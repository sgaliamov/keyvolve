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7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45"/>
        <table:table-column table:style-name="co1" table:default-cell-style-name="ce98"/>
        <table:table-column table:style-name="co1" table:default-cell-style-name="ce4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12" calcext:value-type="float">
            <text:p>12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4" calcext:value-type="float">
            <text:p>4</text:p>
          </table:table-cell>
          <table:table-cell table:style-name="ce176" office:value-type="float" office:value="11" calcext:value-type="float">
            <text:p>1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3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1" table:formula="of:=SUM([.B8:.F10])-[.B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69" table:formula="of:=SUM([.H8:.L10])-[.I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11" table:formula="of:=SUM([.N8:.R10])-[.P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69" table:formula="of:=SUM([.T8:.X10])-[.W8]" office:value-type="float" office:value="99" calcext:value-type="float" table:number-columns-spanned="2" table:number-rows-spanned="1">
            <text:p>99</text:p>
          </table:table-cell>
          <table:covered-table-cell table:style-name="ce26"/>
          <table:table-cell table:style-name="ce47" table:number-columns-repeated="4"/>
          <table:table-cell table:style-name="ce11" table:formula="of:=SUM([.Z8:.AD10])-[.AD8]" office:value-type="float" office:value="94" calcext:value-type="float" table:number-columns-spanned="2" table:number-rows-spanned="1">
            <text:p>94</text:p>
          </table:table-cell>
          <table:covered-table-cell table:style-name="ce26"/>
          <table:table-cell table:style-name="ce47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14" calcext:value-type="float">
            <text:p>14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71" table:formula="of:=[.$AF$3]+[.$U$5]" office:value-type="float" office:value="6" calcext:value-type="float">
            <text:p>6</text:p>
          </table:table-cell>
          <table:table-cell table:style-name="ce12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+[.$U$5]" office:value-type="float" office:value="6" calcext:value-type="float">
            <text:p>6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2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2]" office:value-type="float" office:value="7" calcext:value-type="float">
            <text:p>7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" calcext:value-type="string">
            <text:p>"0": { "0": 14, "1": 2, "2": 1, "3": 0, "4": 11, "5": 6, "6": 4, "7": 3, "8": 1, "9": 11, "10": 14, "11": 12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" calcext:value-type="string">
            <text:p>"1": { "0": 6, "1": 6, "2": 1, "3": 1, "4": 10, "5": 6, "6": 3, "7": 2, "8": 0, "9": 10, "10": 15, "11": 11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14" calcext:value-type="float">
            <text:p>14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81" table:formula="of:=[.$AG$4]+[.$U$2]+[.$U$4]" office:value-type="float" office:value="11" calcext:value-type="float">
            <text:p>11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138" table:formula="of:=[.$AH$4]+[.$U$2]+[.$U$4]" office:value-type="float" office:value="10" calcext:value-type="float">
            <text:p>10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" calcext:value-type="string">
            <text:p>"2": { "0": 6, "1": 2, "2": 3, "3": 1, "4": 10, "5": 5, "6": 2, "7": 2, "8": 0, "9": 10, "10": 15, "11": 12, "12": 10, "13": 7, "14": 14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" calcext:value-type="string">
            <text:p>"3": { "0": 5, "1": 2, "2": 1, "3": 7, "4": 11, "5": 6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4": { "0": 7, "1": 3, "2": 2, "3": 1, "4": 13, "5": 7, "6": 3, "7": 2, "8": 1, "9": 11, "10": 15, "11": 12, "12": 11, "13": 6, "14": 1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1" calcext:value-type="string">
            <text:p>"9": 11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8" table:formula="of:=SUM([.B16:.F18])-[.B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16:.L18])-[.I17]" office:value-type="float" office:value="113" calcext:value-type="float" table:number-columns-spanned="2" table:number-rows-spanned="1">
            <text:p>11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N16:.R18])-[.P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T16:.X18])-[.W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Z16:.AD18])-[.AD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105" table:formula="of:=[.$AJ$2]+[.$U$4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89" table:formula="of:=[.$AG$2]+[.$U$2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53" table:formula="of:=[.$AI$2]+[.$U$5]" office:value-type="float" office:value="8" calcext:value-type="float">
            <text:p>8</text:p>
          </table:table-cell>
          <table:table-cell table:style-name="ce53" table:formula="of:=[.$AJ$2]+[.$U$5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31" table:formula="of:=[.$AG$2]+[.$U$3]" office:value-type="float" office:value="8" calcext:value-type="float">
            <text:p>8</text:p>
          </table:table-cell>
          <table:table-cell table:style-name="ce92" table:formula="of:=[.$AH$2]+[.$U$2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149" table:formula="of:=[.$AF$2]+[.$U$5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109"/>
          <table:table-cell table:style-name="ce149" table:formula="of:=[.$AF$2]+[.$U$4]+[.$U$5]" office:value-type="float" office:value="16" calcext:value-type="float">
            <text:p>16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41" table:formula="of:=[.$AH$2]+[.$U$5]" office:value-type="float" office:value="4" calcext:value-type="float">
            <text:p>4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" calcext:value-type="string">
            <text:p>"5": { "0": 15, "1": 7, "2": 4, "3": 8, "4": 14, "5": 5, "6": 2, "7": 1, "8": 0, "9": 11, "10": 13, "11": 11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0" table:formula="of:=[.$AG$3]" office:value-type="float" office:value="2" calcext:value-type="float">
            <text:p>2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20"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0" calcext:value-type="float">
            <text:p>10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" calcext:value-type="string">
            <text:p>"6": { "0": 16, "1": 7, "2": 3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13" calcext:value-type="float">
            <text:p>13</text:p>
          </table:table-cell>
          <table:table-cell table:style-name="ce29" table:formula="of:=[.$AG$4]+[.$U$3]" office:value-type="float" office:value="11" calcext:value-type="float">
            <text:p>11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106" table:formula="of:=[.$AJ$4]+[.$U$4]" office:value-type="float" office:value="12" calcext:value-type="float">
            <text:p>12</text:p>
          </table:table-cell>
          <table:table-cell table:style-name="ce110"/>
          <table:table-cell table:style-name="ce75" table:formula="of:=[.$AF$4]+[.$U$5]" office:value-type="float" office:value="13" calcext:value-type="float">
            <text:p>13</text:p>
          </table:table-cell>
          <table:table-cell table:style-name="ce81" table:formula="of:=[.$AG$4]+[.$U$2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51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138" table:formula="of:=[.$AH$4]+[.$U$2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38" table:formula="of:=[.$AH$4]+[.$U$3]" office:value-type="float" office:value="10" calcext:value-type="float">
            <text:p>10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+[.$U$4]" office:value-type="float" office:value="14" calcext:value-type="float">
            <text:p>14</text:p>
          </table:table-cell>
          <table:table-cell table:style-name="ce163" table:formula="of:=[.$AG$4]+[.$U$5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" calcext:value-type="string">
            <text:p>"7": { "0": 16, "1": 8, "2": 4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" calcext:value-type="string">
            <text:p>"8": { "0": 15, "1": 7, "2": 3, "3": 8, "4": 14, "5": 5, "6": 2, "7": 1, "8": 0, "9": 11, "10": 13, "11": 10, "12": 10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V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8" table:formula="of:=SUM([.B24:.F26])-[.B26]" office:value-type="float" office:value="93" calcext:value-type="float" table:number-columns-spanned="2" table:number-rows-spanned="1">
            <text:p>9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24:.L26])-[.I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101" calcext:value-type="float" table:number-columns-spanned="2" table:number-rows-spanned="1">
            <text:p>101</text:p>
          </table:table-cell>
          <table:covered-table-cell table:style-name="ce98"/>
          <table:table-cell table:style-name="ce98" table:number-columns-repeated="4"/>
          <table:table-cell table:style-name="ce18" table:formula="of:=SUM([.T24:.X26])-[.W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96" calcext:value-type="float" table:number-columns-spanned="2" table:number-rows-spanned="1">
            <text:p>96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16" calcext:value-type="float">
            <text:p>16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41" table:formula="of:=[.$AH$2]+[.$U$5]+[.$U$4]" office:value-type="float" office:value="5" calcext:value-type="float">
            <text:p>5</text:p>
          </table:table-cell>
          <table:table-cell table:style-name="ce53" table:formula="of:=[.$AI$2]+[.$U$4]+[.$U$5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89" table:formula="of:=[.$AG$2]+[.$U$2]+[.$U$4]" office:value-type="float" office:value="8" calcext:value-type="float">
            <text:p>8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49" table:formula="of:=[.$AI$2]+[.$U$5]+[.$U$4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89" table:formula="of:=[.$AG$2]+[.$U$3]+[.$U$4]" office:value-type="float" office:value="9" calcext:value-type="float">
            <text:p>9</text:p>
          </table:table-cell>
          <table:table-cell table:style-name="ce92" table:formula="of:=[.$AH$2]+[.$U$2]+[.$U$4]" office:value-type="float" office:value="5" calcext:value-type="float">
            <text:p>5</text:p>
          </table:table-cell>
          <table:table-cell table:style-name="ce105" table:formula="of:=[.$AI$2]+[.$U$3]+[.$U$4]" office:value-type="float" office:value="10" calcext:value-type="float">
            <text:p>10</text:p>
          </table:table-cell>
          <table:table-cell table:style-name="ce105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+[.$U$3]+[.$U$4]" office:value-type="float" office:value="9" calcext:value-type="float">
            <text:p>9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4]+[.$U$2]" office:value-type="float" office:value="15" calcext:value-type="float">
            <text:p>15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165" table:formula="of:=[.$AH$2]+[.$U$3]+[.$U$4]" office:value-type="float" office:value="6" calcext:value-type="float">
            <text:p>6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2]+[.$U$4]" office:value-type="float" office:value="15" calcext:value-type="float">
            <text:p>1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" calcext:value-type="string">
            <text:p>"10": { "0": 16, "1": 9, "2": 5, "3": 9, "4": 16, "5": 6, "6": 3, "7": 2, "8": 1, "9": 12, "10": 12, "11": 2, "12": 1, "13": 0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32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54" table:formula="of:=[.$AI$3]+[.$U$5]" office:value-type="float" office:value="1" calcext:value-type="float">
            <text:p>1</text:p>
          </table:table-cell>
          <table:table-cell table:style-name="ce46" table:formula="of:=[.$AJ$3]+[.$U$4]+[.$U$5]" office:value-type="float" office:value="12" calcext:value-type="float">
            <text:p>12</text:p>
          </table:table-cell>
          <table:table-cell/>
          <table:table-cell table:style-name="ce79" table:formula="of:=[.$AF$3]+[.$U$3]" office:value-type="float" office:value="7" calcext:value-type="float">
            <text:p>7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04" table:formula="of:=[.$AJ$3]+[.$U$3]" office:value-type="float" office:value="12" calcext:value-type="float">
            <text:p>12</text:p>
          </table:table-cell>
          <table:table-cell/>
          <table:table-cell table:style-name="ce13" table:formula="of:=[.$AF$3]+[.$U$3]" office:value-type="float" office:value="7" calcext:value-type="float">
            <text:p>7</text:p>
          </table:table-cell>
          <table:table-cell table:formula="of:=[.$AG$3]+[.$U$3]" office:value-type="float" office:value="4" calcext:value-type="float">
            <text:p>4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12" calcext:value-type="float">
            <text:p>12</text:p>
          </table:table-cell>
          <table:table-cell table:style-name="ce98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9" table:formula="of:=[.$AF$3]+[.$U$4]+[.$U$3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" calcext:value-type="string">
            <text:p>"11": { "0": 17, "1": 8, "2": 5, "3": 9, "4": 16, "5": 7, "6": 3, "7": 1, "8": 1, "9": 12, "10": 5, "11": 9, "12": 1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12" calcext:value-type="float">
            <text:p>12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style-name="ce12" table:formula="of:=[.$AG$4]" office:value-type="float" office:value="9" calcext:value-type="float">
            <text:p>9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4]" office:value-type="float" office:value="8" calcext:value-type="float">
            <text:p>8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4]" office:value-type="float" office:value="4" calcext:value-type="float">
            <text:p>4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1" calcext:value-type="float">
            <text:p>1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" calcext:value-type="string">
            <text:p>"12": { "0": 17, "1": 9, "2": 5, "3": 10, "4": 16, "5": 7, "6": 4, "7": 2, "8": 2, "9": 12, "10": 5, "11": 2, "12": 8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" calcext:value-type="string">
            <text:p>"13": { "0": 17, "1": 9, "2": 5, "3": 9, "4": 15, "5": 6, "6": 2, "7": 1, "8": 1, "9": 11, "10": 5, "11": 2, "12": 1, "13": 4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11" calcext:value-type="string">
            <text:p>"9": 11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9" calcext:value-type="string">
            <text:p>"11": 9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, 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, 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}" calcext:value-type="string">
            <text:p>{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, 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, 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_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98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69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2" calcext:value-type="float">
            <text:p>2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178"/>
          <table:table-cell table:style-name="ce178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178"/>
          <table:table-cell table:style-name="ce178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178"/>
          <table:table-cell table:style-name="ce178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178"/>
          <table:table-cell table:style-name="ce178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178"/>
          <table:table-cell table:style-name="ce17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98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98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98"/>
          <table:table-cell table:style-name="ce98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98"/>
          <table:table-cell table:style-name="ce98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98"/>
          <table:table-cell table:style-name="ce98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2" calcext:value-type="float">
            <text:p>2</text:p>
          </table:table-cell>
          <table:table-cell table:style-name="ce98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98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98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98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18:26:46.00939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0T22:31:49.928116200</dc:date>
    <meta:generator>LibreOffice/26.2.0.3$Windows_X86_64 LibreOffice_project/620$Build-3</meta:generator>
    <meta:editing-duration>P1DT3H51M39S</meta:editing-duration>
    <meta:editing-cycles>355</meta:editing-cycles>
    <meta:document-statistic meta:table-count="2" meta:cell-count="1082" meta:object-count="0"/>
    <meta:user-defined meta:name="AppVersion">16.0300</meta:user-defined>
  </office:meta>
</office:document-meta>
</file>
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16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153"/>
        <table:table-column table:style-name="co1" table:default-cell-style-name="ce98"/>
        <table:table-column table:style-name="co1" table:default-cell-style-name="ce4"/>
        <table:table-column table:style-name="co1" table:default-cell-style-name="Default"/>
        <table:table-column table:style-name="co1" table:default-cell-style-name="ce146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143"/>
        <table:table-column table:style-name="co1" table:default-cell-style-name="ce78"/>
        <table:table-column table:style-name="co1" table:default-cell-style-name="ce153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3" table:default-cell-style-name="Default"/>
        <table:table-column table:style-name="co1" table:default-cell-style-name="ce153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9" office:value-type="float" office:value="14" calcext:value-type="float">
            <text:p>14</text:p>
          </table:table-cell>
          <table:table-cell table:style-name="ce172" office:value-type="float" office:value="6" calcext:value-type="float">
            <text:p>6</text:p>
          </table:table-cell>
          <table:table-cell table:style-name="ce175" office:value-type="float" office:value="3" calcext:value-type="float">
            <text:p>3</text:p>
          </table:table-cell>
          <table:table-cell table:style-name="ce176" office:value-type="float" office:value="7" calcext:value-type="float">
            <text:p>7</text:p>
          </table:table-cell>
          <table:table-cell table:style-name="ce169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0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8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71" office:value-type="float" office:value="12" calcext:value-type="float">
            <text:p>12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4" calcext:value-type="float">
            <text:p>4</text:p>
          </table:table-cell>
          <table:table-cell table:style-name="ce179" office:value-type="float" office:value="11" calcext:value-type="float">
            <text:p>1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3"/>
          <table:table-cell table:style-name="ce159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1" table:formula="of:=SUM([.B8:.F10])-[.B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69" table:formula="of:=SUM([.H8:.L10])-[.I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11" table:formula="of:=SUM([.N8:.R10])-[.P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69" table:formula="of:=SUM([.T8:.X10])-[.W8]" office:value-type="float" office:value="99" calcext:value-type="float" table:number-columns-spanned="2" table:number-rows-spanned="1">
            <text:p>99</text:p>
          </table:table-cell>
          <table:covered-table-cell table:style-name="ce26"/>
          <table:table-cell table:style-name="ce47" table:number-columns-repeated="4"/>
          <table:table-cell table:style-name="ce11" table:formula="of:=SUM([.Z8:.AD10])-[.AD8]" office:value-type="float" office:value="94" calcext:value-type="float" table:number-columns-spanned="2" table:number-rows-spanned="1">
            <text:p>94</text:p>
          </table:table-cell>
          <table:covered-table-cell table:style-name="ce26"/>
          <table:table-cell table:style-name="ce47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" table:formula="of:=[.$AF$2]" office:value-type="float" office:value="14" calcext:value-type="float">
            <text:p>14</text:p>
          </table:table-cell>
          <table:table-cell table:style-name="ce143" table:formula="of:=[.$AG$3]" office:value-type="float" office:value="2" calcext:value-type="float">
            <text:p>2</text:p>
          </table:table-cell>
          <table:table-cell table:style-name="ce146" table:formula="of:=[.$AH$3]" office:value-type="float" office:value="1" calcext:value-type="float">
            <text:p>1</text:p>
          </table:table-cell>
          <table:table-cell table:style-name="ce153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71" table:formula="of:=[.$AF$3]+[.$U$5]" office:value-type="float" office:value="6" calcext:value-type="float">
            <text:p>6</text:p>
          </table:table-cell>
          <table:table-cell table:style-name="ce9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53" table:formula="of:=[.$AJ$3]" office:value-type="float" office:value="10" calcext:value-type="float">
            <text:p>10</text:p>
          </table:table-cell>
          <table:table-cell/>
          <table:table-cell table:style-name="ce137" table:formula="of:=[.$AF$3]+[.$U$5]" office:value-type="float" office:value="6" calcext:value-type="float">
            <text:p>6</text:p>
          </table:table-cell>
          <table:table-cell table:formula="of:=[.$AG$3]" office:value-type="float" office:value="2" calcext:value-type="float">
            <text:p>2</text:p>
          </table:table-cell>
          <table:table-cell table:style-name="ce9" table:formula="of:=[.$AH$2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53" table:formula="of:=[.$AJ$3]" office:value-type="float" office:value="10" calcext:value-type="float">
            <text:p>10</text:p>
          </table:table-cell>
          <table:table-cell table:style-name="ce98"/>
          <table:table-cell table:style-name="ce137" table:formula="of:=[.$AF$3]" office:value-type="float" office:value="5" calcext:value-type="float">
            <text:p>5</text:p>
          </table:table-cell>
          <table:table-cell table:style-name="ce143" table:formula="of:=[.$AG$3]" office:value-type="float" office:value="2" calcext:value-type="float">
            <text:p>2</text:p>
          </table:table-cell>
          <table:table-cell table:style-name="ce146" table:formula="of:=[.$AH$3]" office:value-type="float" office:value="1" calcext:value-type="float">
            <text:p>1</text:p>
          </table:table-cell>
          <table:table-cell table:style-name="ce9" table:formula="of:=[.$AI$2]" office:value-type="float" office:value="7" calcext:value-type="float">
            <text:p>7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60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153" table:formula="of:=[.$AI$3]+[.$U$2]" office:value-type="float" office:value="1" calcext:value-type="float">
            <text:p>1</text:p>
          </table:table-cell>
          <table:table-cell table:style-name="ce9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" calcext:value-type="string">
            <text:p>"0": { "0": 14, "1": 2, "2": 1, "3": 0, "4": 11, "5": 6, "6": 4, "7": 3, "8": 1, "9": 11, "10": 14, "11": 12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7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43" table:formula="of:=[.$AG$3]+[.$U$2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153" table:formula="of:=[.$AI$3]" office:value-type="float" office:value="0" calcext:value-type="float">
            <text:p>0</text:p>
          </table:table-cell>
          <table:table-cell table:style-name="ce153" table:formula="of:=[.$AJ$3]" office:value-type="float" office:value="10" calcext:value-type="float">
            <text:p>10</text:p>
          </table:table-cell>
          <table:table-cell table:style-name="ce52"/>
          <table:table-cell table:style-name="ce137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46" table:formula="of:=[.$AH$3]+[.$U$2]" office:value-type="float" office:value="2" calcext:value-type="float">
            <text:p>2</text:p>
          </table:table-cell>
          <table:table-cell table:formula="of:=[.$AI$3]" office:value-type="float" office:value="0" calcext:value-type="float">
            <text:p>0</text:p>
          </table:table-cell>
          <table:table-cell table:style-name="ce153" table:formula="of:=[.$AJ$3]" office:value-type="float" office:value="10" calcext:value-type="float">
            <text:p>10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60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153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60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153" table:formula="of:=[.$AI$3]+[.$U$2]" office:value-type="float" office:value="1" calcext:value-type="float">
            <text:p>1</text:p>
          </table:table-cell>
          <table:table-cell table:style-name="ce153" table:formula="of:=[.$AJ$3]+[.$U$2]" office:value-type="float" office:value="11" calcext:value-type="float">
            <text:p>11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" calcext:value-type="string">
            <text:p>"1": { "0": 6, "1": 6, "2": 1, "3": 1, "4": 10, "5": 6, "6": 3, "7": 2, "8": 0, "9": 10, "10": 15, "11": 11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21" table:formula="of:=[.$AF$4]+[.$U$2]+[.$U$4]" office:value-type="float" office:value="14" calcext:value-type="float">
            <text:p>14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50" table:formula="of:=[.$AG$4]+[.$U$2]+[.$U$4]" office:value-type="float" office:value="11" calcext:value-type="float">
            <text:p>11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80" table:formula="of:=[.$AH$4]+[.$U$2]+[.$U$4]" office:value-type="float" office:value="10" calcext:value-type="float">
            <text:p>10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51" table:formula="of:=[.$AI$4]+[.$U$2]+[.$U$4]" office:value-type="float" office:value="6" calcext:value-type="float">
            <text:p>6</text:p>
          </table:table-cell>
          <table:table-cell table:style-name="ce151" table:formula="of:=[.$AJ$4]+[.$U$2]+[.$U$4]" office:value-type="float" office:value="13" calcext:value-type="float">
            <text:p>13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51" table:formula="of:=[.$AI$4]+[.$U$2]+[.$U$4]" office:value-type="float" office:value="6" calcext:value-type="float">
            <text:p>6</text:p>
          </table:table-cell>
          <table:table-cell table:style-name="ce151" table:formula="of:=[.$AJ$4]+[.$U$2]+[.$U$4]" office:value-type="float" office:value="13" calcext:value-type="float">
            <text:p>1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" calcext:value-type="string">
            <text:p>"2": { "0": 6, "1": 2, "2": 3, "3": 1, "4": 10, "5": 5, "6": 2, "7": 2, "8": 0, "9": 10, "10": 15, "11": 12, "12": 10, "13": 7, "14": 14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" calcext:value-type="string">
            <text:p>"3": { "0": 5, "1": 2, "2": 1, "3": 7, "4": 11, "5": 6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7, &quot;1&quot;: 3, &quot;2&quot;: 2, &quot;3&quot;: 1, &quot;4&quot;: 13, &quot;5&quot;: 7, `, &quot;7&quot;: 2, &quot;8&quot;: 1, &quot;9&quot;: 11, &quot;10&quot;: 15, &quot;11&quot;: 12, &quot;12&quot;: 11, &quot;13&quot;: 6, &quot;14&quot;: 13}" calcext:value-type="string">
            <text:p>"4": { "0": 7, "1": 3, "2": 2, "3": 1, "4": 13, "5": 7, `, "7": 2, "8": 1, "9": 11, "10": 15, "11": 12, "12": 11, "13": 6, "14": 1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office:value-type="string" calcext:value-type="string">
            <text:p>`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1" calcext:value-type="string">
            <text:p>"9": 11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`, &quot;7&quot;: 2, &quot;8&quot;: 1, &quot;9&quot;: 11, &quot;10&quot;: 15, &quot;11&quot;: 12, &quot;12&quot;: 11, &quot;13&quot;: 6, &quot;14&quot;: 13}" calcext:value-type="string">
            <text:p>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`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8" table:formula="of:=SUM([.B16:.F18])-[.B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16:.L18])-[.I17]" office:value-type="float" office:value="113" calcext:value-type="float" table:number-columns-spanned="2" table:number-rows-spanned="1">
            <text:p>11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N16:.R18])-[.P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T16:.X18])-[.W17]" office:value-type="float" office:value="115" calcext:value-type="float" table:number-columns-spanned="2" table:number-rows-spanned="1">
            <text:p>115</text:p>
          </table:table-cell>
          <table:covered-table-cell table:style-name="ce98"/>
          <table:table-cell table:style-name="ce98" table:number-columns-repeated="4"/>
          <table:table-cell table:style-name="ce18" table:formula="of:=SUM([.Z16:.AD18])-[.AD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35" table:formula="of:=[.$AF$2]+[.$U$2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105" table:formula="of:=[.$AJ$2]+[.$U$4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65" table:formula="of:=[.$AG$2]+[.$U$2]" office:value-type="float" office:value="7" calcext:value-type="float">
            <text:p>7</text:p>
          </table:table-cell>
          <table:table-cell table:style-name="ce121" table:formula="of:=[.$AH$2]" office:value-type="float" office:value="3" calcext:value-type="float">
            <text:p>3</text:p>
          </table:table-cell>
          <table:table-cell table:style-name="ce53" table:formula="of:=[.$AI$2]+[.$U$5]" office:value-type="float" office:value="8" calcext:value-type="float">
            <text:p>8</text:p>
          </table:table-cell>
          <table:table-cell table:style-name="ce53" table:formula="of:=[.$AJ$2]+[.$U$5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31" table:formula="of:=[.$AG$2]+[.$U$3]" office:value-type="float" office:value="8" calcext:value-type="float">
            <text:p>8</text:p>
          </table:table-cell>
          <table:table-cell table:style-name="ce121" table:formula="of:=[.$AH$2]+[.$U$2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154" table:formula="of:=[.$AF$2]+[.$U$5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121" table:formula="of:=[.$AH$2]" office:value-type="float" office:value="3" calcext:value-type="float">
            <text:p>3</text:p>
          </table:table-cell>
          <table:table-cell table:style-name="ce133" table:formula="of:=[.$AI$2]+[.$U$2]" office:value-type="float" office:value="8" calcext:value-type="float">
            <text:p>8</text:p>
          </table:table-cell>
          <table:table-cell table:style-name="ce133" table:formula="of:=[.$AJ$2]+[.$U$2]" office:value-type="float" office:value="14" calcext:value-type="float">
            <text:p>14</text:p>
          </table:table-cell>
          <table:table-cell table:style-name="ce109"/>
          <table:table-cell table:style-name="ce154" table:formula="of:=[.$AF$2]+[.$U$4]+[.$U$5]" office:value-type="float" office:value="16" calcext:value-type="float">
            <text:p>16</text:p>
          </table:table-cell>
          <table:table-cell table:style-name="ce165" table:formula="of:=[.$AG$2]+[.$U$5]" office:value-type="float" office:value="7" calcext:value-type="float">
            <text:p>7</text:p>
          </table:table-cell>
          <table:table-cell table:style-name="ce41" table:formula="of:=[.$AH$2]+[.$U$5]" office:value-type="float" office:value="4" calcext:value-type="float">
            <text:p>4</text:p>
          </table:table-cell>
          <table:table-cell table:style-name="ce133" table:formula="of:=[.$AI$2]+[.$U$2]" office:value-type="float" office:value="8" calcext:value-type="float">
            <text:p>8</text:p>
          </table:table-cell>
          <table:table-cell table:style-name="ce133" table:formula="of:=[.$AJ$2]+[.$U$2]" office:value-type="float" office:value="14" calcext:value-type="float">
            <text:p>1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" calcext:value-type="string">
            <text:p>"5": { "0": 15, "1": 7, "2": 4, "3": 8, "4": 14, "5": 5, "6": 2, "7": 1, "8": 0, "9": 11, "10": 13, "11": 11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50" table:formula="of:=[.$AF$3]" office:value-type="float" office:value="5" calcext:value-type="float">
            <text:p>5</text:p>
          </table:table-cell>
          <table:table-cell table:style-name="ce143" table:formula="of:=[.$AG$3]" office:value-type="float" office:value="2" calcext:value-type="float">
            <text:p>2</text:p>
          </table:table-cell>
          <table:table-cell table:style-name="ce146" table:formula="of:=[.$AH$3]" office:value-type="float" office:value="1" calcext:value-type="float">
            <text:p>1</text:p>
          </table:table-cell>
          <table:table-cell table:style-name="ce153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137" table:formula="of:=[.$AF$3]" office:value-type="float" office:value="5" calcext:value-type="float">
            <text:p>5</text:p>
          </table:table-cell>
          <table:table-cell table:style-name="ce150" table:formula="of:=[.$AG$3]" office:value-type="float" office:value="2" calcext:value-type="float">
            <text:p>2</text:p>
          </table:table-cell>
          <table:table-cell table:formula="of:=[.$AH$3]" office:value-type="float" office:value="1" calcext:value-type="float">
            <text:p>1</text:p>
          </table:table-cell>
          <table:table-cell table:style-name="ce153" table:formula="of:=[.$AI$3]" office:value-type="float" office:value="0" calcext:value-type="float">
            <text:p>0</text:p>
          </table:table-cell>
          <table:table-cell table:style-name="ce153" table:formula="of:=[.$AJ$3]" office:value-type="float" office:value="10" calcext:value-type="float">
            <text:p>10</text:p>
          </table:table-cell>
          <table:table-cell table:style-name="ce52"/>
          <table:table-cell table:style-name="ce137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50"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153" table:formula="of:=[.$AJ$3]" office:value-type="float" office:value="10" calcext:value-type="float">
            <text:p>10</text:p>
          </table:table-cell>
          <table:table-cell table:style-name="ce52"/>
          <table:table-cell table:style-name="ce137" table:formula="of:=[.$AF$3]" office:value-type="float" office:value="5" calcext:value-type="float">
            <text:p>5</text:p>
          </table:table-cell>
          <table:table-cell table:style-name="ce143" table:formula="of:=[.$AG$3]" office:value-type="float" office:value="2" calcext:value-type="float">
            <text:p>2</text:p>
          </table:table-cell>
          <table:table-cell table:style-name="ce146" table:formula="of:=[.$AH$3]" office:value-type="float" office:value="1" calcext:value-type="float">
            <text:p>1</text:p>
          </table:table-cell>
          <table:table-cell table:style-name="ce150" table:formula="of:=[.$AI$3]" office:value-type="float" office:value="0" calcext:value-type="float">
            <text:p>0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60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153" table:formula="of:=[.$AI$3]+[.$U$2]" office:value-type="float" office:value="1" calcext:value-type="float">
            <text:p>1</text:p>
          </table:table-cell>
          <table:table-cell table:style-name="ce150" table:formula="of:=[.$AJ$3]" office:value-type="float" office:value="10" calcext:value-type="float">
            <text:p>10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" calcext:value-type="string">
            <text:p>"6": { "0": 16, "1": 7, "2": 3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1" table:formula="of:=[.$AF$4]+[.$U$2]" office:value-type="float" office:value="13" calcext:value-type="float">
            <text:p>13</text:p>
          </table:table-cell>
          <table:table-cell table:style-name="ce29" table:formula="of:=[.$AG$4]+[.$U$3]" office:value-type="float" office:value="11" calcext:value-type="float">
            <text:p>11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106" table:formula="of:=[.$AJ$4]+[.$U$4]" office:value-type="float" office:value="12" calcext:value-type="float">
            <text:p>12</text:p>
          </table:table-cell>
          <table:table-cell table:style-name="ce110"/>
          <table:table-cell table:style-name="ce75" table:formula="of:=[.$AF$4]+[.$U$5]" office:value-type="float" office:value="13" calcext:value-type="float">
            <text:p>13</text:p>
          </table:table-cell>
          <table:table-cell table:style-name="ce50" table:formula="of:=[.$AG$4]+[.$U$2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51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80" table:formula="of:=[.$AH$4]+[.$U$2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151" table:formula="of:=[.$AI$4]+[.$U$2]" office:value-type="float" office:value="5" calcext:value-type="float">
            <text:p>5</text:p>
          </table:table-cell>
          <table:table-cell table:style-name="ce151" table:formula="of:=[.$AJ$4]+[.$U$2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+[.$U$4]" office:value-type="float" office:value="14" calcext:value-type="float">
            <text:p>14</text:p>
          </table:table-cell>
          <table:table-cell table:style-name="ce166" table:formula="of:=[.$AG$4]+[.$U$5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51" table:formula="of:=[.$AI$4]+[.$U$2]" office:value-type="float" office:value="5" calcext:value-type="float">
            <text:p>5</text:p>
          </table:table-cell>
          <table:table-cell table:style-name="ce151" table:formula="of:=[.$AJ$4]+[.$U$2]" office:value-type="float" office:value="12" calcext:value-type="float">
            <text:p>1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" calcext:value-type="string">
            <text:p>"7": { "0": 16, "1": 8, "2": 4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7, &quot;2&quot;: 3, &quot;3&quot;: 8, &quot;4&quot;: 14, &quot;5&quot;: 5, &quot;6&quot;: 2, &quot;7&quot;: 1, &quot;8&quot;: 0, &quot;9&quot;: 11, &quot;10&quot;: 13, &quot;11&quot;: 10, &quot;12&quot;: 9, &quot;13&quot;: 5, &quot;14&quot;: 12}" calcext:value-type="string">
            <text:p>"8": { "0": 15, "1": 7, "2": 3, "3": 8, "4": 14, "5": 5, "6": 2, "7": 1, "8": 0, "9": 11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V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9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9, "13": 5, "14": 12}, 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8" table:formula="of:=SUM([.B24:.F26])-[.B26]" office:value-type="float" office:value="93" calcext:value-type="float" table:number-columns-spanned="2" table:number-rows-spanned="1">
            <text:p>9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24:.L26])-[.I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101" calcext:value-type="float" table:number-columns-spanned="2" table:number-rows-spanned="1">
            <text:p>101</text:p>
          </table:table-cell>
          <table:covered-table-cell table:style-name="ce98"/>
          <table:table-cell table:style-name="ce98" table:number-columns-repeated="4"/>
          <table:table-cell table:style-name="ce18" table:formula="of:=SUM([.T24:.X26])-[.W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/>
          <table:table-cell table:style-name="ce152"/>
          <table:table-cell table:style-name="ce98" table:number-columns-repeated="2"/>
          <table:table-cell table:style-name="ce128" table:formula="of:=SUM([.Z24:.AD26])-[.AD26]" office:value-type="float" office:value="96" calcext:value-type="float" table:number-columns-spanned="2" table:number-rows-spanned="1">
            <text:p>96</text:p>
          </table:table-cell>
          <table:covered-table-cell table:style-name="ce98"/>
          <table:table-cell table:style-name="ce98"/>
          <table:table-cell table:style-name="ce152"/>
          <table:table-cell table:style-name="ce98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35" table:formula="of:=[.$AF$2]+[.$U$2]+[.$U$4]" office:value-type="float" office:value="16" calcext:value-type="float">
            <text:p>16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41" table:formula="of:=[.$AH$2]+[.$U$5]+[.$U$4]" office:value-type="float" office:value="5" calcext:value-type="float">
            <text:p>5</text:p>
          </table:table-cell>
          <table:table-cell table:style-name="ce53" table:formula="of:=[.$AI$2]+[.$U$4]+[.$U$5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65" table:formula="of:=[.$AG$2]+[.$U$2]+[.$U$4]" office:value-type="float" office:value="8" calcext:value-type="float">
            <text:p>8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49" table:formula="of:=[.$AI$2]+[.$U$5]+[.$U$4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35" table:formula="of:=[.$AF$2]+[.$U$3]+[.$U$4]" office:value-type="float" office:value="17" calcext:value-type="float">
            <text:p>17</text:p>
          </table:table-cell>
          <table:table-cell table:style-name="ce65" table:formula="of:=[.$AG$2]+[.$U$3]+[.$U$4]" office:value-type="float" office:value="9" calcext:value-type="float">
            <text:p>9</text:p>
          </table:table-cell>
          <table:table-cell table:style-name="ce121" table:formula="of:=[.$AH$2]+[.$U$2]+[.$U$4]" office:value-type="float" office:value="5" calcext:value-type="float">
            <text:p>5</text:p>
          </table:table-cell>
          <table:table-cell table:style-name="ce133" table:formula="of:=[.$AI$2]+[.$U$3]+[.$U$4]" office:value-type="float" office:value="10" calcext:value-type="float">
            <text:p>10</text:p>
          </table:table-cell>
          <table:table-cell table:style-name="ce133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+[.$U$3]+[.$U$4]" office:value-type="float" office:value="9" calcext:value-type="float">
            <text:p>9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133" table:formula="of:=[.$AI$2]+[.$U$2]+[.$U$4]" office:value-type="float" office:value="9" calcext:value-type="float">
            <text:p>9</text:p>
          </table:table-cell>
          <table:table-cell table:style-name="ce133" table:formula="of:=[.$AJ$2]+[.$U$4]+[.$U$2]" office:value-type="float" office:value="15" calcext:value-type="float">
            <text:p>15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168" table:formula="of:=[.$AH$2]+[.$U$3]+[.$U$4]" office:value-type="float" office:value="6" calcext:value-type="float">
            <text:p>6</text:p>
          </table:table-cell>
          <table:table-cell table:style-name="ce133" table:formula="of:=[.$AI$2]+[.$U$2]+[.$U$4]" office:value-type="float" office:value="9" calcext:value-type="float">
            <text:p>9</text:p>
          </table:table-cell>
          <table:table-cell table:style-name="ce133" table:formula="of:=[.$AJ$2]+[.$U$2]+[.$U$4]" office:value-type="float" office:value="15" calcext:value-type="float">
            <text:p>1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" calcext:value-type="string">
            <text:p>"10": { "0": 16, "1": 9, "2": 5, "3": 9, "4": 16, "5": 6, "6": 3, "7": 2, "8": 1, "9": 12, "10": 12, "11": 2, "12": 1, "13": 0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7" table:formula="of:=[.$AF$3]+[.$U$2]" office:value-type="float" office:value="6" calcext:value-type="float">
            <text:p>6</text:p>
          </table:table-cell>
          <table:table-cell table:style-name="ce32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54" table:formula="of:=[.$AI$3]+[.$U$5]" office:value-type="float" office:value="1" calcext:value-type="float">
            <text:p>1</text:p>
          </table:table-cell>
          <table:table-cell table:style-name="ce46" table:formula="of:=[.$AJ$3]+[.$U$4]+[.$U$5]" office:value-type="float" office:value="12" calcext:value-type="float">
            <text:p>12</text:p>
          </table:table-cell>
          <table:table-cell/>
          <table:table-cell table:style-name="ce79" table:formula="of:=[.$AF$3]+[.$U$3]" office:value-type="float" office:value="7" calcext:value-type="float">
            <text:p>7</text:p>
          </table:table-cell>
          <table:table-cell table:style-name="ce143" table:formula="of:=[.$AG$3]+[.$U$2]" office:value-type="float" office:value="3" calcext:value-type="float">
            <text:p>3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04" table:formula="of:=[.$AJ$3]+[.$U$3]" office:value-type="float" office:value="12" calcext:value-type="float">
            <text:p>12</text:p>
          </table:table-cell>
          <table:table-cell/>
          <table:table-cell table:style-name="ce137" table:formula="of:=[.$AF$3]+[.$U$3]" office:value-type="float" office:value="7" calcext:value-type="float">
            <text:p>7</text:p>
          </table:table-cell>
          <table:table-cell table:formula="of:=[.$AG$3]+[.$U$3]" office:value-type="float" office:value="4" calcext:value-type="float">
            <text:p>4</text:p>
          </table:table-cell>
          <table:table-cell table:style-name="ce146" table:formula="of:=[.$AH$3]+[.$U$2]" office:value-type="float" office:value="2" calcext:value-type="float">
            <text:p>2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153" table:formula="of:=[.$AJ$3]+[.$U$3]" office:value-type="float" office:value="12" calcext:value-type="float">
            <text:p>12</text:p>
          </table:table-cell>
          <table:table-cell table:style-name="ce98"/>
          <table:table-cell table:style-name="ce71" table:formula="of:=[.$AF$3]+[.$U$5]" office:value-type="float" office:value="6" calcext:value-type="float">
            <text:p>6</text:p>
          </table:table-cell>
          <table:table-cell table:style-name="ce143" table:formula="of:=[.$AG$3]" office:value-type="float" office:value="2" calcext:value-type="float">
            <text:p>2</text:p>
          </table:table-cell>
          <table:table-cell table:style-name="ce146" table:formula="of:=[.$AH$3]" office:value-type="float" office:value="1" calcext:value-type="float">
            <text:p>1</text:p>
          </table:table-cell>
          <table:table-cell table:style-name="ce153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9" table:formula="of:=[.$AF$3]+[.$U$4]+[.$U$3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153" table:formula="of:=[.$AI$3]+[.$U$2]" office:value-type="float" office:value="1" calcext:value-type="float">
            <text:p>1</text:p>
          </table:table-cell>
          <table:table-cell table:style-name="ce153" table:formula="of:=[.$AJ$3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" calcext:value-type="string">
            <text:p>"11": { "0": 17, "1": 8, "2": 5, "3": 9, "4": 16, "5": 7, "6": 3, "7": 1, "8": 1, "9": 12, "10": 5, "11": 9, "12": 1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" table:formula="of:=[.$AF$4]" office:value-type="float" office:value="12" calcext:value-type="float">
            <text:p>12</text:p>
          </table:table-cell>
          <table:table-cell table:style-name="ce143" table:formula="of:=[.$AG$3]" office:value-type="float" office:value="2" calcext:value-type="float">
            <text:p>2</text:p>
          </table:table-cell>
          <table:table-cell table:style-name="ce146" table:formula="of:=[.$AH$3]" office:value-type="float" office:value="1" calcext:value-type="float">
            <text:p>1</text:p>
          </table:table-cell>
          <table:table-cell table:style-name="ce153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137" table:formula="of:=[.$AF$3]" office:value-type="float" office:value="5" calcext:value-type="float">
            <text:p>5</text:p>
          </table:table-cell>
          <table:table-cell table:style-name="ce9" table:formula="of:=[.$AG$4]" office:value-type="float" office:value="9" calcext:value-type="float">
            <text:p>9</text:p>
          </table:table-cell>
          <table:table-cell table:formula="of:=[.$AH$3]" office:value-type="float" office:value="1" calcext:value-type="float">
            <text:p>1</text:p>
          </table:table-cell>
          <table:table-cell table:style-name="ce153" table:formula="of:=[.$AI$3]" office:value-type="float" office:value="0" calcext:value-type="float">
            <text:p>0</text:p>
          </table:table-cell>
          <table:table-cell table:style-name="ce153" table:formula="of:=[.$AJ$3]" office:value-type="float" office:value="10" calcext:value-type="float">
            <text:p>10</text:p>
          </table:table-cell>
          <table:table-cell/>
          <table:table-cell table:style-name="ce137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9" table:formula="of:=[.$AH$4]" office:value-type="float" office:value="8" calcext:value-type="float">
            <text:p>8</text:p>
          </table:table-cell>
          <table:table-cell table:formula="of:=[.$AI$3]" office:value-type="float" office:value="0" calcext:value-type="float">
            <text:p>0</text:p>
          </table:table-cell>
          <table:table-cell table:style-name="ce153" table:formula="of:=[.$AJ$3]" office:value-type="float" office:value="10" calcext:value-type="float">
            <text:p>10</text:p>
          </table:table-cell>
          <table:table-cell table:style-name="ce98"/>
          <table:table-cell table:style-name="ce137" table:formula="of:=[.$AF$3]" office:value-type="float" office:value="5" calcext:value-type="float">
            <text:p>5</text:p>
          </table:table-cell>
          <table:table-cell table:style-name="ce143" table:formula="of:=[.$AG$3]" office:value-type="float" office:value="2" calcext:value-type="float">
            <text:p>2</text:p>
          </table:table-cell>
          <table:table-cell table:style-name="ce146" table:formula="of:=[.$AH$3]" office:value-type="float" office:value="1" calcext:value-type="float">
            <text:p>1</text:p>
          </table:table-cell>
          <table:table-cell table:style-name="ce9" table:formula="of:=[.$AI$4]" office:value-type="float" office:value="4" calcext:value-type="float">
            <text:p>4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60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153" table:formula="of:=[.$AI$3]+[.$U$2]" office:value-type="float" office:value="1" calcext:value-type="float">
            <text:p>1</text:p>
          </table:table-cell>
          <table:table-cell table:style-name="ce9" table:formula="of:=[.$AJ$4]" office:value-type="float" office:value="11" calcext:value-type="float">
            <text:p>1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" calcext:value-type="string">
            <text:p>"12": { "0": 17, "1": 9, "2": 5, "3": 10, "4": 16, "5": 7, "6": 4, "7": 2, "8": 2, "9": 12, "10": 5, "11": 2, "12": 8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" calcext:value-type="string">
            <text:p>"13": { "0": 17, "1": 9, "2": 5, "3": 9, "4": 15, "5": 6, "6": 2, "7": 1, "8": 1, "9": 11, "10": 5, "11": 2, "12": 1, "13": 4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11" calcext:value-type="string">
            <text:p>"9": 11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9" calcext:value-type="string">
            <text:p>"11": 9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`, &quot;7&quot;: 2, &quot;8&quot;: 1, &quot;9&quot;: 11, &quot;10&quot;: 15, &quot;11&quot;: 12, &quot;12&quot;: 11, &quot;13&quot;: 6, &quot;14&quot;: 13}, 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9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, 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}" calcext:value-type="string">
            <text:p>{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`, "7": 2, "8": 1, "9": 11, "10": 15, "11": 12, "12": 11, "13": 6, "14": 13}, 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9, "13": 5, "14": 12}, "9": { "0": 16, "1": 7, "2": 4, "3": 8, "4": 14, "5": 7, "6": 3, "7": 2, "8": 1, "9": 10, "10": 14, "11": 10, "12": 9, "13": 5, "14": 12}, 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18:26:46.00939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8T21:42:40.856120300</dc:date>
    <meta:generator>LibreOffice/26.2.0.3$Windows_X86_64 LibreOffice_project/620$Build-3</meta:generator>
    <meta:editing-duration>PT19H25M52S</meta:editing-duration>
    <meta:editing-cycles>340</meta:editing-cycles>
    <meta:document-statistic meta:table-count="1" meta:cell-count="541" meta:object-count="0"/>
    <meta:user-defined meta:name="AppVersion">16.0300</meta:user-defined>
  </office:meta>
</office:document-meta>
</file>
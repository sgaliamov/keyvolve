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rotation-align="none" style:vertical-align="middle"/>
    </style:style>
    <style:style style:name="ce85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12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0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5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8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9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24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26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3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4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15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style:vertical-align="middle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66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8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9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0" style:family="table-cell" style:parent-style-name="Excel_20_Built-in_20_Neutral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178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79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8"/>
        <table:table-column table:style-name="co1" table:default-cell-style-name="ce70"/>
        <table:table-column table:style-name="co1" table:default-cell-style-name="ce58"/>
        <table:table-column table:style-name="co1" table:default-cell-style-name="ce112"/>
        <table:table-column table:style-name="co1" table:default-cell-style-name="ce45"/>
        <table:table-column table:style-name="co1" table:default-cell-style-name="ce98"/>
        <table:table-column table:style-name="co1" table:default-cell-style-name="ce4"/>
        <table:table-column table:style-name="co1" table:default-cell-style-name="Default"/>
        <table:table-column table:style-name="co1" table:default-cell-style-name="ce36"/>
        <table:table-column table:style-name="co1" table:number-columns-repeated="2" table:default-cell-style-name="ce112"/>
        <table:table-column table:style-name="co1" table:default-cell-style-name="ce98"/>
        <table:table-column table:style-name="co1" table:default-cell-style-name="ce58"/>
        <table:table-column table:style-name="co1" table:default-cell-style-name="ce27"/>
        <table:table-column table:style-name="co1" table:default-cell-style-name="ce78"/>
        <table:table-column table:style-name="co1" table:default-cell-style-name="ce45"/>
        <table:table-column table:style-name="co1" table:number-columns-repeated="2" table:default-cell-style-name="Default"/>
        <table:table-column table:style-name="co1" table:default-cell-style-name="ce72"/>
        <table:table-column table:style-name="co1" table:number-columns-repeated="3" table:default-cell-style-name="Default"/>
        <table:table-column table:style-name="co1" table:default-cell-style-name="ce45"/>
        <table:table-column table:style-name="co1" table:number-columns-repeated="7" table:default-cell-style-name="Default"/>
        <table:table-column table:style-name="co1" table:default-cell-style-name="ce5"/>
        <table:table-column table:style-name="co1" table:number-columns-repeated="32" table:default-cell-style-name="Default"/>
        <table:table-column table:style-name="co1" table:number-columns-repeated="16320"/>
        <table:table-row table:style-name="ro1">
          <table:table-cell table:style-name="ce58" table:number-columns-repeated="3"/>
          <table:table-cell table:number-columns-repeated="2"/>
          <table:table-cell table:style-name="ce112" table:number-columns-repeated="2"/>
          <table:table-cell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number-columns-repeated="2"/>
          <table:table-cell table:style-name="ce124"/>
          <table:table-cell/>
          <table:table-cell table:style-name="ce58" table:number-columns-repeated="3"/>
          <table:table-cell table:number-columns-repeated="2"/>
          <table:table-cell office:value-type="string" calcext:value-type="string">
            <text:p>penalties: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priorities:</text:p>
          </table:table-cell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7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number-columns-repeated="2"/>
          <table:table-cell table:style-name="ce4"/>
          <table:table-cell/>
          <table:table-cell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70"/>
          <table:table-cell table:number-columns-repeated="2"/>
          <table:table-cell table:style-name="Default"/>
          <table:table-cell table:style-name="ce139" office:value-type="float" office:value="1" calcext:value-type="float">
            <text:p>1</text:p>
          </table:table-cell>
          <table:table-cell table:style-name="ce72" office:value-type="string" calcext:value-type="string">
            <text:p>same finger</text:p>
          </table:table-cell>
          <table:table-cell table:style-name="ce76" table:number-columns-repeated="2"/>
          <table:table-cell table:number-columns-repeated="7"/>
          <table:table-cell table:style-name="ce166" office:value-type="float" office:value="14" calcext:value-type="float">
            <text:p>14</text:p>
          </table:table-cell>
          <table:table-cell table:style-name="ce169" office:value-type="float" office:value="6" calcext:value-type="float">
            <text:p>6</text:p>
          </table:table-cell>
          <table:table-cell table:style-name="ce172" office:value-type="float" office:value="3" calcext:value-type="float">
            <text:p>3</text:p>
          </table:table-cell>
          <table:table-cell table:style-name="ce173" office:value-type="float" office:value="7" calcext:value-type="float">
            <text:p>7</text:p>
          </table:table-cell>
          <table:table-cell table:style-name="ce166" office:value-type="float" office:value="13" calcext:value-type="float">
            <text:p>13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number-columns-repeated="2"/>
          <table:table-cell table:style-name="ce123"/>
          <table:table-cell/>
          <table:table-cell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78"/>
          <table:table-cell table:number-columns-repeated="3"/>
          <table:table-cell table:style-name="ce140" office:value-type="float" office:value="2" calcext:value-type="float">
            <text:p>2</text:p>
          </table:table-cell>
          <table:table-cell table:style-name="ce72" office:value-type="string" calcext:value-type="string">
            <text:p>awkward diagonal</text:p>
          </table:table-cell>
          <table:table-cell table:style-name="ce77"/>
          <table:table-cell table:style-name="ce76"/>
          <table:table-cell table:number-columns-repeated="7"/>
          <table:table-cell table:style-name="ce167" office:value-type="float" office:value="5" calcext:value-type="float">
            <text:p>5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/>
          <table:table-cell/>
          <table:table-cell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78"/>
          <table:table-cell table:number-columns-repeated="3"/>
          <table:table-cell table:style-name="ce141" office:value-type="float" office:value="1" calcext:value-type="float">
            <text:p>1</text:p>
          </table:table-cell>
          <table:table-cell table:style-name="ce72" office:value-type="string" calcext:value-type="string">
            <text:p>distance(1 row/3 col)</text:p>
          </table:table-cell>
          <table:table-cell table:style-name="ce77" table:number-columns-repeated="3"/>
          <table:table-cell table:number-columns-repeated="6"/>
          <table:table-cell table:style-name="ce168" office:value-type="float" office:value="12" calcext:value-type="float">
            <text:p>12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4" calcext:value-type="float">
            <text:p>4</text:p>
          </table:table-cell>
          <table:table-cell table:style-name="ce176" office:value-type="float" office:value="11" calcext:value-type="float">
            <text:p>11</text:p>
          </table:table-cell>
          <table:table-cell table:style-name="ce77" table:number-columns-repeated="2"/>
          <table:table-cell table:style-name="ce84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table:style-name="ce85"/>
          <table:table-cell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120" table:number-columns-spanned="1" table:number-rows-spanned="2"/>
          <table:table-cell/>
          <table:table-cell table:style-name="ce70"/>
          <table:table-cell table:style-name="ce127"/>
          <table:table-cell table:style-name="ce78"/>
          <table:table-cell table:number-columns-repeated="3"/>
          <table:table-cell table:style-name="ce158" office:value-type="float" office:value="1" calcext:value-type="float">
            <text:p>1</text:p>
          </table:table-cell>
          <table:table-cell table:style-name="ce72" office:value-type="string" calcext:value-type="string">
            <text:p>other move</text:p>
          </table:table-cell>
          <table:table-cell/>
          <table:table-cell table:style-name="ce77" table:number-columns-repeated="15"/>
          <table:table-cell table:style-name="ce84" table:number-columns-repeated="3"/>
          <table:table-cell table:style-name="ce5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44"/>
          <table:table-cell/>
          <table:covered-table-cell table:style-name="ce44"/>
          <table:covered-table-cell table:number-columns-repeated="2" table:style-name="ce119"/>
          <table:covered-table-cell table:style-name="ce120"/>
          <table:table-cell table:style-name="ce4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/>
          <table:table-cell table:style-name="ce11" table:formula="of:=SUM([.B8:.F10])-[.B8]" office:value-type="float" office:value="97" calcext:value-type="float" table:number-columns-spanned="2" table:number-rows-spanned="1">
            <text:p>97</text:p>
          </table:table-cell>
          <table:covered-table-cell table:style-name="ce26"/>
          <table:table-cell table:style-name="ce47" table:number-columns-repeated="4"/>
          <table:table-cell table:style-name="ce69" table:formula="of:=SUM([.H8:.L10])-[.I8]" office:value-type="float" office:value="97" calcext:value-type="float" table:number-columns-spanned="2" table:number-rows-spanned="1">
            <text:p>97</text:p>
          </table:table-cell>
          <table:covered-table-cell table:style-name="ce26"/>
          <table:table-cell table:style-name="ce47" table:number-columns-repeated="4"/>
          <table:table-cell table:style-name="ce11" table:formula="of:=SUM([.N8:.R10])-[.P8]" office:value-type="float" office:value="96" calcext:value-type="float" table:number-columns-spanned="2" table:number-rows-spanned="1">
            <text:p>96</text:p>
          </table:table-cell>
          <table:covered-table-cell table:style-name="ce26"/>
          <table:table-cell table:style-name="ce47" table:number-columns-repeated="4"/>
          <table:table-cell table:style-name="ce69" table:formula="of:=SUM([.T8:.X10])-[.W8]" office:value-type="float" office:value="99" calcext:value-type="float" table:number-columns-spanned="2" table:number-rows-spanned="1">
            <text:p>99</text:p>
          </table:table-cell>
          <table:covered-table-cell table:style-name="ce26"/>
          <table:table-cell table:style-name="ce47" table:number-columns-repeated="4"/>
          <table:table-cell table:style-name="ce11" table:formula="of:=SUM([.Z8:.AD10])-[.AD8]" office:value-type="float" office:value="94" calcext:value-type="float" table:number-columns-spanned="2" table:number-rows-spanned="1">
            <text:p>94</text:p>
          </table:table-cell>
          <table:covered-table-cell table:style-name="ce26"/>
          <table:table-cell table:style-name="ce47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2" table:formula="of:=[.$AF$2]" office:value-type="float" office:value="14" calcext:value-type="float">
            <text:p>14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formula="of:=[.$AJ$3]+[.$U$4]" office:value-type="float" office:value="11" calcext:value-type="float">
            <text:p>11</text:p>
          </table:table-cell>
          <table:table-cell/>
          <table:table-cell table:style-name="ce71" table:formula="of:=[.$AF$3]+[.$U$5]" office:value-type="float" office:value="6" calcext:value-type="float">
            <text:p>6</text:p>
          </table:table-cell>
          <table:table-cell table:style-name="ce12" table:formula="of:=[.$AG$2]" office:value-type="float" office:value="6" calcext:value-type="float">
            <text:p>6</text:p>
          </table:table-cell>
          <table:table-cell table:formula="of:=[.$AH$3]" office:value-type="float" office:value="1" calcext:value-type="float">
            <text:p>1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/>
          <table:table-cell table:style-name="ce13" table:formula="of:=[.$AF$3]+[.$U$5]" office:value-type="float" office:value="6" calcext:value-type="float">
            <text:p>6</text:p>
          </table:table-cell>
          <table:table-cell table:formula="of:=[.$AG$3]" office:value-type="float" office:value="2" calcext:value-type="float">
            <text:p>2</text:p>
          </table:table-cell>
          <table:table-cell table:style-name="ce12" table:formula="of:=[.$AH$2]" office:value-type="float" office:value="3" calcext:value-type="float">
            <text:p>3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98"/>
          <table:table-cell table:style-name="ce13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12" table:formula="of:=[.$AI$2]" office:value-type="float" office:value="7" calcext:value-type="float">
            <text:p>7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98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2]" office:value-type="float" office:value="13" calcext:value-type="float">
            <text:p>13</text:p>
          </table:table-cell>
          <table:table-cell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14, &quot;1&quot;: 2, &quot;2&quot;: 1, &quot;3&quot;: 0, &quot;4&quot;: 11, &quot;5&quot;: 6, &quot;6&quot;: 4, &quot;7&quot;: 3, &quot;8&quot;: 1, &quot;9&quot;: 11, &quot;10&quot;: 14, &quot;11&quot;: 12, &quot;12&quot;: 11, &quot;13&quot;: 7, &quot;14&quot;: 14}" calcext:value-type="string">
            <text:p>"0": { "0": 14, "1": 2, "2": 1, "3": 0, "4": 11, "5": 6, "6": 4, "7": 3, "8": 1, "9": 11, "10": 14, "11": 12, "12": 11, "13": 7, "14": 1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6" calcext:value-type="float">
            <text:p>6</text:p>
          </table:table-cell>
          <table:table-cell table:style-name="ce28" table:formula="of:=[.$AG$3]+[.$U$3]" office:value-type="float" office:value="4" calcext:value-type="float">
            <text:p>4</text:p>
          </table:table-cell>
          <table:table-cell table:style-name="ce37" table:formula="of:=[.$AH$3]+[.$U$3]" office:value-type="float" office:value="3" calcext:value-type="float">
            <text:p>3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formula="of:=[.$AJ$3]+[.$U$4]" office:value-type="float" office:value="11" calcext:value-type="float">
            <text:p>11</text:p>
          </table:table-cell>
          <table:table-cell table:style-name="ce52"/>
          <table:table-cell table:style-name="ce71" table:formula="of:=[.$AF$3]+[.$U$5]" office:value-type="float" office:value="6" calcext:value-type="float">
            <text:p>6</text:p>
          </table:table-cell>
          <table:table-cell table:style-name="ce27" table:formula="of:=[.$AG$3]+[.$U$2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52"/>
          <table:table-cell table:style-name="ce13" table:formula="of:=[.$AF$3]" office:value-type="float" office:value="5" calcext:value-type="float">
            <text:p>5</text:p>
          </table:table-cell>
          <table:table-cell table:formula="of:=[.$AG$3]" office:value-type="float" office:value="2" calcext:value-type="float">
            <text:p>2</text:p>
          </table:table-cell>
          <table:table-cell table:style-name="ce36" table:formula="of:=[.$AH$3]+[.$U$2]" office:value-type="float" office:value="2" calcext:value-type="float">
            <text:p>2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52"/>
          <table:table-cell table:style-name="ce71" table:formula="of:=[.$AF$3]+[.$U$5]" office:value-type="float" office:value="6" calcext:value-type="float">
            <text:p>6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52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11" calcext:value-type="float">
            <text:p>11</text:p>
          </table:table-cell>
          <table:table-cell/>
          <table:table-cell table:formula="of:=COM.MICROSOFT.CONCAT(&quot;&quot;&quot;1&quot;&quot;: { &quot;;COM.MICROSOFT.TEXTJOIN(&quot;, &quot;;TRUE();[.H12:.L14]);&quot;}&quot;)" office:value-type="string" office:string-value="&quot;1&quot;: { &quot;0&quot;: 6, &quot;1&quot;: 6, &quot;2&quot;: 1, &quot;3&quot;: 1, &quot;4&quot;: 10, &quot;5&quot;: 6, &quot;6&quot;: 3, &quot;7&quot;: 2, &quot;8&quot;: 0, &quot;9&quot;: 10, &quot;10&quot;: 15, &quot;11&quot;: 11, &quot;12&quot;: 11, &quot;13&quot;: 7, &quot;14&quot;: 14}" calcext:value-type="string">
            <text:p>"1": { "0": 6, "1": 6, "2": 1, "3": 1, "4": 10, "5": 6, "6": 3, "7": 2, "8": 0, "9": 10, "10": 15, "11": 11, "12": 11, "13": 7, "14": 1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4" table:formula="of:=[.$AF$4]+[.$U$2]+[.$U$4]" office:value-type="float" office:value="14" calcext:value-type="float">
            <text:p>14</text:p>
          </table:table-cell>
          <table:table-cell table:style-name="ce29" table:formula="of:=[.$AG$4]+[.$U$3]+[.$U$4]" office:value-type="float" office:value="12" calcext:value-type="float">
            <text:p>12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48" table:formula="of:=[.$AI$4]+[.$U$3]+[.$U$4]" office:value-type="float" office:value="7" calcext:value-type="float">
            <text:p>7</text:p>
          </table:table-cell>
          <table:table-cell table:style-name="ce48" table:formula="of:=[.$AJ$4]+[.$U$3]+[.$U$4]" office:value-type="float" office:value="14" calcext:value-type="float">
            <text:p>14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81" table:formula="of:=[.$AG$4]+[.$U$2]+[.$U$4]" office:value-type="float" office:value="11" calcext:value-type="float">
            <text:p>11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48" table:formula="of:=[.$AI$4]+[.$U$3]+[.$U$4]" office:value-type="float" office:value="7" calcext:value-type="float">
            <text:p>7</text:p>
          </table:table-cell>
          <table:table-cell table:style-name="ce48" table:formula="of:=[.$AJ$4]+[.$U$3]+[.$U$4]" office:value-type="float" office:value="14" calcext:value-type="float">
            <text:p>14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29" table:formula="of:=[.$AG$4]+[.$U$3]+[.$U$4]" office:value-type="float" office:value="12" calcext:value-type="float">
            <text:p>12</text:p>
          </table:table-cell>
          <table:table-cell table:style-name="ce138" table:formula="of:=[.$AH$4]+[.$U$2]+[.$U$4]" office:value-type="float" office:value="10" calcext:value-type="float">
            <text:p>10</text:p>
          </table:table-cell>
          <table:table-cell table:style-name="ce48" table:formula="of:=[.$AI$4]+[.$U$3]+[.$U$4]" office:value-type="float" office:value="7" calcext:value-type="float">
            <text:p>7</text:p>
          </table:table-cell>
          <table:table-cell table:style-name="ce48" table:formula="of:=[.$AJ$4]+[.$U$3]+[.$U$4]" office:value-type="float" office:value="14" calcext:value-type="float">
            <text:p>14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29" table:formula="of:=[.$AG$4]+[.$U$3]+[.$U$4]" office:value-type="float" office:value="12" calcext:value-type="float">
            <text:p>12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106" table:formula="of:=[.$AI$4]+[.$U$2]+[.$U$4]" office:value-type="float" office:value="6" calcext:value-type="float">
            <text:p>6</text:p>
          </table:table-cell>
          <table:table-cell table:style-name="ce106" table:formula="of:=[.$AJ$4]+[.$U$2]+[.$U$4]" office:value-type="float" office:value="13" calcext:value-type="float">
            <text:p>13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29" table:formula="of:=[.$AG$4]+[.$U$3]+[.$U$4]" office:value-type="float" office:value="12" calcext:value-type="float">
            <text:p>12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106" table:formula="of:=[.$AI$4]+[.$U$2]+[.$U$4]" office:value-type="float" office:value="6" calcext:value-type="float">
            <text:p>6</text:p>
          </table:table-cell>
          <table:table-cell table:style-name="ce106" table:formula="of:=[.$AJ$4]+[.$U$2]+[.$U$4]" office:value-type="float" office:value="13" calcext:value-type="float">
            <text:p>13</text:p>
          </table:table-cell>
          <table:table-cell/>
          <table:table-cell table:formula="of:=COM.MICROSOFT.CONCAT(&quot;&quot;&quot;2&quot;&quot;: { &quot;;COM.MICROSOFT.TEXTJOIN(&quot;, &quot;;TRUE();[.N12:.R14]);&quot;}&quot;)" office:value-type="string" office:string-value="&quot;2&quot;: { &quot;0&quot;: 6, &quot;1&quot;: 2, &quot;2&quot;: 3, &quot;3&quot;: 1, &quot;4&quot;: 10, &quot;5&quot;: 5, &quot;6&quot;: 2, &quot;7&quot;: 2, &quot;8&quot;: 0, &quot;9&quot;: 10, &quot;10&quot;: 15, &quot;11&quot;: 12, &quot;12&quot;: 10, &quot;13&quot;: 7, &quot;14&quot;: 14}" calcext:value-type="string">
            <text:p>"2": { "0": 6, "1": 2, "2": 3, "3": 1, "4": 10, "5": 5, "6": 2, "7": 2, "8": 0, "9": 10, "10": 15, "11": 12, "12": 10, "13": 7, "14": 14}</text:p>
          </table:table-cell>
          <table:table-cell table:number-columns-repeated="32"/>
          <table:table-cell table:style-name="ce76" table:number-columns-repeated="16320"/>
        </table:table-row>
        <table:table-row table:style-name="ro1">
          <table:table-cell table:style-name="ce5"/>
          <table:table-cell table:style-name="ce94" table:number-columns-repeated="29"/>
          <table:table-cell/>
          <table:table-cell table:formula="of:=COM.MICROSOFT.CONCAT(&quot;&quot;&quot;3&quot;&quot;: { &quot;;COM.MICROSOFT.TEXTJOIN(&quot;, &quot;;TRUE();[.T12:.X14]);&quot;}&quot;)" office:value-type="string" office:string-value="&quot;3&quot;: { &quot;0&quot;: 5, &quot;1&quot;: 2, &quot;2&quot;: 1, &quot;3&quot;: 7, &quot;4&quot;: 11, &quot;5&quot;: 6, &quot;6&quot;: 3, &quot;7&quot;: 2, &quot;8&quot;: 1, &quot;9&quot;: 11, &quot;10&quot;: 15, &quot;11&quot;: 12, &quot;12&quot;: 11, &quot;13&quot;: 6, &quot;14&quot;: 13}" calcext:value-type="string">
            <text:p>"3": { "0": 5, "1": 2, "2": 1, "3": 7, "4": 11, "5": 6, "6": 3, "7": 2, "8": 1, "9": 11, "10": 15, "11": 12, "12": 11, "13": 6, "14": 1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6"/>
          <table:table-cell table:style-name="ce95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95" table:formula="of:=COM.MICROSOFT.CONCAT(&quot;&quot;&quot;&quot;;[.$C$2]; &quot;&quot;&quot;: &quot;; [.C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95" table:formula="of:=COM.MICROSOFT.CONCAT(&quot;&quot;&quot;&quot;;[.$F$2]; &quot;&quot;&quot;: &quot;; [.F8])" office:value-type="string" office:string-value="&quot;4&quot;: 11" calcext:value-type="string">
            <text:p>"4": 11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95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95" table:formula="of:=COM.MICROSOFT.CONCAT(&quot;&quot;&quot;&quot;;[.$F$2]; &quot;&quot;&quot;: &quot;; [.X8])" office:value-type="string" office:string-value="&quot;4&quot;: 11" calcext:value-type="string">
            <text:p>"4": 11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95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95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76"/>
          <table:table-cell table:style-name="ce6" table:formula="of:=COM.MICROSOFT.CONCAT(&quot;&quot;&quot;4&quot;&quot;: { &quot;;COM.MICROSOFT.TEXTJOIN(&quot;, &quot;;TRUE();[.Z12:.AD14]);&quot;}&quot;)" office:value-type="string" office:string-value="&quot;4&quot;: { &quot;0&quot;: 7, &quot;1&quot;: 3, &quot;2&quot;: 2, &quot;3&quot;: 1, &quot;4&quot;: 13, &quot;5&quot;: 7, &quot;6&quot;: 3, &quot;7&quot;: 2, &quot;8&quot;: 1, &quot;9&quot;: 11, &quot;10&quot;: 15, &quot;11&quot;: 12, &quot;12&quot;: 11, &quot;13&quot;: 6, &quot;14&quot;: 13}" calcext:value-type="string">
            <text:p>"4": { "0": 7, "1": 3, "2": 2, "3": 1, "4": 13, "5": 7, "6": 3, "7": 2, "8": 1, "9": 11, "10": 15, "11": 12, "12": 11, "13": 6, "14": 13}</text:p>
          </table:table-cell>
          <table:table-cell table:style-name="ce76"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3]; &quot;&quot;&quot;: &quot;; [.B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C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D9])" office:value-type="string" office:string-value="&quot;7&quot;: 3" calcext:value-type="string">
            <text:p>"7": 3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11" calcext:value-type="string">
            <text:p>"9": 11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J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L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5" calcext:value-type="string">
            <text:p>"5": 5</text:p>
          </table:table-cell>
          <table:table-cell table:style-name="ce95" table:formula="of:=COM.MICROSOFT.CONCAT(&quot;&quot;&quot;&quot;;[.$C$3]; &quot;&quot;&quot;: &quot;; [.O9])" office:value-type="string" office:string-value="&quot;6&quot;: 2" calcext:value-type="string">
            <text:p>"6": 2</text:p>
          </table:table-cell>
          <table:table-cell table:style-name="ce95" table:formula="of:=COM.MICROSOFT.CONCAT(&quot;&quot;&quot;&quot;;[.$D$3]; &quot;&quot;&quot;: &quot;; [.P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R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V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X9])" office:value-type="string" office:string-value="&quot;9&quot;: 11" calcext:value-type="string">
            <text:p>"9": 11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7" calcext:value-type="string">
            <text:p>"5": 7</text:p>
          </table:table-cell>
          <table:table-cell table:style-name="ce95" table:formula="of:=COM.MICROSOFT.CONCAT(&quot;&quot;&quot;&quot;;[.$C$3]; &quot;&quot;&quot;: &quot;; [.AA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AB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AD9])" office:value-type="string" office:string-value="&quot;9&quot;: 11" calcext:value-type="string">
            <text:p>"9": 11</text:p>
          </table:table-cell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95" table:formula="of:=COM.MICROSOFT.CONCAT(&quot;&quot;&quot;&quot;;[.$C$4]; &quot;&quot;&quot;: &quot;; [.C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E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F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I10])" office:value-type="string" office:string-value="&quot;11&quot;: 11" calcext:value-type="string">
            <text:p>"11": 11</text:p>
          </table:table-cell>
          <table:table-cell table:style-name="ce95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K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L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95" table:formula="of:=COM.MICROSOFT.CONCAT(&quot;&quot;&quot;&quot;;[.$E$4]; &quot;&quot;&quot;: &quot;; [.Q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U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V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W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X10])" office:value-type="string" office:string-value="&quot;14&quot;: 13" calcext:value-type="string">
            <text:p>"14": 13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AA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AB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AC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/>
          <table:table-cell table:style-name="Default" table:formula="of:=COM.MICROSOFT.TEXTJOIN(&quot;, &quot;;TRUE();[.AF8:.AF12])" office:value-type="string" office:string-value="&quot;0&quot;: { &quot;0&quot;: 14, &quot;1&quot;: 2, &quot;2&quot;: 1, &quot;3&quot;: 0, &quot;4&quot;: 11, &quot;5&quot;: 6, &quot;6&quot;: 4, &quot;7&quot;: 3, &quot;8&quot;: 1, &quot;9&quot;: 11, &quot;10&quot;: 14, &quot;11&quot;: 12, &quot;12&quot;: 11, &quot;13&quot;: 7, &quot;14&quot;: 14}, &quot;1&quot;: { &quot;0&quot;: 6, &quot;1&quot;: 6, &quot;2&quot;: 1, &quot;3&quot;: 1, &quot;4&quot;: 10, &quot;5&quot;: 6, &quot;6&quot;: 3, &quot;7&quot;: 2, &quot;8&quot;: 0, &quot;9&quot;: 10, &quot;10&quot;: 15, &quot;11&quot;: 11, &quot;12&quot;: 11, &quot;13&quot;: 7, &quot;14&quot;: 14}, &quot;2&quot;: { &quot;0&quot;: 6, &quot;1&quot;: 2, &quot;2&quot;: 3, &quot;3&quot;: 1, &quot;4&quot;: 10, &quot;5&quot;: 5, &quot;6&quot;: 2, &quot;7&quot;: 2, &quot;8&quot;: 0, &quot;9&quot;: 10, &quot;10&quot;: 15, &quot;11&quot;: 12, &quot;12&quot;: 10, &quot;13&quot;: 7, &quot;14&quot;: 14}, &quot;3&quot;: { &quot;0&quot;: 5, &quot;1&quot;: 2, &quot;2&quot;: 1, &quot;3&quot;: 7, &quot;4&quot;: 11, &quot;5&quot;: 6, &quot;6&quot;: 3, &quot;7&quot;: 2, &quot;8&quot;: 1, &quot;9&quot;: 11, &quot;10&quot;: 15, &quot;11&quot;: 12, &quot;12&quot;: 11, &quot;13&quot;: 6, &quot;14&quot;: 13}, &quot;4&quot;: { &quot;0&quot;: 7, &quot;1&quot;: 3, &quot;2&quot;: 2, &quot;3&quot;: 1, &quot;4&quot;: 13, &quot;5&quot;: 7, &quot;6&quot;: 3, &quot;7&quot;: 2, &quot;8&quot;: 1, &quot;9&quot;: 11, &quot;10&quot;: 15, &quot;11&quot;: 12, &quot;12&quot;: 11, &quot;13&quot;: 6, &quot;14&quot;: 13}" calcext:value-type="string">
            <text:p>"0": { "0": 14, "1": 2, "2": 1, "3": 0, "4": 11, "5": 6, "6": 4, "7": 3, "8": 1, "9": 11, "10": 14, "11": 12, "12": 11, "13": 7, "14": 14}, "1": { "0": 6, "1": 6, "2": 1, "3": 1, "4": 10, "5": 6, "6": 3, "7": 2, "8": 0, "9": 10, "10": 15, "11": 11, "12": 11, "13": 7, "14": 14}, "2": { "0": 6, "1": 2, "2": 3, "3": 1, "4": 10, "5": 5, "6": 2, "7": 2, "8": 0, "9": 10, "10": 15, "11": 12, "12": 10, "13": 7, "14": 14}, "3": { "0": 5, "1": 2, "2": 1, "3": 7, "4": 11, "5": 6, "6": 3, "7": 2, "8": 1, "9": 11, "10": 15, "11": 12, "12": 11, "13": 6, "14": 13}, "4": { "0": 7, "1": 3, "2": 2, "3": 1, "4": 13, "5": 7, "6": 3, "7": 2, "8": 1, "9": 11, "10": 15, "11": 12, "12": 11, "13": 6, "14": 1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8" table:formula="of:=SUM([.B16:.F18])-[.B17]" office:value-type="float" office:value="112" calcext:value-type="float" table:number-columns-spanned="2" table:number-rows-spanned="1">
            <text:p>112</text:p>
          </table:table-cell>
          <table:covered-table-cell table:style-name="ce98"/>
          <table:table-cell table:style-name="ce98" table:number-columns-repeated="3"/>
          <table:table-cell/>
          <table:table-cell table:style-name="ce18" table:formula="of:=SUM([.H16:.L18])-[.I17]" office:value-type="float" office:value="113" calcext:value-type="float" table:number-columns-spanned="2" table:number-rows-spanned="1">
            <text:p>113</text:p>
          </table:table-cell>
          <table:covered-table-cell table:style-name="ce98"/>
          <table:table-cell table:style-name="ce98" table:number-columns-repeated="3"/>
          <table:table-cell/>
          <table:table-cell table:style-name="ce18" table:formula="of:=SUM([.N16:.R18])-[.P17]" office:value-type="float" office:value="116" calcext:value-type="float" table:number-columns-spanned="2" table:number-rows-spanned="1">
            <text:p>116</text:p>
          </table:table-cell>
          <table:covered-table-cell table:style-name="ce98"/>
          <table:table-cell table:style-name="ce98" table:number-columns-repeated="4"/>
          <table:table-cell table:style-name="ce18" table:formula="of:=SUM([.T16:.X18])-[.W17]" office:value-type="float" office:value="116" calcext:value-type="float" table:number-columns-spanned="2" table:number-rows-spanned="1">
            <text:p>116</text:p>
          </table:table-cell>
          <table:covered-table-cell table:style-name="ce98"/>
          <table:table-cell table:style-name="ce98" table:number-columns-repeated="4"/>
          <table:table-cell table:style-name="ce18" table:formula="of:=SUM([.Z16:.AD18])-[.AD17]" office:value-type="float" office:value="112" calcext:value-type="float" table:number-columns-spanned="2" table:number-rows-spanned="1">
            <text:p>112</text:p>
          </table:table-cell>
          <table:covered-table-cell table:style-name="ce98"/>
          <table:table-cell table:style-name="ce98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9" table:formula="of:=[.$AF$2]+[.$U$2]" office:value-type="float" office:value="15" calcext:value-type="float">
            <text:p>15</text:p>
          </table:table-cell>
          <table:table-cell table:style-name="ce30" table:formula="of:=[.$AG$2]+[.$U$5]" office:value-type="float" office:value="7" calcext:value-type="float">
            <text:p>7</text:p>
          </table:table-cell>
          <table:table-cell table:style-name="ce39" table:formula="of:=[.$AH$2]+[.$U$5]" office:value-type="float" office:value="4" calcext:value-type="float">
            <text:p>4</text:p>
          </table:table-cell>
          <table:table-cell table:style-name="ce49" table:formula="of:=[.$AI$2]+[.$U$5]" office:value-type="float" office:value="8" calcext:value-type="float">
            <text:p>8</text:p>
          </table:table-cell>
          <table:table-cell table:style-name="ce105" table:formula="of:=[.$AJ$2]+[.$U$4]" office:value-type="float" office:value="14" calcext:value-type="float">
            <text:p>14</text:p>
          </table:table-cell>
          <table:table-cell table:style-name="ce109"/>
          <table:table-cell table:style-name="ce74" table:formula="of:=[.$AF$2]+[.$U$3]" office:value-type="float" office:value="16" calcext:value-type="float">
            <text:p>16</text:p>
          </table:table-cell>
          <table:table-cell table:style-name="ce89" table:formula="of:=[.$AG$2]+[.$U$2]" office:value-type="float" office:value="7" calcext:value-type="float">
            <text:p>7</text:p>
          </table:table-cell>
          <table:table-cell table:style-name="ce92" table:formula="of:=[.$AH$2]" office:value-type="float" office:value="3" calcext:value-type="float">
            <text:p>3</text:p>
          </table:table-cell>
          <table:table-cell table:style-name="ce53" table:formula="of:=[.$AI$2]+[.$U$5]" office:value-type="float" office:value="8" calcext:value-type="float">
            <text:p>8</text:p>
          </table:table-cell>
          <table:table-cell table:style-name="ce53" table:formula="of:=[.$AJ$2]+[.$U$5]" office:value-type="float" office:value="14" calcext:value-type="float">
            <text:p>14</text:p>
          </table:table-cell>
          <table:table-cell table:style-name="ce109"/>
          <table:table-cell table:style-name="ce74" table:formula="of:=[.$AF$2]+[.$U$3]" office:value-type="float" office:value="16" calcext:value-type="float">
            <text:p>16</text:p>
          </table:table-cell>
          <table:table-cell table:style-name="ce31" table:formula="of:=[.$AG$2]+[.$U$3]" office:value-type="float" office:value="8" calcext:value-type="float">
            <text:p>8</text:p>
          </table:table-cell>
          <table:table-cell table:style-name="ce92" table:formula="of:=[.$AH$2]+[.$U$2]" office:value-type="float" office:value="4" calcext:value-type="float">
            <text:p>4</text:p>
          </table:table-cell>
          <table:table-cell table:style-name="ce49" table:formula="of:=[.$AI$2]+[.$U$5]" office:value-type="float" office:value="8" calcext:value-type="float">
            <text:p>8</text:p>
          </table:table-cell>
          <table:table-cell table:style-name="ce49" table:formula="of:=[.$AJ$2]+[.$U$5]" office:value-type="float" office:value="14" calcext:value-type="float">
            <text:p>14</text:p>
          </table:table-cell>
          <table:table-cell table:style-name="ce109"/>
          <table:table-cell table:style-name="ce149" table:formula="of:=[.$AF$2]+[.$U$5]" office:value-type="float" office:value="15" calcext:value-type="float">
            <text:p>15</text:p>
          </table:table-cell>
          <table:table-cell table:style-name="ce30" table:formula="of:=[.$AG$2]+[.$U$5]" office:value-type="float" office:value="7" calcext:value-type="float">
            <text:p>7</text:p>
          </table:table-cell>
          <table:table-cell table:style-name="ce92" table:formula="of:=[.$AH$2]" office:value-type="float" office:value="3" calcext:value-type="float">
            <text:p>3</text:p>
          </table:table-cell>
          <table:table-cell table:style-name="ce105" table:formula="of:=[.$AI$2]+[.$U$2]" office:value-type="float" office:value="8" calcext:value-type="float">
            <text:p>8</text:p>
          </table:table-cell>
          <table:table-cell table:style-name="ce105" table:formula="of:=[.$AJ$2]+[.$U$2]" office:value-type="float" office:value="14" calcext:value-type="float">
            <text:p>14</text:p>
          </table:table-cell>
          <table:table-cell table:style-name="ce109"/>
          <table:table-cell table:style-name="ce149" table:formula="of:=[.$AF$2]+[.$U$4]+[.$U$5]" office:value-type="float" office:value="16" calcext:value-type="float">
            <text:p>16</text:p>
          </table:table-cell>
          <table:table-cell table:style-name="ce162" table:formula="of:=[.$AG$2]+[.$U$5]" office:value-type="float" office:value="7" calcext:value-type="float">
            <text:p>7</text:p>
          </table:table-cell>
          <table:table-cell table:style-name="ce41" table:formula="of:=[.$AH$2]+[.$U$5]" office:value-type="float" office:value="4" calcext:value-type="float">
            <text:p>4</text:p>
          </table:table-cell>
          <table:table-cell table:style-name="ce105" table:formula="of:=[.$AI$2]+[.$U$2]" office:value-type="float" office:value="8" calcext:value-type="float">
            <text:p>8</text:p>
          </table:table-cell>
          <table:table-cell table:style-name="ce105" table:formula="of:=[.$AJ$2]+[.$U$2]" office:value-type="float" office:value="14" calcext:value-type="float">
            <text:p>14</text:p>
          </table:table-cell>
          <table:table-cell table:style-name="ce5"/>
          <table:table-cell table:formula="of:=COM.MICROSOFT.CONCAT(&quot;&quot;&quot;5&quot;&quot;: { &quot;;COM.MICROSOFT.TEXTJOIN(&quot;, &quot;;TRUE();[.B20:.F22]);&quot;}&quot;)" office:value-type="string" office:string-value="&quot;5&quot;: { &quot;0&quot;: 15, &quot;1&quot;: 7, &quot;2&quot;: 4, &quot;3&quot;: 8, &quot;4&quot;: 14, &quot;5&quot;: 5, &quot;6&quot;: 2, &quot;7&quot;: 1, &quot;8&quot;: 0, &quot;9&quot;: 11, &quot;10&quot;: 13, &quot;11&quot;: 11, &quot;12&quot;: 9, &quot;13&quot;: 5, &quot;14&quot;: 12}" calcext:value-type="string">
            <text:p>"5": { "0": 15, "1": 7, "2": 4, "3": 8, "4": 14, "5": 5, "6": 2, "7": 1, "8": 0, "9": 11, "10": 13, "11": 11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20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formula="of:=[.$AJ$3]+[.$U$4]" office:value-type="float" office:value="11" calcext:value-type="float">
            <text:p>11</text:p>
          </table:table-cell>
          <table:table-cell table:style-name="ce52"/>
          <table:table-cell table:style-name="ce13" table:formula="of:=[.$AF$3]" office:value-type="float" office:value="5" calcext:value-type="float">
            <text:p>5</text:p>
          </table:table-cell>
          <table:table-cell table:style-name="ce20" table:formula="of:=[.$AG$3]" office:value-type="float" office:value="2" calcext:value-type="float">
            <text:p>2</text:p>
          </table:table-cell>
          <table:table-cell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52"/>
          <table:table-cell table:style-name="ce13" table:formula="of:=[.$AF$3]" office:value-type="float" office:value="5" calcext:value-type="float">
            <text:p>5</text:p>
          </table:table-cell>
          <table:table-cell table:formula="of:=[.$AG$3]" office:value-type="float" office:value="2" calcext:value-type="float">
            <text:p>2</text:p>
          </table:table-cell>
          <table:table-cell table:style-name="ce20" table:formula="of:=[.$AH$3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52"/>
          <table:table-cell table:style-name="ce13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20" table:formula="of:=[.$AI$3]" office:value-type="float" office:value="0" calcext:value-type="float">
            <text:p>0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52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20" table:formula="of:=[.$AJ$3]" office:value-type="float" office:value="10" calcext:value-type="float">
            <text:p>10</text:p>
          </table:table-cell>
          <table:table-cell table:style-name="ce5"/>
          <table:table-cell table:formula="of:=COM.MICROSOFT.CONCAT(&quot;&quot;&quot;6&quot;&quot;: { &quot;;COM.MICROSOFT.TEXTJOIN(&quot;, &quot;;TRUE();[.H20:.L22]);&quot;}&quot;)" office:value-type="string" office:string-value="&quot;6&quot;: { &quot;0&quot;: 16, &quot;1&quot;: 7, &quot;2&quot;: 3, &quot;3&quot;: 8, &quot;4&quot;: 14, &quot;5&quot;: 5, &quot;6&quot;: 2, &quot;7&quot;: 1, &quot;8&quot;: 0, &quot;9&quot;: 10, &quot;10&quot;: 13, &quot;11&quot;: 10, &quot;12&quot;: 9, &quot;13&quot;: 5, &quot;14&quot;: 12}" calcext:value-type="string">
            <text:p>"6": { "0": 16, "1": 7, "2": 3, "3": 8, "4": 14, "5": 5, "6": 2, "7": 1, "8": 0, "9": 10, "10": 13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4" table:formula="of:=[.$AF$4]+[.$U$2]" office:value-type="float" office:value="13" calcext:value-type="float">
            <text:p>13</text:p>
          </table:table-cell>
          <table:table-cell table:style-name="ce29" table:formula="of:=[.$AG$4]+[.$U$3]" office:value-type="float" office:value="11" calcext:value-type="float">
            <text:p>11</text:p>
          </table:table-cell>
          <table:table-cell table:style-name="ce40" table:formula="of:=[.$AH$4]+[.$U$5]" office:value-type="float" office:value="9" calcext:value-type="float">
            <text:p>9</text:p>
          </table:table-cell>
          <table:table-cell table:style-name="ce51" table:formula="of:=[.$AI$4]+[.$U$5]" office:value-type="float" office:value="5" calcext:value-type="float">
            <text:p>5</text:p>
          </table:table-cell>
          <table:table-cell table:style-name="ce106" table:formula="of:=[.$AJ$4]+[.$U$4]" office:value-type="float" office:value="12" calcext:value-type="float">
            <text:p>12</text:p>
          </table:table-cell>
          <table:table-cell table:style-name="ce110"/>
          <table:table-cell table:style-name="ce75" table:formula="of:=[.$AF$4]+[.$U$5]" office:value-type="float" office:value="13" calcext:value-type="float">
            <text:p>13</text:p>
          </table:table-cell>
          <table:table-cell table:style-name="ce81" table:formula="of:=[.$AG$4]+[.$U$2]" office:value-type="float" office:value="10" calcext:value-type="float">
            <text:p>10</text:p>
          </table:table-cell>
          <table:table-cell table:style-name="ce101" table:formula="of:=[.$AH$4]+[.$U$5]" office:value-type="float" office:value="9" calcext:value-type="float">
            <text:p>9</text:p>
          </table:table-cell>
          <table:table-cell table:style-name="ce51" table:formula="of:=[.$AI$4]+[.$U$5]" office:value-type="float" office:value="5" calcext:value-type="float">
            <text:p>5</text:p>
          </table:table-cell>
          <table:table-cell table:style-name="ce51" table:formula="of:=[.$AJ$4]+[.$U$5]" office:value-type="float" office:value="12" calcext:value-type="float">
            <text:p>12</text:p>
          </table:table-cell>
          <table:table-cell table:style-name="ce110"/>
          <table:table-cell table:style-name="ce126" table:formula="of:=[.$AF$4]+[.$U$5]" office:value-type="float" office:value="13" calcext:value-type="float">
            <text:p>13</text:p>
          </table:table-cell>
          <table:table-cell table:style-name="ce132" table:formula="of:=[.$AG$4]+[.$U$5]" office:value-type="float" office:value="10" calcext:value-type="float">
            <text:p>10</text:p>
          </table:table-cell>
          <table:table-cell table:style-name="ce138" table:formula="of:=[.$AH$4]+[.$U$2]" office:value-type="float" office:value="9" calcext:value-type="float">
            <text:p>9</text:p>
          </table:table-cell>
          <table:table-cell table:style-name="ce144" table:formula="of:=[.$AI$4]+[.$U$5]" office:value-type="float" office:value="5" calcext:value-type="float">
            <text:p>5</text:p>
          </table:table-cell>
          <table:table-cell table:style-name="ce144" table:formula="of:=[.$AJ$4]+[.$U$5]" office:value-type="float" office:value="12" calcext:value-type="float">
            <text:p>12</text:p>
          </table:table-cell>
          <table:table-cell table:style-name="ce110"/>
          <table:table-cell table:style-name="ce126" table:formula="of:=[.$AF$4]+[.$U$5]" office:value-type="float" office:value="13" calcext:value-type="float">
            <text:p>13</text:p>
          </table:table-cell>
          <table:table-cell table:style-name="ce132" table:formula="of:=[.$AG$4]+[.$U$5]" office:value-type="float" office:value="10" calcext:value-type="float">
            <text:p>10</text:p>
          </table:table-cell>
          <table:table-cell table:style-name="ce38" table:formula="of:=[.$AH$4]+[.$U$3]" office:value-type="float" office:value="10" calcext:value-type="float">
            <text:p>10</text:p>
          </table:table-cell>
          <table:table-cell table:style-name="ce106" table:formula="of:=[.$AI$4]+[.$U$2]" office:value-type="float" office:value="5" calcext:value-type="float">
            <text:p>5</text:p>
          </table:table-cell>
          <table:table-cell table:style-name="ce106" table:formula="of:=[.$AJ$4]+[.$U$2]" office:value-type="float" office:value="12" calcext:value-type="float">
            <text:p>12</text:p>
          </table:table-cell>
          <table:table-cell table:style-name="ce110"/>
          <table:table-cell table:style-name="ce126" table:formula="of:=[.$AF$4]+[.$U$5]+[.$U$4]" office:value-type="float" office:value="14" calcext:value-type="float">
            <text:p>14</text:p>
          </table:table-cell>
          <table:table-cell table:style-name="ce163" table:formula="of:=[.$AG$4]+[.$U$5]" office:value-type="float" office:value="10" calcext:value-type="float">
            <text:p>10</text:p>
          </table:table-cell>
          <table:table-cell table:style-name="ce101" table:formula="of:=[.$AH$4]+[.$U$5]" office:value-type="float" office:value="9" calcext:value-type="float">
            <text:p>9</text:p>
          </table:table-cell>
          <table:table-cell table:style-name="ce106" table:formula="of:=[.$AI$4]+[.$U$2]" office:value-type="float" office:value="5" calcext:value-type="float">
            <text:p>5</text:p>
          </table:table-cell>
          <table:table-cell table:style-name="ce106" table:formula="of:=[.$AJ$4]+[.$U$2]" office:value-type="float" office:value="12" calcext:value-type="float">
            <text:p>12</text:p>
          </table:table-cell>
          <table:table-cell table:style-name="ce5"/>
          <table:table-cell table:formula="of:=COM.MICROSOFT.CONCAT(&quot;&quot;&quot;7&quot;&quot;: { &quot;;COM.MICROSOFT.TEXTJOIN(&quot;, &quot;;TRUE();[.N20:.R22]);&quot;}&quot;)" office:value-type="string" office:string-value="&quot;7&quot;: { &quot;0&quot;: 16, &quot;1&quot;: 8, &quot;2&quot;: 4, &quot;3&quot;: 8, &quot;4&quot;: 14, &quot;5&quot;: 5, &quot;6&quot;: 2, &quot;7&quot;: 1, &quot;8&quot;: 0, &quot;9&quot;: 10, &quot;10&quot;: 13, &quot;11&quot;: 10, &quot;12&quot;: 9, &quot;13&quot;: 5, &quot;14&quot;: 12}" calcext:value-type="string">
            <text:p>"7": { "0": 16, "1": 8, "2": 4, "3": 8, "4": 14, "5": 5, "6": 2, "7": 1, "8": 0, "9": 10, "10": 13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17"/>
          <table:table-cell table:style-name="ce5"/>
          <table:table-cell table:formula="of:=COM.MICROSOFT.CONCAT(&quot;&quot;&quot;8&quot;&quot;: { &quot;;COM.MICROSOFT.TEXTJOIN(&quot;, &quot;;TRUE();[.T20:.X22]);&quot;}&quot;)" office:value-type="string" office:string-value="&quot;8&quot;: { &quot;0&quot;: 15, &quot;1&quot;: 7, &quot;2&quot;: 3, &quot;3&quot;: 8, &quot;4&quot;: 14, &quot;5&quot;: 5, &quot;6&quot;: 2, &quot;7&quot;: 1, &quot;8&quot;: 0, &quot;9&quot;: 11, &quot;10&quot;: 13, &quot;11&quot;: 10, &quot;12&quot;: 10, &quot;13&quot;: 5, &quot;14&quot;: 12}" calcext:value-type="string">
            <text:p>"8": { "0": 15, "1": 7, "2": 3, "3": 8, "4": 14, "5": 5, "6": 2, "7": 1, "8": 0, "9": 11, "10": 13, "11": 10, "12": 10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2]; &quot;&quot;&quot;: &quot;; [.B16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C16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D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E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F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H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I16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J16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L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N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O16])" office:value-type="string" office:string-value="&quot;1&quot;: 8" calcext:value-type="string">
            <text:p>"1": 8</text:p>
          </table:table-cell>
          <table:table-cell table:style-name="ce100" table:formula="of:=COM.MICROSOFT.CONCAT(&quot;&quot;&quot;&quot;;[.$D$2]; &quot;&quot;&quot;: &quot;; [.P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Q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R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T16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U16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V16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W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Z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AA16])" office:value-type="string" office:string-value="&quot;1&quot;: 7" calcext:value-type="string">
            <text:p>"1": 7</text:p>
          </table:table-cell>
          <table:table-cell table:style-name="ce131" table:formula="of:=COM.MICROSOFT.CONCAT(&quot;&quot;&quot;&quot;;[.$D$2]; &quot;&quot;&quot;: &quot;; [.AB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AC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AD16])" office:value-type="string" office:string-value="&quot;4&quot;: 14" calcext:value-type="string">
            <text:p>"4": 14</text:p>
          </table:table-cell>
          <table:table-cell table:style-name="ce5"/>
          <table:table-cell table:formula="of:=COM.MICROSOFT.CONCAT(&quot;&quot;&quot;9&quot;&quot;: { &quot;;COM.MICROSOFT.TEXTJOIN(&quot;, &quot;;TRUE();[.Z20:.AD22]);&quot;}&quot;)" office:value-type="string" office:string-value="&quot;9&quot;: { &quot;0&quot;: 16, &quot;1&quot;: 7, &quot;2&quot;: 4, &quot;3&quot;: 8, &quot;4&quot;: 14, &quot;5&quot;: 7, &quot;6&quot;: 3, &quot;7&quot;: 2, &quot;8&quot;: 1, &quot;9&quot;: 10, &quot;10&quot;: 14, &quot;11&quot;: 10, &quot;12&quot;: 9, &quot;13&quot;: 5, &quot;14&quot;: 12}" calcext:value-type="string">
            <text:p>"9": { "0": 16, "1": 7, "2": 4, "3": 8, "4": 14, "5": 7, "6": 3, "7": 2, "8": 1, "9": 10, "10": 14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3]; &quot;&quot;&quot;: &quot;; [.B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C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D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E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F17])" office:value-type="string" office:string-value="&quot;9&quot;: 11" calcext:value-type="string">
            <text:p>"9": 11</text:p>
          </table:table-cell>
          <table:table-cell table:style-name="ce100"/>
          <table:table-cell table:style-name="ce100" table:formula="of:=COM.MICROSOFT.CONCAT(&quot;&quot;&quot;&quot;;[.$B$3]; &quot;&quot;&quot;: &quot;; [.H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I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K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N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O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P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Q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R17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U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W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100"/>
          <table:table-cell table:style-name="ce100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00" table:formula="of:=COM.MICROSOFT.CONCAT(&quot;&quot;&quot;&quot;;[.$C$3]; &quot;&quot;&quot;: &quot;; [.AA17])" office:value-type="string" office:string-value="&quot;6&quot;: 3" calcext:value-type="string">
            <text:p>"6": 3</text:p>
          </table:table-cell>
          <table:table-cell table:style-name="ce100" table:formula="of:=COM.MICROSOFT.CONCAT(&quot;&quot;&quot;&quot;;[.$D$3]; &quot;&quot;&quot;: &quot;; [.AB17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7])" office:value-type="string" office:string-value="&quot;9&quot;: 10" calcext:value-type="string">
            <text:p>"9": 10</text:p>
          </table:table-cell>
          <table:table-cell table:style-name="ce5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4]; &quot;&quot;&quot;: &quot;; [.B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C18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D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E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F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H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00" table:formula="of:=COM.MICROSOFT.CONCAT(&quot;&quot;&quot;&quot;;[.$D$4]; &quot;&quot;&quot;: &quot;; [.J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K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L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N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O18])" office:value-type="string" office:string-value="&quot;11&quot;: 10" calcext:value-type="string">
            <text:p>"11": 10</text:p>
          </table:table-cell>
          <table:table-cell table:style-name="ce10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Q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R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T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U18])" office:value-type="string" office:string-value="&quot;11&quot;: 10" calcext:value-type="string">
            <text:p>"11": 10</text:p>
          </table:table-cell>
          <table:table-cell table:style-name="ce100" table:formula="of:=COM.MICROSOFT.CONCAT(&quot;&quot;&quot;&quot;;[.$D$4]; &quot;&quot;&quot;: &quot;; [.V18])" office:value-type="string" office:string-value="&quot;12&quot;: 10" calcext:value-type="string">
            <text:p>"12": 10</text:p>
          </table:table-cell>
          <table:table-cell table:style-name="ce100" table:formula="of:=COM.MICROSOFT.CONCAT(&quot;&quot;&quot;&quot;;[.$E$4]; &quot;&quot;&quot;: &quot;; [.W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X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Z18])" office:value-type="string" office:string-value="&quot;10&quot;: 14" calcext:value-type="string">
            <text:p>"10": 14</text:p>
          </table:table-cell>
          <table:table-cell table:style-name="ce100" table:formula="of:=COM.MICROSOFT.CONCAT(&quot;&quot;&quot;&quot;;[.$C$4]; &quot;&quot;&quot;: &quot;; [.AA18])" office:value-type="string" office:string-value="&quot;11&quot;: 10" calcext:value-type="string">
            <text:p>"11": 10</text:p>
          </table:table-cell>
          <table:table-cell table:style-name="ce100" table:formula="of:=COM.MICROSOFT.CONCAT(&quot;&quot;&quot;&quot;;[.$D$4]; &quot;&quot;&quot;: &quot;; [.AB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AC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5"/>
          <table:table-cell table:formula="of:=COM.MICROSOFT.TEXTJOIN(&quot;, &quot;;TRUE();[.AF16:.AF20])" office:value-type="string" office:string-value="&quot;5&quot;: { &quot;0&quot;: 15, &quot;1&quot;: 7, &quot;2&quot;: 4, &quot;3&quot;: 8, &quot;4&quot;: 14, &quot;5&quot;: 5, &quot;6&quot;: 2, &quot;7&quot;: 1, &quot;8&quot;: 0, &quot;9&quot;: 11, &quot;10&quot;: 13, &quot;11&quot;: 11, &quot;12&quot;: 9, &quot;13&quot;: 5, &quot;14&quot;: 12}, &quot;6&quot;: { &quot;0&quot;: 16, &quot;1&quot;: 7, &quot;2&quot;: 3, &quot;3&quot;: 8, &quot;4&quot;: 14, &quot;5&quot;: 5, &quot;6&quot;: 2, &quot;7&quot;: 1, &quot;8&quot;: 0, &quot;9&quot;: 10, &quot;10&quot;: 13, &quot;11&quot;: 10, &quot;12&quot;: 9, &quot;13&quot;: 5, &quot;14&quot;: 12}, &quot;7&quot;: { &quot;0&quot;: 16, &quot;1&quot;: 8, &quot;2&quot;: 4, &quot;3&quot;: 8, &quot;4&quot;: 14, &quot;5&quot;: 5, &quot;6&quot;: 2, &quot;7&quot;: 1, &quot;8&quot;: 0, &quot;9&quot;: 10, &quot;10&quot;: 13, &quot;11&quot;: 10, &quot;12&quot;: 9, &quot;13&quot;: 5, &quot;14&quot;: 12}, &quot;8&quot;: { &quot;0&quot;: 15, &quot;1&quot;: 7, &quot;2&quot;: 3, &quot;3&quot;: 8, &quot;4&quot;: 14, &quot;5&quot;: 5, &quot;6&quot;: 2, &quot;7&quot;: 1, &quot;8&quot;: 0, &quot;9&quot;: 11, &quot;10&quot;: 13, &quot;11&quot;: 10, &quot;12&quot;: 10, &quot;13&quot;: 5, &quot;14&quot;: 12}, &quot;9&quot;: { &quot;0&quot;: 16, &quot;1&quot;: 7, &quot;2&quot;: 4, &quot;3&quot;: 8, &quot;4&quot;: 14, &quot;5&quot;: 7, &quot;6&quot;: 3, &quot;7&quot;: 2, &quot;8&quot;: 1, &quot;9&quot;: 10, &quot;10&quot;: 14, &quot;11&quot;: 10, &quot;12&quot;: 9, &quot;13&quot;: 5, &quot;14&quot;: 12}" calcext:value-type="string">
            <text:p>"5": { "0": 15, "1": 7, "2": 4, "3": 8, "4": 14, "5": 5, "6": 2, "7": 1, "8": 0, "9": 11, "10": 13, "11": 11, "12": 9, "13": 5, "14": 12}, "6": { "0": 16, "1": 7, "2": 3, "3": 8, "4": 14, "5": 5, "6": 2, "7": 1, "8": 0, "9": 10, "10": 13, "11": 10, "12": 9, "13": 5, "14": 12}, "7": { "0": 16, "1": 8, "2": 4, "3": 8, "4": 14, "5": 5, "6": 2, "7": 1, "8": 0, "9": 10, "10": 13, "11": 10, "12": 9, "13": 5, "14": 12}, "8": { "0": 15, "1": 7, "2": 3, "3": 8, "4": 14, "5": 5, "6": 2, "7": 1, "8": 0, "9": 11, "10": 13, "11": 10, "12": 10, "13": 5, "14": 12}, "9": { "0": 16, "1": 7, "2": 4, "3": 8, "4": 14, "5": 7, "6": 3, "7": 2, "8": 1, "9": 10, "10": 14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8" table:formula="of:=SUM([.B24:.F26])-[.B26]" office:value-type="float" office:value="93" calcext:value-type="float" table:number-columns-spanned="2" table:number-rows-spanned="1">
            <text:p>93</text:p>
          </table:table-cell>
          <table:covered-table-cell table:style-name="ce98"/>
          <table:table-cell table:style-name="ce98" table:number-columns-repeated="3"/>
          <table:table-cell/>
          <table:table-cell table:style-name="ce18" table:formula="of:=SUM([.H24:.L26])-[.I26]" office:value-type="float" office:value="95" calcext:value-type="float" table:number-columns-spanned="2" table:number-rows-spanned="1">
            <text:p>95</text:p>
          </table:table-cell>
          <table:covered-table-cell table:style-name="ce98"/>
          <table:table-cell table:style-name="ce98" table:number-columns-repeated="3"/>
          <table:table-cell/>
          <table:table-cell table:style-name="ce128" table:formula="of:=SUM([.N24:.R26])-[.P26]" office:value-type="float" office:value="101" calcext:value-type="float" table:number-columns-spanned="2" table:number-rows-spanned="1">
            <text:p>101</text:p>
          </table:table-cell>
          <table:covered-table-cell table:style-name="ce98"/>
          <table:table-cell table:style-name="ce98" table:number-columns-repeated="4"/>
          <table:table-cell table:style-name="ce18" table:formula="of:=SUM([.T24:.X26])-[.W26]" office:value-type="float" office:value="95" calcext:value-type="float" table:number-columns-spanned="2" table:number-rows-spanned="1">
            <text:p>95</text:p>
          </table:table-cell>
          <table:covered-table-cell table:style-name="ce98"/>
          <table:table-cell table:style-name="ce98" table:number-columns-repeated="4"/>
          <table:table-cell table:style-name="ce128" table:formula="of:=SUM([.Z24:.AD26])-[.AD26]" office:value-type="float" office:value="96" calcext:value-type="float" table:number-columns-spanned="2" table:number-rows-spanned="1">
            <text:p>96</text:p>
          </table:table-cell>
          <table:covered-table-cell table:style-name="ce98"/>
          <table:table-cell table:style-name="ce98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9" table:formula="of:=[.$AF$2]+[.$U$2]+[.$U$4]" office:value-type="float" office:value="16" calcext:value-type="float">
            <text:p>16</text:p>
          </table:table-cell>
          <table:table-cell table:style-name="ce31" table:formula="of:=[.$AG$2]+[.$U$3]+[.$U$4]" office:value-type="float" office:value="9" calcext:value-type="float">
            <text:p>9</text:p>
          </table:table-cell>
          <table:table-cell table:style-name="ce41" table:formula="of:=[.$AH$2]+[.$U$5]+[.$U$4]" office:value-type="float" office:value="5" calcext:value-type="float">
            <text:p>5</text:p>
          </table:table-cell>
          <table:table-cell table:style-name="ce53" table:formula="of:=[.$AI$2]+[.$U$4]+[.$U$5]" office:value-type="float" office:value="9" calcext:value-type="float">
            <text:p>9</text:p>
          </table:table-cell>
          <table:table-cell table:style-name="ce60" table:formula="of:=[.$AJ$2]+[.$U$4]+[.$U$3]" office:value-type="float" office:value="16" calcext:value-type="float">
            <text:p>16</text:p>
          </table:table-cell>
          <table:table-cell table:style-name="ce111"/>
          <table:table-cell table:style-name="ce74" table:formula="of:=[.$AF$2]+[.$U$3]+[.$U$4]" office:value-type="float" office:value="17" calcext:value-type="float">
            <text:p>17</text:p>
          </table:table-cell>
          <table:table-cell table:style-name="ce89" table:formula="of:=[.$AG$2]+[.$U$2]+[.$U$4]" office:value-type="float" office:value="8" calcext:value-type="float">
            <text:p>8</text:p>
          </table:table-cell>
          <table:table-cell table:style-name="ce39" table:formula="of:=[.$AH$2]+[.$U$4]+[.$U$5]" office:value-type="float" office:value="5" calcext:value-type="float">
            <text:p>5</text:p>
          </table:table-cell>
          <table:table-cell table:style-name="ce49" table:formula="of:=[.$AI$2]+[.$U$5]+[.$U$4]" office:value-type="float" office:value="9" calcext:value-type="float">
            <text:p>9</text:p>
          </table:table-cell>
          <table:table-cell table:style-name="ce60" table:formula="of:=[.$AJ$2]+[.$U$4]+[.$U$3]" office:value-type="float" office:value="16" calcext:value-type="float">
            <text:p>16</text:p>
          </table:table-cell>
          <table:table-cell table:style-name="ce111"/>
          <table:table-cell table:style-name="ce19" table:formula="of:=[.$AF$2]+[.$U$3]+[.$U$4]" office:value-type="float" office:value="17" calcext:value-type="float">
            <text:p>17</text:p>
          </table:table-cell>
          <table:table-cell table:style-name="ce89" table:formula="of:=[.$AG$2]+[.$U$3]+[.$U$4]" office:value-type="float" office:value="9" calcext:value-type="float">
            <text:p>9</text:p>
          </table:table-cell>
          <table:table-cell table:style-name="ce92" table:formula="of:=[.$AH$2]+[.$U$2]+[.$U$4]" office:value-type="float" office:value="5" calcext:value-type="float">
            <text:p>5</text:p>
          </table:table-cell>
          <table:table-cell table:style-name="ce105" table:formula="of:=[.$AI$2]+[.$U$3]+[.$U$4]" office:value-type="float" office:value="10" calcext:value-type="float">
            <text:p>10</text:p>
          </table:table-cell>
          <table:table-cell table:style-name="ce105" table:formula="of:=[.$AJ$2]+[.$U$4]+[.$U$3]" office:value-type="float" office:value="16" calcext:value-type="float">
            <text:p>16</text:p>
          </table:table-cell>
          <table:table-cell table:style-name="ce111"/>
          <table:table-cell table:style-name="ce74" table:formula="of:=[.$AF$2]+[.$U$3]+[.$U$4]" office:value-type="float" office:value="17" calcext:value-type="float">
            <text:p>17</text:p>
          </table:table-cell>
          <table:table-cell table:style-name="ce31" table:formula="of:=[.$AG$2]++[.$U$3]+[.$U$4]" office:value-type="float" office:value="9" calcext:value-type="float">
            <text:p>9</text:p>
          </table:table-cell>
          <table:table-cell table:style-name="ce39" table:formula="of:=[.$AH$2]+[.$U$4]+[.$U$5]" office:value-type="float" office:value="5" calcext:value-type="float">
            <text:p>5</text:p>
          </table:table-cell>
          <table:table-cell table:style-name="ce105" table:formula="of:=[.$AI$2]+[.$U$2]+[.$U$4]" office:value-type="float" office:value="9" calcext:value-type="float">
            <text:p>9</text:p>
          </table:table-cell>
          <table:table-cell table:style-name="ce105" table:formula="of:=[.$AJ$2]+[.$U$4]+[.$U$2]" office:value-type="float" office:value="15" calcext:value-type="float">
            <text:p>15</text:p>
          </table:table-cell>
          <table:table-cell table:style-name="ce111"/>
          <table:table-cell table:style-name="ce74" table:formula="of:=[.$AF$2]+[.$U$3]+[.$U$4]" office:value-type="float" office:value="17" calcext:value-type="float">
            <text:p>17</text:p>
          </table:table-cell>
          <table:table-cell table:style-name="ce31" table:formula="of:=[.$AG$2]+[.$U$3]+[.$U$4]" office:value-type="float" office:value="9" calcext:value-type="float">
            <text:p>9</text:p>
          </table:table-cell>
          <table:table-cell table:style-name="ce165" table:formula="of:=[.$AH$2]+[.$U$3]+[.$U$4]" office:value-type="float" office:value="6" calcext:value-type="float">
            <text:p>6</text:p>
          </table:table-cell>
          <table:table-cell table:style-name="ce105" table:formula="of:=[.$AI$2]+[.$U$2]+[.$U$4]" office:value-type="float" office:value="9" calcext:value-type="float">
            <text:p>9</text:p>
          </table:table-cell>
          <table:table-cell table:style-name="ce105" table:formula="of:=[.$AJ$2]+[.$U$2]+[.$U$4]" office:value-type="float" office:value="15" calcext:value-type="float">
            <text:p>15</text:p>
          </table:table-cell>
          <table:table-cell table:style-name="ce5"/>
          <table:table-cell table:formula="of:=COM.MICROSOFT.CONCAT(&quot;&quot;&quot;10&quot;&quot;: { &quot;;COM.MICROSOFT.TEXTJOIN(&quot;, &quot;;TRUE();[.B28:.F30]);&quot;}&quot;)" office:value-type="string" office:string-value="&quot;10&quot;: { &quot;0&quot;: 16, &quot;1&quot;: 9, &quot;2&quot;: 5, &quot;3&quot;: 9, &quot;4&quot;: 16, &quot;5&quot;: 6, &quot;6&quot;: 3, &quot;7&quot;: 2, &quot;8&quot;: 1, &quot;9&quot;: 12, &quot;10&quot;: 12, &quot;11&quot;: 2, &quot;12&quot;: 1, &quot;13&quot;: 0, &quot;14&quot;: 11}" calcext:value-type="string">
            <text:p>"10": { "0": 16, "1": 9, "2": 5, "3": 9, "4": 16, "5": 6, "6": 3, "7": 2, "8": 1, "9": 12, "10": 12, "11": 2, "12": 1, "13": 0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6" calcext:value-type="float">
            <text:p>6</text:p>
          </table:table-cell>
          <table:table-cell table:style-name="ce32" table:formula="of:=[.$AG$3]+[.$U$5]" office:value-type="float" office:value="3" calcext:value-type="float">
            <text:p>3</text:p>
          </table:table-cell>
          <table:table-cell table:style-name="ce42" table:formula="of:=[.$AH$3]+[.$U$5]" office:value-type="float" office:value="2" calcext:value-type="float">
            <text:p>2</text:p>
          </table:table-cell>
          <table:table-cell table:style-name="ce54" table:formula="of:=[.$AI$3]+[.$U$5]" office:value-type="float" office:value="1" calcext:value-type="float">
            <text:p>1</text:p>
          </table:table-cell>
          <table:table-cell table:style-name="ce46" table:formula="of:=[.$AJ$3]+[.$U$4]+[.$U$5]" office:value-type="float" office:value="12" calcext:value-type="float">
            <text:p>12</text:p>
          </table:table-cell>
          <table:table-cell/>
          <table:table-cell table:style-name="ce79" table:formula="of:=[.$AF$3]+[.$U$3]" office:value-type="float" office:value="7" calcext:value-type="float">
            <text:p>7</text:p>
          </table:table-cell>
          <table:table-cell table:style-name="ce27" table:formula="of:=[.$AG$3]+[.$U$2]" office:value-type="float" office:value="3" calcext:value-type="float">
            <text:p>3</text:p>
          </table:table-cell>
          <table:table-cell table:formula="of:=[.$AH$3]" office:value-type="float" office:value="1" calcext:value-type="float">
            <text:p>1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style-name="ce104" table:formula="of:=[.$AJ$3]+[.$U$3]" office:value-type="float" office:value="12" calcext:value-type="float">
            <text:p>12</text:p>
          </table:table-cell>
          <table:table-cell/>
          <table:table-cell table:style-name="ce13" table:formula="of:=[.$AF$3]+[.$U$3]" office:value-type="float" office:value="7" calcext:value-type="float">
            <text:p>7</text:p>
          </table:table-cell>
          <table:table-cell table:formula="of:=[.$AG$3]+[.$U$3]" office:value-type="float" office:value="4" calcext:value-type="float">
            <text:p>4</text:p>
          </table:table-cell>
          <table:table-cell table:style-name="ce36" table:formula="of:=[.$AH$3]+[.$U$2]" office:value-type="float" office:value="2" calcext:value-type="float">
            <text:p>2</text:p>
          </table:table-cell>
          <table:table-cell table:formula="of:=[.$AI$3]+[.$U$3]" office:value-type="float" office:value="2" calcext:value-type="float">
            <text:p>2</text:p>
          </table:table-cell>
          <table:table-cell table:style-name="ce45" table:formula="of:=[.$AJ$3]+[.$U$3]" office:value-type="float" office:value="12" calcext:value-type="float">
            <text:p>12</text:p>
          </table:table-cell>
          <table:table-cell table:style-name="ce98"/>
          <table:table-cell table:style-name="ce71" table:formula="of:=[.$AF$3]+[.$U$5]" office:value-type="float" office:value="6" calcext:value-type="float">
            <text:p>6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98"/>
          <table:table-cell table:style-name="ce79" table:formula="of:=[.$AF$3]+[.$U$4]+[.$U$3]" office:value-type="float" office:value="8" calcext:value-type="float">
            <text:p>8</text:p>
          </table:table-cell>
          <table:table-cell table:style-name="ce28" table:formula="of:=[.$AG$3]+[.$U$3]" office:value-type="float" office:value="4" calcext:value-type="float">
            <text:p>4</text:p>
          </table:table-cell>
          <table:table-cell table:style-name="ce37" table:formula="of:=[.$AH$3]+[.$U$3]" office:value-type="float" office:value="3" calcext:value-type="float">
            <text:p>3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11" calcext:value-type="float">
            <text:p>11</text:p>
          </table:table-cell>
          <table:table-cell table:style-name="ce5"/>
          <table:table-cell table:formula="of:=COM.MICROSOFT.CONCAT(&quot;&quot;&quot;11&quot;&quot;: { &quot;;COM.MICROSOFT.TEXTJOIN(&quot;, &quot;;TRUE();[.H28:.L30]);&quot;}&quot;)" office:value-type="string" office:string-value="&quot;11&quot;: { &quot;0&quot;: 17, &quot;1&quot;: 8, &quot;2&quot;: 5, &quot;3&quot;: 9, &quot;4&quot;: 16, &quot;5&quot;: 7, &quot;6&quot;: 3, &quot;7&quot;: 1, &quot;8&quot;: 1, &quot;9&quot;: 12, &quot;10&quot;: 5, &quot;11&quot;: 9, &quot;12&quot;: 1, &quot;13&quot;: 0, &quot;14&quot;: 10}" calcext:value-type="string">
            <text:p>"11": { "0": 17, "1": 8, "2": 5, "3": 9, "4": 16, "5": 7, "6": 3, "7": 1, "8": 1, "9": 12, "10": 5, "11": 9, "12": 1, "13": 0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2" table:formula="of:=[.$AF$4]" office:value-type="float" office:value="12" calcext:value-type="float">
            <text:p>12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formula="of:=[.$AJ$3]+[.$U$4]" office:value-type="float" office:value="11" calcext:value-type="float">
            <text:p>11</text:p>
          </table:table-cell>
          <table:table-cell/>
          <table:table-cell table:style-name="ce13" table:formula="of:=[.$AF$3]" office:value-type="float" office:value="5" calcext:value-type="float">
            <text:p>5</text:p>
          </table:table-cell>
          <table:table-cell table:style-name="ce12" table:formula="of:=[.$AG$4]" office:value-type="float" office:value="9" calcext:value-type="float">
            <text:p>9</text:p>
          </table:table-cell>
          <table:table-cell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/>
          <table:table-cell table:style-name="ce13" table:formula="of:=[.$AF$3]" office:value-type="float" office:value="5" calcext:value-type="float">
            <text:p>5</text:p>
          </table:table-cell>
          <table:table-cell table:formula="of:=[.$AG$3]" office:value-type="float" office:value="2" calcext:value-type="float">
            <text:p>2</text:p>
          </table:table-cell>
          <table:table-cell table:style-name="ce12" table:formula="of:=[.$AH$4]" office:value-type="float" office:value="8" calcext:value-type="float">
            <text:p>8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98"/>
          <table:table-cell table:style-name="ce13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12" table:formula="of:=[.$AI$4]" office:value-type="float" office:value="4" calcext:value-type="float">
            <text:p>4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98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4]" office:value-type="float" office:value="11" calcext:value-type="float">
            <text:p>11</text:p>
          </table:table-cell>
          <table:table-cell table:style-name="ce5"/>
          <table:table-cell table:formula="of:=COM.MICROSOFT.CONCAT(&quot;&quot;&quot;12&quot;&quot;: { &quot;;COM.MICROSOFT.TEXTJOIN(&quot;, &quot;;TRUE();[.N28:.R30]);&quot;}&quot;)" office:value-type="string" office:string-value="&quot;12&quot;: { &quot;0&quot;: 17, &quot;1&quot;: 9, &quot;2&quot;: 5, &quot;3&quot;: 10, &quot;4&quot;: 16, &quot;5&quot;: 7, &quot;6&quot;: 4, &quot;7&quot;: 2, &quot;8&quot;: 2, &quot;9&quot;: 12, &quot;10&quot;: 5, &quot;11&quot;: 2, &quot;12&quot;: 8, &quot;13&quot;: 0, &quot;14&quot;: 10}" calcext:value-type="string">
            <text:p>"12": { "0": 17, "1": 9, "2": 5, "3": 10, "4": 16, "5": 7, "6": 4, "7": 2, "8": 2, "9": 12, "10": 5, "11": 2, "12": 8, "13": 0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2" table:number-columns-repeated="29"/>
          <table:table-cell table:style-name="ce5"/>
          <table:table-cell table:formula="of:=COM.MICROSOFT.CONCAT(&quot;&quot;&quot;13&quot;&quot;: { &quot;;COM.MICROSOFT.TEXTJOIN(&quot;, &quot;;TRUE();[.T28:.X30]);&quot;}&quot;)" office:value-type="string" office:string-value="&quot;13&quot;: { &quot;0&quot;: 17, &quot;1&quot;: 9, &quot;2&quot;: 5, &quot;3&quot;: 9, &quot;4&quot;: 15, &quot;5&quot;: 6, &quot;6&quot;: 2, &quot;7&quot;: 1, &quot;8&quot;: 1, &quot;9&quot;: 11, &quot;10&quot;: 5, &quot;11&quot;: 2, &quot;12&quot;: 1, &quot;13&quot;: 4, &quot;14&quot;: 11}" calcext:value-type="string">
            <text:p>"13": { "0": 17, "1": 9, "2": 5, "3": 9, "4": 15, "5": 6, "6": 2, "7": 1, "8": 1, "9": 11, "10": 5, "11": 2, "12": 1, "13": 4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2]; &quot;&quot;&quot;: &quot;; [.B24])" office:value-type="string" office:string-value="&quot;0&quot;: 16" calcext:value-type="string">
            <text:p>"0": 16</text:p>
          </table:table-cell>
          <table:table-cell table:style-name="ce103" table:formula="of:=COM.MICROSOFT.CONCAT(&quot;&quot;&quot;&quot;;[.$C$2]; &quot;&quot;&quot;: &quot;; [.C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D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E24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F24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H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I24])" office:value-type="string" office:string-value="&quot;1&quot;: 8" calcext:value-type="string">
            <text:p>"1": 8</text:p>
          </table:table-cell>
          <table:table-cell table:style-name="ce103" table:formula="of:=COM.MICROSOFT.CONCAT(&quot;&quot;&quot;&quot;;[.$D$2]; &quot;&quot;&quot;: &quot;; [.J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K24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L24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N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O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P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Q24])" office:value-type="string" office:string-value="&quot;3&quot;: 10" calcext:value-type="string">
            <text:p>"3": 10</text:p>
          </table:table-cell>
          <table:table-cell table:style-name="ce103" table:formula="of:=COM.MICROSOFT.CONCAT(&quot;&quot;&quot;&quot;;[.$F$2]; &quot;&quot;&quot;: &quot;; [.R24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T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U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V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W24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X24])" office:value-type="string" office:string-value="&quot;4&quot;: 15" calcext:value-type="string">
            <text:p>"4": 15</text:p>
          </table:table-cell>
          <table:table-cell table:style-name="ce103"/>
          <table:table-cell table:style-name="ce103" table:formula="of:=COM.MICROSOFT.CONCAT(&quot;&quot;&quot;&quot;;[.$B$2]; &quot;&quot;&quot;: &quot;; [.Z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AA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AB24])" office:value-type="string" office:string-value="&quot;2&quot;: 6" calcext:value-type="string">
            <text:p>"2": 6</text:p>
          </table:table-cell>
          <table:table-cell table:style-name="ce103" table:formula="of:=COM.MICROSOFT.CONCAT(&quot;&quot;&quot;&quot;;[.$E$2]; &quot;&quot;&quot;: &quot;; [.AC24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AD24])" office:value-type="string" office:string-value="&quot;4&quot;: 15" calcext:value-type="string">
            <text:p>"4": 15</text:p>
          </table:table-cell>
          <table:table-cell table:style-name="ce5"/>
          <table:table-cell table:formula="of:=COM.MICROSOFT.CONCAT(&quot;&quot;&quot;14&quot;&quot;: { &quot;;COM.MICROSOFT.TEXTJOIN(&quot;, &quot;;TRUE();[.Z28:.AD30]);&quot;}&quot;)" office:value-type="string" office:string-value="&quot;14&quot;: { &quot;0&quot;: 17, &quot;1&quot;: 9, &quot;2&quot;: 6, &quot;3&quot;: 9, &quot;4&quot;: 15, &quot;5&quot;: 8, &quot;6&quot;: 4, &quot;7&quot;: 3, &quot;8&quot;: 1, &quot;9&quot;: 11, &quot;10&quot;: 7, &quot;11&quot;: 3, &quot;12&quot;: 2, &quot;13&quot;: 1, &quot;14&quot;: 11}" calcext:value-type="string">
            <text:p>"14": { "0": 17, "1": 9, "2": 6, "3": 9, "4": 15, "5": 8, "6": 4, "7": 3, "8": 1, "9": 11, "10": 7, "11": 3, "12": 2, "13": 1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3]; &quot;&quot;&quot;: &quot;; [.B25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C25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D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F25])" office:value-type="string" office:string-value="&quot;9&quot;: 12" calcext:value-type="string">
            <text:p>"9": 12</text:p>
          </table:table-cell>
          <table:table-cell table:style-name="ce103"/>
          <table:table-cell table:style-name="ce103" table:formula="of:=COM.MICROSOFT.CONCAT(&quot;&quot;&quot;&quot;;[.$B$3]; &quot;&quot;&quot;: &quot;; [.H25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I25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J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25])" office:value-type="string" office:string-value="&quot;9&quot;: 12" calcext:value-type="string">
            <text:p>"9": 12</text:p>
          </table:table-cell>
          <table:table-cell table:style-name="ce103"/>
          <table:table-cell table:style-name="ce103" table:formula="of:=COM.MICROSOFT.CONCAT(&quot;&quot;&quot;&quot;;[.$B$3]; &quot;&quot;&quot;: &quot;; [.N25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O25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P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Q25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R25])" office:value-type="string" office:string-value="&quot;9&quot;: 12" calcext:value-type="string">
            <text:p>"9": 12</text:p>
          </table:table-cell>
          <table:table-cell table:style-name="ce103"/>
          <table:table-cell table:style-name="ce103" table:formula="of:=COM.MICROSOFT.CONCAT(&quot;&quot;&quot;&quot;;[.$B$3]; &quot;&quot;&quot;: &quot;; [.T25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U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V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W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X25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Z25])" office:value-type="string" office:string-value="&quot;5&quot;: 8" calcext:value-type="string">
            <text:p>"5": 8</text:p>
          </table:table-cell>
          <table:table-cell table:style-name="ce103" table:formula="of:=COM.MICROSOFT.CONCAT(&quot;&quot;&quot;&quot;;[.$C$3]; &quot;&quot;&quot;: &quot;; [.AA25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AB25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AC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25])" office:value-type="string" office:string-value="&quot;9&quot;: 11" calcext:value-type="string">
            <text:p>"9": 11</text:p>
          </table:table-cell>
          <table:table-cell table:style-name="ce5"/>
          <table:table-cell table:number-columns-repeated="33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4]; &quot;&quot;&quot;: &quot;; [.B26])" office:value-type="string" office:string-value="&quot;10&quot;: 12" calcext:value-type="string">
            <text:p>"10": 12</text:p>
          </table:table-cell>
          <table:table-cell table:style-name="ce103" table:formula="of:=COM.MICROSOFT.CONCAT(&quot;&quot;&quot;&quot;;[.$C$4]; &quot;&quot;&quot;: &quot;; [.C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D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E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F26])" office:value-type="string" office:string-value="&quot;14&quot;: 11" calcext:value-type="string">
            <text:p>"14": 11</text:p>
          </table:table-cell>
          <table:table-cell table:style-name="ce103"/>
          <table:table-cell table:style-name="ce103" table:formula="of:=COM.MICROSOFT.CONCAT(&quot;&quot;&quot;&quot;;[.$B$4]; &quot;&quot;&quot;: &quot;; [.H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I26])" office:value-type="string" office:string-value="&quot;11&quot;: 9" calcext:value-type="string">
            <text:p>"11": 9</text:p>
          </table:table-cell>
          <table:table-cell table:style-name="ce103" table:formula="of:=COM.MICROSOFT.CONCAT(&quot;&quot;&quot;&quot;;[.$D$4]; &quot;&quot;&quot;: &quot;; [.J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K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L26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N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O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P26])" office:value-type="string" office:string-value="&quot;12&quot;: 8" calcext:value-type="string">
            <text:p>"12": 8</text:p>
          </table:table-cell>
          <table:table-cell table:style-name="ce103" table:formula="of:=COM.MICROSOFT.CONCAT(&quot;&quot;&quot;&quot;;[.$E$4]; &quot;&quot;&quot;: &quot;; [.Q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R26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T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U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V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W26])" office:value-type="string" office:string-value="&quot;13&quot;: 4" calcext:value-type="string">
            <text:p>"13": 4</text:p>
          </table:table-cell>
          <table:table-cell table:style-name="ce103" table:formula="of:=COM.MICROSOFT.CONCAT(&quot;&quot;&quot;&quot;;[.$F$4]; &quot;&quot;&quot;: &quot;; [.X26])" office:value-type="string" office:string-value="&quot;14&quot;: 11" calcext:value-type="string">
            <text:p>"14": 11</text:p>
          </table:table-cell>
          <table:table-cell table:style-name="ce103"/>
          <table:table-cell table:style-name="ce103" table:formula="of:=COM.MICROSOFT.CONCAT(&quot;&quot;&quot;&quot;;[.$B$4]; &quot;&quot;&quot;: &quot;; [.Z26])" office:value-type="string" office:string-value="&quot;10&quot;: 7" calcext:value-type="string">
            <text:p>"10": 7</text:p>
          </table:table-cell>
          <table:table-cell table:style-name="ce103" table:formula="of:=COM.MICROSOFT.CONCAT(&quot;&quot;&quot;&quot;;[.$C$4]; &quot;&quot;&quot;: &quot;; [.AA26])" office:value-type="string" office:string-value="&quot;11&quot;: 3" calcext:value-type="string">
            <text:p>"11": 3</text:p>
          </table:table-cell>
          <table:table-cell table:style-name="ce103" table:formula="of:=COM.MICROSOFT.CONCAT(&quot;&quot;&quot;&quot;;[.$D$4]; &quot;&quot;&quot;: &quot;; [.AB26])" office:value-type="string" office:string-value="&quot;12&quot;: 2" calcext:value-type="string">
            <text:p>"12": 2</text:p>
          </table:table-cell>
          <table:table-cell table:style-name="ce103" table:formula="of:=COM.MICROSOFT.CONCAT(&quot;&quot;&quot;&quot;;[.$E$4]; &quot;&quot;&quot;: &quot;; [.AC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26])" office:value-type="string" office:string-value="&quot;14&quot;: 11" calcext:value-type="string">
            <text:p>"14": 11</text:p>
          </table:table-cell>
          <table:table-cell table:style-name="ce5"/>
          <table:table-cell table:formula="of:=COM.MICROSOFT.TEXTJOIN(&quot;, &quot;;TRUE();[.AF24:.AF28])" office:value-type="string" office:string-value="&quot;10&quot;: { &quot;0&quot;: 16, &quot;1&quot;: 9, &quot;2&quot;: 5, &quot;3&quot;: 9, &quot;4&quot;: 16, &quot;5&quot;: 6, &quot;6&quot;: 3, &quot;7&quot;: 2, &quot;8&quot;: 1, &quot;9&quot;: 12, &quot;10&quot;: 12, &quot;11&quot;: 2, &quot;12&quot;: 1, &quot;13&quot;: 0, &quot;14&quot;: 11}, &quot;11&quot;: { &quot;0&quot;: 17, &quot;1&quot;: 8, &quot;2&quot;: 5, &quot;3&quot;: 9, &quot;4&quot;: 16, &quot;5&quot;: 7, &quot;6&quot;: 3, &quot;7&quot;: 1, &quot;8&quot;: 1, &quot;9&quot;: 12, &quot;10&quot;: 5, &quot;11&quot;: 9, &quot;12&quot;: 1, &quot;13&quot;: 0, &quot;14&quot;: 10}, &quot;12&quot;: { &quot;0&quot;: 17, &quot;1&quot;: 9, &quot;2&quot;: 5, &quot;3&quot;: 10, &quot;4&quot;: 16, &quot;5&quot;: 7, &quot;6&quot;: 4, &quot;7&quot;: 2, &quot;8&quot;: 2, &quot;9&quot;: 12, &quot;10&quot;: 5, &quot;11&quot;: 2, &quot;12&quot;: 8, &quot;13&quot;: 0, &quot;14&quot;: 10}, &quot;13&quot;: { &quot;0&quot;: 17, &quot;1&quot;: 9, &quot;2&quot;: 5, &quot;3&quot;: 9, &quot;4&quot;: 15, &quot;5&quot;: 6, &quot;6&quot;: 2, &quot;7&quot;: 1, &quot;8&quot;: 1, &quot;9&quot;: 11, &quot;10&quot;: 5, &quot;11&quot;: 2, &quot;12&quot;: 1, &quot;13&quot;: 4, &quot;14&quot;: 11}, &quot;14&quot;: { &quot;0&quot;: 17, &quot;1&quot;: 9, &quot;2&quot;: 6, &quot;3&quot;: 9, &quot;4&quot;: 15, &quot;5&quot;: 8, &quot;6&quot;: 4, &quot;7&quot;: 3, &quot;8&quot;: 1, &quot;9&quot;: 11, &quot;10&quot;: 7, &quot;11&quot;: 3, &quot;12&quot;: 2, &quot;13&quot;: 1, &quot;14&quot;: 11}" calcext:value-type="string">
            <text:p>"10": { "0": 16, "1": 9, "2": 5, "3": 9, "4": 16, "5": 6, "6": 3, "7": 2, "8": 1, "9": 12, "10": 12, "11": 2, "12": 1, "13": 0, "14": 11}, "11": { "0": 17, "1": 8, "2": 5, "3": 9, "4": 16, "5": 7, "6": 3, "7": 1, "8": 1, "9": 12, "10": 5, "11": 9, "12": 1, "13": 0, "14": 10}, "12": { "0": 17, "1": 9, "2": 5, "3": 10, "4": 16, "5": 7, "6": 4, "7": 2, "8": 2, "9": 12, "10": 5, "11": 2, "12": 8, "13": 0, "14": 10}, "13": { "0": 17, "1": 9, "2": 5, "3": 9, "4": 15, "5": 6, "6": 2, "7": 1, "8": 1, "9": 11, "10": 5, "11": 2, "12": 1, "13": 4, "14": 11}, "14": { "0": 17, "1": 9, "2": 6, "3": 9, "4": 15, "5": 8, "6": 4, "7": 3, "8": 1, "9": 11, "10": 7, "11": 3, "12": 2, "13": 1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" table:formula="of:=COM.MICROSOFT.CONCAT(&quot;{&quot;; COM.MICROSOFT.TEXTJOIN(&quot;, &quot;;TRUE();[.AF14]; [.AF22]; [.AF30]);&quot;}&quot;)" office:value-type="string" office:string-value="{&quot;0&quot;: { &quot;0&quot;: 14, &quot;1&quot;: 2, &quot;2&quot;: 1, &quot;3&quot;: 0, &quot;4&quot;: 11, &quot;5&quot;: 6, &quot;6&quot;: 4, &quot;7&quot;: 3, &quot;8&quot;: 1, &quot;9&quot;: 11, &quot;10&quot;: 14, &quot;11&quot;: 12, &quot;12&quot;: 11, &quot;13&quot;: 7, &quot;14&quot;: 14}, &quot;1&quot;: { &quot;0&quot;: 6, &quot;1&quot;: 6, &quot;2&quot;: 1, &quot;3&quot;: 1, &quot;4&quot;: 10, &quot;5&quot;: 6, &quot;6&quot;: 3, &quot;7&quot;: 2, &quot;8&quot;: 0, &quot;9&quot;: 10, &quot;10&quot;: 15, &quot;11&quot;: 11, &quot;12&quot;: 11, &quot;13&quot;: 7, &quot;14&quot;: 14}, &quot;2&quot;: { &quot;0&quot;: 6, &quot;1&quot;: 2, &quot;2&quot;: 3, &quot;3&quot;: 1, &quot;4&quot;: 10, &quot;5&quot;: 5, &quot;6&quot;: 2, &quot;7&quot;: 2, &quot;8&quot;: 0, &quot;9&quot;: 10, &quot;10&quot;: 15, &quot;11&quot;: 12, &quot;12&quot;: 10, &quot;13&quot;: 7, &quot;14&quot;: 14}, &quot;3&quot;: { &quot;0&quot;: 5, &quot;1&quot;: 2, &quot;2&quot;: 1, &quot;3&quot;: 7, &quot;4&quot;: 11, &quot;5&quot;: 6, &quot;6&quot;: 3, &quot;7&quot;: 2, &quot;8&quot;: 1, &quot;9&quot;: 11, &quot;10&quot;: 15, &quot;11&quot;: 12, &quot;12&quot;: 11, &quot;13&quot;: 6, &quot;14&quot;: 13}, &quot;4&quot;: { &quot;0&quot;: 7, &quot;1&quot;: 3, &quot;2&quot;: 2, &quot;3&quot;: 1, &quot;4&quot;: 13, &quot;5&quot;: 7, &quot;6&quot;: 3, &quot;7&quot;: 2, &quot;8&quot;: 1, &quot;9&quot;: 11, &quot;10&quot;: 15, &quot;11&quot;: 12, &quot;12&quot;: 11, &quot;13&quot;: 6, &quot;14&quot;: 13}, &quot;5&quot;: { &quot;0&quot;: 15, &quot;1&quot;: 7, &quot;2&quot;: 4, &quot;3&quot;: 8, &quot;4&quot;: 14, &quot;5&quot;: 5, &quot;6&quot;: 2, &quot;7&quot;: 1, &quot;8&quot;: 0, &quot;9&quot;: 11, &quot;10&quot;: 13, &quot;11&quot;: 11, &quot;12&quot;: 9, &quot;13&quot;: 5, &quot;14&quot;: 12}, &quot;6&quot;: { &quot;0&quot;: 16, &quot;1&quot;: 7, &quot;2&quot;: 3, &quot;3&quot;: 8, &quot;4&quot;: 14, &quot;5&quot;: 5, &quot;6&quot;: 2, &quot;7&quot;: 1, &quot;8&quot;: 0, &quot;9&quot;: 10, &quot;10&quot;: 13, &quot;11&quot;: 10, &quot;12&quot;: 9, &quot;13&quot;: 5, &quot;14&quot;: 12}, &quot;7&quot;: { &quot;0&quot;: 16, &quot;1&quot;: 8, &quot;2&quot;: 4, &quot;3&quot;: 8, &quot;4&quot;: 14, &quot;5&quot;: 5, &quot;6&quot;: 2, &quot;7&quot;: 1, &quot;8&quot;: 0, &quot;9&quot;: 10, &quot;10&quot;: 13, &quot;11&quot;: 10, &quot;12&quot;: 9, &quot;13&quot;: 5, &quot;14&quot;: 12}, &quot;8&quot;: { &quot;0&quot;: 15, &quot;1&quot;: 7, &quot;2&quot;: 3, &quot;3&quot;: 8, &quot;4&quot;: 14, &quot;5&quot;: 5, &quot;6&quot;: 2, &quot;7&quot;: 1, &quot;8&quot;: 0, &quot;9&quot;: 11, &quot;10&quot;: 13, &quot;11&quot;: 10, &quot;12&quot;: 10, &quot;13&quot;: 5, &quot;14&quot;: 12}, &quot;9&quot;: { &quot;0&quot;: 16, &quot;1&quot;: 7, &quot;2&quot;: 4, &quot;3&quot;: 8, &quot;4&quot;: 14, &quot;5&quot;: 7, &quot;6&quot;: 3, &quot;7&quot;: 2, &quot;8&quot;: 1, &quot;9&quot;: 10, &quot;10&quot;: 14, &quot;11&quot;: 10, &quot;12&quot;: 9, &quot;13&quot;: 5, &quot;14&quot;: 12}, &quot;10&quot;: { &quot;0&quot;: 16, &quot;1&quot;: 9, &quot;2&quot;: 5, &quot;3&quot;: 9, &quot;4&quot;: 16, &quot;5&quot;: 6, &quot;6&quot;: 3, &quot;7&quot;: 2, &quot;8&quot;: 1, &quot;9&quot;: 12, &quot;10&quot;: 12, &quot;11&quot;: 2, &quot;12&quot;: 1, &quot;13&quot;: 0, &quot;14&quot;: 11}, &quot;11&quot;: { &quot;0&quot;: 17, &quot;1&quot;: 8, &quot;2&quot;: 5, &quot;3&quot;: 9, &quot;4&quot;: 16, &quot;5&quot;: 7, &quot;6&quot;: 3, &quot;7&quot;: 1, &quot;8&quot;: 1, &quot;9&quot;: 12, &quot;10&quot;: 5, &quot;11&quot;: 9, &quot;12&quot;: 1, &quot;13&quot;: 0, &quot;14&quot;: 10}, &quot;12&quot;: { &quot;0&quot;: 17, &quot;1&quot;: 9, &quot;2&quot;: 5, &quot;3&quot;: 10, &quot;4&quot;: 16, &quot;5&quot;: 7, &quot;6&quot;: 4, &quot;7&quot;: 2, &quot;8&quot;: 2, &quot;9&quot;: 12, &quot;10&quot;: 5, &quot;11&quot;: 2, &quot;12&quot;: 8, &quot;13&quot;: 0, &quot;14&quot;: 10}, &quot;13&quot;: { &quot;0&quot;: 17, &quot;1&quot;: 9, &quot;2&quot;: 5, &quot;3&quot;: 9, &quot;4&quot;: 15, &quot;5&quot;: 6, &quot;6&quot;: 2, &quot;7&quot;: 1, &quot;8&quot;: 1, &quot;9&quot;: 11, &quot;10&quot;: 5, &quot;11&quot;: 2, &quot;12&quot;: 1, &quot;13&quot;: 4, &quot;14&quot;: 11}, &quot;14&quot;: { &quot;0&quot;: 17, &quot;1&quot;: 9, &quot;2&quot;: 6, &quot;3&quot;: 9, &quot;4&quot;: 15, &quot;5&quot;: 8, &quot;6&quot;: 4, &quot;7&quot;: 3, &quot;8&quot;: 1, &quot;9&quot;: 11, &quot;10&quot;: 7, &quot;11&quot;: 3, &quot;12&quot;: 2, &quot;13&quot;: 1, &quot;14&quot;: 11}}" calcext:value-type="string">
            <text:p>{"0": { "0": 14, "1": 2, "2": 1, "3": 0, "4": 11, "5": 6, "6": 4, "7": 3, "8": 1, "9": 11, "10": 14, "11": 12, "12": 11, "13": 7, "14": 14}, "1": { "0": 6, "1": 6, "2": 1, "3": 1, "4": 10, "5": 6, "6": 3, "7": 2, "8": 0, "9": 10, "10": 15, "11": 11, "12": 11, "13": 7, "14": 14}, "2": { "0": 6, "1": 2, "2": 3, "3": 1, "4": 10, "5": 5, "6": 2, "7": 2, "8": 0, "9": 10, "10": 15, "11": 12, "12": 10, "13": 7, "14": 14}, "3": { "0": 5, "1": 2, "2": 1, "3": 7, "4": 11, "5": 6, "6": 3, "7": 2, "8": 1, "9": 11, "10": 15, "11": 12, "12": 11, "13": 6, "14": 13}, "4": { "0": 7, "1": 3, "2": 2, "3": 1, "4": 13, "5": 7, "6": 3, "7": 2, "8": 1, "9": 11, "10": 15, "11": 12, "12": 11, "13": 6, "14": 13}, "5": { "0": 15, "1": 7, "2": 4, "3": 8, "4": 14, "5": 5, "6": 2, "7": 1, "8": 0, "9": 11, "10": 13, "11": 11, "12": 9, "13": 5, "14": 12}, "6": { "0": 16, "1": 7, "2": 3, "3": 8, "4": 14, "5": 5, "6": 2, "7": 1, "8": 0, "9": 10, "10": 13, "11": 10, "12": 9, "13": 5, "14": 12}, "7": { "0": 16, "1": 8, "2": 4, "3": 8, "4": 14, "5": 5, "6": 2, "7": 1, "8": 0, "9": 10, "10": 13, "11": 10, "12": 9, "13": 5, "14": 12}, "8": { "0": 15, "1": 7, "2": 3, "3": 8, "4": 14, "5": 5, "6": 2, "7": 1, "8": 0, "9": 11, "10": 13, "11": 10, "12": 10, "13": 5, "14": 12}, "9": { "0": 16, "1": 7, "2": 4, "3": 8, "4": 14, "5": 7, "6": 3, "7": 2, "8": 1, "9": 10, "10": 14, "11": 10, "12": 9, "13": 5, "14": 12}, "10": { "0": 16, "1": 9, "2": 5, "3": 9, "4": 16, "5": 6, "6": 3, "7": 2, "8": 1, "9": 12, "10": 12, "11": 2, "12": 1, "13": 0, "14": 11}, "11": { "0": 17, "1": 8, "2": 5, "3": 9, "4": 16, "5": 7, "6": 3, "7": 1, "8": 1, "9": 12, "10": 5, "11": 9, "12": 1, "13": 0, "14": 10}, "12": { "0": 17, "1": 9, "2": 5, "3": 10, "4": 16, "5": 7, "6": 4, "7": 2, "8": 2, "9": 12, "10": 5, "11": 2, "12": 8, "13": 0, "14": 10}, "13": { "0": 17, "1": 9, "2": 5, "3": 9, "4": 15, "5": 6, "6": 2, "7": 1, "8": 1, "9": 11, "10": 5, "11": 2, "12": 1, "13": 4, "14": 11}, "14": { "0": 17, "1": 9, "2": 6, "3": 9, "4": 15, "5": 8, "6": 4, "7": 3, "8": 1, "9": 11, "10": 7, "11": 3, "12": 2, "13": 1, "14": 11}}</text:p>
          </table:table-cell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</table:table>
      <table:table table:name="keys_2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8"/>
        <table:table-column table:style-name="co1" table:default-cell-style-name="ce27"/>
        <table:table-column table:style-name="co1" table:default-cell-style-name="ce58"/>
        <table:table-column table:style-name="co1" table:number-columns-repeated="2" table:default-cell-style-name="ce45"/>
        <table:table-column table:style-name="co1" table:default-cell-style-name="ce98"/>
        <table:table-column table:style-name="co1" table:default-cell-style-name="ce13"/>
        <table:table-column table:style-name="co1" table:default-cell-style-name="Default"/>
        <table:table-column table:style-name="co1" table:default-cell-style-name="ce36"/>
        <table:table-column table:style-name="co1" table:number-columns-repeated="2" table:default-cell-style-name="ce45"/>
        <table:table-column table:style-name="co1" table:default-cell-style-name="ce98"/>
        <table:table-column table:style-name="co1" table:default-cell-style-name="ce58"/>
        <table:table-column table:style-name="co1" table:default-cell-style-name="ce27"/>
        <table:table-column table:style-name="co1" table:default-cell-style-name="ce78"/>
        <table:table-column table:style-name="co1" table:default-cell-style-name="ce45"/>
        <table:table-column table:style-name="co1" table:number-columns-repeated="2" table:default-cell-style-name="Default"/>
        <table:table-column table:style-name="co1" table:default-cell-style-name="ce13"/>
        <table:table-column table:style-name="co1" table:default-cell-style-name="ce27"/>
        <table:table-column table:style-name="co1" table:default-cell-style-name="ce36"/>
        <table:table-column table:style-name="co1" table:default-cell-style-name="Default"/>
        <table:table-column table:style-name="co1" table:default-cell-style-name="ce45"/>
        <table:table-column table:style-name="co1" table:number-columns-repeated="7" table:default-cell-style-name="Default"/>
        <table:table-column table:style-name="co1" table:default-cell-style-name="ce5"/>
        <table:table-column table:style-name="co1" table:number-columns-repeated="32" table:default-cell-style-name="Default"/>
        <table:table-column table:style-name="co1" table:number-columns-repeated="16320"/>
        <table:table-row table:style-name="ro1">
          <table:table-cell table:style-name="ce58" table:number-columns-repeated="3"/>
          <table:table-cell/>
          <table:table-cell table:style-name="ce112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112" table:number-columns-repeated="2"/>
          <table:table-cell table:style-name="ce124"/>
          <table:table-cell/>
          <table:table-cell table:style-name="ce58" table:number-columns-repeated="3"/>
          <table:table-cell table:number-columns-repeated="2"/>
          <table:table-cell table:style-name="ce72" office:value-type="string" calcext:value-type="string">
            <text:p>penalties: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  <table:table-cell office:value-type="string" calcext:value-type="string">
            <text:p>priorities:</text:p>
          </table:table-cell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70"/>
          <table:table-cell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style-name="ce4"/>
          <table:table-cell/>
          <table:table-cell table:style-name="ce4"/>
          <table:table-cell table:style-name="ce112"/>
          <table:table-cell table:style-name="ce112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70"/>
          <table:table-cell table:number-columns-repeated="2"/>
          <table:table-cell table:style-name="Default"/>
          <table:table-cell table:style-name="ce139" office:value-type="float" office:value="1" calcext:value-type="float">
            <text:p>1</text:p>
          </table:table-cell>
          <table:table-cell table:style-name="ce72" office:value-type="string" calcext:value-type="string">
            <text:p>same finger</text:p>
          </table:table-cell>
          <table:table-cell table:style-name="ce76" table:number-columns-repeated="2"/>
          <table:table-cell table:number-columns-repeated="7"/>
          <table:table-cell table:style-name="ce166" office:value-type="float" office:value="3" calcext:value-type="float">
            <text:p>3</text:p>
          </table:table-cell>
          <table:table-cell table:style-name="ce169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66" office:value-type="float" office:value="3" calcext:value-type="float">
            <text:p>3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style-name="ce4"/>
          <table:table-cell/>
          <table:table-cell table:style-name="ce123"/>
          <table:table-cell table:style-name="ce112"/>
          <table:table-cell table:style-name="ce112"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78"/>
          <table:table-cell table:number-columns-repeated="2"/>
          <table:table-cell table:style-name="ce72"/>
          <table:table-cell table:style-name="ce140" office:value-type="float" office:value="2" calcext:value-type="float">
            <text:p>2</text:p>
          </table:table-cell>
          <table:table-cell table:style-name="ce72" office:value-type="string" calcext:value-type="string">
            <text:p>awkward diagonal</text:p>
          </table:table-cell>
          <table:table-cell table:style-name="ce77"/>
          <table:table-cell table:style-name="ce76"/>
          <table:table-cell table:number-columns-repeated="7"/>
          <table:table-cell table:style-name="ce179" office:value-type="float" office:value="1" calcext:value-type="float">
            <text:p>1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5" office:value-type="float" office:value="2" calcext:value-type="float">
            <text:p>2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 table:number-columns-repeated="2"/>
          <table:table-cell table:style-name="ce112"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78"/>
          <table:table-cell table:number-columns-repeated="2"/>
          <table:table-cell table:style-name="ce72"/>
          <table:table-cell table:style-name="ce141" office:value-type="float" office:value="1" calcext:value-type="float">
            <text:p>1</text:p>
          </table:table-cell>
          <table:table-cell table:style-name="ce72" office:value-type="string" calcext:value-type="string">
            <text:p>distance(1 row/3 col)</text:p>
          </table:table-cell>
          <table:table-cell table:style-name="ce77" table:number-columns-repeated="3"/>
          <table:table-cell table:number-columns-repeated="6"/>
          <table:table-cell table:style-name="ce168" office:value-type="float" office:value="2" calcext:value-type="float">
            <text:p>2</text:p>
          </table:table-cell>
          <table:table-cell table:number-columns-repeated="2" table:style-name="ce171" office:value-type="float" office:value="1" calcext:value-type="float">
            <text:p>1</text:p>
          </table:table-cell>
          <table:table-cell table:style-name="ce174" office:value-type="float" office:value="0" calcext:value-type="float">
            <text:p>0</text:p>
          </table:table-cell>
          <table:table-cell table:style-name="ce176" office:value-type="float" office:value="2" calcext:value-type="float">
            <text:p>2</text:p>
          </table:table-cell>
          <table:table-cell table:style-name="ce77" table:number-columns-repeated="2"/>
          <table:table-cell table:style-name="ce84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table:style-name="ce85"/>
          <table:table-cell table:style-name="ce70"/>
          <table:table-cell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120" table:number-columns-spanned="1" table:number-rows-spanned="2"/>
          <table:table-cell/>
          <table:table-cell table:style-name="ce70"/>
          <table:table-cell table:style-name="ce127"/>
          <table:table-cell table:style-name="ce78"/>
          <table:table-cell table:number-columns-repeated="2"/>
          <table:table-cell table:style-name="ce72"/>
          <table:table-cell table:style-name="ce158" office:value-type="float" office:value="1" calcext:value-type="float">
            <text:p>1</text:p>
          </table:table-cell>
          <table:table-cell table:style-name="ce72" office:value-type="string" calcext:value-type="string">
            <text:p>other move</text:p>
          </table:table-cell>
          <table:table-cell/>
          <table:table-cell table:style-name="ce77" table:number-columns-repeated="15"/>
          <table:table-cell table:style-name="ce84" table:number-columns-repeated="3"/>
          <table:table-cell table:style-name="ce5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44"/>
          <table:table-cell/>
          <table:covered-table-cell table:style-name="ce44"/>
          <table:covered-table-cell table:number-columns-repeated="2" table:style-name="ce119"/>
          <table:covered-table-cell table:style-name="ce120"/>
          <table:table-cell table:style-name="ce4" table:number-columns-repeated="4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/>
          <table:table-cell table:style-name="ce128" table:formula="of:=SUM([.B8:.F10])-[.B8]" office:value-type="float" office:value="33" calcext:value-type="float" table:number-columns-spanned="2" table:number-rows-spanned="1">
            <text:p>33</text:p>
          </table:table-cell>
          <table:covered-table-cell table:style-name="ce178"/>
          <table:table-cell table:style-name="ce178" table:number-columns-repeated="4"/>
          <table:table-cell table:style-name="ce128" table:formula="of:=SUM([.H8:.L10])-[.I8]" office:value-type="float" office:value="31" calcext:value-type="float" table:number-columns-spanned="2" table:number-rows-spanned="1">
            <text:p>31</text:p>
          </table:table-cell>
          <table:covered-table-cell table:style-name="ce178"/>
          <table:table-cell table:style-name="ce178" table:number-columns-repeated="4"/>
          <table:table-cell table:style-name="ce128" table:formula="of:=SUM([.N8:.R10])-[.P8]" office:value-type="float" office:value="29" calcext:value-type="float" table:number-columns-spanned="2" table:number-rows-spanned="1">
            <text:p>29</text:p>
          </table:table-cell>
          <table:covered-table-cell table:style-name="ce178"/>
          <table:table-cell table:style-name="ce178" table:number-columns-repeated="4"/>
          <table:table-cell table:style-name="ce128" table:formula="of:=SUM([.T8:.X10])-[.W8]" office:value-type="float" office:value="31" calcext:value-type="float" table:number-columns-spanned="2" table:number-rows-spanned="1">
            <text:p>31</text:p>
          </table:table-cell>
          <table:covered-table-cell table:style-name="ce178"/>
          <table:table-cell table:style-name="ce178" table:number-columns-repeated="4"/>
          <table:table-cell table:style-name="ce128" table:formula="of:=SUM([.Z8:.AD10])-[.AD8]" office:value-type="float" office:value="34" calcext:value-type="float" table:number-columns-spanned="2" table:number-rows-spanned="1">
            <text:p>34</text:p>
          </table:table-cell>
          <table:covered-table-cell table:style-name="ce178"/>
          <table:table-cell table:style-name="ce178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2" table:formula="of:=[.$AF$2]" office:value-type="float" office:value="3" calcext:value-type="float">
            <text:p>3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3" calcext:value-type="float">
            <text:p>3</text:p>
          </table:table-cell>
          <table:table-cell/>
          <table:table-cell table:formula="of:=[.$AF$3]+[.$U$5]" office:value-type="float" office:value="2" calcext:value-type="float">
            <text:p>2</text:p>
          </table:table-cell>
          <table:table-cell table:style-name="ce12" table:formula="of:=[.$AG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" office:value-type="float" office:value="2" calcext:value-type="float">
            <text:p>2</text:p>
          </table:table-cell>
          <table:table-cell/>
          <table:table-cell table:style-name="ce13"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12" table:formula="of:=[.$AH$2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45" table:formula="of:=[.$AJ$3]" office:value-type="float" office:value="2" calcext:value-type="float">
            <text:p>2</text:p>
          </table:table-cell>
          <table:table-cell table:style-name="ce98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12" table:formula="of:=[.$AI$2]" office:value-type="float" office:value="1" calcext:value-type="float">
            <text:p>1</text:p>
          </table:table-cell>
          <table:table-cell table:formula="of:=[.$AJ$3]+[.$U$2]" office:value-type="float" office:value="3" calcext:value-type="float">
            <text:p>3</text:p>
          </table:table-cell>
          <table:table-cell table:style-name="ce98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2]" office:value-type="float" office:value="3" calcext:value-type="float">
            <text:p>3</text:p>
          </table:table-cell>
          <table:table-cell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3, &quot;1&quot;: 0, &quot;2&quot;: 0, &quot;3&quot;: 0, &quot;4&quot;: 3, &quot;5&quot;: 2, &quot;6&quot;: 2, &quot;7&quot;: 2, &quot;8&quot;: 1, &quot;9&quot;: 3, &quot;10&quot;: 4, &quot;11&quot;: 4, &quot;12&quot;: 4, &quot;13&quot;: 3, &quot;14&quot;: 5}" calcext:value-type="string">
            <text:p>"0": { "0": 3, "1": 0, "2": 0, "3": 0, "4": 3, "5": 2, "6": 2, "7": 2, "8": 1, "9": 3, "10": 4, "11": 4, "12": 4, "13": 3, "14": 5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2" calcext:value-type="float">
            <text:p>2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36" table:formula="of:=[.$AH$3]+[.$U$3]" office:value-type="float" office:value="2" calcext:value-type="float">
            <text:p>2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" office:value-type="float" office:value="3" calcext:value-type="float">
            <text:p>3</text:p>
          </table:table-cell>
          <table:table-cell table:style-name="ce52"/>
          <table:table-cell table:formula="of:=[.$AF$3]+[.$U$5]" office:value-type="float" office:value="2" calcext:value-type="float">
            <text:p>2</text:p>
          </table:table-cell>
          <table:table-cell table:style-name="ce27" table:formula="of:=[.$AG$3]+[.$U$2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2" calcext:value-type="float">
            <text:p>2</text:p>
          </table:table-cell>
          <table:table-cell table:style-name="ce52"/>
          <table:table-cell table:style-name="ce13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+[.$U$2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2" calcext:value-type="float">
            <text:p>2</text:p>
          </table:table-cell>
          <table:table-cell table:style-name="ce52"/>
          <table:table-cell table:formula="of:=[.$AF$3]+[.$U$5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3" calcext:value-type="float">
            <text:p>3</text:p>
          </table:table-cell>
          <table:table-cell table:style-name="ce52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3" calcext:value-type="float">
            <text:p>3</text:p>
          </table:table-cell>
          <table:table-cell/>
          <table:table-cell table:formula="of:=COM.MICROSOFT.CONCAT(&quot;&quot;&quot;1&quot;&quot;: { &quot;;COM.MICROSOFT.TEXTJOIN(&quot;, &quot;;TRUE();[.H12:.L14]);&quot;}&quot;)" office:value-type="string" office:string-value="&quot;1&quot;: { &quot;0&quot;: 2, &quot;1&quot;: 1, &quot;2&quot;: 0, &quot;3&quot;: 1, &quot;4&quot;: 2, &quot;5&quot;: 2, &quot;6&quot;: 1, &quot;7&quot;: 1, &quot;8&quot;: 0, &quot;9&quot;: 2, &quot;10&quot;: 5, &quot;11&quot;: 3, &quot;12&quot;: 4, &quot;13&quot;: 3, &quot;14&quot;: 5}" calcext:value-type="string">
            <text:p>"1": { "0": 2, "1": 1, "2": 0, "3": 1, "4": 2, "5": 2, "6": 1, "7": 1, "8": 0, "9": 2, "10": 5, "11": 3, "12": 4, "13": 3, "14": 5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4" table:formula="of:=[.$AF$4]+[.$U$2]+[.$U$4]" office:value-type="float" office:value="4" calcext:value-type="float">
            <text:p>4</text:p>
          </table:table-cell>
          <table:table-cell table:style-name="ce81" table:formula="of:=[.$AG$4]+[.$U$3]+[.$U$4]" office:value-type="float" office:value="4" calcext:value-type="float">
            <text:p>4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5" calcext:value-type="float">
            <text:p>5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2]+[.$U$4]" office:value-type="float" office:value="3" calcext:value-type="float">
            <text:p>3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5" calcext:value-type="float">
            <text:p>5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4" calcext:value-type="float">
            <text:p>4</text:p>
          </table:table-cell>
          <table:table-cell table:style-name="ce138" table:formula="of:=[.$AH$4]+[.$U$2]+[.$U$4]" office:value-type="float" office:value="3" calcext:value-type="float">
            <text:p>3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5" calcext:value-type="float">
            <text:p>5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4" calcext:value-type="float">
            <text:p>4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2]+[.$U$4]" office:value-type="float" office:value="2" calcext:value-type="float">
            <text:p>2</text:p>
          </table:table-cell>
          <table:table-cell table:style-name="ce106" table:formula="of:=[.$AJ$4]+[.$U$2]+[.$U$4]" office:value-type="float" office:value="4" calcext:value-type="float">
            <text:p>4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4" calcext:value-type="float">
            <text:p>4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2]+[.$U$4]" office:value-type="float" office:value="2" calcext:value-type="float">
            <text:p>2</text:p>
          </table:table-cell>
          <table:table-cell table:style-name="ce106" table:formula="of:=[.$AJ$4]+[.$U$2]+[.$U$4]" office:value-type="float" office:value="4" calcext:value-type="float">
            <text:p>4</text:p>
          </table:table-cell>
          <table:table-cell/>
          <table:table-cell table:formula="of:=COM.MICROSOFT.CONCAT(&quot;&quot;&quot;2&quot;&quot;: { &quot;;COM.MICROSOFT.TEXTJOIN(&quot;, &quot;;TRUE();[.N12:.R14]);&quot;}&quot;)" office:value-type="string" office:string-value="&quot;2&quot;: { &quot;0&quot;: 2, &quot;1&quot;: 0, &quot;2&quot;: 0, &quot;3&quot;: 1, &quot;4&quot;: 2, &quot;5&quot;: 1, &quot;6&quot;: 0, &quot;7&quot;: 1, &quot;8&quot;: 0, &quot;9&quot;: 2, &quot;10&quot;: 5, &quot;11&quot;: 4, &quot;12&quot;: 3, &quot;13&quot;: 3, &quot;14&quot;: 5}" calcext:value-type="string">
            <text:p>"2": { "0": 2, "1": 0, "2": 0, "3": 1, "4": 2, "5": 1, "6": 0, "7": 1, "8": 0, "9": 2, "10": 5, "11": 4, "12": 3, "13": 3, "14": 5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4" table:number-columns-repeated="29"/>
          <table:table-cell/>
          <table:table-cell table:formula="of:=COM.MICROSOFT.CONCAT(&quot;&quot;&quot;3&quot;&quot;: { &quot;;COM.MICROSOFT.TEXTJOIN(&quot;, &quot;;TRUE();[.T12:.X14]);&quot;}&quot;)" office:value-type="string" office:string-value="&quot;3&quot;: { &quot;0&quot;: 1, &quot;1&quot;: 0, &quot;2&quot;: 0, &quot;3&quot;: 1, &quot;4&quot;: 3, &quot;5&quot;: 2, &quot;6&quot;: 1, &quot;7&quot;: 1, &quot;8&quot;: 1, &quot;9&quot;: 3, &quot;10&quot;: 5, &quot;11&quot;: 4, &quot;12&quot;: 4, &quot;13&quot;: 2, &quot;14&quot;: 4}" calcext:value-type="string">
            <text:p>"3": { "0": 1, "1": 0, "2": 0, "3": 1, "4": 3, "5": 2, "6": 1, "7": 1, "8": 1, "9": 3, "10": 5, "11": 4, "12": 4, "13": 2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6"/>
          <table:table-cell table:style-name="ce95" table:formula="of:=COM.MICROSOFT.CONCAT(&quot;&quot;&quot;&quot;;[.$B$2]; &quot;&quot;&quot;: &quot;; [.B8])" office:value-type="string" office:string-value="&quot;0&quot;: 3" calcext:value-type="string">
            <text:p>"0": 3</text:p>
          </table:table-cell>
          <table:table-cell table:style-name="ce95" table:formula="of:=COM.MICROSOFT.CONCAT(&quot;&quot;&quot;&quot;;[.$C$2]; &quot;&quot;&quot;: &quot;; [.C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D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95" table:formula="of:=COM.MICROSOFT.CONCAT(&quot;&quot;&quot;&quot;;[.$F$2]; &quot;&quot;&quot;: &quot;; [.F8])" office:value-type="string" office:string-value="&quot;4&quot;: 3" calcext:value-type="string">
            <text:p>"4": 3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2" calcext:value-type="string">
            <text:p>"0": 2</text:p>
          </table:table-cell>
          <table:table-cell table:style-name="ce95" table:formula="of:=COM.MICROSOFT.CONCAT(&quot;&quot;&quot;&quot;;[.$C$2]; &quot;&quot;&quot;: &quot;; [.I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J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2" calcext:value-type="string">
            <text:p>"4": 2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2" calcext:value-type="string">
            <text:p>"0": 2</text:p>
          </table:table-cell>
          <table:table-cell table:style-name="ce95" table:formula="of:=COM.MICROSOFT.CONCAT(&quot;&quot;&quot;&quot;;[.$C$2]; &quot;&quot;&quot;: &quot;; [.O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P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2" calcext:value-type="string">
            <text:p>"4": 2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1" calcext:value-type="string">
            <text:p>"0": 1</text:p>
          </table:table-cell>
          <table:table-cell table:style-name="ce95" table:formula="of:=COM.MICROSOFT.CONCAT(&quot;&quot;&quot;&quot;;[.$C$2]; &quot;&quot;&quot;: &quot;; [.U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V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W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X8])" office:value-type="string" office:string-value="&quot;4&quot;: 3" calcext:value-type="string">
            <text:p>"4": 3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3" calcext:value-type="string">
            <text:p>"0": 3</text:p>
          </table:table-cell>
          <table:table-cell table:style-name="ce95" table:formula="of:=COM.MICROSOFT.CONCAT(&quot;&quot;&quot;&quot;;[.$C$2]; &quot;&quot;&quot;: &quot;; [.AA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3" calcext:value-type="string">
            <text:p>"4": 3</text:p>
          </table:table-cell>
          <table:table-cell table:style-name="ce76"/>
          <table:table-cell table:style-name="ce6" table:formula="of:=COM.MICROSOFT.CONCAT(&quot;&quot;&quot;4&quot;&quot;: { &quot;;COM.MICROSOFT.TEXTJOIN(&quot;, &quot;;TRUE();[.Z12:.AD14]);&quot;}&quot;)" office:value-type="string" office:string-value="&quot;4&quot;: { &quot;0&quot;: 3, &quot;1&quot;: 1, &quot;2&quot;: 1, &quot;3&quot;: 1, &quot;4&quot;: 3, &quot;5&quot;: 3, &quot;6&quot;: 1, &quot;7&quot;: 1, &quot;8&quot;: 1, &quot;9&quot;: 3, &quot;10&quot;: 5, &quot;11&quot;: 4, &quot;12&quot;: 4, &quot;13&quot;: 2, &quot;14&quot;: 4}" calcext:value-type="string">
            <text:p>"4": { "0": 3, "1": 1, "2": 1, "3": 1, "4": 3, "5": 3, "6": 1, "7": 1, "8": 1, "9": 3, "10": 5, "11": 4, "12": 4, "13": 2, "14": 4}</text:p>
          </table:table-cell>
          <table:table-cell table:style-name="ce76"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3]; &quot;&quot;&quot;: &quot;; [.B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C9])" office:value-type="string" office:string-value="&quot;6&quot;: 2" calcext:value-type="string">
            <text:p>"6": 2</text:p>
          </table:table-cell>
          <table:table-cell table:style-name="ce95" table:formula="of:=COM.MICROSOFT.CONCAT(&quot;&quot;&quot;&quot;;[.$D$3]; &quot;&quot;&quot;: &quot;; [.D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3" calcext:value-type="string">
            <text:p>"9": 3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I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J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L9])" office:value-type="string" office:string-value="&quot;9&quot;: 2" calcext:value-type="string">
            <text:p>"9": 2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1" calcext:value-type="string">
            <text:p>"5": 1</text:p>
          </table:table-cell>
          <table:table-cell table:style-name="ce95" table:formula="of:=COM.MICROSOFT.CONCAT(&quot;&quot;&quot;&quot;;[.$C$3]; &quot;&quot;&quot;: &quot;; [.O9])" office:value-type="string" office:string-value="&quot;6&quot;: 0" calcext:value-type="string">
            <text:p>"6": 0</text:p>
          </table:table-cell>
          <table:table-cell table:style-name="ce95" table:formula="of:=COM.MICROSOFT.CONCAT(&quot;&quot;&quot;&quot;;[.$D$3]; &quot;&quot;&quot;: &quot;; [.P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R9])" office:value-type="string" office:string-value="&quot;9&quot;: 2" calcext:value-type="string">
            <text:p>"9": 2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U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V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X9])" office:value-type="string" office:string-value="&quot;9&quot;: 3" calcext:value-type="string">
            <text:p>"9": 3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3" calcext:value-type="string">
            <text:p>"5": 3</text:p>
          </table:table-cell>
          <table:table-cell table:style-name="ce95" table:formula="of:=COM.MICROSOFT.CONCAT(&quot;&quot;&quot;&quot;;[.$C$3]; &quot;&quot;&quot;: &quot;; [.AA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AB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AD9])" office:value-type="string" office:string-value="&quot;9&quot;: 3" calcext:value-type="string">
            <text:p>"9": 3</text:p>
          </table:table-cell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4]; &quot;&quot;&quot;: &quot;; [.B10])" office:value-type="string" office:string-value="&quot;10&quot;: 4" calcext:value-type="string">
            <text:p>"10": 4</text:p>
          </table:table-cell>
          <table:table-cell table:style-name="ce95" table:formula="of:=COM.MICROSOFT.CONCAT(&quot;&quot;&quot;&quot;;[.$C$4]; &quot;&quot;&quot;: &quot;; [.C10])" office:value-type="string" office:string-value="&quot;11&quot;: 4" calcext:value-type="string">
            <text:p>"11": 4</text:p>
          </table:table-cell>
          <table:table-cell table:style-name="ce95" table:formula="of:=COM.MICROSOFT.CONCAT(&quot;&quot;&quot;&quot;;[.$D$4]; &quot;&quot;&quot;: &quot;; [.D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E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F10])" office:value-type="string" office:string-value="&quot;14&quot;: 5" calcext:value-type="string">
            <text:p>"14": 5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I10])" office:value-type="string" office:string-value="&quot;11&quot;: 3" calcext:value-type="string">
            <text:p>"11": 3</text:p>
          </table:table-cell>
          <table:table-cell table:style-name="ce95" table:formula="of:=COM.MICROSOFT.CONCAT(&quot;&quot;&quot;&quot;;[.$D$4]; &quot;&quot;&quot;: &quot;; [.J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K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L10])" office:value-type="string" office:string-value="&quot;14&quot;: 5" calcext:value-type="string">
            <text:p>"14": 5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O10])" office:value-type="string" office:string-value="&quot;11&quot;: 4" calcext:value-type="string">
            <text:p>"11": 4</text:p>
          </table:table-cell>
          <table:table-cell table:style-name="ce95" table:formula="of:=COM.MICROSOFT.CONCAT(&quot;&quot;&quot;&quot;;[.$D$4]; &quot;&quot;&quot;: &quot;; [.P10])" office:value-type="string" office:string-value="&quot;12&quot;: 3" calcext:value-type="string">
            <text:p>"12": 3</text:p>
          </table:table-cell>
          <table:table-cell table:style-name="ce95" table:formula="of:=COM.MICROSOFT.CONCAT(&quot;&quot;&quot;&quot;;[.$E$4]; &quot;&quot;&quot;: &quot;; [.Q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R10])" office:value-type="string" office:string-value="&quot;14&quot;: 5" calcext:value-type="string">
            <text:p>"14": 5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U10])" office:value-type="string" office:string-value="&quot;11&quot;: 4" calcext:value-type="string">
            <text:p>"11": 4</text:p>
          </table:table-cell>
          <table:table-cell table:style-name="ce95" table:formula="of:=COM.MICROSOFT.CONCAT(&quot;&quot;&quot;&quot;;[.$D$4]; &quot;&quot;&quot;: &quot;; [.V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W10])" office:value-type="string" office:string-value="&quot;13&quot;: 2" calcext:value-type="string">
            <text:p>"13": 2</text:p>
          </table:table-cell>
          <table:table-cell table:style-name="ce95" table:formula="of:=COM.MICROSOFT.CONCAT(&quot;&quot;&quot;&quot;;[.$F$4]; &quot;&quot;&quot;: &quot;; [.X10])" office:value-type="string" office:string-value="&quot;14&quot;: 4" calcext:value-type="string">
            <text:p>"14": 4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AA10])" office:value-type="string" office:string-value="&quot;11&quot;: 4" calcext:value-type="string">
            <text:p>"11": 4</text:p>
          </table:table-cell>
          <table:table-cell table:style-name="ce95" table:formula="of:=COM.MICROSOFT.CONCAT(&quot;&quot;&quot;&quot;;[.$D$4]; &quot;&quot;&quot;: &quot;; [.AB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AC10])" office:value-type="string" office:string-value="&quot;13&quot;: 2" calcext:value-type="string">
            <text:p>"13": 2</text:p>
          </table:table-cell>
          <table:table-cell table:style-name="ce95" table:formula="of:=COM.MICROSOFT.CONCAT(&quot;&quot;&quot;&quot;;[.$F$4]; &quot;&quot;&quot;: &quot;; [.AD10])" office:value-type="string" office:string-value="&quot;14&quot;: 4" calcext:value-type="string">
            <text:p>"14": 4</text:p>
          </table:table-cell>
          <table:table-cell/>
          <table:table-cell table:style-name="Default" table:formula="of:=COM.MICROSOFT.TEXTJOIN(&quot;, &quot;;TRUE();[.AF8:.AF12])" office:value-type="string" office:string-value="&quot;0&quot;: { &quot;0&quot;: 3, &quot;1&quot;: 0, &quot;2&quot;: 0, &quot;3&quot;: 0, &quot;4&quot;: 3, &quot;5&quot;: 2, &quot;6&quot;: 2, &quot;7&quot;: 2, &quot;8&quot;: 1, &quot;9&quot;: 3, &quot;10&quot;: 4, &quot;11&quot;: 4, &quot;12&quot;: 4, &quot;13&quot;: 3, &quot;14&quot;: 5}, &quot;1&quot;: { &quot;0&quot;: 2, &quot;1&quot;: 1, &quot;2&quot;: 0, &quot;3&quot;: 1, &quot;4&quot;: 2, &quot;5&quot;: 2, &quot;6&quot;: 1, &quot;7&quot;: 1, &quot;8&quot;: 0, &quot;9&quot;: 2, &quot;10&quot;: 5, &quot;11&quot;: 3, &quot;12&quot;: 4, &quot;13&quot;: 3, &quot;14&quot;: 5}, &quot;2&quot;: { &quot;0&quot;: 2, &quot;1&quot;: 0, &quot;2&quot;: 0, &quot;3&quot;: 1, &quot;4&quot;: 2, &quot;5&quot;: 1, &quot;6&quot;: 0, &quot;7&quot;: 1, &quot;8&quot;: 0, &quot;9&quot;: 2, &quot;10&quot;: 5, &quot;11&quot;: 4, &quot;12&quot;: 3, &quot;13&quot;: 3, &quot;14&quot;: 5}, &quot;3&quot;: { &quot;0&quot;: 1, &quot;1&quot;: 0, &quot;2&quot;: 0, &quot;3&quot;: 1, &quot;4&quot;: 3, &quot;5&quot;: 2, &quot;6&quot;: 1, &quot;7&quot;: 1, &quot;8&quot;: 1, &quot;9&quot;: 3, &quot;10&quot;: 5, &quot;11&quot;: 4, &quot;12&quot;: 4, &quot;13&quot;: 2, &quot;14&quot;: 4}, &quot;4&quot;: { &quot;0&quot;: 3, &quot;1&quot;: 1, &quot;2&quot;: 1, &quot;3&quot;: 1, &quot;4&quot;: 3, &quot;5&quot;: 3, &quot;6&quot;: 1, &quot;7&quot;: 1, &quot;8&quot;: 1, &quot;9&quot;: 3, &quot;10&quot;: 5, &quot;11&quot;: 4, &quot;12&quot;: 4, &quot;13&quot;: 2, &quot;14&quot;: 4}" calcext:value-type="string">
            <text:p>"0": { "0": 3, "1": 0, "2": 0, "3": 0, "4": 3, "5": 2, "6": 2, "7": 2, "8": 1, "9": 3, "10": 4, "11": 4, "12": 4, "13": 3, "14": 5}, "1": { "0": 2, "1": 1, "2": 0, "3": 1, "4": 2, "5": 2, "6": 1, "7": 1, "8": 0, "9": 2, "10": 5, "11": 3, "12": 4, "13": 3, "14": 5}, "2": { "0": 2, "1": 0, "2": 0, "3": 1, "4": 2, "5": 1, "6": 0, "7": 1, "8": 0, "9": 2, "10": 5, "11": 4, "12": 3, "13": 3, "14": 5}, "3": { "0": 1, "1": 0, "2": 0, "3": 1, "4": 3, "5": 2, "6": 1, "7": 1, "8": 1, "9": 3, "10": 5, "11": 4, "12": 4, "13": 2, "14": 4}, "4": { "0": 3, "1": 1, "2": 1, "3": 1, "4": 3, "5": 3, "6": 1, "7": 1, "8": 1, "9": 3, "10": 5, "11": 4, "12": 4, "13": 2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28" table:formula="of:=SUM([.B16:.F18])-[.B17]" office:value-type="float" office:value="28" calcext:value-type="float" table:number-columns-spanned="2" table:number-rows-spanned="1">
            <text:p>28</text:p>
          </table:table-cell>
          <table:covered-table-cell table:style-name="ce98"/>
          <table:table-cell table:style-name="ce98" table:number-columns-repeated="3"/>
          <table:table-cell/>
          <table:table-cell table:style-name="ce128" table:formula="of:=SUM([.H16:.L18])-[.I17]" office:value-type="float" office:value="27" calcext:value-type="float" table:number-columns-spanned="2" table:number-rows-spanned="1">
            <text:p>27</text:p>
          </table:table-cell>
          <table:covered-table-cell table:style-name="ce98"/>
          <table:table-cell table:style-name="ce98" table:number-columns-repeated="3"/>
          <table:table-cell/>
          <table:table-cell table:style-name="ce128" table:formula="of:=SUM([.N16:.R18])-[.P17]" office:value-type="float" office:value="29" calcext:value-type="float" table:number-columns-spanned="2" table:number-rows-spanned="1">
            <text:p>29</text:p>
          </table:table-cell>
          <table:covered-table-cell table:style-name="ce98"/>
          <table:table-cell table:style-name="ce98" table:number-columns-repeated="4"/>
          <table:table-cell table:style-name="ce128" table:formula="of:=SUM([.T16:.X18])-[.W17]" office:value-type="float" office:value="28" calcext:value-type="float" table:number-columns-spanned="2" table:number-rows-spanned="1">
            <text:p>28</text:p>
          </table:table-cell>
          <table:covered-table-cell table:style-name="ce98"/>
          <table:table-cell table:style-name="ce98" table:number-columns-repeated="4"/>
          <table:table-cell table:style-name="ce128" table:formula="of:=SUM([.Z16:.AD18])-[.AD17]" office:value-type="float" office:value="32" calcext:value-type="float" table:number-columns-spanned="2" table:number-rows-spanned="1">
            <text:p>32</text:p>
          </table:table-cell>
          <table:covered-table-cell table:style-name="ce98"/>
          <table:table-cell table:style-name="ce98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9" table:formula="of:=[.$AF$2]+[.$U$2]" office:value-type="float" office:value="4" calcext:value-type="float">
            <text:p>4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+[.$U$5]" office:value-type="float" office:value="1" calcext:value-type="float">
            <text:p>1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4]" office:value-type="float" office:value="4" calcext:value-type="float">
            <text:p>4</text:p>
          </table:table-cell>
          <table:table-cell table:style-name="ce109"/>
          <table:table-cell table:style-name="ce19" table:formula="of:=[.$AF$2]+[.$U$3]" office:value-type="float" office:value="5" calcext:value-type="float">
            <text:p>5</text:p>
          </table:table-cell>
          <table:table-cell table:style-name="ce89" table:formula="of:=[.$AG$2]+[.$U$2]" office:value-type="float" office:value="2" calcext:value-type="float">
            <text:p>2</text:p>
          </table:table-cell>
          <table:table-cell table:style-name="ce92" table:formula="of:=[.$AH$2]" office:value-type="float" office:value="0" calcext:value-type="float">
            <text:p>0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5]" office:value-type="float" office:value="4" calcext:value-type="float">
            <text:p>4</text:p>
          </table:table-cell>
          <table:table-cell table:style-name="ce109"/>
          <table:table-cell table:style-name="ce19" table:formula="of:=[.$AF$2]+[.$U$3]" office:value-type="float" office:value="5" calcext:value-type="float">
            <text:p>5</text:p>
          </table:table-cell>
          <table:table-cell table:style-name="ce89" table:formula="of:=[.$AG$2]+[.$U$3]" office:value-type="float" office:value="3" calcext:value-type="float">
            <text:p>3</text:p>
          </table:table-cell>
          <table:table-cell table:style-name="ce92" table:formula="of:=[.$AH$2]+[.$U$2]" office:value-type="float" office:value="1" calcext:value-type="float">
            <text:p>1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5]" office:value-type="float" office:value="4" calcext:value-type="float">
            <text:p>4</text:p>
          </table:table-cell>
          <table:table-cell table:style-name="ce109"/>
          <table:table-cell table:style-name="ce19" table:formula="of:=[.$AF$2]+[.$U$5]" office:value-type="float" office:value="4" calcext:value-type="float">
            <text:p>4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" office:value-type="float" office:value="0" calcext:value-type="float">
            <text:p>0</text:p>
          </table:table-cell>
          <table:table-cell table:style-name="ce105" table:formula="of:=[.$AI$2]+[.$U$2]" office:value-type="float" office:value="2" calcext:value-type="float">
            <text:p>2</text:p>
          </table:table-cell>
          <table:table-cell table:style-name="ce105" table:formula="of:=[.$AJ$2]+[.$U$2]" office:value-type="float" office:value="4" calcext:value-type="float">
            <text:p>4</text:p>
          </table:table-cell>
          <table:table-cell table:style-name="ce109"/>
          <table:table-cell table:style-name="ce19" table:formula="of:=[.$AF$2]+[.$U$4]+[.$U$5]" office:value-type="float" office:value="5" calcext:value-type="float">
            <text:p>5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+[.$U$5]" office:value-type="float" office:value="1" calcext:value-type="float">
            <text:p>1</text:p>
          </table:table-cell>
          <table:table-cell table:style-name="ce105" table:formula="of:=[.$AI$2]+[.$U$2]" office:value-type="float" office:value="2" calcext:value-type="float">
            <text:p>2</text:p>
          </table:table-cell>
          <table:table-cell table:style-name="ce105" table:formula="of:=[.$AJ$2]+[.$U$2]" office:value-type="float" office:value="4" calcext:value-type="float">
            <text:p>4</text:p>
          </table:table-cell>
          <table:table-cell table:style-name="ce5"/>
          <table:table-cell table:formula="of:=COM.MICROSOFT.CONCAT(&quot;&quot;&quot;5&quot;&quot;: { &quot;;COM.MICROSOFT.TEXTJOIN(&quot;, &quot;;TRUE();[.B20:.F22]);&quot;}&quot;)" office:value-type="string" office:string-value="&quot;5&quot;: { &quot;0&quot;: 4, &quot;1&quot;: 2, &quot;2&quot;: 1, &quot;3&quot;: 2, &quot;4&quot;: 4, &quot;5&quot;: 1, &quot;6&quot;: 0, &quot;7&quot;: 0, &quot;8&quot;: 0, &quot;9&quot;: 3, &quot;10&quot;: 3, &quot;11&quot;: 3, &quot;12&quot;: 2, &quot;13&quot;: 1, &quot;14&quot;: 3}" calcext:value-type="string">
            <text:p>"5": { "0": 4, "1": 2, "2": 1, "3": 2, "4": 4, "5": 1, "6": 0, "7": 0, "8": 0, "9": 3, "10": 3, "11": 3, "12": 2, "13": 1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20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3" calcext:value-type="float">
            <text:p>3</text:p>
          </table:table-cell>
          <table:table-cell table:style-name="ce52"/>
          <table:table-cell table:formula="of:=[.$AF$3]" office:value-type="float" office:value="1" calcext:value-type="float">
            <text:p>1</text:p>
          </table:table-cell>
          <table:table-cell table:style-name="ce20"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2" calcext:value-type="float">
            <text:p>2</text:p>
          </table:table-cell>
          <table:table-cell table:style-name="ce52"/>
          <table:table-cell table:style-name="ce13" table:formula="of:=[.$AF$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2" calcext:value-type="float">
            <text:p>2</text:p>
          </table:table-cell>
          <table:table-cell table:style-name="ce52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20" table:formula="of:=[.$AI$3]" office:value-type="float" office:value="0" calcext:value-type="float">
            <text:p>0</text:p>
          </table:table-cell>
          <table:table-cell table:formula="of:=[.$AJ$3]+[.$U$2]" office:value-type="float" office:value="3" calcext:value-type="float">
            <text:p>3</text:p>
          </table:table-cell>
          <table:table-cell table:style-name="ce52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20" table:formula="of:=[.$AJ$3]" office:value-type="float" office:value="2" calcext:value-type="float">
            <text:p>2</text:p>
          </table:table-cell>
          <table:table-cell table:style-name="ce5"/>
          <table:table-cell table:formula="of:=COM.MICROSOFT.CONCAT(&quot;&quot;&quot;6&quot;&quot;: { &quot;;COM.MICROSOFT.TEXTJOIN(&quot;, &quot;;TRUE();[.H20:.L22]);&quot;}&quot;)" office:value-type="string" office:string-value="&quot;6&quot;: { &quot;0&quot;: 5, &quot;1&quot;: 2, &quot;2&quot;: 0, &quot;3&quot;: 2, &quot;4&quot;: 4, &quot;5&quot;: 1, &quot;6&quot;: 0, &quot;7&quot;: 0, &quot;8&quot;: 0, &quot;9&quot;: 2, &quot;10&quot;: 3, &quot;11&quot;: 2, &quot;12&quot;: 2, &quot;13&quot;: 1, &quot;14&quot;: 3}" calcext:value-type="string">
            <text:p>"6": { "0": 5, "1": 2, "2": 0, "3": 2, "4": 4, "5": 1, "6": 0, "7": 0, "8": 0, "9": 2, "10": 3, "11": 2, "12": 2, "13": 1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4" table:formula="of:=[.$AF$4]+[.$U$2]" office:value-type="float" office:value="3" calcext:value-type="float">
            <text:p>3</text:p>
          </table:table-cell>
          <table:table-cell table:style-name="ce81" table:formula="of:=[.$AG$4]+[.$U$3]" office:value-type="float" office:value="3" calcext:value-type="float">
            <text:p>3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4]" office:value-type="float" office:value="3" calcext:value-type="float">
            <text:p>3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2]" office:value-type="float" office:value="2" calcext:value-type="float">
            <text:p>2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5]" office:value-type="float" office:value="3" calcext:value-type="float">
            <text:p>3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5]" office:value-type="float" office:value="2" calcext:value-type="float">
            <text:p>2</text:p>
          </table:table-cell>
          <table:table-cell table:style-name="ce138" table:formula="of:=[.$AH$4]+[.$U$2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5]" office:value-type="float" office:value="3" calcext:value-type="float">
            <text:p>3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5]" office:value-type="float" office:value="2" calcext:value-type="float">
            <text:p>2</text:p>
          </table:table-cell>
          <table:table-cell table:style-name="ce138" table:formula="of:=[.$AH$4]+[.$U$3]" office:value-type="float" office:value="3" calcext:value-type="float">
            <text:p>3</text:p>
          </table:table-cell>
          <table:table-cell table:style-name="ce106" table:formula="of:=[.$AI$4]+[.$U$2]" office:value-type="float" office:value="1" calcext:value-type="float">
            <text:p>1</text:p>
          </table:table-cell>
          <table:table-cell table:style-name="ce106" table:formula="of:=[.$AJ$4]+[.$U$2]" office:value-type="float" office:value="3" calcext:value-type="float">
            <text:p>3</text:p>
          </table:table-cell>
          <table:table-cell table:style-name="ce110"/>
          <table:table-cell table:style-name="ce14" table:formula="of:=[.$AF$4]+[.$U$5]+[.$U$4]" office:value-type="float" office:value="4" calcext:value-type="float">
            <text:p>4</text:p>
          </table:table-cell>
          <table:table-cell table:style-name="ce81" table:formula="of:=[.$AG$4]+[.$U$5]" office:value-type="float" office:value="2" calcext:value-type="float">
            <text:p>2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2]" office:value-type="float" office:value="1" calcext:value-type="float">
            <text:p>1</text:p>
          </table:table-cell>
          <table:table-cell table:style-name="ce106" table:formula="of:=[.$AJ$4]+[.$U$2]" office:value-type="float" office:value="3" calcext:value-type="float">
            <text:p>3</text:p>
          </table:table-cell>
          <table:table-cell table:style-name="ce5"/>
          <table:table-cell table:formula="of:=COM.MICROSOFT.CONCAT(&quot;&quot;&quot;7&quot;&quot;: { &quot;;COM.MICROSOFT.TEXTJOIN(&quot;, &quot;;TRUE();[.N20:.R22]);&quot;}&quot;)" office:value-type="string" office:string-value="&quot;7&quot;: { &quot;0&quot;: 5, &quot;1&quot;: 3, &quot;2&quot;: 1, &quot;3&quot;: 2, &quot;4&quot;: 4, &quot;5&quot;: 1, &quot;6&quot;: 0, &quot;7&quot;: 0, &quot;8&quot;: 0, &quot;9&quot;: 2, &quot;10&quot;: 3, &quot;11&quot;: 2, &quot;12&quot;: 2, &quot;13&quot;: 1, &quot;14&quot;: 3}" calcext:value-type="string">
            <text:p>"7": { "0": 5, "1": 3, "2": 1, "3": 2, "4": 4, "5": 1, "6": 0, "7": 0, "8": 0, "9": 2, "10": 3, "11": 2, "12": 2, "13": 1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17"/>
          <table:table-cell table:style-name="ce5"/>
          <table:table-cell table:formula="of:=COM.MICROSOFT.CONCAT(&quot;&quot;&quot;8&quot;&quot;: { &quot;;COM.MICROSOFT.TEXTJOIN(&quot;, &quot;;TRUE();[.T20:.X22]);&quot;}&quot;)" office:value-type="string" office:string-value="&quot;8&quot;: { &quot;0&quot;: 4, &quot;1&quot;: 2, &quot;2&quot;: 0, &quot;3&quot;: 2, &quot;4&quot;: 4, &quot;5&quot;: 1, &quot;6&quot;: 0, &quot;7&quot;: 0, &quot;8&quot;: 0, &quot;9&quot;: 3, &quot;10&quot;: 3, &quot;11&quot;: 2, &quot;12&quot;: 3, &quot;13&quot;: 1, &quot;14&quot;: 3}" calcext:value-type="string">
            <text:p>"8": { "0": 4, "1": 2, "2": 0, "3": 2, "4": 4, "5": 1, "6": 0, "7": 0, "8": 0, "9": 3, "10": 3, "11": 2, "12": 3, "13": 1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2]; &quot;&quot;&quot;: &quot;; [.B16])" office:value-type="string" office:string-value="&quot;0&quot;: 4" calcext:value-type="string">
            <text:p>"0": 4</text:p>
          </table:table-cell>
          <table:table-cell table:style-name="ce100" table:formula="of:=COM.MICROSOFT.CONCAT(&quot;&quot;&quot;&quot;;[.$C$2]; &quot;&quot;&quot;: &quot;; [.C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D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E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F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H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I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J16])" office:value-type="string" office:string-value="&quot;2&quot;: 0" calcext:value-type="string">
            <text:p>"2": 0</text:p>
          </table:table-cell>
          <table:table-cell table:style-name="ce100" table:formula="of:=COM.MICROSOFT.CONCAT(&quot;&quot;&quot;&quot;;[.$E$2]; &quot;&quot;&quot;: &quot;; [.K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L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N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O16])" office:value-type="string" office:string-value="&quot;1&quot;: 3" calcext:value-type="string">
            <text:p>"1": 3</text:p>
          </table:table-cell>
          <table:table-cell table:style-name="ce100" table:formula="of:=COM.MICROSOFT.CONCAT(&quot;&quot;&quot;&quot;;[.$D$2]; &quot;&quot;&quot;: &quot;; [.P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Q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R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T16])" office:value-type="string" office:string-value="&quot;0&quot;: 4" calcext:value-type="string">
            <text:p>"0": 4</text:p>
          </table:table-cell>
          <table:table-cell table:style-name="ce100" table:formula="of:=COM.MICROSOFT.CONCAT(&quot;&quot;&quot;&quot;;[.$C$2]; &quot;&quot;&quot;: &quot;; [.U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V16])" office:value-type="string" office:string-value="&quot;2&quot;: 0" calcext:value-type="string">
            <text:p>"2": 0</text:p>
          </table:table-cell>
          <table:table-cell table:style-name="ce100" table:formula="of:=COM.MICROSOFT.CONCAT(&quot;&quot;&quot;&quot;;[.$E$2]; &quot;&quot;&quot;: &quot;; [.W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X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Z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AA16])" office:value-type="string" office:string-value="&quot;1&quot;: 2" calcext:value-type="string">
            <text:p>"1": 2</text:p>
          </table:table-cell>
          <table:table-cell table:style-name="ce131" table:formula="of:=COM.MICROSOFT.CONCAT(&quot;&quot;&quot;&quot;;[.$D$2]; &quot;&quot;&quot;: &quot;; [.AB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AC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AD16])" office:value-type="string" office:string-value="&quot;4&quot;: 4" calcext:value-type="string">
            <text:p>"4": 4</text:p>
          </table:table-cell>
          <table:table-cell table:style-name="ce5"/>
          <table:table-cell table:formula="of:=COM.MICROSOFT.CONCAT(&quot;&quot;&quot;9&quot;&quot;: { &quot;;COM.MICROSOFT.TEXTJOIN(&quot;, &quot;;TRUE();[.Z20:.AD22]);&quot;}&quot;)" office:value-type="string" office:string-value="&quot;9&quot;: { &quot;0&quot;: 5, &quot;1&quot;: 2, &quot;2&quot;: 1, &quot;3&quot;: 2, &quot;4&quot;: 4, &quot;5&quot;: 3, &quot;6&quot;: 1, &quot;7&quot;: 1, &quot;8&quot;: 1, &quot;9&quot;: 2, &quot;10&quot;: 4, &quot;11&quot;: 2, &quot;12&quot;: 2, &quot;13&quot;: 1, &quot;14&quot;: 3}" calcext:value-type="string">
            <text:p>"9": { "0": 5, "1": 2, "2": 1, "3": 2, "4": 4, "5": 3, "6": 1, "7": 1, "8": 1, "9": 2, "10": 4, "11": 2, "12": 2, "13": 1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3]; &quot;&quot;&quot;: &quot;; [.B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C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D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E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F17])" office:value-type="string" office:string-value="&quot;9&quot;: 3" calcext:value-type="string">
            <text:p>"9": 3</text:p>
          </table:table-cell>
          <table:table-cell table:style-name="ce100"/>
          <table:table-cell table:style-name="ce100" table:formula="of:=COM.MICROSOFT.CONCAT(&quot;&quot;&quot;&quot;;[.$B$3]; &quot;&quot;&quot;: &quot;; [.H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I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J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K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L17])" office:value-type="string" office:string-value="&quot;9&quot;: 2" calcext:value-type="string">
            <text:p>"9": 2</text:p>
          </table:table-cell>
          <table:table-cell table:style-name="ce100"/>
          <table:table-cell table:style-name="ce100" table:formula="of:=COM.MICROSOFT.CONCAT(&quot;&quot;&quot;&quot;;[.$B$3]; &quot;&quot;&quot;: &quot;; [.N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O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P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Q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R17])" office:value-type="string" office:string-value="&quot;9&quot;: 2" calcext:value-type="string">
            <text:p>"9": 2</text:p>
          </table:table-cell>
          <table:table-cell table:style-name="ce100"/>
          <table:table-cell table:style-name="ce100" table:formula="of:=COM.MICROSOFT.CONCAT(&quot;&quot;&quot;&quot;;[.$B$3]; &quot;&quot;&quot;: &quot;; [.T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U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V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W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X17])" office:value-type="string" office:string-value="&quot;9&quot;: 3" calcext:value-type="string">
            <text:p>"9": 3</text:p>
          </table:table-cell>
          <table:table-cell table:style-name="ce100"/>
          <table:table-cell table:style-name="ce100" table:formula="of:=COM.MICROSOFT.CONCAT(&quot;&quot;&quot;&quot;;[.$B$3]; &quot;&quot;&quot;: &quot;; [.Z17])" office:value-type="string" office:string-value="&quot;5&quot;: 3" calcext:value-type="string">
            <text:p>"5": 3</text:p>
          </table:table-cell>
          <table:table-cell table:style-name="ce100" table:formula="of:=COM.MICROSOFT.CONCAT(&quot;&quot;&quot;&quot;;[.$C$3]; &quot;&quot;&quot;: &quot;; [.AA17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AB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7])" office:value-type="string" office:string-value="&quot;9&quot;: 2" calcext:value-type="string">
            <text:p>"9": 2</text:p>
          </table:table-cell>
          <table:table-cell table:style-name="ce5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4]; &quot;&quot;&quot;: &quot;; [.B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C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E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F18])" office:value-type="string" office:string-value="&quot;14&quot;: 3" calcext:value-type="string">
            <text:p>"14": 3</text:p>
          </table:table-cell>
          <table:table-cell table:style-name="ce100"/>
          <table:table-cell table:style-name="ce100" table:formula="of:=COM.MICROSOFT.CONCAT(&quot;&quot;&quot;&quot;;[.$B$4]; &quot;&quot;&quot;: &quot;; [.H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I18])" office:value-type="string" office:string-value="&quot;11&quot;: 2" calcext:value-type="string">
            <text:p>"11": 2</text:p>
          </table:table-cell>
          <table:table-cell table:style-name="ce100" table:formula="of:=COM.MICROSOFT.CONCAT(&quot;&quot;&quot;&quot;;[.$D$4]; &quot;&quot;&quot;: &quot;; [.J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K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L18])" office:value-type="string" office:string-value="&quot;14&quot;: 3" calcext:value-type="string">
            <text:p>"14": 3</text:p>
          </table:table-cell>
          <table:table-cell table:style-name="ce100"/>
          <table:table-cell table:style-name="ce100" table:formula="of:=COM.MICROSOFT.CONCAT(&quot;&quot;&quot;&quot;;[.$B$4]; &quot;&quot;&quot;: &quot;; [.N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00" table:formula="of:=COM.MICROSOFT.CONCAT(&quot;&quot;&quot;&quot;;[.$D$4]; &quot;&quot;&quot;: &quot;; [.P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R18])" office:value-type="string" office:string-value="&quot;14&quot;: 3" calcext:value-type="string">
            <text:p>"14": 3</text:p>
          </table:table-cell>
          <table:table-cell table:style-name="ce100"/>
          <table:table-cell table:style-name="ce100" table:formula="of:=COM.MICROSOFT.CONCAT(&quot;&quot;&quot;&quot;;[.$B$4]; &quot;&quot;&quot;: &quot;; [.T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00" table:formula="of:=COM.MICROSOFT.CONCAT(&quot;&quot;&quot;&quot;;[.$D$4]; &quot;&quot;&quot;: &quot;; [.V18])" office:value-type="string" office:string-value="&quot;12&quot;: 3" calcext:value-type="string">
            <text:p>"12": 3</text:p>
          </table:table-cell>
          <table:table-cell table:style-name="ce100" table:formula="of:=COM.MICROSOFT.CONCAT(&quot;&quot;&quot;&quot;;[.$E$4]; &quot;&quot;&quot;: &quot;; [.W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X18])" office:value-type="string" office:string-value="&quot;14&quot;: 3" calcext:value-type="string">
            <text:p>"14": 3</text:p>
          </table:table-cell>
          <table:table-cell table:style-name="ce100"/>
          <table:table-cell table:style-name="ce100" table:formula="of:=COM.MICROSOFT.CONCAT(&quot;&quot;&quot;&quot;;[.$B$4]; &quot;&quot;&quot;: &quot;; [.Z18])" office:value-type="string" office:string-value="&quot;10&quot;: 4" calcext:value-type="string">
            <text:p>"10": 4</text:p>
          </table:table-cell>
          <table:table-cell table:style-name="ce100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100" table:formula="of:=COM.MICROSOFT.CONCAT(&quot;&quot;&quot;&quot;;[.$D$4]; &quot;&quot;&quot;: &quot;; [.AB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AD18])" office:value-type="string" office:string-value="&quot;14&quot;: 3" calcext:value-type="string">
            <text:p>"14": 3</text:p>
          </table:table-cell>
          <table:table-cell table:style-name="ce5"/>
          <table:table-cell table:formula="of:=COM.MICROSOFT.TEXTJOIN(&quot;, &quot;;TRUE();[.AF16:.AF20])" office:value-type="string" office:string-value="&quot;5&quot;: { &quot;0&quot;: 4, &quot;1&quot;: 2, &quot;2&quot;: 1, &quot;3&quot;: 2, &quot;4&quot;: 4, &quot;5&quot;: 1, &quot;6&quot;: 0, &quot;7&quot;: 0, &quot;8&quot;: 0, &quot;9&quot;: 3, &quot;10&quot;: 3, &quot;11&quot;: 3, &quot;12&quot;: 2, &quot;13&quot;: 1, &quot;14&quot;: 3}, &quot;6&quot;: { &quot;0&quot;: 5, &quot;1&quot;: 2, &quot;2&quot;: 0, &quot;3&quot;: 2, &quot;4&quot;: 4, &quot;5&quot;: 1, &quot;6&quot;: 0, &quot;7&quot;: 0, &quot;8&quot;: 0, &quot;9&quot;: 2, &quot;10&quot;: 3, &quot;11&quot;: 2, &quot;12&quot;: 2, &quot;13&quot;: 1, &quot;14&quot;: 3}, &quot;7&quot;: { &quot;0&quot;: 5, &quot;1&quot;: 3, &quot;2&quot;: 1, &quot;3&quot;: 2, &quot;4&quot;: 4, &quot;5&quot;: 1, &quot;6&quot;: 0, &quot;7&quot;: 0, &quot;8&quot;: 0, &quot;9&quot;: 2, &quot;10&quot;: 3, &quot;11&quot;: 2, &quot;12&quot;: 2, &quot;13&quot;: 1, &quot;14&quot;: 3}, &quot;8&quot;: { &quot;0&quot;: 4, &quot;1&quot;: 2, &quot;2&quot;: 0, &quot;3&quot;: 2, &quot;4&quot;: 4, &quot;5&quot;: 1, &quot;6&quot;: 0, &quot;7&quot;: 0, &quot;8&quot;: 0, &quot;9&quot;: 3, &quot;10&quot;: 3, &quot;11&quot;: 2, &quot;12&quot;: 3, &quot;13&quot;: 1, &quot;14&quot;: 3}, &quot;9&quot;: { &quot;0&quot;: 5, &quot;1&quot;: 2, &quot;2&quot;: 1, &quot;3&quot;: 2, &quot;4&quot;: 4, &quot;5&quot;: 3, &quot;6&quot;: 1, &quot;7&quot;: 1, &quot;8&quot;: 1, &quot;9&quot;: 2, &quot;10&quot;: 4, &quot;11&quot;: 2, &quot;12&quot;: 2, &quot;13&quot;: 1, &quot;14&quot;: 3}" calcext:value-type="string">
            <text:p>"5": { "0": 4, "1": 2, "2": 1, "3": 2, "4": 4, "5": 1, "6": 0, "7": 0, "8": 0, "9": 3, "10": 3, "11": 3, "12": 2, "13": 1, "14": 3}, "6": { "0": 5, "1": 2, "2": 0, "3": 2, "4": 4, "5": 1, "6": 0, "7": 0, "8": 0, "9": 2, "10": 3, "11": 2, "12": 2, "13": 1, "14": 3}, "7": { "0": 5, "1": 3, "2": 1, "3": 2, "4": 4, "5": 1, "6": 0, "7": 0, "8": 0, "9": 2, "10": 3, "11": 2, "12": 2, "13": 1, "14": 3}, "8": { "0": 4, "1": 2, "2": 0, "3": 2, "4": 4, "5": 1, "6": 0, "7": 0, "8": 0, "9": 3, "10": 3, "11": 2, "12": 3, "13": 1, "14": 3}, "9": { "0": 5, "1": 2, "2": 1, "3": 2, "4": 4, "5": 3, "6": 1, "7": 1, "8": 1, "9": 2, "10": 4, "11": 2, "12": 2, "13": 1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28" table:formula="of:=SUM([.B24:.F26])-[.B26]" office:value-type="float" office:value="32" calcext:value-type="float" table:number-columns-spanned="2" table:number-rows-spanned="1">
            <text:p>32</text:p>
          </table:table-cell>
          <table:covered-table-cell table:style-name="ce98"/>
          <table:table-cell table:style-name="ce98" table:number-columns-repeated="3"/>
          <table:table-cell/>
          <table:table-cell table:style-name="ce128" table:formula="of:=SUM([.H24:.L26])-[.I26]" office:value-type="float" office:value="32" calcext:value-type="float" table:number-columns-spanned="2" table:number-rows-spanned="1">
            <text:p>32</text:p>
          </table:table-cell>
          <table:covered-table-cell table:style-name="ce98"/>
          <table:table-cell table:style-name="ce98" table:number-columns-repeated="3"/>
          <table:table-cell/>
          <table:table-cell table:style-name="ce128" table:formula="of:=SUM([.N24:.R26])-[.P26]" office:value-type="float" office:value="37" calcext:value-type="float" table:number-columns-spanned="2" table:number-rows-spanned="1">
            <text:p>37</text:p>
          </table:table-cell>
          <table:covered-table-cell table:style-name="ce98"/>
          <table:table-cell table:style-name="ce98" table:number-columns-repeated="4"/>
          <table:table-cell table:style-name="ce128" table:formula="of:=SUM([.T24:.X26])-[.W26]" office:value-type="float" office:value="30" calcext:value-type="float" table:number-columns-spanned="2" table:number-rows-spanned="1">
            <text:p>30</text:p>
          </table:table-cell>
          <table:covered-table-cell table:style-name="ce98"/>
          <table:table-cell table:style-name="ce98" table:number-columns-repeated="4"/>
          <table:table-cell table:style-name="ce128" table:formula="of:=SUM([.Z24:.AD26])-[.AD26]" office:value-type="float" office:value="39" calcext:value-type="float" table:number-columns-spanned="2" table:number-rows-spanned="1">
            <text:p>39</text:p>
          </table:table-cell>
          <table:covered-table-cell table:style-name="ce98"/>
          <table:table-cell table:style-name="ce98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9" table:formula="of:=[.$AF$2]+[.$U$2]+[.$U$4]" office:value-type="float" office:value="5" calcext:value-type="float">
            <text:p>5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5]+[.$U$4]" office:value-type="float" office:value="2" calcext:value-type="float">
            <text:p>2</text:p>
          </table:table-cell>
          <table:table-cell table:style-name="ce105" table:formula="of:=[.$AI$2]+[.$U$4]+[.$U$5]" office:value-type="float" office:value="3" calcext:value-type="float">
            <text:p>3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2]+[.$U$4]" office:value-type="float" office:value="3" calcext:value-type="float">
            <text:p>3</text:p>
          </table:table-cell>
          <table:table-cell table:style-name="ce92" table:formula="of:=[.$AH$2]+[.$U$4]+[.$U$5]" office:value-type="float" office:value="2" calcext:value-type="float">
            <text:p>2</text:p>
          </table:table-cell>
          <table:table-cell table:style-name="ce105" table:formula="of:=[.$AI$2]+[.$U$5]+[.$U$4]" office:value-type="float" office:value="3" calcext:value-type="float">
            <text:p>3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2]+[.$U$4]" office:value-type="float" office:value="2" calcext:value-type="float">
            <text:p>2</text:p>
          </table:table-cell>
          <table:table-cell table:style-name="ce105" table:formula="of:=[.$AI$2]+[.$U$3]+[.$U$4]" office:value-type="float" office:value="4" calcext:value-type="float">
            <text:p>4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+[.$U$3]+[.$U$4]" office:value-type="float" office:value="4" calcext:value-type="float">
            <text:p>4</text:p>
          </table:table-cell>
          <table:table-cell table:style-name="ce92" table:formula="of:=[.$AH$2]+[.$U$4]+[.$U$5]" office:value-type="float" office:value="2" calcext:value-type="float">
            <text:p>2</text:p>
          </table:table-cell>
          <table:table-cell table:style-name="ce105" table:formula="of:=[.$AI$2]+[.$U$2]+[.$U$4]" office:value-type="float" office:value="3" calcext:value-type="float">
            <text:p>3</text:p>
          </table:table-cell>
          <table:table-cell table:style-name="ce105" table:formula="of:=[.$AJ$2]+[.$U$4]+[.$U$2]" office:value-type="float" office:value="5" calcext:value-type="float">
            <text:p>5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3]+[.$U$4]" office:value-type="float" office:value="3" calcext:value-type="float">
            <text:p>3</text:p>
          </table:table-cell>
          <table:table-cell table:style-name="ce105" table:formula="of:=[.$AI$2]+[.$U$2]+[.$U$4]" office:value-type="float" office:value="3" calcext:value-type="float">
            <text:p>3</text:p>
          </table:table-cell>
          <table:table-cell table:style-name="ce105" table:formula="of:=[.$AJ$2]+[.$U$2]+[.$U$4]" office:value-type="float" office:value="5" calcext:value-type="float">
            <text:p>5</text:p>
          </table:table-cell>
          <table:table-cell table:style-name="ce5"/>
          <table:table-cell table:formula="of:=COM.MICROSOFT.CONCAT(&quot;&quot;&quot;10&quot;&quot;: { &quot;;COM.MICROSOFT.TEXTJOIN(&quot;, &quot;;TRUE();[.B28:.F30]);&quot;}&quot;)" office:value-type="string" office:string-value="&quot;10&quot;: { &quot;0&quot;: 5, &quot;1&quot;: 4, &quot;2&quot;: 2, &quot;3&quot;: 3, &quot;4&quot;: 6, &quot;5&quot;: 2, &quot;6&quot;: 1, &quot;7&quot;: 1, &quot;8&quot;: 1, &quot;9&quot;: 4, &quot;10&quot;: 2, &quot;11&quot;: 0, &quot;12&quot;: 0, &quot;13&quot;: 0, &quot;14&quot;: 3}" calcext:value-type="string">
            <text:p>"10": { "0": 5, "1": 4, "2": 2, "3": 3, "4": 6, "5": 2, "6": 1, "7": 1, "8": 1, "9": 4, "10": 2, "11": 0, "12": 0, "13": 0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+[.$U$5]" office:value-type="float" office:value="4" calcext:value-type="float">
            <text:p>4</text:p>
          </table:table-cell>
          <table:table-cell/>
          <table:table-cell table:formula="of:=[.$AF$3]+[.$U$3]" office:value-type="float" office:value="3" calcext:value-type="float">
            <text:p>3</text:p>
          </table:table-cell>
          <table:table-cell table:style-name="ce27" table:formula="of:=[.$AG$3]+[.$U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3]" office:value-type="float" office:value="4" calcext:value-type="float">
            <text:p>4</text:p>
          </table:table-cell>
          <table:table-cell/>
          <table:table-cell table:style-name="ce13" table:formula="of:=[.$AF$3]+[.$U$3]" office:value-type="float" office:value="3" calcext:value-type="float">
            <text:p>3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36" table:formula="of:=[.$AH$3]+[.$U$2]" office:value-type="float" office:value="1" calcext:value-type="float">
            <text:p>1</text:p>
          </table:table-cell>
          <table:table-cell table:formula="of:=[.$AI$3]+[.$U$3]" office:value-type="float" office:value="2" calcext:value-type="float">
            <text:p>2</text:p>
          </table:table-cell>
          <table:table-cell table:style-name="ce45" table:formula="of:=[.$AJ$3]+[.$U$3]" office:value-type="float" office:value="4" calcext:value-type="float">
            <text:p>4</text:p>
          </table:table-cell>
          <table:table-cell table:style-name="ce98"/>
          <table:table-cell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3" calcext:value-type="float">
            <text:p>3</text:p>
          </table:table-cell>
          <table:table-cell table:style-name="ce98"/>
          <table:table-cell table:style-name="ce13" table:formula="of:=[.$AF$3]+[.$U$4]+[.$U$3]" office:value-type="float" office:value="4" calcext:value-type="float">
            <text:p>4</text:p>
          </table:table-cell>
          <table:table-cell table:style-name="ce27" table:formula="of:=[.$AG$3]+[.$U$3]" office:value-type="float" office:value="2" calcext:value-type="float">
            <text:p>2</text:p>
          </table:table-cell>
          <table:table-cell table:style-name="ce36" table:formula="of:=[.$AH$3]+[.$U$3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3" calcext:value-type="float">
            <text:p>3</text:p>
          </table:table-cell>
          <table:table-cell table:style-name="ce5"/>
          <table:table-cell table:formula="of:=COM.MICROSOFT.CONCAT(&quot;&quot;&quot;11&quot;&quot;: { &quot;;COM.MICROSOFT.TEXTJOIN(&quot;, &quot;;TRUE();[.H28:.L30]);&quot;}&quot;)" office:value-type="string" office:string-value="&quot;11&quot;: { &quot;0&quot;: 6, &quot;1&quot;: 3, &quot;2&quot;: 2, &quot;3&quot;: 3, &quot;4&quot;: 6, &quot;5&quot;: 3, &quot;6&quot;: 1, &quot;7&quot;: 0, &quot;8&quot;: 1, &quot;9&quot;: 4, &quot;10&quot;: 1, &quot;11&quot;: 1, &quot;12&quot;: 0, &quot;13&quot;: 0, &quot;14&quot;: 2}" calcext:value-type="string">
            <text:p>"11": { "0": 6, "1": 3, "2": 2, "3": 3, "4": 6, "5": 3, "6": 1, "7": 0, "8": 1, "9": 4, "10": 1, "11": 1, "12": 0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2" table:formula="of:=[.$AF$4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3" calcext:value-type="float">
            <text:p>3</text:p>
          </table:table-cell>
          <table:table-cell/>
          <table:table-cell table:formula="of:=[.$AF$3]" office:value-type="float" office:value="1" calcext:value-type="float">
            <text:p>1</text:p>
          </table:table-cell>
          <table:table-cell table:style-name="ce12" table:formula="of:=[.$AG$4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2" calcext:value-type="float">
            <text:p>2</text:p>
          </table:table-cell>
          <table:table-cell/>
          <table:table-cell table:style-name="ce13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12" table:formula="of:=[.$AH$4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2" calcext:value-type="float">
            <text:p>2</text:p>
          </table:table-cell>
          <table:table-cell table:style-name="ce98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12" table:formula="of:=[.$AI$4]" office:value-type="float" office:value="0" calcext:value-type="float">
            <text:p>0</text:p>
          </table:table-cell>
          <table:table-cell table:formula="of:=[.$AJ$3]+[.$U$2]" office:value-type="float" office:value="3" calcext:value-type="float">
            <text:p>3</text:p>
          </table:table-cell>
          <table:table-cell table:style-name="ce98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4]" office:value-type="float" office:value="2" calcext:value-type="float">
            <text:p>2</text:p>
          </table:table-cell>
          <table:table-cell table:style-name="ce5"/>
          <table:table-cell table:formula="of:=COM.MICROSOFT.CONCAT(&quot;&quot;&quot;12&quot;&quot;: { &quot;;COM.MICROSOFT.TEXTJOIN(&quot;, &quot;;TRUE();[.N28:.R30]);&quot;}&quot;)" office:value-type="string" office:string-value="&quot;12&quot;: { &quot;0&quot;: 6, &quot;1&quot;: 4, &quot;2&quot;: 2, &quot;3&quot;: 4, &quot;4&quot;: 6, &quot;5&quot;: 3, &quot;6&quot;: 2, &quot;7&quot;: 1, &quot;8&quot;: 2, &quot;9&quot;: 4, &quot;10&quot;: 1, &quot;11&quot;: 0, &quot;12&quot;: 1, &quot;13&quot;: 0, &quot;14&quot;: 2}" calcext:value-type="string">
            <text:p>"12": { "0": 6, "1": 4, "2": 2, "3": 4, "4": 6, "5": 3, "6": 2, "7": 1, "8": 2, "9": 4, "10": 1, "11": 0, "12": 1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2" table:number-columns-repeated="29"/>
          <table:table-cell table:style-name="ce5"/>
          <table:table-cell table:formula="of:=COM.MICROSOFT.CONCAT(&quot;&quot;&quot;13&quot;&quot;: { &quot;;COM.MICROSOFT.TEXTJOIN(&quot;, &quot;;TRUE();[.T28:.X30]);&quot;}&quot;)" office:value-type="string" office:string-value="&quot;13&quot;: { &quot;0&quot;: 6, &quot;1&quot;: 4, &quot;2&quot;: 2, &quot;3&quot;: 3, &quot;4&quot;: 5, &quot;5&quot;: 2, &quot;6&quot;: 0, &quot;7&quot;: 0, &quot;8&quot;: 1, &quot;9&quot;: 3, &quot;10&quot;: 1, &quot;11&quot;: 0, &quot;12&quot;: 0, &quot;13&quot;: 0, &quot;14&quot;: 3}" calcext:value-type="string">
            <text:p>"13": { "0": 6, "1": 4, "2": 2, "3": 3, "4": 5, "5": 2, "6": 0, "7": 0, "8": 1, "9": 3, "10": 1, "11": 0, "12": 0, "13": 0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2]; &quot;&quot;&quot;: &quot;; [.B24])" office:value-type="string" office:string-value="&quot;0&quot;: 5" calcext:value-type="string">
            <text:p>"0": 5</text:p>
          </table:table-cell>
          <table:table-cell table:style-name="ce103" table:formula="of:=COM.MICROSOFT.CONCAT(&quot;&quot;&quot;&quot;;[.$C$2]; &quot;&quot;&quot;: &quot;; [.C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D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E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F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H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I24])" office:value-type="string" office:string-value="&quot;1&quot;: 3" calcext:value-type="string">
            <text:p>"1": 3</text:p>
          </table:table-cell>
          <table:table-cell table:style-name="ce103" table:formula="of:=COM.MICROSOFT.CONCAT(&quot;&quot;&quot;&quot;;[.$D$2]; &quot;&quot;&quot;: &quot;; [.J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K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L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N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O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P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Q24])" office:value-type="string" office:string-value="&quot;3&quot;: 4" calcext:value-type="string">
            <text:p>"3": 4</text:p>
          </table:table-cell>
          <table:table-cell table:style-name="ce103" table:formula="of:=COM.MICROSOFT.CONCAT(&quot;&quot;&quot;&quot;;[.$F$2]; &quot;&quot;&quot;: &quot;; [.R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T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U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V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W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X24])" office:value-type="string" office:string-value="&quot;4&quot;: 5" calcext:value-type="string">
            <text:p>"4": 5</text:p>
          </table:table-cell>
          <table:table-cell table:style-name="ce103"/>
          <table:table-cell table:style-name="ce103" table:formula="of:=COM.MICROSOFT.CONCAT(&quot;&quot;&quot;&quot;;[.$B$2]; &quot;&quot;&quot;: &quot;; [.Z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AA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AB24])" office:value-type="string" office:string-value="&quot;2&quot;: 3" calcext:value-type="string">
            <text:p>"2": 3</text:p>
          </table:table-cell>
          <table:table-cell table:style-name="ce103" table:formula="of:=COM.MICROSOFT.CONCAT(&quot;&quot;&quot;&quot;;[.$E$2]; &quot;&quot;&quot;: &quot;; [.AC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AD24])" office:value-type="string" office:string-value="&quot;4&quot;: 5" calcext:value-type="string">
            <text:p>"4": 5</text:p>
          </table:table-cell>
          <table:table-cell table:style-name="ce5"/>
          <table:table-cell table:formula="of:=COM.MICROSOFT.CONCAT(&quot;&quot;&quot;14&quot;&quot;: { &quot;;COM.MICROSOFT.TEXTJOIN(&quot;, &quot;;TRUE();[.Z28:.AD30]);&quot;}&quot;)" office:value-type="string" office:string-value="&quot;14&quot;: { &quot;0&quot;: 6, &quot;1&quot;: 4, &quot;2&quot;: 3, &quot;3&quot;: 3, &quot;4&quot;: 5, &quot;5&quot;: 4, &quot;6&quot;: 2, &quot;7&quot;: 2, &quot;8&quot;: 1, &quot;9&quot;: 3, &quot;10&quot;: 3, &quot;11&quot;: 1, &quot;12&quot;: 1, &quot;13&quot;: 1, &quot;14&quot;: 2}" calcext:value-type="string">
            <text:p>"14": { "0": 6, "1": 4, "2": 3, "3": 3, "4": 5, "5": 4, "6": 2, "7": 2, "8": 1, "9": 3, "10": 3, "11": 1, "12": 1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3]; &quot;&quot;&quot;: &quot;; [.B25])" office:value-type="string" office:string-value="&quot;5&quot;: 2" calcext:value-type="string">
            <text:p>"5": 2</text:p>
          </table:table-cell>
          <table:table-cell table:style-name="ce103" table:formula="of:=COM.MICROSOFT.CONCAT(&quot;&quot;&quot;&quot;;[.$C$3]; &quot;&quot;&quot;: &quot;; [.C25])" office:value-type="string" office:string-value="&quot;6&quot;: 1" calcext:value-type="string">
            <text:p>"6": 1</text:p>
          </table:table-cell>
          <table:table-cell table:style-name="ce103" table:formula="of:=COM.MICROSOFT.CONCAT(&quot;&quot;&quot;&quot;;[.$D$3]; &quot;&quot;&quot;: &quot;; [.D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F25])" office:value-type="string" office:string-value="&quot;9&quot;: 4" calcext:value-type="string">
            <text:p>"9": 4</text:p>
          </table:table-cell>
          <table:table-cell table:style-name="ce103"/>
          <table:table-cell table:style-name="ce103" table:formula="of:=COM.MICROSOFT.CONCAT(&quot;&quot;&quot;&quot;;[.$B$3]; &quot;&quot;&quot;: &quot;; [.H25])" office:value-type="string" office:string-value="&quot;5&quot;: 3" calcext:value-type="string">
            <text:p>"5": 3</text:p>
          </table:table-cell>
          <table:table-cell table:style-name="ce103" table:formula="of:=COM.MICROSOFT.CONCAT(&quot;&quot;&quot;&quot;;[.$C$3]; &quot;&quot;&quot;: &quot;; [.I25])" office:value-type="string" office:string-value="&quot;6&quot;: 1" calcext:value-type="string">
            <text:p>"6": 1</text:p>
          </table:table-cell>
          <table:table-cell table:style-name="ce103" table:formula="of:=COM.MICROSOFT.CONCAT(&quot;&quot;&quot;&quot;;[.$D$3]; &quot;&quot;&quot;: &quot;; [.J25])" office:value-type="string" office:string-value="&quot;7&quot;: 0" calcext:value-type="string">
            <text:p>"7": 0</text:p>
          </table:table-cell>
          <table:table-cell table:style-name="ce103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25])" office:value-type="string" office:string-value="&quot;9&quot;: 4" calcext:value-type="string">
            <text:p>"9": 4</text:p>
          </table:table-cell>
          <table:table-cell table:style-name="ce103"/>
          <table:table-cell table:style-name="ce103" table:formula="of:=COM.MICROSOFT.CONCAT(&quot;&quot;&quot;&quot;;[.$B$3]; &quot;&quot;&quot;: &quot;; [.N25])" office:value-type="string" office:string-value="&quot;5&quot;: 3" calcext:value-type="string">
            <text:p>"5": 3</text:p>
          </table:table-cell>
          <table:table-cell table:style-name="ce103" table:formula="of:=COM.MICROSOFT.CONCAT(&quot;&quot;&quot;&quot;;[.$C$3]; &quot;&quot;&quot;: &quot;; [.O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P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Q25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R25])" office:value-type="string" office:string-value="&quot;9&quot;: 4" calcext:value-type="string">
            <text:p>"9": 4</text:p>
          </table:table-cell>
          <table:table-cell table:style-name="ce103"/>
          <table:table-cell table:style-name="ce103" table:formula="of:=COM.MICROSOFT.CONCAT(&quot;&quot;&quot;&quot;;[.$B$3]; &quot;&quot;&quot;: &quot;; [.T25])" office:value-type="string" office:string-value="&quot;5&quot;: 2" calcext:value-type="string">
            <text:p>"5": 2</text:p>
          </table:table-cell>
          <table:table-cell table:style-name="ce103" table:formula="of:=COM.MICROSOFT.CONCAT(&quot;&quot;&quot;&quot;;[.$C$3]; &quot;&quot;&quot;: &quot;; [.U25])" office:value-type="string" office:string-value="&quot;6&quot;: 0" calcext:value-type="string">
            <text:p>"6": 0</text:p>
          </table:table-cell>
          <table:table-cell table:style-name="ce103" table:formula="of:=COM.MICROSOFT.CONCAT(&quot;&quot;&quot;&quot;;[.$D$3]; &quot;&quot;&quot;: &quot;; [.V25])" office:value-type="string" office:string-value="&quot;7&quot;: 0" calcext:value-type="string">
            <text:p>"7": 0</text:p>
          </table:table-cell>
          <table:table-cell table:style-name="ce103" table:formula="of:=COM.MICROSOFT.CONCAT(&quot;&quot;&quot;&quot;;[.$E$3]; &quot;&quot;&quot;: &quot;; [.W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X25])" office:value-type="string" office:string-value="&quot;9&quot;: 3" calcext:value-type="string">
            <text:p>"9": 3</text:p>
          </table:table-cell>
          <table:table-cell table:style-name="ce103"/>
          <table:table-cell table:style-name="ce103" table:formula="of:=COM.MICROSOFT.CONCAT(&quot;&quot;&quot;&quot;;[.$B$3]; &quot;&quot;&quot;: &quot;; [.Z25])" office:value-type="string" office:string-value="&quot;5&quot;: 4" calcext:value-type="string">
            <text:p>"5": 4</text:p>
          </table:table-cell>
          <table:table-cell table:style-name="ce103" table:formula="of:=COM.MICROSOFT.CONCAT(&quot;&quot;&quot;&quot;;[.$C$3]; &quot;&quot;&quot;: &quot;; [.AA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AB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AC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25])" office:value-type="string" office:string-value="&quot;9&quot;: 3" calcext:value-type="string">
            <text:p>"9": 3</text:p>
          </table:table-cell>
          <table:table-cell table:style-name="ce5"/>
          <table:table-cell table:number-columns-repeated="33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4]; &quot;&quot;&quot;: &quot;; [.B26])" office:value-type="string" office:string-value="&quot;10&quot;: 2" calcext:value-type="string">
            <text:p>"10": 2</text:p>
          </table:table-cell>
          <table:table-cell table:style-name="ce103" table:formula="of:=COM.MICROSOFT.CONCAT(&quot;&quot;&quot;&quot;;[.$C$4]; &quot;&quot;&quot;: &quot;; [.C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D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E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F26])" office:value-type="string" office:string-value="&quot;14&quot;: 3" calcext:value-type="string">
            <text:p>"14": 3</text:p>
          </table:table-cell>
          <table:table-cell table:style-name="ce103"/>
          <table:table-cell table:style-name="ce103" table:formula="of:=COM.MICROSOFT.CONCAT(&quot;&quot;&quot;&quot;;[.$B$4]; &quot;&quot;&quot;: &quot;; [.H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I26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J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K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L26])" office:value-type="string" office:string-value="&quot;14&quot;: 2" calcext:value-type="string">
            <text:p>"14": 2</text:p>
          </table:table-cell>
          <table:table-cell table:style-name="ce103"/>
          <table:table-cell table:style-name="ce103" table:formula="of:=COM.MICROSOFT.CONCAT(&quot;&quot;&quot;&quot;;[.$B$4]; &quot;&quot;&quot;: &quot;; [.N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O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P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Q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R26])" office:value-type="string" office:string-value="&quot;14&quot;: 2" calcext:value-type="string">
            <text:p>"14": 2</text:p>
          </table:table-cell>
          <table:table-cell table:style-name="ce103"/>
          <table:table-cell table:style-name="ce103" table:formula="of:=COM.MICROSOFT.CONCAT(&quot;&quot;&quot;&quot;;[.$B$4]; &quot;&quot;&quot;: &quot;; [.T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U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V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W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X26])" office:value-type="string" office:string-value="&quot;14&quot;: 3" calcext:value-type="string">
            <text:p>"14": 3</text:p>
          </table:table-cell>
          <table:table-cell table:style-name="ce103"/>
          <table:table-cell table:style-name="ce103" table:formula="of:=COM.MICROSOFT.CONCAT(&quot;&quot;&quot;&quot;;[.$B$4]; &quot;&quot;&quot;: &quot;; [.Z26])" office:value-type="string" office:string-value="&quot;10&quot;: 3" calcext:value-type="string">
            <text:p>"10": 3</text:p>
          </table:table-cell>
          <table:table-cell table:style-name="ce103" table:formula="of:=COM.MICROSOFT.CONCAT(&quot;&quot;&quot;&quot;;[.$C$4]; &quot;&quot;&quot;: &quot;; [.AA26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AB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AC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26])" office:value-type="string" office:string-value="&quot;14&quot;: 2" calcext:value-type="string">
            <text:p>"14": 2</text:p>
          </table:table-cell>
          <table:table-cell table:style-name="ce5"/>
          <table:table-cell table:formula="of:=COM.MICROSOFT.TEXTJOIN(&quot;, &quot;;TRUE();[.AF24:.AF28])" office:value-type="string" office:string-value="&quot;10&quot;: { &quot;0&quot;: 5, &quot;1&quot;: 4, &quot;2&quot;: 2, &quot;3&quot;: 3, &quot;4&quot;: 6, &quot;5&quot;: 2, &quot;6&quot;: 1, &quot;7&quot;: 1, &quot;8&quot;: 1, &quot;9&quot;: 4, &quot;10&quot;: 2, &quot;11&quot;: 0, &quot;12&quot;: 0, &quot;13&quot;: 0, &quot;14&quot;: 3}, &quot;11&quot;: { &quot;0&quot;: 6, &quot;1&quot;: 3, &quot;2&quot;: 2, &quot;3&quot;: 3, &quot;4&quot;: 6, &quot;5&quot;: 3, &quot;6&quot;: 1, &quot;7&quot;: 0, &quot;8&quot;: 1, &quot;9&quot;: 4, &quot;10&quot;: 1, &quot;11&quot;: 1, &quot;12&quot;: 0, &quot;13&quot;: 0, &quot;14&quot;: 2}, &quot;12&quot;: { &quot;0&quot;: 6, &quot;1&quot;: 4, &quot;2&quot;: 2, &quot;3&quot;: 4, &quot;4&quot;: 6, &quot;5&quot;: 3, &quot;6&quot;: 2, &quot;7&quot;: 1, &quot;8&quot;: 2, &quot;9&quot;: 4, &quot;10&quot;: 1, &quot;11&quot;: 0, &quot;12&quot;: 1, &quot;13&quot;: 0, &quot;14&quot;: 2}, &quot;13&quot;: { &quot;0&quot;: 6, &quot;1&quot;: 4, &quot;2&quot;: 2, &quot;3&quot;: 3, &quot;4&quot;: 5, &quot;5&quot;: 2, &quot;6&quot;: 0, &quot;7&quot;: 0, &quot;8&quot;: 1, &quot;9&quot;: 3, &quot;10&quot;: 1, &quot;11&quot;: 0, &quot;12&quot;: 0, &quot;13&quot;: 0, &quot;14&quot;: 3}, &quot;14&quot;: { &quot;0&quot;: 6, &quot;1&quot;: 4, &quot;2&quot;: 3, &quot;3&quot;: 3, &quot;4&quot;: 5, &quot;5&quot;: 4, &quot;6&quot;: 2, &quot;7&quot;: 2, &quot;8&quot;: 1, &quot;9&quot;: 3, &quot;10&quot;: 3, &quot;11&quot;: 1, &quot;12&quot;: 1, &quot;13&quot;: 1, &quot;14&quot;: 2}" calcext:value-type="string">
            <text:p>"10": { "0": 5, "1": 4, "2": 2, "3": 3, "4": 6, "5": 2, "6": 1, "7": 1, "8": 1, "9": 4, "10": 2, "11": 0, "12": 0, "13": 0, "14": 3}, "11": { "0": 6, "1": 3, "2": 2, "3": 3, "4": 6, "5": 3, "6": 1, "7": 0, "8": 1, "9": 4, "10": 1, "11": 1, "12": 0, "13": 0, "14": 2}, "12": { "0": 6, "1": 4, "2": 2, "3": 4, "4": 6, "5": 3, "6": 2, "7": 1, "8": 2, "9": 4, "10": 1, "11": 0, "12": 1, "13": 0, "14": 2}, "13": { "0": 6, "1": 4, "2": 2, "3": 3, "4": 5, "5": 2, "6": 0, "7": 0, "8": 1, "9": 3, "10": 1, "11": 0, "12": 0, "13": 0, "14": 3}, "14": { "0": 6, "1": 4, "2": 3, "3": 3, "4": 5, "5": 4, "6": 2, "7": 2, "8": 1, "9": 3, "10": 3, "11": 1, "12": 1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" table:formula="of:=COM.MICROSOFT.CONCAT(&quot;{&quot;; COM.MICROSOFT.TEXTJOIN(&quot;, &quot;;TRUE();[.AF14]; [.AF22]; [.AF30]);&quot;}&quot;)" office:value-type="string" office:string-value="{&quot;0&quot;: { &quot;0&quot;: 3, &quot;1&quot;: 0, &quot;2&quot;: 0, &quot;3&quot;: 0, &quot;4&quot;: 3, &quot;5&quot;: 2, &quot;6&quot;: 2, &quot;7&quot;: 2, &quot;8&quot;: 1, &quot;9&quot;: 3, &quot;10&quot;: 4, &quot;11&quot;: 4, &quot;12&quot;: 4, &quot;13&quot;: 3, &quot;14&quot;: 5}, &quot;1&quot;: { &quot;0&quot;: 2, &quot;1&quot;: 1, &quot;2&quot;: 0, &quot;3&quot;: 1, &quot;4&quot;: 2, &quot;5&quot;: 2, &quot;6&quot;: 1, &quot;7&quot;: 1, &quot;8&quot;: 0, &quot;9&quot;: 2, &quot;10&quot;: 5, &quot;11&quot;: 3, &quot;12&quot;: 4, &quot;13&quot;: 3, &quot;14&quot;: 5}, &quot;2&quot;: { &quot;0&quot;: 2, &quot;1&quot;: 0, &quot;2&quot;: 0, &quot;3&quot;: 1, &quot;4&quot;: 2, &quot;5&quot;: 1, &quot;6&quot;: 0, &quot;7&quot;: 1, &quot;8&quot;: 0, &quot;9&quot;: 2, &quot;10&quot;: 5, &quot;11&quot;: 4, &quot;12&quot;: 3, &quot;13&quot;: 3, &quot;14&quot;: 5}, &quot;3&quot;: { &quot;0&quot;: 1, &quot;1&quot;: 0, &quot;2&quot;: 0, &quot;3&quot;: 1, &quot;4&quot;: 3, &quot;5&quot;: 2, &quot;6&quot;: 1, &quot;7&quot;: 1, &quot;8&quot;: 1, &quot;9&quot;: 3, &quot;10&quot;: 5, &quot;11&quot;: 4, &quot;12&quot;: 4, &quot;13&quot;: 2, &quot;14&quot;: 4}, &quot;4&quot;: { &quot;0&quot;: 3, &quot;1&quot;: 1, &quot;2&quot;: 1, &quot;3&quot;: 1, &quot;4&quot;: 3, &quot;5&quot;: 3, &quot;6&quot;: 1, &quot;7&quot;: 1, &quot;8&quot;: 1, &quot;9&quot;: 3, &quot;10&quot;: 5, &quot;11&quot;: 4, &quot;12&quot;: 4, &quot;13&quot;: 2, &quot;14&quot;: 4}, &quot;5&quot;: { &quot;0&quot;: 4, &quot;1&quot;: 2, &quot;2&quot;: 1, &quot;3&quot;: 2, &quot;4&quot;: 4, &quot;5&quot;: 1, &quot;6&quot;: 0, &quot;7&quot;: 0, &quot;8&quot;: 0, &quot;9&quot;: 3, &quot;10&quot;: 3, &quot;11&quot;: 3, &quot;12&quot;: 2, &quot;13&quot;: 1, &quot;14&quot;: 3}, &quot;6&quot;: { &quot;0&quot;: 5, &quot;1&quot;: 2, &quot;2&quot;: 0, &quot;3&quot;: 2, &quot;4&quot;: 4, &quot;5&quot;: 1, &quot;6&quot;: 0, &quot;7&quot;: 0, &quot;8&quot;: 0, &quot;9&quot;: 2, &quot;10&quot;: 3, &quot;11&quot;: 2, &quot;12&quot;: 2, &quot;13&quot;: 1, &quot;14&quot;: 3}, &quot;7&quot;: { &quot;0&quot;: 5, &quot;1&quot;: 3, &quot;2&quot;: 1, &quot;3&quot;: 2, &quot;4&quot;: 4, &quot;5&quot;: 1, &quot;6&quot;: 0, &quot;7&quot;: 0, &quot;8&quot;: 0, &quot;9&quot;: 2, &quot;10&quot;: 3, &quot;11&quot;: 2, &quot;12&quot;: 2, &quot;13&quot;: 1, &quot;14&quot;: 3}, &quot;8&quot;: { &quot;0&quot;: 4, &quot;1&quot;: 2, &quot;2&quot;: 0, &quot;3&quot;: 2, &quot;4&quot;: 4, &quot;5&quot;: 1, &quot;6&quot;: 0, &quot;7&quot;: 0, &quot;8&quot;: 0, &quot;9&quot;: 3, &quot;10&quot;: 3, &quot;11&quot;: 2, &quot;12&quot;: 3, &quot;13&quot;: 1, &quot;14&quot;: 3}, &quot;9&quot;: { &quot;0&quot;: 5, &quot;1&quot;: 2, &quot;2&quot;: 1, &quot;3&quot;: 2, &quot;4&quot;: 4, &quot;5&quot;: 3, &quot;6&quot;: 1, &quot;7&quot;: 1, &quot;8&quot;: 1, &quot;9&quot;: 2, &quot;10&quot;: 4, &quot;11&quot;: 2, &quot;12&quot;: 2, &quot;13&quot;: 1, &quot;14&quot;: 3}, &quot;10&quot;: { &quot;0&quot;: 5, &quot;1&quot;: 4, &quot;2&quot;: 2, &quot;3&quot;: 3, &quot;4&quot;: 6, &quot;5&quot;: 2, &quot;6&quot;: 1, &quot;7&quot;: 1, &quot;8&quot;: 1, &quot;9&quot;: 4, &quot;10&quot;: 2, &quot;11&quot;: 0, &quot;12&quot;: 0, &quot;13&quot;: 0, &quot;14&quot;: 3}, &quot;11&quot;: { &quot;0&quot;: 6, &quot;1&quot;: 3, &quot;2&quot;: 2, &quot;3&quot;: 3, &quot;4&quot;: 6, &quot;5&quot;: 3, &quot;6&quot;: 1, &quot;7&quot;: 0, &quot;8&quot;: 1, &quot;9&quot;: 4, &quot;10&quot;: 1, &quot;11&quot;: 1, &quot;12&quot;: 0, &quot;13&quot;: 0, &quot;14&quot;: 2}, &quot;12&quot;: { &quot;0&quot;: 6, &quot;1&quot;: 4, &quot;2&quot;: 2, &quot;3&quot;: 4, &quot;4&quot;: 6, &quot;5&quot;: 3, &quot;6&quot;: 2, &quot;7&quot;: 1, &quot;8&quot;: 2, &quot;9&quot;: 4, &quot;10&quot;: 1, &quot;11&quot;: 0, &quot;12&quot;: 1, &quot;13&quot;: 0, &quot;14&quot;: 2}, &quot;13&quot;: { &quot;0&quot;: 6, &quot;1&quot;: 4, &quot;2&quot;: 2, &quot;3&quot;: 3, &quot;4&quot;: 5, &quot;5&quot;: 2, &quot;6&quot;: 0, &quot;7&quot;: 0, &quot;8&quot;: 1, &quot;9&quot;: 3, &quot;10&quot;: 1, &quot;11&quot;: 0, &quot;12&quot;: 0, &quot;13&quot;: 0, &quot;14&quot;: 3}, &quot;14&quot;: { &quot;0&quot;: 6, &quot;1&quot;: 4, &quot;2&quot;: 3, &quot;3&quot;: 3, &quot;4&quot;: 5, &quot;5&quot;: 4, &quot;6&quot;: 2, &quot;7&quot;: 2, &quot;8&quot;: 1, &quot;9&quot;: 3, &quot;10&quot;: 3, &quot;11&quot;: 1, &quot;12&quot;: 1, &quot;13&quot;: 1, &quot;14&quot;: 2}}" calcext:value-type="string">
            <text:p>{"0": { "0": 3, "1": 0, "2": 0, "3": 0, "4": 3, "5": 2, "6": 2, "7": 2, "8": 1, "9": 3, "10": 4, "11": 4, "12": 4, "13": 3, "14": 5}, "1": { "0": 2, "1": 1, "2": 0, "3": 1, "4": 2, "5": 2, "6": 1, "7": 1, "8": 0, "9": 2, "10": 5, "11": 3, "12": 4, "13": 3, "14": 5}, "2": { "0": 2, "1": 0, "2": 0, "3": 1, "4": 2, "5": 1, "6": 0, "7": 1, "8": 0, "9": 2, "10": 5, "11": 4, "12": 3, "13": 3, "14": 5}, "3": { "0": 1, "1": 0, "2": 0, "3": 1, "4": 3, "5": 2, "6": 1, "7": 1, "8": 1, "9": 3, "10": 5, "11": 4, "12": 4, "13": 2, "14": 4}, "4": { "0": 3, "1": 1, "2": 1, "3": 1, "4": 3, "5": 3, "6": 1, "7": 1, "8": 1, "9": 3, "10": 5, "11": 4, "12": 4, "13": 2, "14": 4}, "5": { "0": 4, "1": 2, "2": 1, "3": 2, "4": 4, "5": 1, "6": 0, "7": 0, "8": 0, "9": 3, "10": 3, "11": 3, "12": 2, "13": 1, "14": 3}, "6": { "0": 5, "1": 2, "2": 0, "3": 2, "4": 4, "5": 1, "6": 0, "7": 0, "8": 0, "9": 2, "10": 3, "11": 2, "12": 2, "13": 1, "14": 3}, "7": { "0": 5, "1": 3, "2": 1, "3": 2, "4": 4, "5": 1, "6": 0, "7": 0, "8": 0, "9": 2, "10": 3, "11": 2, "12": 2, "13": 1, "14": 3}, "8": { "0": 4, "1": 2, "2": 0, "3": 2, "4": 4, "5": 1, "6": 0, "7": 0, "8": 0, "9": 3, "10": 3, "11": 2, "12": 3, "13": 1, "14": 3}, "9": { "0": 5, "1": 2, "2": 1, "3": 2, "4": 4, "5": 3, "6": 1, "7": 1, "8": 1, "9": 2, "10": 4, "11": 2, "12": 2, "13": 1, "14": 3}, "10": { "0": 5, "1": 4, "2": 2, "3": 3, "4": 6, "5": 2, "6": 1, "7": 1, "8": 1, "9": 4, "10": 2, "11": 0, "12": 0, "13": 0, "14": 3}, "11": { "0": 6, "1": 3, "2": 2, "3": 3, "4": 6, "5": 3, "6": 1, "7": 0, "8": 1, "9": 4, "10": 1, "11": 1, "12": 0, "13": 0, "14": 2}, "12": { "0": 6, "1": 4, "2": 2, "3": 4, "4": 6, "5": 3, "6": 2, "7": 1, "8": 2, "9": 4, "10": 1, "11": 0, "12": 1, "13": 0, "14": 2}, "13": { "0": 6, "1": 4, "2": 2, "3": 3, "4": 5, "5": 2, "6": 0, "7": 0, "8": 1, "9": 3, "10": 1, "11": 0, "12": 0, "13": 0, "14": 3}, "14": { "0": 6, "1": 4, "2": 3, "3": 3, "4": 5, "5": 4, "6": 2, "7": 2, "8": 1, "9": 3, "10": 3, "11": 1, "12": 1, "13": 1, "14": 2}}</text:p>
          </table:table-cell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0">00/00/0000</text:date>, <text:time style:data-style-name="N2" text:time-value="18:26:46.009399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10T17:36:21.884706400</dc:date>
    <meta:generator>LibreOffice/26.2.0.3$Windows_X86_64 LibreOffice_project/620$Build-3</meta:generator>
    <meta:editing-duration>PT22H56M13S</meta:editing-duration>
    <meta:editing-cycles>351</meta:editing-cycles>
    <meta:document-statistic meta:table-count="2" meta:cell-count="1082" meta:object-count="0"/>
    <meta:user-defined meta:name="AppVersion">16.0300</meta:user-defined>
  </office:meta>
</office:document-meta>
</file>
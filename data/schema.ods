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804cm"/>
    </style:style>
    <style:style style:name="co4" style:family="table-column">
      <style:table-column-properties fo:break-before="auto" style:column-width="0.61cm"/>
    </style:style>
    <style:style style:name="co5" style:family="table-column">
      <style:table-column-properties fo:break-before="auto" style:column-width="0.594cm"/>
    </style:style>
    <style:style style:name="co6" style:family="table-column">
      <style:table-column-properties fo:break-before="auto" style:column-width="0.485cm"/>
    </style:style>
    <style:style style:name="co7" style:family="table-column">
      <style:table-column-properties fo:break-before="auto" style:column-width="0.813cm"/>
    </style:style>
    <style:style style:name="co8" style:family="table-column">
      <style:table-column-properties fo:break-before="auto" style:column-width="0.882cm"/>
    </style:style>
    <style:style style:name="co9" style:family="table-column">
      <style:table-column-properties fo:break-before="auto" style:column-width="1.007cm"/>
    </style:style>
    <style:style style:name="co10" style:family="table-column">
      <style:table-column-properties fo:break-before="auto" style:column-width="0.462cm"/>
    </style:style>
    <style:style style:name="co11" style:family="table-column">
      <style:table-column-properties fo:break-before="auto" style:column-width="0.446cm"/>
    </style:style>
    <style:style style:name="co12" style:family="table-column">
      <style:table-column-properties fo:break-before="auto" style:column-width="0.534cm"/>
    </style:style>
    <style:style style:name="co13" style:family="table-column">
      <style:table-column-properties fo:break-before="auto" style:column-width="0.559cm"/>
    </style:style>
    <style:style style:name="co14" style:family="table-column">
      <style:table-column-properties fo:break-before="auto" style:column-width="0.50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3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40" style:family="table-cell" style:parent-style-name="Default">
      <style:table-cell-properties style:rotation-align="none"/>
    </style:style>
    <style:style style:name="ce541" style:family="table-cell" style:parent-style-name="Default">
      <style:table-cell-properties style:rotation-align="none" style:vertical-align="middle"/>
    </style:style>
    <style:style style:name="ce542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3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1" style:family="table-cell" style:parent-style-name="Defaul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5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ffffff" style:vertical-align="top"/>
      <style:text-properties style:use-window-font-color="true"/>
    </style:style>
    <style:style style:name="ce18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548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73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1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1" style:family="table-cell" style:parent-style-name="Default" style:data-style-name="N148">
      <style:table-cell-properties style:rotation-align="none" style:shrink-to-fit="tru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2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68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8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4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4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 style:data-style-name="N148">
      <style:table-cell-properties style:shrink-to-fit="true"/>
      <style:text-properties fo:font-weight="normal" style:font-weight-asian="normal" style:font-weight-complex="normal"/>
    </style:style>
    <style:style style:name="ce61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1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2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75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62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0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6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60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3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3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8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64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66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66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1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7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7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79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4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8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49" style:family="table-cell" style:parent-style-name="Excel_20_Built-in_20_Neutral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13" style:family="table-cell" style:parent-style-name="Excel_20_Built-in_20_Neutral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7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dotted" style:text-underline-width="auto" style:text-underline-color="font-color"/>
    </style:style>
    <style:style style:name="ce82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3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3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3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0" style:family="table-cell" style:parent-style-name="Default">
      <style:table-cell-properties style:vertical-align="middle"/>
    </style:style>
    <style:style style:name="ce189" style:family="table-cell" style:parent-style-name="Default">
      <style:table-cell-properties fo:wrap-option="no-wrap"/>
    </style:style>
    <style:style style:name="ce834" style:family="table-cell" style:parent-style-name="Default">
      <style:table-cell-properties fo:wrap-option="wrap" style:rotation-align="none" style:shrink-to-fit="false" style:vertical-align="top"/>
      <style:text-properties fo:font-size="6pt" style:font-size-asian="11pt" style:font-size-complex="11pt" fo:hyphenate="false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2" style:family="table-cell" style:parent-style-name="Default">
      <style:text-properties fo:color="#b2b2b2">
        <loext:char-complex-color loext:theme-type="dark1" loext:color-type="theme"/>
      </style:text-properties>
    </style:style>
    <style:style style:name="ce16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>
        <loext:char-complex-color loext:theme-type="dark1" loext:color-type="theme"/>
      </style:text-properties>
    </style:style>
    <style:style style:name="ce195" style:family="table-cell" style:parent-style-name="Default">
      <style:table-cell-properties fo:wrap-option="wrap" style:shrink-to-fit="true" style:vertical-align="top"/>
      <style:text-properties fo:color="#b2b2b2" fo:font-size="6pt">
        <loext:char-complex-color loext:theme-type="dark1" loext:color-type="theme"/>
      </style:text-properties>
    </style:style>
    <style:style style:name="ce196" style:family="table-cell" style:parent-style-name="Default">
      <style:table-cell-properties fo:wrap-option="no-wrap"/>
      <style:text-properties fo:color="#b2b2b2">
        <loext:char-complex-color loext:theme-type="dark1" loext:color-type="theme"/>
      </style:text-properties>
    </style:style>
    <style:style style:name="ce836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198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838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200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839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202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840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174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Default">
      <style:table-cell-properties style:vertical-align="middle"/>
      <style:text-properties fo:color="#b2b2b2">
        <loext:char-complex-color loext:theme-type="dark1" loext:color-type="theme"/>
      </style:text-properties>
    </style:style>
    <style:style style:name="ce841" style:family="table-cell" style:parent-style-name="Default">
      <style:table-cell-properties fo:wrap-option="no-wrap" style:rotation-align="none"/>
    </style:style>
    <style:style style:name="ce177" style:family="table-cell" style:parent-style-name="Default">
      <style:text-properties fo:color="#808080">
        <loext:char-complex-color loext:theme-type="dark1" loext:color-type="theme"/>
      </style:text-properties>
    </style:style>
    <style:style style:name="ce151" style:family="table-cell" style:parent-style-name="Default">
      <style:table-cell-properties style:vertical-align="middle"/>
      <style:text-properties fo:color="#808080">
        <loext:char-complex-color loext:theme-type="dark1" loext:color-type="theme"/>
      </style:text-properties>
    </style:style>
    <style:style style:name="ce179" style:family="table-cell" style:parent-style-name="Default">
      <style:table-cell-properties style:rotation-align="none"/>
      <style:text-properties fo:color="#b2b2b2">
        <loext:char-complex-color loext:theme-type="dark1" loext:color-type="theme"/>
      </style:text-properties>
    </style:style>
    <style:style style:name="ce180" style:family="table-cell" style:parent-style-name="Default">
      <style:table-cell-properties style:rotation-align="none" style:vertical-align="middle"/>
      <style:text-properties fo:color="#b2b2b2">
        <loext:char-complex-color loext:theme-type="dark1" loext:color-type="theme"/>
      </style:text-properties>
    </style:style>
    <style:style style:name="ce12" style:family="table-cell" style:parent-style-name="Default">
      <style:table-cell-properties style:vertical-align="top"/>
    </style:style>
    <style:style style:name="ce21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5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92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93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12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0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0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>
        <loext:char-complex-color loext:theme-type="dark1" loext:color-type="theme"/>
      </style:text-properties>
    </style:style>
    <style:style style:name="ce143" style:family="table-cell" style:parent-style-name="Default">
      <style:table-cell-properties fo:wrap-option="wrap" style:vertical-align="top"/>
      <style:text-properties fo:color="#808080" fo:font-size="6pt">
        <loext:char-complex-color loext:theme-type="dark1" loext:color-type="theme"/>
      </style:text-properties>
    </style:style>
    <style:style style:name="ce311" style:family="table-cell" style:parent-style-name="Default">
      <style:table-cell-properties fo:wrap-option="no-wrap"/>
      <style:text-properties fo:color="#808080">
        <loext:char-complex-color loext:theme-type="dark1" loext:color-type="theme"/>
      </style:text-properties>
    </style:style>
    <style:style style:name="ce312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837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314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315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316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15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3" style:family="table-cell" style:parent-style-name="Default">
      <style:table-cell-properties style:rotation-align="none"/>
      <style:text-properties fo:color="#808080">
        <loext:char-complex-color loext:theme-type="dark1" loext:color-type="theme"/>
      </style:text-properties>
    </style:style>
    <style:style style:name="ce154" style:family="table-cell" style:parent-style-name="Default">
      <style:table-cell-properties style:rotation-align="none" style:vertical-align="middle"/>
      <style:text-properties fo:color="#808080">
        <loext:char-complex-color loext:theme-type="dark1" loext:color-type="theme"/>
      </style:text-properties>
    </style:style>
    <style:style style:name="ce7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2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5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6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6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4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8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4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1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835" style:family="table-cell" style:parent-style-name="Default">
      <style:table-cell-properties fo:wrap-option="wrap" style:vertical-align="top"/>
      <style:text-properties fo:font-size="6pt"/>
    </style:style>
    <style:style style:name="ce417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418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419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420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421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7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08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309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 5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38"/>
        <table:table-column table:style-name="co1" table:default-cell-style-name="ce537"/>
        <table:table-column table:style-name="co1" table:default-cell-style-name="ce536"/>
        <table:table-column table:style-name="co1" table:number-columns-repeated="2" table:default-cell-style-name="ce750"/>
        <table:table-column table:style-name="co1" table:default-cell-style-name="ce29"/>
        <table:table-column table:style-name="co1" table:default-cell-style-name="ce730"/>
        <table:table-column table:style-name="co1" table:default-cell-style-name="Default"/>
        <table:table-column table:style-name="co1" table:default-cell-style-name="ce746"/>
        <table:table-column table:style-name="co1" table:default-cell-style-name="ce750"/>
        <table:table-column table:style-name="co1" table:default-cell-style-name="ce579"/>
        <table:table-column table:style-name="co1" table:default-cell-style-name="ce29"/>
        <table:table-column table:style-name="co1" table:default-cell-style-name="ce536"/>
        <table:table-column table:style-name="co1" table:default-cell-style-name="ce742"/>
        <table:table-column table:style-name="co1" table:default-cell-style-name="ce538"/>
        <table:table-column table:style-name="co1" table:default-cell-style-name="ce750"/>
        <table:table-column table:style-name="co1" table:default-cell-style-name="Default"/>
        <table:table-column table:style-name="co1" table:default-cell-style-name="ce29"/>
        <table:table-column table:style-name="co1" table:default-cell-style-name="ce14"/>
        <table:table-column table:style-name="co1" table:default-cell-style-name="ce742"/>
        <table:table-column table:style-name="co1" table:default-cell-style-name="ce746"/>
        <table:table-column table:style-name="co1" table:default-cell-style-name="Default"/>
        <table:table-column table:style-name="co1" table:default-cell-style-name="ce829"/>
        <table:table-column table:style-name="co1" table:default-cell-style-name="ce29"/>
        <table:table-column table:style-name="co1" table:default-cell-style-name="ce71"/>
        <table:table-column table:style-name="co1" table:number-columns-repeated="36" table:default-cell-style-name="Default"/>
        <table:table-column table:style-name="co1" table:default-cell-style-name="ce179"/>
        <table:table-column table:style-name="co1" table:number-columns-repeated="36" table:default-cell-style-name="Default"/>
        <table:table-row table:style-name="ro1">
          <table:table-cell table:style-name="ce536" table:number-columns-repeated="3"/>
          <table:table-cell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579"/>
          <table:table-cell/>
          <table:table-cell table:style-name="ce629"/>
          <table:table-cell/>
          <table:table-cell table:style-name="ce536" table:number-columns-repeated="3"/>
          <table:table-cell/>
          <table:table-cell table:style-name="Default"/>
          <table:table-cell table:style-name="ce790" office:value-type="string" calcext:value-type="string">
            <text:p>start priorities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ce790" office:value-type="string" calcext:value-type="string">
            <text:p>averages</text:p>
          </table:table-cell>
          <table:table-cell table:number-columns-repeated="5"/>
          <table:table-cell table:style-name="ce790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3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124" office:value-type="float" office:value="14" calcext:value-type="float">
            <text:p>14</text:p>
          </table:table-cell>
          <table:table-cell table:style-name="ce125" office:value-type="float" office:value="6" calcext:value-type="float">
            <text:p>6</text:p>
          </table:table-cell>
          <table:table-cell table:style-name="ce124" office:value-type="float" office:value="3" calcext:value-type="float">
            <text:p>3</text:p>
          </table:table-cell>
          <table:table-cell table:style-name="ce125" office:value-type="float" office:value="5" calcext:value-type="float">
            <text:p>5</text:p>
          </table:table-cell>
          <table:table-cell table:style-name="ce124" office:value-type="float" office:value="13" calcext:value-type="float">
            <text:p>13</text:p>
          </table:table-cell>
          <table:table-cell table:style-name="Default"/>
          <table:table-cell table:style-name="ce149" table:formula="of:=SUM([.B25];[.H25];[.N25];[.T25];[.Z25];[.Z30];[.T30];[.N30];[.H30];[.B30];[.B35];[.H35];[.N35];[.T35];[.Z35])/[.$Z$6]" office:value-type="float" office:value="2.46781115879828" calcext:value-type="float">
            <text:p>2.47</text:p>
          </table:table-cell>
          <table:table-cell table:style-name="ce149" table:formula="of:=SUM([.C25];[.I25];[.O25];[.U25];[.AA25];[.AA30];[.U30];[.O30];[.I30];[.C30];[.C35];[.I35];[.O35];[.U35];[.AA35])/[.$Z$6]" office:value-type="float" office:value="1.72103004291845" calcext:value-type="float">
            <text:p>1.72</text:p>
          </table:table-cell>
          <table:table-cell table:style-name="ce149" table:formula="of:=SUM([.D25];[.J25];[.P25];[.V25];[.AB25];[.AB30];[.V30];[.P30];[.J30];[.D30];[.D35];[.J35];[.P35];[.V35];[.AB35])/[.$Z$6]" office:value-type="float" office:value="1.19742489270386" calcext:value-type="float">
            <text:p>1.20</text:p>
          </table:table-cell>
          <table:table-cell table:style-name="ce149" table:formula="of:=SUM([.E25];[.K25];[.Q25];[.W25];[.AC25];[.AC30];[.W30];[.Q30];[.K30];[.E30];[.E35];[.K35];[.Q35];[.W35];[.AC35])/[.$Z$6]" office:value-type="float" office:value="1.68240343347639" calcext:value-type="float">
            <text:p>1.68</text:p>
          </table:table-cell>
          <table:table-cell table:style-name="ce149" table:formula="of:=SUM([.F25];[.L25];[.R25];[.X25];[.AD25];[.AD30];[.X30];[.R30];[.L30];[.F30];[.F35];[.L35];[.R35];[.X35];[.AD35])/[.$Z$6]" office:value-type="float" office:value="2.38197424892704" calcext:value-type="float">
            <text:p>2.38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2, 2.1, 2.2, 2.3, 3, 3.1, 3.2, 3.6, 4, 4.2, 4.4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4, &quot;2&quot;: 3, &quot;3&quot;: 10, &quot;4&quot;: 12, &quot;5&quot;: 5, &quot;6&quot;: 2, &quot;7&quot;: 1, &quot;8&quot;: 6, &quot;9&quot;: 8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7, &quot;3&quot;: 12, &quot;4&quot;: 11, &quot;5&quot;: 6, &quot;6&quot;: 4, &quot;7&quot;: 3, &quot;8&quot;: 9, &quot;9&quot;: 10, &quot;10&quot;: 5, &quot;11&quot;: 2, &quot;12&quot;: 1, &quot;13&quot;: 8, &quot;14&quot;: 12}}}" calcext:value-type="string" table:number-columns-spanned="29" table:number-rows-spanned="5">
            <text:p>{ "efforts": [1, 1.1, 1.2, 1.3, 2, 2.1, 2.2, 2.3, 3, 3.1, 3.2, 3.6, 4, 4.2, 4.4], "pairs": {"0": { "0": 14, "1": 1, "2": 2, "3": 3, "4": 5, "5": 9, "6": 8, "7": 7, "8": 4, "9": 6, "10": 12, "11": 14, "12": 13, "13": 10, "14": 11}, "1": { "0": 9, "1": 6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1, "12": 10, "13": 12, "14": 14}, "4": { "0": 6, "1": 2, "2": 1, "3": 7, "4": 13, "5": 5, "6": 4, "7": 3, "8": 9, "9": 8, "10": 12, "11": 11, "12": 10, "13": 14, "14": 13}, 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4, "2": 3, "3": 10, "4": 12, "5": 5, "6": 2, "7": 1, "8": 6, "9": 8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7, "3": 12, "4": 11, "5": 6, "6": 4, "7": 3, "8": 9, "9": 10, "10": 5, "11": 2, "12": 1, "13": 8, "14": 12}}}</text:p>
          </table:table-cell>
          <table:covered-table-cell table:number-columns-repeated="28" table:style-name="ce189"/>
          <table:table-cell table:style-name="ce841"/>
          <table:table-cell table:style-name="ce189"/>
          <table:table-cell table:style-name="Default"/>
          <table:table-cell table:number-columns-repeated="36"/>
        </table:table-row>
        <table:table-row table:style-name="ro1">
          <table:table-cell table:style-name="ce53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125" office:value-type="float" office:value="7" calcext:value-type="float">
            <text:p>7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25" office:value-type="float" office:value="8" calcext:value-type="float">
            <text:p>8</text:p>
          </table:table-cell>
          <table:table-cell table:style-name="Default"/>
          <table:table-cell table:style-name="ce149" table:formula="of:=SUM([.B26];[.H26];[.N26];[.T26];[.Z26];[.Z31];[.T31];[.N31];[.H31];[.B31];[.B36];[.H36];[.N36];[.T36];[.Z36])/[.$Z$6]" office:value-type="float" office:value="1.54935622317597" calcext:value-type="float">
            <text:p>1.55</text:p>
          </table:table-cell>
          <table:table-cell table:style-name="ce149" table:formula="of:=SUM([.C26];[.I26];[.O26];[.U26];[.AA26];[.AA31];[.U31];[.O31];[.I31];[.C31];[.C36];[.I36];[.O36];[.U36];[.AA36])/[.$Z$6]" office:value-type="float" office:value="1.21888412017167" calcext:value-type="float">
            <text:p>1.22</text:p>
          </table:table-cell>
          <table:table-cell table:style-name="ce149" table:formula="of:=SUM([.D26];[.J26];[.P26];[.V26];[.AB26];[.AB31];[.V31];[.P31];[.J31];[.D31];[.D36];[.J36];[.P36];[.V36];[.AB36])/[.$Z$6]" office:value-type="float" office:value="1" calcext:value-type="float">
            <text:p>1.00</text:p>
          </table:table-cell>
          <table:table-cell table:style-name="ce149" table:formula="of:=SUM([.E26];[.K26];[.Q26];[.W26];[.AC26];[.AC31];[.W31];[.Q31];[.K31];[.E31];[.E36];[.K36];[.Q36];[.W36];[.AC36])/[.$Z$6]" office:value-type="float" office:value="1.18025751072961" calcext:value-type="float">
            <text:p>1.18</text:p>
          </table:table-cell>
          <table:table-cell table:style-name="ce149" table:formula="of:=SUM([.F26];[.L26];[.R26];[.X26];[.AD26];[.AD31];[.X31];[.R31];[.L31];[.F31];[.F36];[.L36];[.R36];[.X36];[.AD36])/[.$Z$6]" office:value-type="float" office:value="1.82403433476395" calcext:value-type="float">
            <text:p>1.82</text:p>
          </table:table-cell>
          <table:table-cell/>
          <table:covered-table-cell table:number-columns-repeated="29" table:style-name="ce189"/>
          <table:table-cell table:style-name="ce189" table:number-columns-repeated="3"/>
          <table:table-cell table:number-columns-repeated="36"/>
        </table:table-row>
        <table:table-row table:style-name="ro1">
          <table:table-cell table:style-name="ce538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124" office:value-type="float" office:value="11" calcext:value-type="float">
            <text:p>11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9" calcext:value-type="float">
            <text:p>9</text:p>
          </table:table-cell>
          <table:table-cell table:style-name="ce124" office:value-type="float" office:value="4" calcext:value-type="float">
            <text:p>4</text:p>
          </table:table-cell>
          <table:table-cell table:style-name="ce124" office:value-type="float" office:value="12" calcext:value-type="float">
            <text:p>12</text:p>
          </table:table-cell>
          <table:table-cell table:style-name="Default"/>
          <table:table-cell table:style-name="ce149" table:formula="of:=SUM([.B27];[.H27];[.N27];[.T27];[.Z27];[.Z32];[.T32];[.N32];[.H32];[.B32];[.B37];[.H37];[.N37];[.T37];[.Z37])/[.$Z$6]" office:value-type="float" office:value="2.18454935622318" calcext:value-type="float">
            <text:p>2.18</text:p>
          </table:table-cell>
          <table:table-cell table:style-name="ce149" table:formula="of:=SUM([.C27];[.I27];[.O27];[.U27];[.AA27];[.AA32];[.U32];[.O32];[.I32];[.C32];[.C37];[.I37];[.O37];[.U37];[.AA37])/[.$Z$6]" office:value-type="float" office:value="1.74248927038627" calcext:value-type="float">
            <text:p>1.74</text:p>
          </table:table-cell>
          <table:table-cell table:style-name="ce149" table:formula="of:=SUM([.D27];[.J27];[.P27];[.V27];[.AB27];[.AB32];[.V32];[.P32];[.J32];[.D32];[.D37];[.J37];[.P37];[.V37];[.AB37])/[.$Z$6]" office:value-type="float" office:value="1.72532188841202" calcext:value-type="float">
            <text:p>1.73</text:p>
          </table:table-cell>
          <table:table-cell table:style-name="ce149" table:formula="of:=SUM([.E27];[.K27];[.Q27];[.W27];[.AC27];[.AC32];[.W32];[.Q32];[.K32];[.E32];[.E37];[.K37];[.Q37];[.W37];[.AC37])/[.$Z$6]" office:value-type="float" office:value="1.63948497854077" calcext:value-type="float">
            <text:p>1.64</text:p>
          </table:table-cell>
          <table:table-cell table:style-name="ce149" table:formula="of:=SUM([.F27];[.L27];[.R27];[.X27];[.AD27];[.AD32];[.X32];[.R32];[.L32];[.F32];[.F37];[.L37];[.R37];[.X37];[.AD37])/[.$Z$6]" office:value-type="float" office:value="2.41630901287554" calcext:value-type="float">
            <text:p>2.42</text:p>
          </table:table-cell>
          <table:table-cell table:style-name="ce184"/>
          <table:covered-table-cell table:number-columns-repeated="29" table:style-name="ce189"/>
          <table:table-cell table:style-name="ce841"/>
          <table:table-cell table:style-name="ce189" table:number-columns-repeated="2"/>
          <table:table-cell table:number-columns-repeated="36"/>
        </table:table-row>
        <table:table-row table:style-name="ro1">
          <table:table-cell table:style-name="ce538"/>
          <table:table-cell table:style-name="ce542"/>
          <table:table-cell table:number-columns-repeat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99" table:number-columns-spanned="1" table:number-rows-spanned="2"/>
          <table:table-cell/>
          <table:table-cell table:style-name="ce537"/>
          <table:table-cell table:style-name="ce641"/>
          <table:table-cell table:style-name="ce538"/>
          <table:table-cell/>
          <table:table-cell table:style-name="Default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 table:style-name="Default"/>
          <table:table-cell table:style-name="ce682"/>
          <table:table-cell table:style-name="ce692"/>
          <table:table-cell table:style-name="ce682"/>
          <table:table-cell/>
          <table:table-cell table:style-name="ce184" table:number-columns-repeated="2"/>
          <table:covered-table-cell table:style-name="ce184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54"/>
          <table:table-cell/>
          <table:covered-table-cell table:style-name="ce54"/>
          <table:covered-table-cell table:number-columns-repeated="2" table:style-name="ce590"/>
          <table:covered-table-cell table:style-name="ce99"/>
          <table:table-cell table:style-name="ce4" table:number-columns-repeated="4"/>
          <table:table-cell/>
          <table:table-cell table:style-name="Default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 table:style-name="Default"/>
          <table:table-cell table:style-name="ce813" table:formula="of:=SUM([.D26];[.J26];[.P26];[.V26];[.AB26];[.AB31];[.V31];[.P31];[.J31];[.D31];[.D36];[.J36];[.P36];[.V36];[.AB36])" office:value-type="float" office:value="23.3" calcext:value-type="float">
            <text:p>23.3</text:p>
          </table:table-cell>
          <table:table-cell table:number-columns-repeated="5"/>
          <table:covered-table-cell table:number-columns-repeated="13"/>
          <table:covered-table-cell table:number-columns-repeated="3" table:style-name="ce184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Default" office:value-type="string" calcext:value-type="string">
            <text:p>+</text:p>
          </table:table-cell>
          <table:table-cell table:style-name="Default" table:number-columns-repeated="5"/>
          <table:table-cell table:style-name="Default" office:value-type="string" calcext:value-type="string">
            <text:p>+</text:p>
          </table:table-cell>
          <table:table-cell/>
          <table:table-cell table:style-name="Default" table:number-columns-repeated="4"/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/>
          <table:table-cell table:style-name="Default"/>
          <table:table-cell table:style-name="Default" office:value-type="string" calcext:value-type="string">
            <text:p>+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Default" office:value-type="string" calcext:value-type="string">
            <text:p>+</text:p>
          </table:table-cell>
          <table:table-cell table:number-columns-repeated="36"/>
          <table:table-cell table:style-name="Default"/>
          <table:table-cell table:number-columns-repeated="36"/>
        </table:table-row>
        <table:table-row table:style-name="ro1">
          <table:table-cell table:style-name="ce540"/>
          <table:table-cell table:style-name="ce543" table:formula="of:=[.$T$2]" office:value-type="float" office:value="14" calcext:value-type="float">
            <text:p>14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94"/>
          <table:table-cell office:value-type="float" office:value="9" calcext:value-type="float">
            <text:p>9</text:p>
          </table:table-cell>
          <table:table-cell table:style-name="ce543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3" calcext:value-type="float">
            <text:p>3</text:p>
          </table:table-cell>
          <table:table-cell table:style-name="ce60"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9" calcext:value-type="float">
            <text:p>9</text:p>
          </table:table-cell>
          <table:table-cell table:style-name="ce33" office:value-type="float" office:value="3" calcext:value-type="float">
            <text:p>3</text:p>
          </table:table-cell>
          <table:table-cell table:style-name="ce543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2]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94"/>
          <table:table-cell table:style-name="ce20" office:value-type="float" office:value="6" calcext:value-type="float">
            <text:p>6</text:p>
          </table:table-cell>
          <table:table-cell table:style-name="ce11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7" calcext:value-type="float">
            <text:p>7</text:p>
          </table:table-cell>
          <table:table-cell table:style-name="ce543" table:formula="of:=[.$X$2]" office:value-type="float" office:value="13" calcext:value-type="float">
            <text:p>13</text:p>
          </table:table-cell>
          <table:table-cell/>
          <table:table-cell table:style-name="ce163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63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63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63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63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63"/>
          <table:table-cell table:style-name="ce163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63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63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63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163" table:formula="of:=COM.MICROSOFT.CONCAT(&quot;&quot;&quot;&quot;;[.$F$2]; &quot;&quot;&quot;: &quot;; [.L8])" office:value-type="string" office:string-value="&quot;4&quot;: 6" calcext:value-type="string">
            <text:p>"4": 6</text:p>
          </table:table-cell>
          <table:table-cell table:style-name="ce163"/>
          <table:table-cell table:style-name="ce163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163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163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63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63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163"/>
          <table:table-cell table:style-name="ce163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63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63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63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163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163"/>
          <table:table-cell table:style-name="ce163" table:formula="of:=COM.MICROSOFT.CONCAT(&quot;&quot;&quot;&quot;;[.$B$2]; &quot;&quot;&quot;: &quot;; [.Z8])" office:value-type="string" office:string-value="&quot;0&quot;: 6" calcext:value-type="string">
            <text:p>"0": 6</text:p>
          </table:table-cell>
          <table:table-cell table:style-name="ce163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163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163" table:formula="of:=COM.MICROSOFT.CONCAT(&quot;&quot;&quot;&quot;;[.$E$2]; &quot;&quot;&quot;: &quot;; [.AC8])" office:value-type="string" office:string-value="&quot;3&quot;: 7" calcext:value-type="string">
            <text:p>"3": 7</text:p>
          </table:table-cell>
          <table:table-cell table:style-name="ce163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177" table:number-columns-repeated="2"/>
          <table:table-cell table:style-name="ce192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110" office:value-type="float" office:value="4" calcext:value-type="float">
            <text:p>4</text:p>
          </table:table-cell>
          <table:table-cell table:style-name="ce829" office:value-type="float" office:value="2" calcext:value-type="float">
            <text:p>2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1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74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829" office:value-type="float" office:value="6" calcext:value-type="float">
            <text:p>6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829" office:value-type="float" office:value="7" calcext:value-type="float">
            <text:p>7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20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88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163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63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63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63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63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63"/>
          <table:table-cell table:style-name="ce163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163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163" table:formula="of:=COM.MICROSOFT.CONCAT(&quot;&quot;&quot;&quot;;[.$D$3]; &quot;&quot;&quot;: &quot;; [.J9])" office:value-type="string" office:string-value="&quot;7&quot;: 4" calcext:value-type="string">
            <text:p>"7": 4</text:p>
          </table:table-cell>
          <table:table-cell table:style-name="ce163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163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63"/>
          <table:table-cell table:style-name="ce163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163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63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63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163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163"/>
          <table:table-cell table:style-name="ce163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63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163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163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163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163"/>
          <table:table-cell table:style-name="ce163" table:formula="of:=COM.MICROSOFT.CONCAT(&quot;&quot;&quot;&quot;;[.$B$3]; &quot;&quot;&quot;: &quot;; [.Z9])" office:value-type="string" office:string-value="&quot;5&quot;: 5" calcext:value-type="string">
            <text:p>"5": 5</text:p>
          </table:table-cell>
          <table:table-cell table:style-name="ce163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163" table:formula="of:=COM.MICROSOFT.CONCAT(&quot;&quot;&quot;&quot;;[.$D$3]; &quot;&quot;&quot;: &quot;; [.AB9])" office:value-type="string" office:string-value="&quot;7&quot;: 3" calcext:value-type="string">
            <text:p>"7": 3</text:p>
          </table:table-cell>
          <table:table-cell table:style-name="ce163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63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177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" calcext:value-type="string">
            <text:p>"1": { "0": 9, "1": 6, "2": 1, "3": 3, "4": 6, "5": 7, "6": 8, "7": 4, "8": 2, "9": 5, "10": 13, "11": 14, "12": 12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730" office:value-type="float" office:value="12" calcext:value-type="float">
            <text:p>12</text:p>
          </table:table-cell>
          <table:table-cell table:style-name="ce33" office:value-type="float" office:value="14" calcext:value-type="float">
            <text:p>14</text:p>
          </table:table-cell>
          <table:table-cell table:style-name="ce40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829" office:value-type="float" office:value="10" calcext:value-type="float">
            <text:p>10</text:p>
          </table:table-cell>
          <table:table-cell table:style-name="ce829" office:value-type="float" office:value="14" calcext:value-type="float">
            <text:p>14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106" office:value-type="float" office:value="11" calcext:value-type="float">
            <text:p>11</text:p>
          </table:table-cell>
          <table:table-cell table:style-name="ce110" office:value-type="float" office:value="10" calcext:value-type="float">
            <text:p>10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4" calcext:value-type="float">
            <text:p>14</text:p>
          </table:table-cell>
          <table:table-cell table:style-name="ce594"/>
          <table:table-cell table:style-name="ce20" office:value-type="float" office:value="12" calcext:value-type="float">
            <text:p>12</text:p>
          </table:table-cell>
          <table:table-cell table:style-name="ce742" office:value-type="float" office:value="11" calcext:value-type="float">
            <text:p>11</text:p>
          </table:table-cell>
          <table:table-cell table:style-name="ce110" office:value-type="float" office:value="10" calcext:value-type="float">
            <text:p>10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3" calcext:value-type="float">
            <text:p>13</text:p>
          </table:table-cell>
          <table:table-cell/>
          <table:table-cell table:style-name="ce163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63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163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163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63"/>
          <table:table-cell table:style-name="ce163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163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163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63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63"/>
          <table:table-cell table:style-name="ce163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163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163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163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163"/>
          <table:table-cell table:style-name="ce163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163" table:formula="of:=COM.MICROSOFT.CONCAT(&quot;&quot;&quot;&quot;;[.$C$4]; &quot;&quot;&quot;: &quot;; [.U10])" office:value-type="string" office:string-value="&quot;11&quot;: 11" calcext:value-type="string">
            <text:p>"11": 11</text:p>
          </table:table-cell>
          <table:table-cell table:style-name="ce163" table:formula="of:=COM.MICROSOFT.CONCAT(&quot;&quot;&quot;&quot;;[.$D$4]; &quot;&quot;&quot;: &quot;; [.V10])" office:value-type="string" office:string-value="&quot;12&quot;: 10" calcext:value-type="string">
            <text:p>"12": 10</text:p>
          </table:table-cell>
          <table:table-cell table:style-name="ce163" table:formula="of:=COM.MICROSOFT.CONCAT(&quot;&quot;&quot;&quot;;[.$E$4]; &quot;&quot;&quot;: &quot;; [.W10])" office:value-type="string" office:string-value="&quot;13&quot;: 12" calcext:value-type="string">
            <text:p>"13": 12</text:p>
          </table:table-cell>
          <table:table-cell table:style-name="ce163" table:formula="of:=COM.MICROSOFT.CONCAT(&quot;&quot;&quot;&quot;;[.$F$4]; &quot;&quot;&quot;: &quot;; [.X10])" office:value-type="string" office:string-value="&quot;14&quot;: 14" calcext:value-type="string">
            <text:p>"14": 14</text:p>
          </table:table-cell>
          <table:table-cell table:style-name="ce163"/>
          <table:table-cell table:style-name="ce163" table:formula="of:=COM.MICROSOFT.CONCAT(&quot;&quot;&quot;&quot;;[.$B$4]; &quot;&quot;&quot;: &quot;; [.Z10])" office:value-type="string" office:string-value="&quot;10&quot;: 12" calcext:value-type="string">
            <text:p>"10": 12</text:p>
          </table:table-cell>
          <table:table-cell table:style-name="ce163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63" table:formula="of:=COM.MICROSOFT.CONCAT(&quot;&quot;&quot;&quot;;[.$D$4]; &quot;&quot;&quot;: &quot;; [.AB10])" office:value-type="string" office:string-value="&quot;12&quot;: 10" calcext:value-type="string">
            <text:p>"12": 10</text:p>
          </table:table-cell>
          <table:table-cell table:style-name="ce163" table:formula="of:=COM.MICROSOFT.CONCAT(&quot;&quot;&quot;&quot;;[.$E$4]; &quot;&quot;&quot;: &quot;; [.AC10])" office:value-type="string" office:string-value="&quot;13&quot;: 14" calcext:value-type="string">
            <text:p>"13": 14</text:p>
          </table:table-cell>
          <table:table-cell table:style-name="ce163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style-name="ce177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ce731" table:number-columns-repeated="6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10"/>
          <table:table-cell table:style-name="ce700"/>
          <table:table-cell table:style-name="ce192" table:number-columns-repeated="27"/>
          <table:table-cell table:style-name="ce175" table:number-columns-repeated="2"/>
          <table:table-cell table:style-name="ce177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" calcext:value-type="string">
            <text:p>"3": { "0": 3, "1": 2, "2": 1, "3": 5, "4": 8, "5": 5, "6": 4, "7": 6, "8": 7, "9": 9, "10": 13, "11": 11, "12": 10, "13": 12, "14": 14}</text:p>
          </table:table-cell>
          <table:table-cell table:number-columns-repeated="36"/>
        </table:table-row>
        <table:table-row table:style-name="ro1">
          <table:table-cell table:style-name="ce541"/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40" office:value-type="float" office:value="4" calcext:value-type="float">
            <text:p>4</text:p>
          </table:table-cell>
          <table:table-cell table:style-name="ce60" office:value-type="float" office:value="6" calcext:value-type="float">
            <text:p>6</text:p>
          </table:table-cell>
          <table:table-cell table:style-name="ce62" office:value-type="float" office:value="13" calcext:value-type="float">
            <text:p>13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106" office:value-type="float" office:value="5" calcext:value-type="float">
            <text:p>5</text:p>
          </table:table-cell>
          <table:table-cell table:style-name="ce110" office:value-type="float" office:value="6" calcext:value-type="float">
            <text:p>6</text:p>
          </table:table-cell>
          <table:table-cell table:style-name="ce829" office:value-type="float" office:value="9" calcext:value-type="float">
            <text:p>9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20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0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44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2" calcext:value-type="float">
            <text:p>12</text:p>
          </table:table-cell>
          <table:table-cell/>
          <table:table-cell table:style-name="ce165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165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65" table:formula="of:=COM.MICROSOFT.CONCAT(&quot;&quot;&quot;&quot;;[.$E$2]; &quot;&quot;&quot;: &quot;; [.E12])" office:value-type="string" office:string-value="&quot;3&quot;: 6" calcext:value-type="string">
            <text:p>"3": 6</text:p>
          </table:table-cell>
          <table:table-cell table:style-name="ce165" table:formula="of:=COM.MICROSOFT.CONCAT(&quot;&quot;&quot;&quot;;[.$F$2]; &quot;&quot;&quot;: &quot;; [.F12])" office:value-type="string" office:string-value="&quot;4&quot;: 13" calcext:value-type="string">
            <text:p>"4": 13</text:p>
          </table:table-cell>
          <table:table-cell table:style-name="ce165"/>
          <table:table-cell table:style-name="ce165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165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65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65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65"/>
          <table:table-cell table:style-name="ce165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165" table:formula="of:=COM.MICROSOFT.CONCAT(&quot;&quot;&quot;&quot;;[.$D$2]; &quot;&quot;&quot;: &quot;; [.P12])" office:value-type="string" office:string-value="&quot;2&quot;: 6" calcext:value-type="string">
            <text:p>"2": 6</text:p>
          </table:table-cell>
          <table:table-cell table:style-name="ce165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165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65"/>
          <table:table-cell table:style-name="ce165" table:formula="of:=COM.MICROSOFT.CONCAT(&quot;&quot;&quot;&quot;;[.$B$2]; &quot;&quot;&quot;: &quot;; [.T12])" office:value-type="string" office:string-value="&quot;0&quot;: 12" calcext:value-type="string">
            <text:p>"0": 12</text:p>
          </table:table-cell>
          <table:table-cell table:style-name="ce165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65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65" table:formula="of:=COM.MICROSOFT.CONCAT(&quot;&quot;&quot;&quot;;[.$E$2]; &quot;&quot;&quot;: &quot;; [.W12])" office:value-type="string" office:string-value="&quot;3&quot;: 10" calcext:value-type="string">
            <text:p>"3": 10</text:p>
          </table:table-cell>
          <table:table-cell table:style-name="ce165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165"/>
          <table:table-cell table:style-name="ce165" table:formula="of:=COM.MICROSOFT.CONCAT(&quot;&quot;&quot;&quot;;[.$B$2]; &quot;&quot;&quot;: &quot;; [.Z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AA12])" office:value-type="string" office:string-value="&quot;1&quot;: 4" calcext:value-type="string">
            <text:p>"1": 4</text:p>
          </table:table-cell>
          <table:table-cell table:style-name="ce174" table:formula="of:=COM.MICROSOFT.CONCAT(&quot;&quot;&quot;&quot;;[.$D$2]; &quot;&quot;&quot;: &quot;; [.AB12])" office:value-type="string" office:string-value="&quot;2&quot;: 3" calcext:value-type="string">
            <text:p>"2": 3</text:p>
          </table:table-cell>
          <table:table-cell table:style-name="ce165" table:formula="of:=COM.MICROSOFT.CONCAT(&quot;&quot;&quot;&quot;;[.$E$2]; &quot;&quot;&quot;: &quot;; [.AC12])" office:value-type="string" office:string-value="&quot;3&quot;: 10" calcext:value-type="string">
            <text:p>"3": 10</text:p>
          </table:table-cell>
          <table:table-cell table:style-name="ce165" table:formula="of:=COM.MICROSOFT.CONCAT(&quot;&quot;&quot;&quot;;[.$F$2]; &quot;&quot;&quot;: &quot;; [.AD12])" office:value-type="string" office:string-value="&quot;4&quot;: 12" calcext:value-type="string">
            <text:p>"4": 12</text:p>
          </table:table-cell>
          <table:table-cell table:style-name="ce151" table:number-columns-repeated="2"/>
          <table:table-cell table:style-name="ce180" table:formula="of:=COM.MICROSOFT.CONCAT(&quot;&quot;&quot;4&quot;&quot;: { &quot;;COM.MICROSOFT.TEXTJOIN(&quot;, &quot;;TRUE();[.BD8:.BH10]);&quot;}&quot;)" office:value-type="string" office:string-value="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" calcext:value-type="string">
            <text:p>"4": { "0": 6, "1": 2, "2": 1, "3": 7, "4": 13, "5": 5, "6": 4, "7": 3, "8": 9, "9": 8, "10": 12, "11": 11, "12": 10, "13": 14, "14": 13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5" table:formula="of:=[.$T$3]" office:value-type="float" office:value="7" calcext:value-type="float">
            <text:p>7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2" office:value-type="float" office:value="8" calcext:value-type="float">
            <text:p>8</text:p>
          </table:table-cell>
          <table:table-cell table:style-name="ce594"/>
          <table:table-cell table:style-name="ce14" office:value-type="float" office:value="6" calcext:value-type="float">
            <text:p>6</text:p>
          </table:table-cell>
          <table:table-cell table:style-name="ce543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29" office:value-type="float" office:value="7" calcext:value-type="float">
            <text:p>7</text:p>
          </table:table-cell>
          <table:table-cell table:style-name="ce594"/>
          <table:table-cell table:style-name="ce2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543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3]" office:value-type="float" office:value="1" calcext:value-type="float">
            <text:p>1</text:p>
          </table:table-cell>
          <table:table-cell table:style-name="ce61" office:value-type="float" office:value="11" calcext:value-type="float">
            <text:p>11</text:p>
          </table:table-cell>
          <table:table-cell table:style-name="ce594"/>
          <table:table-cell table:style-name="ce19" office:value-type="float" office:value="5" calcext:value-type="float">
            <text:p>5</text:p>
          </table:table-cell>
          <table:table-cell table:style-name="ce11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6" calcext:value-type="float">
            <text:p>6</text:p>
          </table:table-cell>
          <table:table-cell table:style-name="ce15" table:formula="of:=[.$X$3]" office:value-type="float" office:value="8" calcext:value-type="float">
            <text:p>8</text:p>
          </table:table-cell>
          <table:table-cell/>
          <table:table-cell table:style-name="ce165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165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65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65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65" table:formula="of:=COM.MICROSOFT.CONCAT(&quot;&quot;&quot;&quot;;[.$F$3]; &quot;&quot;&quot;: &quot;; [.F13])" office:value-type="string" office:string-value="&quot;9&quot;: 8" calcext:value-type="string">
            <text:p>"9": 8</text:p>
          </table:table-cell>
          <table:table-cell table:style-name="ce165"/>
          <table:table-cell table:style-name="ce165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165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65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65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165"/>
          <table:table-cell table:style-name="ce165" table:formula="of:=COM.MICROSOFT.CONCAT(&quot;&quot;&quot;&quot;;[.$B$3]; &quot;&quot;&quot;: &quot;; [.N13])" office:value-type="string" office:string-value="&quot;5&quot;: 4" calcext:value-type="string">
            <text:p>"5": 4</text:p>
          </table:table-cell>
          <table:table-cell table:style-name="ce165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65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65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165"/>
          <table:table-cell table:style-name="ce165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65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65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65" table:formula="of:=COM.MICROSOFT.CONCAT(&quot;&quot;&quot;&quot;;[.$F$3]; &quot;&quot;&quot;: &quot;; [.X13])" office:value-type="string" office:string-value="&quot;9&quot;: 11" calcext:value-type="string">
            <text:p>"9": 11</text:p>
          </table:table-cell>
          <table:table-cell table:style-name="ce165"/>
          <table:table-cell table:style-name="ce165" table:formula="of:=COM.MICROSOFT.CONCAT(&quot;&quot;&quot;&quot;;[.$B$3]; &quot;&quot;&quot;: &quot;; [.Z13])" office:value-type="string" office:string-value="&quot;5&quot;: 5" calcext:value-type="string">
            <text:p>"5": 5</text:p>
          </table:table-cell>
          <table:table-cell table:style-name="ce165" table:formula="of:=COM.MICROSOFT.CONCAT(&quot;&quot;&quot;&quot;;[.$C$3]; &quot;&quot;&quot;: &quot;; [.AA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AB13])" office:value-type="string" office:string-value="&quot;7&quot;: 1" calcext:value-type="string">
            <text:p>"7": 1</text:p>
          </table:table-cell>
          <table:table-cell table:style-name="ce165" table:formula="of:=COM.MICROSOFT.CONCAT(&quot;&quot;&quot;&quot;;[.$E$3]; &quot;&quot;&quot;: &quot;; [.AC13])" office:value-type="string" office:string-value="&quot;8&quot;: 6" calcext:value-type="string">
            <text:p>"8": 6</text:p>
          </table:table-cell>
          <table:table-cell table:style-name="ce165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177" table:number-columns-repeated="2"/>
          <table:table-cell table:style-name="ce192"/>
          <table:table-cell table:number-columns-repeated="36"/>
        </table:table-row>
        <table:table-row table:style-name="ro1">
          <table:table-cell table:style-name="ce540"/>
          <table:table-cell table:style-name="ce14" office:value-type="float" office:value="12" calcext:value-type="float">
            <text:p>12</text:p>
          </table:table-cell>
          <table:table-cell table:style-name="ce42" office:value-type="float" office:value="10" calcext:value-type="float">
            <text:p>10</text:p>
          </table:table-cell>
          <table:table-cell table:style-name="ce110" office:value-type="float" office:value="7" calcext:value-type="float">
            <text:p>7</text:p>
          </table:table-cell>
          <table:table-cell table:style-name="ce61" office:value-type="float" office:value="5" calcext:value-type="float">
            <text:p>5</text:p>
          </table:table-cell>
          <table:table-cell table:style-name="ce59" office:value-type="float" office:value="11" calcext:value-type="float">
            <text:p>11</text:p>
          </table:table-cell>
          <table:table-cell table:style-name="ce594"/>
          <table:table-cell table:style-name="ce14" office:value-type="float" office:value="11" calcext:value-type="float">
            <text:p>11</text:p>
          </table:table-cell>
          <table:table-cell table:style-name="ce33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829" office:value-type="float" office:value="4" calcext:value-type="float">
            <text:p>4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106" office:value-type="float" office:value="7" calcext:value-type="float">
            <text:p>7</text:p>
          </table:table-cell>
          <table:table-cell table:style-name="ce88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97" office:value-type="float" office:value="8" calcext:value-type="float">
            <text:p>8</text:p>
          </table:table-cell>
          <table:table-cell table:style-name="ce106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829" office:value-type="float" office:value="9" calcext:value-type="float">
            <text:p>9</text:p>
          </table:table-cell>
          <table:table-cell table:style-name="ce61" office:value-type="float" office:value="13" calcext:value-type="float">
            <text:p>13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4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59" office:value-type="float" office:value="11" calcext:value-type="float">
            <text:p>11</text:p>
          </table:table-cell>
          <table:table-cell/>
          <table:table-cell table:style-name="ce165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165" table:formula="of:=COM.MICROSOFT.CONCAT(&quot;&quot;&quot;&quot;;[.$C$4]; &quot;&quot;&quot;: &quot;; [.C14])" office:value-type="string" office:string-value="&quot;11&quot;: 10" calcext:value-type="string">
            <text:p>"11": 10</text:p>
          </table:table-cell>
          <table:table-cell table:style-name="ce165" table:formula="of:=COM.MICROSOFT.CONCAT(&quot;&quot;&quot;&quot;;[.$D$4]; &quot;&quot;&quot;: &quot;; [.D14])" office:value-type="string" office:string-value="&quot;12&quot;: 7" calcext:value-type="string">
            <text:p>"12": 7</text:p>
          </table:table-cell>
          <table:table-cell table:style-name="ce165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165" table:formula="of:=COM.MICROSOFT.CONCAT(&quot;&quot;&quot;&quot;;[.$F$4]; &quot;&quot;&quot;: &quot;; [.F14])" office:value-type="string" office:string-value="&quot;14&quot;: 11" calcext:value-type="string">
            <text:p>"14": 11</text:p>
          </table:table-cell>
          <table:table-cell table:style-name="ce165"/>
          <table:table-cell table:style-name="ce165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165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165" table:formula="of:=COM.MICROSOFT.CONCAT(&quot;&quot;&quot;&quot;;[.$D$4]; &quot;&quot;&quot;: &quot;; [.J14])" office:value-type="string" office:string-value="&quot;12&quot;: 10" calcext:value-type="string">
            <text:p>"12": 10</text:p>
          </table:table-cell>
          <table:table-cell table:style-name="ce165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165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165"/>
          <table:table-cell table:style-name="ce165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65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165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165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65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65"/>
          <table:table-cell table:style-name="ce165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165" table:formula="of:=COM.MICROSOFT.CONCAT(&quot;&quot;&quot;&quot;;[.$C$4]; &quot;&quot;&quot;: &quot;; [.U14])" office:value-type="string" office:string-value="&quot;11&quot;: 6" calcext:value-type="string">
            <text:p>"11": 6</text:p>
          </table:table-cell>
          <table:table-cell table:style-name="ce165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165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165" table:formula="of:=COM.MICROSOFT.CONCAT(&quot;&quot;&quot;&quot;;[.$F$4]; &quot;&quot;&quot;: &quot;; [.X14])" office:value-type="string" office:string-value="&quot;14&quot;: 13" calcext:value-type="string">
            <text:p>"14": 13</text:p>
          </table:table-cell>
          <table:table-cell table:style-name="ce165"/>
          <table:table-cell table:style-name="ce165" table:formula="of:=COM.MICROSOFT.CONCAT(&quot;&quot;&quot;&quot;;[.$B$4]; &quot;&quot;&quot;: &quot;; [.Z14])" office:value-type="string" office:string-value="&quot;10&quot;: 13" calcext:value-type="string">
            <text:p>"10": 13</text:p>
          </table:table-cell>
          <table:table-cell table:style-name="ce165" table:formula="of:=COM.MICROSOFT.CONCAT(&quot;&quot;&quot;&quot;;[.$C$4]; &quot;&quot;&quot;: &quot;; [.AA14])" office:value-type="string" office:string-value="&quot;11&quot;: 7" calcext:value-type="string">
            <text:p>"11": 7</text:p>
          </table:table-cell>
          <table:table-cell table:style-name="ce165" table:formula="of:=COM.MICROSOFT.CONCAT(&quot;&quot;&quot;&quot;;[.$D$4]; &quot;&quot;&quot;: &quot;; [.AB14])" office:value-type="string" office:string-value="&quot;12&quot;: 8" calcext:value-type="string">
            <text:p>"12": 8</text:p>
          </table:table-cell>
          <table:table-cell table:style-name="ce165" table:formula="of:=COM.MICROSOFT.CONCAT(&quot;&quot;&quot;&quot;;[.$E$4]; &quot;&quot;&quot;: &quot;; [.AC14])" office:value-type="string" office:string-value="&quot;13&quot;: 9" calcext:value-type="string">
            <text:p>"13": 9</text:p>
          </table:table-cell>
          <table:table-cell table:style-name="ce165" table:formula="of:=COM.MICROSOFT.CONCAT(&quot;&quot;&quot;&quot;;[.$F$4]; &quot;&quot;&quot;: &quot;; [.AD14])" office:value-type="string" office:string-value="&quot;14&quot;: 11" calcext:value-type="string">
            <text:p>"14": 11</text:p>
          </table:table-cell>
          <table:table-cell table:style-name="ce177" table:number-columns-repeated="2"/>
          <table:table-cell table:style-name="ce192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" calcext:value-type="string">
            <text:p>"0": { "0": 14, "1": 1, "2": 2, "3": 3, "4": 5, "5": 9, "6": 8, "7": 7, "8": 4, "9": 6, "10": 12, "11": 14, "12": 13, "13": 10, "14": 11}, "1": { "0": 9, "1": 6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1, "12": 10, "13": 12, "14": 14}, "4": { "0": 6, "1": 2, "2": 1, "3": 7, "4": 13, "5": 5, "6": 4, "7": 3, "8": 9, "9": 8, "10": 12, "11": 11, "12": 10, "13": 14, "14": 13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ce731" table:number-columns-repeated="6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10"/>
          <table:table-cell/>
          <table:table-cell table:style-name="ce192" table:number-columns-repeated="29"/>
          <table:table-cell table:style-name="ce177" table:number-columns-repeated="2"/>
          <table:table-cell table:style-name="ce192"/>
          <table:table-cell table:number-columns-repeated="36"/>
        </table:table-row>
        <table:table-row table:style-name="ro1">
          <table:table-cell table:style-name="ce540"/>
          <table:table-cell table:style-name="ce20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40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88" office:value-type="float" office:value="7" calcext:value-type="float">
            <text:p>7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40" office:value-type="float" office:value="10" calcext:value-type="float">
            <text:p>10</text:p>
          </table:table-cell>
          <table:table-cell table:style-name="ce829" office:value-type="float" office:value="9" calcext:value-type="float">
            <text:p>9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829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52" office:value-type="float" office:value="7" calcext:value-type="float">
            <text:p>7</text:p>
          </table:table-cell>
          <table:table-cell table:style-name="ce62" office:value-type="float" office:value="12" calcext:value-type="float">
            <text:p>12</text:p>
          </table:table-cell>
          <table:table-cell table:style-name="ce829" office:value-type="float" office:value="11" calcext:value-type="float">
            <text:p>11</text:p>
          </table:table-cell>
          <table:table-cell table:style-name="ce540"/>
          <table:table-cell table:style-name="ce166" table:formula="of:=COM.MICROSOFT.CONCAT(&quot;&quot;&quot;&quot;;[.$B$2]; &quot;&quot;&quot;: &quot;; [.B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C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166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66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166"/>
          <table:table-cell table:style-name="ce166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J16])" office:value-type="string" office:string-value="&quot;2&quot;: 7" calcext:value-type="string">
            <text:p>"2": 7</text:p>
          </table:table-cell>
          <table:table-cell table:style-name="ce166" table:formula="of:=COM.MICROSOFT.CONCAT(&quot;&quot;&quot;&quot;;[.$E$2]; &quot;&quot;&quot;: &quot;; [.K16])" office:value-type="string" office:string-value="&quot;3&quot;: 8" calcext:value-type="string">
            <text:p>"3": 8</text:p>
          </table:table-cell>
          <table:table-cell table:style-name="ce166" table:formula="of:=COM.MICROSOFT.CONCAT(&quot;&quot;&quot;&quot;;[.$F$2]; &quot;&quot;&quot;: &quot;; [.L16])" office:value-type="string" office:string-value="&quot;4&quot;: 12" calcext:value-type="string">
            <text:p>"4": 12</text:p>
          </table:table-cell>
          <table:table-cell table:style-name="ce166"/>
          <table:table-cell table:style-name="ce166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166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166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66"/>
          <table:table-cell table:style-name="ce166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166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166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66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166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66"/>
          <table:table-cell table:style-name="ce166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AB16])" office:value-type="string" office:string-value="&quot;2&quot;: 7" calcext:value-type="string">
            <text:p>"2": 7</text:p>
          </table:table-cell>
          <table:table-cell table:style-name="ce166" table:formula="of:=COM.MICROSOFT.CONCAT(&quot;&quot;&quot;&quot;;[.$E$2]; &quot;&quot;&quot;: &quot;; [.AC16])" office:value-type="string" office:string-value="&quot;3&quot;: 12" calcext:value-type="string">
            <text:p>"3": 12</text:p>
          </table:table-cell>
          <table:table-cell table:style-name="ce166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177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" calcext:value-type="string">
            <text:p>"5": { "0": 14, "1": 9, "2": 4, "3": 6, "4": 13, "5": 7, "6": 1, "7": 2, "8": 3, "9": 8, "10": 12, "11": 10, "12": 7, "13": 5, "14": 11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0" office:value-type="float" office:value="9" calcext:value-type="float">
            <text:p>9</text:p>
          </table:table-cell>
          <table:table-cell table:style-name="ce44"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9" office:value-type="float" office:value="8" calcext:value-type="float">
            <text:p>8</text:p>
          </table:table-cell>
          <table:table-cell table:style-name="ce594"/>
          <table:table-cell table:style-name="ce97" office:value-type="float" office:value="9" calcext:value-type="float">
            <text:p>9</text:p>
          </table:table-cell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1" office:value-type="float" office:value="10" calcext:value-type="float">
            <text:p>10</text:p>
          </table:table-cell>
          <table:table-cell table:style-name="ce594"/>
          <table:table-cell table:style-name="ce97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0" office:value-type="float" office:value="7" calcext:value-type="float">
            <text:p>7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746" office:value-type="float" office:value="3" calcext:value-type="float">
            <text:p>3</text:p>
          </table:table-cell>
          <table:table-cell table:style-name="ce59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540"/>
          <table:table-cell table:style-name="ce166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66" table:formula="of:=COM.MICROSOFT.CONCAT(&quot;&quot;&quot;&quot;;[.$C$3]; &quot;&quot;&quot;: &quot;; [.C17])" office:value-type="string" office:string-value="&quot;6&quot;: 6" calcext:value-type="string">
            <text:p>"6": 6</text:p>
          </table:table-cell>
          <table:table-cell table:style-name="ce166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66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66" table:formula="of:=COM.MICROSOFT.CONCAT(&quot;&quot;&quot;&quot;;[.$F$3]; &quot;&quot;&quot;: &quot;; [.F17])" office:value-type="string" office:string-value="&quot;9&quot;: 8" calcext:value-type="string">
            <text:p>"9": 8</text:p>
          </table:table-cell>
          <table:table-cell table:style-name="ce166"/>
          <table:table-cell table:style-name="ce166" table:formula="of:=COM.MICROSOFT.CONCAT(&quot;&quot;&quot;&quot;;[.$B$3]; &quot;&quot;&quot;: &quot;; [.H17])" office:value-type="string" office:string-value="&quot;5&quot;: 9" calcext:value-type="string">
            <text:p>"5": 9</text:p>
          </table:table-cell>
          <table:table-cell table:style-name="ce166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166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66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66" table:formula="of:=COM.MICROSOFT.CONCAT(&quot;&quot;&quot;&quot;;[.$F$3]; &quot;&quot;&quot;: &quot;; [.L17])" office:value-type="string" office:string-value="&quot;9&quot;: 10" calcext:value-type="string">
            <text:p>"9": 10</text:p>
          </table:table-cell>
          <table:table-cell table:style-name="ce166"/>
          <table:table-cell table:style-name="ce166" table:formula="of:=COM.MICROSOFT.CONCAT(&quot;&quot;&quot;&quot;;[.$B$3]; &quot;&quot;&quot;: &quot;; [.N17])" office:value-type="string" office:string-value="&quot;5&quot;: 8" calcext:value-type="string">
            <text:p>"5": 8</text:p>
          </table:table-cell>
          <table:table-cell table:style-name="ce166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66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66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66" table:formula="of:=COM.MICROSOFT.CONCAT(&quot;&quot;&quot;&quot;;[.$F$3]; &quot;&quot;&quot;: &quot;; [.R17])" office:value-type="string" office:string-value="&quot;9&quot;: 7" calcext:value-type="string">
            <text:p>"9": 7</text:p>
          </table:table-cell>
          <table:table-cell table:style-name="ce166"/>
          <table:table-cell table:style-name="ce166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166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66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66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66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166"/>
          <table:table-cell table:style-name="ce166" table:formula="of:=COM.MICROSOFT.CONCAT(&quot;&quot;&quot;&quot;;[.$B$3]; &quot;&quot;&quot;: &quot;; [.Z17])" office:value-type="string" office:string-value="&quot;5&quot;: 6" calcext:value-type="string">
            <text:p>"5": 6</text:p>
          </table:table-cell>
          <table:table-cell table:style-name="ce166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166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66" table:formula="of:=COM.MICROSOFT.CONCAT(&quot;&quot;&quot;&quot;;[.$E$3]; &quot;&quot;&quot;: &quot;; [.AC17])" office:value-type="string" office:string-value="&quot;8&quot;: 9" calcext:value-type="string">
            <text:p>"8": 9</text:p>
          </table:table-cell>
          <table:table-cell table:style-name="ce166" table:formula="of:=COM.MICROSOFT.CONCAT(&quot;&quot;&quot;&quot;;[.$F$3]; &quot;&quot;&quot;: &quot;; [.AD17])" office:value-type="string" office:string-value="&quot;9&quot;: 10" calcext:value-type="string">
            <text:p>"9": 10</text:p>
          </table:table-cell>
          <table:table-cell table:style-name="ce177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" calcext:value-type="string">
            <text:p>"6": { "0": 14, "1": 8, "2": 3, "3": 5, "4": 13, "5": 6, "6": 2, "7": 1, "8": 2, "9": 7, "10": 11, "11": 9, "12": 10, "13": 4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5" table:formula="of:=[.$T$4]" office:value-type="float" office:value="11" calcext:value-type="float">
            <text:p>11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94"/>
          <table:table-cell table:style-name="ce20" office:value-type="float" office:value="6" calcext:value-type="float">
            <text:p>6</text:p>
          </table:table-cell>
          <table:table-cell table:style-name="ce543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1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43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11" calcext:value-type="float">
            <text:p>11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4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table:style-name="ce44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9" office:value-type="float" office:value="8" calcext:value-type="float">
            <text:p>8</text:p>
          </table:table-cell>
          <table:table-cell table:style-name="ce15" table:formula="of:=[.$X$4]" office:value-type="float" office:value="12" calcext:value-type="float">
            <text:p>12</text:p>
          </table:table-cell>
          <table:table-cell table:style-name="ce540"/>
          <table:table-cell table:style-name="ce166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166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66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66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66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66"/>
          <table:table-cell table:style-name="ce166" table:formula="of:=COM.MICROSOFT.CONCAT(&quot;&quot;&quot;&quot;;[.$B$4]; &quot;&quot;&quot;: &quot;; [.H18])" office:value-type="string" office:string-value="&quot;10&quot;: 6" calcext:value-type="string">
            <text:p>"10": 6</text:p>
          </table:table-cell>
          <table:table-cell table:style-name="ce166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66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66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66" table:formula="of:=COM.MICROSOFT.CONCAT(&quot;&quot;&quot;&quot;;[.$F$4]; &quot;&quot;&quot;: &quot;; [.L18])" office:value-type="string" office:string-value="&quot;14&quot;: 11" calcext:value-type="string">
            <text:p>"14": 11</text:p>
          </table:table-cell>
          <table:table-cell table:style-name="ce166"/>
          <table:table-cell table:style-name="ce166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66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66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66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66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166"/>
          <table:table-cell table:style-name="ce166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66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66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66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66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66"/>
          <table:table-cell table:style-name="ce166" table:formula="of:=COM.MICROSOFT.CONCAT(&quot;&quot;&quot;&quot;;[.$B$4]; &quot;&quot;&quot;: &quot;; [.Z18])" office:value-type="string" office:string-value="&quot;10&quot;: 5" calcext:value-type="string">
            <text:p>"10": 5</text:p>
          </table:table-cell>
          <table:table-cell table:style-name="ce166" table:formula="of:=COM.MICROSOFT.CONCAT(&quot;&quot;&quot;&quot;;[.$C$4]; &quot;&quot;&quot;: &quot;; [.AA18])" office:value-type="string" office:string-value="&quot;11&quot;: 2" calcext:value-type="string">
            <text:p>"11": 2</text:p>
          </table:table-cell>
          <table:table-cell table:style-name="ce166" table:formula="of:=COM.MICROSOFT.CONCAT(&quot;&quot;&quot;&quot;;[.$D$4]; &quot;&quot;&quot;: &quot;; [.AB18])" office:value-type="string" office:string-value="&quot;12&quot;: 1" calcext:value-type="string">
            <text:p>"12": 1</text:p>
          </table:table-cell>
          <table:table-cell table:style-name="ce166" table:formula="of:=COM.MICROSOFT.CONCAT(&quot;&quot;&quot;&quot;;[.$E$4]; &quot;&quot;&quot;: &quot;; [.AC18])" office:value-type="string" office:string-value="&quot;13&quot;: 8" calcext:value-type="string">
            <text:p>"13": 8</text:p>
          </table:table-cell>
          <table:table-cell table:style-name="ce166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177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" calcext:value-type="string">
            <text:p>"7": { "0": 14, "1": 5, "2": 6, "3": 9, "4": 13, "5": 4, "6": 2, "7": 0, "8": 1, "9": 10, "10": 11, "11": 7, "12": 8, "13": 3, "14": 12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90" office:value-type="string" calcext:value-type="string">
            <text:p><text:s text:c="43"/>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ce192" table:number-columns-repeated="29"/>
          <table:table-cell table:style-name="ce177" table:number-columns-repeated="2"/>
          <table:table-cell table:formula="of:=COM.MICROSOFT.CONCAT(&quot;&quot;&quot;8&quot;&quot;: { &quot;;COM.MICROSOFT.TEXTJOIN(&quot;, &quot;;TRUE();[.AX12:.BB14]);&quot;}&quot;)" office:value-type="string" office:string-value="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" calcext:value-type="string">
            <text:p>"8": { "0": 12, "1": 5, "2": 3, "3": 10, "4": 14, "5": 4, "6": 2, "7": 1, "8": 1, "9": 11, "10": 8, "11": 6, "12": 7, "13": 9, "14": 13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ce17" office:value-type="string" calcext:value-type="string" table:number-columns-spanned="29" table:number-rows-spanned="3">
            <text:p>opopouopougpgu</text:p>
          </table:table-cell>
          <table:covered-table-cell table:number-columns-repeated="28" table:style-name="ce18"/>
          <table:table-cell table:style-name="ce189"/>
          <table:table-cell table:style-name="ce195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4, &quot;2&quot;: 3, &quot;3&quot;: 10, &quot;4&quot;: 12, &quot;5&quot;: 5, &quot;6&quot;: 2, &quot;7&quot;: 1, &quot;8&quot;: 6, &quot;9&quot;: 8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7, &quot;3&quot;: 12, &quot;4&quot;: 11, &quot;5&quot;: 6, &quot;6&quot;: 4, &quot;7&quot;: 3, &quot;8&quot;: 9, &quot;9&quot;: 10, &quot;10&quot;: 5, &quot;11&quot;: 2, &quot;12&quot;: 1, &quot;13&quot;: 8, &quot;14&quot;: 12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1, "12": 10, "13": 12, "14": 14}, "4": { "0": 6, "1": 2, "2": 1, "3": 7, "4": 13, "5": 5, "6": 4, "7": 3, "8": 9, "9": 8, "10": 12, "11": 11, "12": 10, "13": 14, "14": 13}, 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4, "2": 3, "3": 10, "4": 12, "5": 5, "6": 2, "7": 1, "8": 6, "9": 8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7, "3": 12, "4": 11, "5": 6, "6": 4, "7": 3, "8": 9, "9": 10, "10": 5, "11": 2, "12": 1, "13": 8, "14": 12}}</text:p>
          </table:table-cell>
          <table:covered-table-cell table:number-columns-repeated="28" table:style-name="ce196"/>
          <table:table-cell table:style-name="ce177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4, &quot;1&quot;: 4, &quot;2&quot;: 3, &quot;3&quot;: 10, &quot;4&quot;: 12, &quot;5&quot;: 5, &quot;6&quot;: 2, &quot;7&quot;: 1, &quot;8&quot;: 6, &quot;9&quot;: 8, &quot;10&quot;: 13, &quot;11&quot;: 7, &quot;12&quot;: 8, &quot;13&quot;: 9, &quot;14&quot;: 11}" calcext:value-type="string">
            <text:p>"9": { "0": 14, "1": 4, "2": 3, "3": 10, "4": 12, "5": 5, "6": 2, "7": 1, "8": 6, "9": 8, "10": 13, "11": 7, "12": 8, "13": 9, "14": 11}</text:p>
          </table:table-cell>
          <table:table-cell table:number-columns-repeated="36"/>
        </table:table-row>
        <table:table-row table:style-name="ro2">
          <table:table-cell table:style-name="ce540"/>
          <table:covered-table-cell table:number-columns-repeated="29" table:style-name="ce18"/>
          <table:table-cell table:style-name="ce189"/>
          <table:covered-table-cell table:number-columns-repeated="29" table:style-name="ce196"/>
          <table:table-cell table:style-name="ce177" table:number-columns-repeated="2"/>
          <table:table-cell table:style-name="ce192"/>
          <table:table-cell table:number-columns-repeated="36"/>
        </table:table-row>
        <table:table-row table:style-name="ro2">
          <table:table-cell table:style-name="ce540"/>
          <table:covered-table-cell table:number-columns-repeated="29" table:style-name="ce18"/>
          <table:table-cell table:style-name="ce189"/>
          <table:covered-table-cell table:number-columns-repeated="29" table:style-name="ce196"/>
          <table:table-cell table:style-name="ce177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4, &quot;2&quot;: 3, &quot;3&quot;: 10, &quot;4&quot;: 12, &quot;5&quot;: 5, &quot;6&quot;: 2, &quot;7&quot;: 1, &quot;8&quot;: 6, &quot;9&quot;: 8, &quot;10&quot;: 13, &quot;11&quot;: 7, &quot;12&quot;: 8, &quot;13&quot;: 9, &quot;14&quot;: 11}" calcext:value-type="string">
            <text:p>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4, "2": 3, "3": 10, "4": 12, "5": 5, "6": 2, "7": 1, "8": 6, "9": 8, "10": 13, "11": 7, "12": 8, "13": 9, "14": 11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5"/>
          <table:covered-table-cell table:number-columns-repeated="29" table:style-name="ce192"/>
          <table:table-cell table:style-name="ce177" table:number-columns-repeated="2"/>
          <table:table-cell table:style-name="ce192"/>
          <table:table-cell table:number-columns-repeated="36"/>
        </table:table-row>
        <table:table-row table:style-name="ro2">
          <table:table-cell/>
          <table:table-cell table:style-name="ce548" table:formula="of:=SUM([.B25:.F27])-[.B25]" office:value-type="float" office:value="37.7" calcext:value-type="float" table:number-columns-spanned="2" table:number-rows-spanned="1">
            <text:p>37.7</text:p>
          </table:table-cell>
          <table:covered-table-cell table:style-name="ce39"/>
          <table:table-cell table:style-name="ce39" table:number-columns-repeated="4"/>
          <table:table-cell table:style-name="ce605" table:formula="of:=SUM([.H25:.L27])-[.I25]" office:value-type="float" office:value="37.7" calcext:value-type="float" table:number-columns-spanned="2" table:number-rows-spanned="1">
            <text:p>37.7</text:p>
          </table:table-cell>
          <table:covered-table-cell table:style-name="ce39"/>
          <table:table-cell table:style-name="ce39" table:number-columns-repeated="4"/>
          <table:table-cell table:style-name="ce548" table:formula="of:=SUM([.N25:.R27])-[.P25]" office:value-type="float" office:value="37.7" calcext:value-type="float" table:number-columns-spanned="2" table:number-rows-spanned="1">
            <text:p>37.7</text:p>
          </table:table-cell>
          <table:covered-table-cell table:style-name="ce39"/>
          <table:table-cell table:style-name="ce39" table:number-columns-repeated="4"/>
          <table:table-cell table:style-name="ce605" table:formula="of:=SUM([.T25:.X27])-[.W25]" office:value-type="float" office:value="37.7" calcext:value-type="float" table:number-columns-spanned="2" table:number-rows-spanned="1">
            <text:p>37.7</text:p>
          </table:table-cell>
          <table:covered-table-cell table:style-name="ce39"/>
          <table:table-cell table:style-name="ce39" table:number-columns-repeated="4"/>
          <table:table-cell table:style-name="ce548" table:formula="of:=SUM([.Z25:.AD27])-[.AD25]" office:value-type="float" office:value="37.7" calcext:value-type="float" table:number-columns-spanned="2" table:number-rows-spanned="1">
            <text:p>37.7</text:p>
          </table:table-cell>
          <table:covered-table-cell table:style-name="ce39"/>
          <table:table-cell table:style-name="ce39" table:number-columns-repeated="3"/>
          <table:table-cell table:style-name="ce540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" calcext:value-type="string">
            <text:p>"10": { "0": 14, "1": 13, "2": 10, "3": 11, "4": 12, "5": 9, "6": 6, "7": 4, "8": 5, "9": 8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734" table:formula="of:=HLOOKUP([.B8];[.$AF$25:.$AW$26];2;0)" office:value-type="float" office:value="4.4" calcext:value-type="float">
            <text:p>4.4</text:p>
          </table:table-cell>
          <table:table-cell table:style-name="ce618" table:formula="of:=HLOOKUP([.C8];[.$AF$25:.$AW$26];2;0)" office:value-type="float" office:value="1.1" calcext:value-type="float">
            <text:p>1.1</text:p>
          </table:table-cell>
          <table:table-cell table:style-name="ce624" table:formula="of:=HLOOKUP([.D8];[.$AF$25:.$AW$26];2;0)" office:value-type="float" office:value="1.2" calcext:value-type="float">
            <text:p>1.2</text:p>
          </table:table-cell>
          <table:table-cell table:style-name="ce627" table:formula="of:=HLOOKUP([.E8];[.$AF$25:.$AW$26];2;0)" office:value-type="float" office:value="1.3" calcext:value-type="float">
            <text:p>1.3</text:p>
          </table:table-cell>
          <table:table-cell table:style-name="ce627" table:formula="of:=HLOOKUP([.F8];[.$AF$25:.$AW$26];2;0)" office:value-type="float" office:value="2.1" calcext:value-type="float">
            <text:p>2.1</text:p>
          </table:table-cell>
          <table:table-cell/>
          <table:table-cell table:style-name="ce635" table:formula="of:=HLOOKUP([.H8];[.$AF$25:.$AW$26];2;0)" office:value-type="float" office:value="3.1" calcext:value-type="float">
            <text:p>3.1</text:p>
          </table:table-cell>
          <table:table-cell table:style-name="ce760" table:formula="of:=HLOOKUP([.I8];[.$AF$25:.$AW$26];2;0)" office:value-type="float" office:value="2.2" calcext:value-type="float">
            <text:p>2.2</text:p>
          </table:table-cell>
          <table:table-cell table:style-name="ce647" table:formula="of:=HLOOKUP([.J8];[.$AF$25:.$AW$26];2;0)" office:value-type="float" office:value="1.1" calcext:value-type="float">
            <text:p>1.1</text:p>
          </table:table-cell>
          <table:table-cell table:style-name="ce651" table:formula="of:=HLOOKUP([.K8];[.$AF$25:.$AW$26];2;0)" office:value-type="float" office:value="1.3" calcext:value-type="float">
            <text:p>1.3</text:p>
          </table:table-cell>
          <table:table-cell table:style-name="ce651" table:formula="of:=HLOOKUP([.L8];[.$AF$25:.$AW$26];2;0)" office:value-type="float" office:value="2.2" calcext:value-type="float">
            <text:p>2.2</text:p>
          </table:table-cell>
          <table:table-cell/>
          <table:table-cell table:style-name="ce660" table:formula="of:=HLOOKUP([.N8];[.$AF$25:.$AW$26];2;0)" office:value-type="float" office:value="3.1" calcext:value-type="float">
            <text:p>3.1</text:p>
          </table:table-cell>
          <table:table-cell table:style-name="ce667" table:formula="of:=HLOOKUP([.O8];[.$AF$25:.$AW$26];2;0)" office:value-type="float" office:value="1.3" calcext:value-type="float">
            <text:p>1.3</text:p>
          </table:table-cell>
          <table:table-cell table:style-name="ce781" table:formula="of:=HLOOKUP([.P8];[.$AF$25:.$AW$26];2;0)" office:value-type="float" office:value="1.3" calcext:value-type="float">
            <text:p>1.3</text:p>
          </table:table-cell>
          <table:table-cell table:style-name="ce679" table:formula="of:=HLOOKUP([.Q8];[.$AF$25:.$AW$26];2;0)" office:value-type="float" office:value="1.1" calcext:value-type="float">
            <text:p>1.1</text:p>
          </table:table-cell>
          <table:table-cell table:style-name="ce679" table:formula="of:=HLOOKUP([.R8];[.$AF$25:.$AW$26];2;0)" office:value-type="float" office:value="3" calcext:value-type="float">
            <text:p>3.0</text:p>
          </table:table-cell>
          <table:table-cell/>
          <table:table-cell table:style-name="ce687" table:formula="of:=HLOOKUP([.T8];[.$AF$25:.$AW$26];2;0)" office:value-type="float" office:value="1.3" calcext:value-type="float">
            <text:p>1.3</text:p>
          </table:table-cell>
          <table:table-cell table:style-name="ce695" table:formula="of:=HLOOKUP([.U8];[.$AF$25:.$AW$26];2;0)" office:value-type="float" office:value="1.2" calcext:value-type="float">
            <text:p>1.2</text:p>
          </table:table-cell>
          <table:table-cell table:style-name="ce699" table:formula="of:=HLOOKUP([.V8];[.$AF$25:.$AW$26];2;0)" office:value-type="float" office:value="1.1" calcext:value-type="float">
            <text:p>1.1</text:p>
          </table:table-cell>
          <table:table-cell table:style-name="ce707" table:formula="of:=HLOOKUP([.W8];[.$AF$25:.$AW$26];2;0)" office:value-type="float" office:value="2.1" calcext:value-type="float">
            <text:p>2.1</text:p>
          </table:table-cell>
          <table:table-cell table:style-name="ce704" table:formula="of:=HLOOKUP([.X8];[.$AF$25:.$AW$26];2;0)" office:value-type="float" office:value="3" calcext:value-type="float">
            <text:p>3.0</text:p>
          </table:table-cell>
          <table:table-cell/>
          <table:table-cell table:style-name="ce814" table:formula="of:=HLOOKUP([.Z8];[.$AF$25:.$AW$26];2;0)" office:value-type="float" office:value="2.2" calcext:value-type="float">
            <text:p>2.2</text:p>
          </table:table-cell>
          <table:table-cell table:style-name="ce820" table:formula="of:=HLOOKUP([.AA8];[.$AF$25:.$AW$26];2;0)" office:value-type="float" office:value="1.2" calcext:value-type="float">
            <text:p>1.2</text:p>
          </table:table-cell>
          <table:table-cell table:style-name="ce823" table:formula="of:=HLOOKUP([.AB8];[.$AF$25:.$AW$26];2;0)" office:value-type="float" office:value="1.1" calcext:value-type="float">
            <text:p>1.1</text:p>
          </table:table-cell>
          <table:table-cell table:style-name="ce826" table:formula="of:=HLOOKUP([.AC8];[.$AF$25:.$AW$26];2;0)" office:value-type="float" office:value="2.3" calcext:value-type="float">
            <text:p>2.3</text:p>
          </table:table-cell>
          <table:table-cell table:style-name="ce830" table:formula="of:=HLOOKUP([.AD8];[.$AF$25:.$AW$26];2;0)" office:value-type="float" office:value="4.2" calcext:value-type="float">
            <text:p>4.2</text:p>
          </table:table-cell>
          <table:table-cell table:style-name="ce540"/>
          <table:table-cell table:style-name="ce836" office:value-type="float" office:value="0" calcext:value-type="float">
            <text:p>0</text:p>
          </table:table-cell>
          <table:table-cell table:style-name="ce836" office:value-type="float" office:value="1" calcext:value-type="float">
            <text:p>1</text:p>
          </table:table-cell>
          <table:table-cell table:style-name="ce836" office:value-type="float" office:value="2" calcext:value-type="float">
            <text:p>2</text:p>
          </table:table-cell>
          <table:table-cell table:style-name="ce836" office:value-type="float" office:value="3" calcext:value-type="float">
            <text:p>3</text:p>
          </table:table-cell>
          <table:table-cell table:style-name="ce838" office:value-type="float" office:value="4" calcext:value-type="float">
            <text:p>4</text:p>
          </table:table-cell>
          <table:table-cell table:style-name="ce838" office:value-type="float" office:value="5" calcext:value-type="float">
            <text:p>5</text:p>
          </table:table-cell>
          <table:table-cell table:style-name="ce838" office:value-type="float" office:value="6" calcext:value-type="float">
            <text:p>6</text:p>
          </table:table-cell>
          <table:table-cell table:style-name="ce838" office:value-type="float" office:value="7" calcext:value-type="float">
            <text:p>7</text:p>
          </table:table-cell>
          <table:table-cell table:style-name="ce838" office:value-type="float" office:value="8" calcext:value-type="float">
            <text:p>8</text:p>
          </table:table-cell>
          <table:table-cell table:style-name="ce839" office:value-type="float" office:value="9" calcext:value-type="float">
            <text:p>9</text:p>
          </table:table-cell>
          <table:table-cell table:style-name="ce202" office:value-type="float" office:value="10" calcext:value-type="float">
            <text:p>10</text:p>
          </table:table-cell>
          <table:table-cell table:style-name="ce840" office:value-type="float" office:value="11" calcext:value-type="float">
            <text:p>11</text:p>
          </table:table-cell>
          <table:table-cell table:style-name="ce840" office:value-type="float" office:value="12" calcext:value-type="float">
            <text:p>12</text:p>
          </table:table-cell>
          <table:table-cell table:style-name="ce840" office:value-type="float" office:value="13" calcext:value-type="float">
            <text:p>13</text:p>
          </table:table-cell>
          <table:table-cell table:style-name="ce840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" calcext:value-type="string">
            <text:p>"11": { "0": 14, "1": 13, "2": 7, "3": 8, "4": 12, "5": 9, "6": 5, "7": 3, "8": 4, "9": 10, "10": 6, "11": 10, "12": 1, "13": 2, "14": 11}</text:p>
          </table:table-cell>
          <table:table-cell table:number-columns-repeated="36"/>
        </table:table-row>
        <table:table-row table:style-name="ro1">
          <table:table-cell/>
          <table:table-cell table:style-name="ce611" table:formula="of:=HLOOKUP([.B9];[.$AF$25:.$AW$26];2;0)" office:value-type="float" office:value="3.1" calcext:value-type="float">
            <text:p>3.1</text:p>
          </table:table-cell>
          <table:table-cell table:style-name="ce618" table:formula="of:=HLOOKUP([.C9];[.$AF$25:.$AW$26];2;0)" office:value-type="float" office:value="3" calcext:value-type="float">
            <text:p>3.0</text:p>
          </table:table-cell>
          <table:table-cell table:style-name="ce624" table:formula="of:=HLOOKUP([.D9];[.$AF$25:.$AW$26];2;0)" office:value-type="float" office:value="2.3" calcext:value-type="float">
            <text:p>2.3</text:p>
          </table:table-cell>
          <table:table-cell table:style-name="ce627" table:formula="of:=HLOOKUP([.E9];[.$AF$25:.$AW$26];2;0)" office:value-type="float" office:value="2" calcext:value-type="float">
            <text:p>2.0</text:p>
          </table:table-cell>
          <table:table-cell table:style-name="ce627" table:formula="of:=HLOOKUP([.F9];[.$AF$25:.$AW$26];2;0)" office:value-type="float" office:value="2.2" calcext:value-type="float">
            <text:p>2.2</text:p>
          </table:table-cell>
          <table:table-cell/>
          <table:table-cell table:style-name="ce636" table:formula="of:=HLOOKUP([.H9];[.$AF$25:.$AW$26];2;0)" office:value-type="float" office:value="2.3" calcext:value-type="float">
            <text:p>2.3</text:p>
          </table:table-cell>
          <table:table-cell table:style-name="ce640" table:formula="of:=HLOOKUP([.I9];[.$AF$25:.$AW$26];2;0)" office:value-type="float" office:value="3" calcext:value-type="float">
            <text:p>3.0</text:p>
          </table:table-cell>
          <table:table-cell table:style-name="ce647" table:formula="of:=HLOOKUP([.J9];[.$AF$25:.$AW$26];2;0)" office:value-type="float" office:value="2" calcext:value-type="float">
            <text:p>2.0</text:p>
          </table:table-cell>
          <table:table-cell table:style-name="ce651" table:formula="of:=HLOOKUP([.K9];[.$AF$25:.$AW$26];2;0)" office:value-type="float" office:value="1.2" calcext:value-type="float">
            <text:p>1.2</text:p>
          </table:table-cell>
          <table:table-cell table:style-name="ce651" table:formula="of:=HLOOKUP([.L9];[.$AF$25:.$AW$26];2;0)" office:value-type="float" office:value="2.1" calcext:value-type="float">
            <text:p>2.1</text:p>
          </table:table-cell>
          <table:table-cell/>
          <table:table-cell table:style-name="ce661" table:formula="of:=HLOOKUP([.N9];[.$AF$25:.$AW$26];2;0)" office:value-type="float" office:value="2.3" calcext:value-type="float">
            <text:p>2.3</text:p>
          </table:table-cell>
          <table:table-cell table:style-name="ce667" table:formula="of:=HLOOKUP([.O9];[.$AF$25:.$AW$26];2;0)" office:value-type="float" office:value="2" calcext:value-type="float">
            <text:p>2.0</text:p>
          </table:table-cell>
          <table:table-cell table:style-name="ce672" table:formula="of:=HLOOKUP([.P9];[.$AF$25:.$AW$26];2;0)" office:value-type="float" office:value="2.1" calcext:value-type="float">
            <text:p>2.1</text:p>
          </table:table-cell>
          <table:table-cell table:style-name="ce679" table:formula="of:=HLOOKUP([.Q9];[.$AF$25:.$AW$26];2;0)" office:value-type="float" office:value="1.2" calcext:value-type="float">
            <text:p>1.2</text:p>
          </table:table-cell>
          <table:table-cell table:style-name="ce679" table:formula="of:=HLOOKUP([.R9];[.$AF$25:.$AW$26];2;0)" office:value-type="float" office:value="2.2" calcext:value-type="float">
            <text:p>2.2</text:p>
          </table:table-cell>
          <table:table-cell/>
          <table:table-cell table:style-name="ce688" table:formula="of:=HLOOKUP([.T9];[.$AF$25:.$AW$26];2;0)" office:value-type="float" office:value="2.1" calcext:value-type="float">
            <text:p>2.1</text:p>
          </table:table-cell>
          <table:table-cell table:style-name="ce695" table:formula="of:=HLOOKUP([.U9];[.$AF$25:.$AW$26];2;0)" office:value-type="float" office:value="2" calcext:value-type="float">
            <text:p>2.0</text:p>
          </table:table-cell>
          <table:table-cell table:style-name="ce699" table:formula="of:=HLOOKUP([.V9];[.$AF$25:.$AW$26];2;0)" office:value-type="float" office:value="2.2" calcext:value-type="float">
            <text:p>2.2</text:p>
          </table:table-cell>
          <table:table-cell table:style-name="ce704" table:formula="of:=HLOOKUP([.W9];[.$AF$25:.$AW$26];2;0)" office:value-type="float" office:value="2.3" calcext:value-type="float">
            <text:p>2.3</text:p>
          </table:table-cell>
          <table:table-cell table:style-name="ce704" table:formula="of:=HLOOKUP([.X9];[.$AF$25:.$AW$26];2;0)" office:value-type="float" office:value="3.1" calcext:value-type="float">
            <text:p>3.1</text:p>
          </table:table-cell>
          <table:table-cell/>
          <table:table-cell table:style-name="ce815" table:formula="of:=HLOOKUP([.Z9];[.$AF$25:.$AW$26];2;0)" office:value-type="float" office:value="2.1" calcext:value-type="float">
            <text:p>2.1</text:p>
          </table:table-cell>
          <table:table-cell table:style-name="ce820" table:formula="of:=HLOOKUP([.AA9];[.$AF$25:.$AW$26];2;0)" office:value-type="float" office:value="2" calcext:value-type="float">
            <text:p>2.0</text:p>
          </table:table-cell>
          <table:table-cell table:style-name="ce823" table:formula="of:=HLOOKUP([.AB9];[.$AF$25:.$AW$26];2;0)" office:value-type="float" office:value="1.3" calcext:value-type="float">
            <text:p>1.3</text:p>
          </table:table-cell>
          <table:table-cell table:style-name="ce826" table:formula="of:=HLOOKUP([.AC9];[.$AF$25:.$AW$26];2;0)" office:value-type="float" office:value="3.1" calcext:value-type="float">
            <text:p>3.1</text:p>
          </table:table-cell>
          <table:table-cell table:style-name="ce826" table:formula="of:=HLOOKUP([.AD9];[.$AF$25:.$AW$26];2;0)" office:value-type="float" office:value="3" calcext:value-type="float">
            <text:p>3.0</text:p>
          </table:table-cell>
          <table:table-cell table:style-name="ce540"/>
          <table:table-cell table:style-name="ce198" office:value-type="float" office:value="1" calcext:value-type="float">
            <text:p>1.0</text:p>
          </table:table-cell>
          <table:table-cell table:style-name="ce198" office:value-type="float" office:value="1.1" calcext:value-type="float">
            <text:p>1.1</text:p>
          </table:table-cell>
          <table:table-cell table:style-name="ce198" office:value-type="float" office:value="1.2" calcext:value-type="float">
            <text:p>1.2</text:p>
          </table:table-cell>
          <table:table-cell table:style-name="ce198" office:value-type="float" office:value="1.3" calcext:value-type="float">
            <text:p>1.3</text:p>
          </table:table-cell>
          <table:table-cell table:style-name="ce200" office:value-type="float" office:value="2" calcext:value-type="float">
            <text:p>2.0</text:p>
          </table:table-cell>
          <table:table-cell table:style-name="ce200" office:value-type="float" office:value="2.1" calcext:value-type="float">
            <text:p>2.1</text:p>
          </table:table-cell>
          <table:table-cell table:style-name="ce200" office:value-type="float" office:value="2.2" calcext:value-type="float">
            <text:p>2.2</text:p>
          </table:table-cell>
          <table:table-cell table:style-name="ce200" office:value-type="float" office:value="2.3" calcext:value-type="float">
            <text:p>2.3</text:p>
          </table:table-cell>
          <table:table-cell table:style-name="ce198" office:value-type="float" office:value="3" calcext:value-type="float">
            <text:p>3.0</text:p>
          </table:table-cell>
          <table:table-cell table:style-name="ce198" office:value-type="float" office:value="3.1" calcext:value-type="float">
            <text:p>3.1</text:p>
          </table:table-cell>
          <table:table-cell table:style-name="ce198" office:value-type="float" office:value="3.2" calcext:value-type="float">
            <text:p>3.2</text:p>
          </table:table-cell>
          <table:table-cell table:style-name="ce198" office:value-type="float" office:value="3.6" calcext:value-type="float">
            <text:p>3.6</text:p>
          </table:table-cell>
          <table:table-cell table:style-name="ce198" office:value-type="float" office:value="4" calcext:value-type="float">
            <text:p>4.0</text:p>
          </table:table-cell>
          <table:table-cell table:style-name="ce198" office:value-type="float" office:value="4.2" calcext:value-type="float">
            <text:p>4.2</text:p>
          </table:table-cell>
          <table:table-cell table:style-name="ce198" office:value-type="float" office:value="4.4" calcext:value-type="float">
            <text:p>4.4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" calcext:value-type="string">
            <text:p>"12": { "0": 14, "1": 13, "2": 10, "3": 9, "4": 12, "5": 8, "6": 6, "7": 4, "8": 3, "9": 7, "10": 5, "11": 2, "12": 9, "13": 1, "14": 11}</text:p>
          </table:table-cell>
          <table:table-cell table:number-columns-repeated="36"/>
        </table:table-row>
        <table:table-row table:style-name="ro1">
          <table:table-cell/>
          <table:table-cell table:style-name="ce611" table:formula="of:=HLOOKUP([.B10];[.$AF$25:.$AW$26];2;0)" office:value-type="float" office:value="4" calcext:value-type="float">
            <text:p>4.0</text:p>
          </table:table-cell>
          <table:table-cell table:style-name="ce618" table:formula="of:=HLOOKUP([.C10];[.$AF$25:.$AW$26];2;0)" office:value-type="float" office:value="4.4" calcext:value-type="float">
            <text:p>4.4</text:p>
          </table:table-cell>
          <table:table-cell table:style-name="ce624" table:formula="of:=HLOOKUP([.D10];[.$AF$25:.$AW$26];2;0)" office:value-type="float" office:value="4.2" calcext:value-type="float">
            <text:p>4.2</text:p>
          </table:table-cell>
          <table:table-cell table:style-name="ce627" table:formula="of:=HLOOKUP([.E10];[.$AF$25:.$AW$26];2;0)" office:value-type="float" office:value="3.2" calcext:value-type="float">
            <text:p>3.2</text:p>
          </table:table-cell>
          <table:table-cell table:style-name="ce627" table:formula="of:=HLOOKUP([.F10];[.$AF$25:.$AW$26];2;0)" office:value-type="float" office:value="3.6" calcext:value-type="float">
            <text:p>3.6</text:p>
          </table:table-cell>
          <table:table-cell/>
          <table:table-cell table:style-name="ce636" table:formula="of:=HLOOKUP([.H10];[.$AF$25:.$AW$26];2;0)" office:value-type="float" office:value="4.2" calcext:value-type="float">
            <text:p>4.2</text:p>
          </table:table-cell>
          <table:table-cell table:style-name="ce640" table:formula="of:=HLOOKUP([.I10];[.$AF$25:.$AW$26];2;0)" office:value-type="float" office:value="4.4" calcext:value-type="float">
            <text:p>4.4</text:p>
          </table:table-cell>
          <table:table-cell table:style-name="ce647" table:formula="of:=HLOOKUP([.J10];[.$AF$25:.$AW$26];2;0)" office:value-type="float" office:value="4" calcext:value-type="float">
            <text:p>4.0</text:p>
          </table:table-cell>
          <table:table-cell table:style-name="ce651" table:formula="of:=HLOOKUP([.K10];[.$AF$25:.$AW$26];2;0)" office:value-type="float" office:value="3.2" calcext:value-type="float">
            <text:p>3.2</text:p>
          </table:table-cell>
          <table:table-cell table:style-name="ce651" table:formula="of:=HLOOKUP([.L10];[.$AF$25:.$AW$26];2;0)" office:value-type="float" office:value="3.6" calcext:value-type="float">
            <text:p>3.6</text:p>
          </table:table-cell>
          <table:table-cell/>
          <table:table-cell table:style-name="ce661" table:formula="of:=HLOOKUP([.N10];[.$AF$25:.$AW$26];2;0)" office:value-type="float" office:value="4" calcext:value-type="float">
            <text:p>4.0</text:p>
          </table:table-cell>
          <table:table-cell table:style-name="ce667" table:formula="of:=HLOOKUP([.O10];[.$AF$25:.$AW$26];2;0)" office:value-type="float" office:value="3.6" calcext:value-type="float">
            <text:p>3.6</text:p>
          </table:table-cell>
          <table:table-cell table:style-name="ce672" table:formula="of:=HLOOKUP([.P10];[.$AF$25:.$AW$26];2;0)" office:value-type="float" office:value="4.2" calcext:value-type="float">
            <text:p>4.2</text:p>
          </table:table-cell>
          <table:table-cell table:style-name="ce679" table:formula="of:=HLOOKUP([.Q10];[.$AF$25:.$AW$26];2;0)" office:value-type="float" office:value="3.2" calcext:value-type="float">
            <text:p>3.2</text:p>
          </table:table-cell>
          <table:table-cell table:style-name="ce679" table:formula="of:=HLOOKUP([.R10];[.$AF$25:.$AW$26];2;0)" office:value-type="float" office:value="4.4" calcext:value-type="float">
            <text:p>4.4</text:p>
          </table:table-cell>
          <table:table-cell/>
          <table:table-cell table:style-name="ce688" table:formula="of:=HLOOKUP([.T10];[.$AF$25:.$AW$26];2;0)" office:value-type="float" office:value="4.2" calcext:value-type="float">
            <text:p>4.2</text:p>
          </table:table-cell>
          <table:table-cell table:style-name="ce695" table:formula="of:=HLOOKUP([.U10];[.$AF$25:.$AW$26];2;0)" office:value-type="float" office:value="3.6" calcext:value-type="float">
            <text:p>3.6</text:p>
          </table:table-cell>
          <table:table-cell table:style-name="ce699" table:formula="of:=HLOOKUP([.V10];[.$AF$25:.$AW$26];2;0)" office:value-type="float" office:value="3.2" calcext:value-type="float">
            <text:p>3.2</text:p>
          </table:table-cell>
          <table:table-cell table:style-name="ce704" table:formula="of:=HLOOKUP([.W10];[.$AF$25:.$AW$26];2;0)" office:value-type="float" office:value="4" calcext:value-type="float">
            <text:p>4.0</text:p>
          </table:table-cell>
          <table:table-cell table:style-name="ce704" table:formula="of:=HLOOKUP([.X10];[.$AF$25:.$AW$26];2;0)" office:value-type="float" office:value="4.4" calcext:value-type="float">
            <text:p>4.4</text:p>
          </table:table-cell>
          <table:table-cell/>
          <table:table-cell table:style-name="ce815" table:formula="of:=HLOOKUP([.Z10];[.$AF$25:.$AW$26];2;0)" office:value-type="float" office:value="4" calcext:value-type="float">
            <text:p>4.0</text:p>
          </table:table-cell>
          <table:table-cell table:style-name="ce820" table:formula="of:=HLOOKUP([.AA10];[.$AF$25:.$AW$26];2;0)" office:value-type="float" office:value="3.6" calcext:value-type="float">
            <text:p>3.6</text:p>
          </table:table-cell>
          <table:table-cell table:style-name="ce823" table:formula="of:=HLOOKUP([.AB10];[.$AF$25:.$AW$26];2;0)" office:value-type="float" office:value="3.2" calcext:value-type="float">
            <text:p>3.2</text:p>
          </table:table-cell>
          <table:table-cell table:style-name="ce826" table:formula="of:=HLOOKUP([.AC10];[.$AF$25:.$AW$26];2;0)" office:value-type="float" office:value="4.4" calcext:value-type="float">
            <text:p>4.4</text:p>
          </table:table-cell>
          <table:table-cell table:style-name="ce826" table:formula="of:=HLOOKUP([.AD10];[.$AF$25:.$AW$26];2;0)" office:value-type="float" office:value="4.2" calcext:value-type="float">
            <text:p>4.2</text:p>
          </table:table-cell>
          <table:table-cell table:style-name="ce540"/>
          <table:table-cell table:number-columns-repeated="31"/>
          <table:table-cell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" calcext:value-type="string">
            <text:p>"13": { "0": 13, "1": 12, "2": 8, "3": 11, "4": 14, "5": 6, "6": 4, "7": 3, "8": 7, "9": 9, "10": 5, "11": 2, "12": 1, "13": 4, "14": 10}</text:p>
          </table:table-cell>
          <table:table-cell table:number-columns-repeated="36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style-name="ce192" table:formula="of:=COM.MICROSOFT.TEXTJOIN(&quot;, &quot;;TRUE();[.AF26:.AT26])" office:value-type="string" office:string-value="1, 1.1, 1.2, 1.3, 2, 2.1, 2.2, 2.3, 3, 3.1, 3.2, 3.6, 4, 4.2, 4.4" calcext:value-type="string">
            <text:p>1, 1.1, 1.2, 1.3, 2, 2.1, 2.2, 2.3, 3, 3.1, 3.2, 3.6, 4, 4.2, 4.4</text:p>
          </table:table-cell>
          <table:table-cell table:number-columns-repeated="30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7, &quot;3&quot;: 12, &quot;4&quot;: 11, &quot;5&quot;: 6, &quot;6&quot;: 4, &quot;7&quot;: 3, &quot;8&quot;: 9, &quot;9&quot;: 10, &quot;10&quot;: 5, &quot;11&quot;: 2, &quot;12&quot;: 1, &quot;13&quot;: 8, &quot;14&quot;: 12}" calcext:value-type="string">
            <text:p>"14": { "0": 14, "1": 13, "2": 7, "3": 12, "4": 11, "5": 6, "6": 4, "7": 3, "8": 9, "9": 10, "10": 5, "11": 2, "12": 1, "13": 8, "14": 12}</text:p>
          </table:table-cell>
          <table:table-cell table:number-columns-repeated="36"/>
        </table:table-row>
        <table:table-row table:style-name="ro1">
          <table:table-cell/>
          <table:table-cell table:style-name="ce552" table:formula="of:=SUM([.B30:.F32])-[.B31]" office:value-type="float" office:value="37.7" calcext:value-type="float" table:number-columns-spanned="2" table:number-rows-spanned="1">
            <text:p>37.7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H30:.L32])-[.I31]" office:value-type="float" office:value="37.7" calcext:value-type="float" table:number-columns-spanned="2" table:number-rows-spanned="1">
            <text:p>37.7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N30:.R32])-[.P31]" office:value-type="float" office:value="37.7" calcext:value-type="float" table:number-columns-spanned="2" table:number-rows-spanned="1">
            <text:p>37.7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T30:.X32])-[.W31]" office:value-type="float" office:value="37.7" calcext:value-type="float" table:number-columns-spanned="2" table:number-rows-spanned="1">
            <text:p>37.7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Z30:.AD32])-[.AD31]" office:value-type="float" office:value="37.7" calcext:value-type="float" table:number-columns-spanned="2" table:number-rows-spanned="1">
            <text:p>37.7</text:p>
          </table:table-cell>
          <table:covered-table-cell table:style-name="ce29"/>
          <table:table-cell table:style-name="ce29" table:number-columns-repeated="3"/>
          <table:table-cell table:style-name="ce540"/>
          <table:table-cell table:number-columns-repeated="68"/>
        </table:table-row>
        <table:table-row table:style-name="ro1">
          <table:table-cell/>
          <table:table-cell table:style-name="ce685" table:formula="of:=HLOOKUP([.B12];[.$AF$25:.$AW$26];2;0)" office:value-type="float" office:value="4.4" calcext:value-type="float">
            <text:p>4.4</text:p>
          </table:table-cell>
          <table:table-cell table:style-name="ce694" table:formula="of:=HLOOKUP([.C12];[.$AF$25:.$AW$26];2;0)" office:value-type="float" office:value="3.1" calcext:value-type="float">
            <text:p>3.1</text:p>
          </table:table-cell>
          <table:table-cell table:style-name="ce698" table:formula="of:=HLOOKUP([.D12];[.$AF$25:.$AW$26];2;0)" office:value-type="float" office:value="2" calcext:value-type="float">
            <text:p>2.0</text:p>
          </table:table-cell>
          <table:table-cell table:style-name="ce703" table:formula="of:=HLOOKUP([.E12];[.$AF$25:.$AW$26];2;0)" office:value-type="float" office:value="2.2" calcext:value-type="float">
            <text:p>2.2</text:p>
          </table:table-cell>
          <table:table-cell table:style-name="ce703" table:formula="of:=HLOOKUP([.F12];[.$AF$25:.$AW$26];2;0)" office:value-type="float" office:value="4.2" calcext:value-type="float">
            <text:p>4.2</text:p>
          </table:table-cell>
          <table:table-cell/>
          <table:table-cell table:style-name="ce683" table:formula="of:=HLOOKUP([.H12];[.$AF$25:.$AW$26];2;0)" office:value-type="float" office:value="4.4" calcext:value-type="float">
            <text:p>4.4</text:p>
          </table:table-cell>
          <table:table-cell table:style-name="ce693" table:formula="of:=HLOOKUP([.I12];[.$AF$25:.$AW$26];2;0)" office:value-type="float" office:value="3" calcext:value-type="float">
            <text:p>3.0</text:p>
          </table:table-cell>
          <table:table-cell table:style-name="ce697" table:formula="of:=HLOOKUP([.J12];[.$AF$25:.$AW$26];2;0)" office:value-type="float" office:value="1.3" calcext:value-type="float">
            <text:p>1.3</text:p>
          </table:table-cell>
          <table:table-cell table:style-name="ce702" table:formula="of:=HLOOKUP([.K12];[.$AF$25:.$AW$26];2;0)" office:value-type="float" office:value="2.1" calcext:value-type="float">
            <text:p>2.1</text:p>
          </table:table-cell>
          <table:table-cell table:style-name="ce702" table:formula="of:=HLOOKUP([.L12];[.$AF$25:.$AW$26];2;0)" office:value-type="float" office:value="4.2" calcext:value-type="float">
            <text:p>4.2</text:p>
          </table:table-cell>
          <table:table-cell/>
          <table:table-cell table:style-name="ce656" table:formula="of:=HLOOKUP([.N12];[.$AF$25:.$AW$26];2;0)" office:value-type="float" office:value="4.4" calcext:value-type="float">
            <text:p>4.4</text:p>
          </table:table-cell>
          <table:table-cell table:style-name="ce665" table:formula="of:=HLOOKUP([.O12];[.$AF$25:.$AW$26];2;0)" office:value-type="float" office:value="2.1" calcext:value-type="float">
            <text:p>2.1</text:p>
          </table:table-cell>
          <table:table-cell table:style-name="ce670" table:formula="of:=HLOOKUP([.P12];[.$AF$25:.$AW$26];2;0)" office:value-type="float" office:value="2.2" calcext:value-type="float">
            <text:p>2.2</text:p>
          </table:table-cell>
          <table:table-cell table:style-name="ce676" table:formula="of:=HLOOKUP([.Q12];[.$AF$25:.$AW$26];2;0)" office:value-type="float" office:value="3.1" calcext:value-type="float">
            <text:p>3.1</text:p>
          </table:table-cell>
          <table:table-cell table:style-name="ce676" table:formula="of:=HLOOKUP([.R12];[.$AF$25:.$AW$26];2;0)" office:value-type="float" office:value="4.2" calcext:value-type="float">
            <text:p>4.2</text:p>
          </table:table-cell>
          <table:table-cell/>
          <table:table-cell table:style-name="ce631" table:formula="of:=HLOOKUP([.T12];[.$AF$25:.$AW$26];2;0)" office:value-type="float" office:value="4" calcext:value-type="float">
            <text:p>4.0</text:p>
          </table:table-cell>
          <table:table-cell table:style-name="ce638" table:formula="of:=HLOOKUP([.U12];[.$AF$25:.$AW$26];2;0)" office:value-type="float" office:value="2.1" calcext:value-type="float">
            <text:p>2.1</text:p>
          </table:table-cell>
          <table:table-cell table:style-name="ce644" table:formula="of:=HLOOKUP([.V12];[.$AF$25:.$AW$26];2;0)" office:value-type="float" office:value="1.3" calcext:value-type="float">
            <text:p>1.3</text:p>
          </table:table-cell>
          <table:table-cell table:style-name="ce649" table:formula="of:=HLOOKUP([.W12];[.$AF$25:.$AW$26];2;0)" office:value-type="float" office:value="3.2" calcext:value-type="float">
            <text:p>3.2</text:p>
          </table:table-cell>
          <table:table-cell table:style-name="ce649" table:formula="of:=HLOOKUP([.X12];[.$AF$25:.$AW$26];2;0)" office:value-type="float" office:value="4.4" calcext:value-type="float">
            <text:p>4.4</text:p>
          </table:table-cell>
          <table:table-cell/>
          <table:table-cell table:style-name="ce606" table:formula="of:=HLOOKUP([.Z12];[.$AF$25:.$AW$26];2;0)" office:value-type="float" office:value="4.4" calcext:value-type="float">
            <text:p>4.4</text:p>
          </table:table-cell>
          <table:table-cell table:style-name="ce615" table:formula="of:=HLOOKUP([.AA12];[.$AF$25:.$AW$26];2;0)" office:value-type="float" office:value="2" calcext:value-type="float">
            <text:p>2.0</text:p>
          </table:table-cell>
          <table:table-cell table:style-name="ce622" table:formula="of:=HLOOKUP([.AB12];[.$AF$25:.$AW$26];2;0)" office:value-type="float" office:value="1.3" calcext:value-type="float">
            <text:p>1.3</text:p>
          </table:table-cell>
          <table:table-cell table:style-name="ce625" table:formula="of:=HLOOKUP([.AC12];[.$AF$25:.$AW$26];2;0)" office:value-type="float" office:value="3.2" calcext:value-type="float">
            <text:p>3.2</text:p>
          </table:table-cell>
          <table:table-cell table:style-name="ce625" table:formula="of:=HLOOKUP([.AD12];[.$AF$25:.$AW$26];2;0)" office:value-type="float" office:value="4" calcext:value-type="float">
            <text:p>4.0</text:p>
          </table:table-cell>
          <table:table-cell table:style-name="ce540"/>
          <table:table-cell table:number-columns-repeated="31"/>
          <table:table-cell table:formula="of:=COM.MICROSOFT.TEXTJOIN(&quot;, &quot;;TRUE();[.BK24:.BK28]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7, &quot;3&quot;: 12, &quot;4&quot;: 11, &quot;5&quot;: 6, &quot;6&quot;: 4, &quot;7&quot;: 3, &quot;8&quot;: 9, &quot;9&quot;: 10, &quot;10&quot;: 5, &quot;11&quot;: 2, &quot;12&quot;: 1, &quot;13&quot;: 8, &quot;14&quot;: 12}" calcext:value-type="string">
            <text:p>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7, "3": 12, "4": 11, "5": 6, "6": 4, "7": 3, "8": 9, "9": 10, "10": 5, "11": 2, "12": 1, "13": 8, "14": 12}</text:p>
          </table:table-cell>
          <table:table-cell table:number-columns-repeated="36"/>
        </table:table-row>
        <table:table-row table:style-name="ro1">
          <table:table-cell/>
          <table:table-cell table:style-name="ce737" table:formula="of:=HLOOKUP([.B13];[.$AF$25:.$AW$26];2;0)" office:value-type="float" office:value="2.3" calcext:value-type="float">
            <text:p>2.3</text:p>
          </table:table-cell>
          <table:table-cell table:style-name="ce694" table:formula="of:=HLOOKUP([.C13];[.$AF$25:.$AW$26];2;0)" office:value-type="float" office:value="1.1" calcext:value-type="float">
            <text:p>1.1</text:p>
          </table:table-cell>
          <table:table-cell table:style-name="ce698" table:formula="of:=HLOOKUP([.D13];[.$AF$25:.$AW$26];2;0)" office:value-type="float" office:value="1.2" calcext:value-type="float">
            <text:p>1.2</text:p>
          </table:table-cell>
          <table:table-cell table:style-name="ce703" table:formula="of:=HLOOKUP([.E13];[.$AF$25:.$AW$26];2;0)" office:value-type="float" office:value="1.3" calcext:value-type="float">
            <text:p>1.3</text:p>
          </table:table-cell>
          <table:table-cell table:style-name="ce703" table:formula="of:=HLOOKUP([.F13];[.$AF$25:.$AW$26];2;0)" office:value-type="float" office:value="3" calcext:value-type="float">
            <text:p>3.0</text:p>
          </table:table-cell>
          <table:table-cell/>
          <table:table-cell table:style-name="ce684" table:formula="of:=HLOOKUP([.H13];[.$AF$25:.$AW$26];2;0)" office:value-type="float" office:value="2.2" calcext:value-type="float">
            <text:p>2.2</text:p>
          </table:table-cell>
          <table:table-cell table:style-name="ce763" table:formula="of:=HLOOKUP([.I13];[.$AF$25:.$AW$26];2;0)" office:value-type="float" office:value="1.2" calcext:value-type="float">
            <text:p>1.2</text:p>
          </table:table-cell>
          <table:table-cell table:style-name="ce697" table:formula="of:=HLOOKUP([.J13];[.$AF$25:.$AW$26];2;0)" office:value-type="float" office:value="1.1" calcext:value-type="float">
            <text:p>1.1</text:p>
          </table:table-cell>
          <table:table-cell table:style-name="ce702" table:formula="of:=HLOOKUP([.K13];[.$AF$25:.$AW$26];2;0)" office:value-type="float" office:value="1.2" calcext:value-type="float">
            <text:p>1.2</text:p>
          </table:table-cell>
          <table:table-cell table:style-name="ce702" table:formula="of:=HLOOKUP([.L13];[.$AF$25:.$AW$26];2;0)" office:value-type="float" office:value="2.3" calcext:value-type="float">
            <text:p>2.3</text:p>
          </table:table-cell>
          <table:table-cell/>
          <table:table-cell table:style-name="ce657" table:formula="of:=HLOOKUP([.N13];[.$AF$25:.$AW$26];2;0)" office:value-type="float" office:value="2" calcext:value-type="float">
            <text:p>2.0</text:p>
          </table:table-cell>
          <table:table-cell table:style-name="ce665" table:formula="of:=HLOOKUP([.O13];[.$AF$25:.$AW$26];2;0)" office:value-type="float" office:value="1.2" calcext:value-type="float">
            <text:p>1.2</text:p>
          </table:table-cell>
          <table:table-cell table:style-name="ce784" table:formula="of:=HLOOKUP([.P13];[.$AF$25:.$AW$26];2;0)" office:value-type="float" office:value="1" calcext:value-type="float">
            <text:p>1.0</text:p>
          </table:table-cell>
          <table:table-cell table:style-name="ce676" table:formula="of:=HLOOKUP([.Q13];[.$AF$25:.$AW$26];2;0)" office:value-type="float" office:value="1.1" calcext:value-type="float">
            <text:p>1.1</text:p>
          </table:table-cell>
          <table:table-cell table:style-name="ce676" table:formula="of:=HLOOKUP([.R13];[.$AF$25:.$AW$26];2;0)" office:value-type="float" office:value="3.2" calcext:value-type="float">
            <text:p>3.2</text:p>
          </table:table-cell>
          <table:table-cell/>
          <table:table-cell table:style-name="ce632" table:formula="of:=HLOOKUP([.T13];[.$AF$25:.$AW$26];2;0)" office:value-type="float" office:value="2" calcext:value-type="float">
            <text:p>2.0</text:p>
          </table:table-cell>
          <table:table-cell table:style-name="ce638" table:formula="of:=HLOOKUP([.U13];[.$AF$25:.$AW$26];2;0)" office:value-type="float" office:value="1.2" calcext:value-type="float">
            <text:p>1.2</text:p>
          </table:table-cell>
          <table:table-cell table:style-name="ce644" table:formula="of:=HLOOKUP([.V13];[.$AF$25:.$AW$26];2;0)" office:value-type="float" office:value="1.1" calcext:value-type="float">
            <text:p>1.1</text:p>
          </table:table-cell>
          <table:table-cell table:style-name="ce809" table:formula="of:=HLOOKUP([.W13];[.$AF$25:.$AW$26];2;0)" office:value-type="float" office:value="1.1" calcext:value-type="float">
            <text:p>1.1</text:p>
          </table:table-cell>
          <table:table-cell table:style-name="ce649" table:formula="of:=HLOOKUP([.X13];[.$AF$25:.$AW$26];2;0)" office:value-type="float" office:value="3.6" calcext:value-type="float">
            <text:p>3.6</text:p>
          </table:table-cell>
          <table:table-cell/>
          <table:table-cell table:style-name="ce607" table:formula="of:=HLOOKUP([.Z13];[.$AF$25:.$AW$26];2;0)" office:value-type="float" office:value="2.1" calcext:value-type="float">
            <text:p>2.1</text:p>
          </table:table-cell>
          <table:table-cell table:style-name="ce615" table:formula="of:=HLOOKUP([.AA13];[.$AF$25:.$AW$26];2;0)" office:value-type="float" office:value="1.2" calcext:value-type="float">
            <text:p>1.2</text:p>
          </table:table-cell>
          <table:table-cell table:style-name="ce622" table:formula="of:=HLOOKUP([.AB13];[.$AF$25:.$AW$26];2;0)" office:value-type="float" office:value="1.1" calcext:value-type="float">
            <text:p>1.1</text:p>
          </table:table-cell>
          <table:table-cell table:style-name="ce625" table:formula="of:=HLOOKUP([.AC13];[.$AF$25:.$AW$26];2;0)" office:value-type="float" office:value="2.2" calcext:value-type="float">
            <text:p>2.2</text:p>
          </table:table-cell>
          <table:table-cell table:style-name="ce831" table:formula="of:=HLOOKUP([.AD13];[.$AF$25:.$AW$26];2;0)" office:value-type="float" office:value="3" calcext:value-type="float">
            <text:p>3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686" table:formula="of:=HLOOKUP([.B14];[.$AF$25:.$AW$26];2;0)" office:value-type="float" office:value="4" calcext:value-type="float">
            <text:p>4.0</text:p>
          </table:table-cell>
          <table:table-cell table:style-name="ce694" table:formula="of:=HLOOKUP([.C14];[.$AF$25:.$AW$26];2;0)" office:value-type="float" office:value="3.2" calcext:value-type="float">
            <text:p>3.2</text:p>
          </table:table-cell>
          <table:table-cell table:style-name="ce698" table:formula="of:=HLOOKUP([.D14];[.$AF$25:.$AW$26];2;0)" office:value-type="float" office:value="2.3" calcext:value-type="float">
            <text:p>2.3</text:p>
          </table:table-cell>
          <table:table-cell table:style-name="ce703" table:formula="of:=HLOOKUP([.E14];[.$AF$25:.$AW$26];2;0)" office:value-type="float" office:value="2.1" calcext:value-type="float">
            <text:p>2.1</text:p>
          </table:table-cell>
          <table:table-cell table:style-name="ce703" table:formula="of:=HLOOKUP([.F14];[.$AF$25:.$AW$26];2;0)" office:value-type="float" office:value="3.6" calcext:value-type="float">
            <text:p>3.6</text:p>
          </table:table-cell>
          <table:table-cell/>
          <table:table-cell table:style-name="ce684" table:formula="of:=HLOOKUP([.H14];[.$AF$25:.$AW$26];2;0)" office:value-type="float" office:value="3.6" calcext:value-type="float">
            <text:p>3.6</text:p>
          </table:table-cell>
          <table:table-cell table:style-name="ce693" table:formula="of:=HLOOKUP([.I14];[.$AF$25:.$AW$26];2;0)" office:value-type="float" office:value="3.1" calcext:value-type="float">
            <text:p>3.1</text:p>
          </table:table-cell>
          <table:table-cell table:style-name="ce697" table:formula="of:=HLOOKUP([.J14];[.$AF$25:.$AW$26];2;0)" office:value-type="float" office:value="3.2" calcext:value-type="float">
            <text:p>3.2</text:p>
          </table:table-cell>
          <table:table-cell table:style-name="ce702" table:formula="of:=HLOOKUP([.K14];[.$AF$25:.$AW$26];2;0)" office:value-type="float" office:value="2" calcext:value-type="float">
            <text:p>2.0</text:p>
          </table:table-cell>
          <table:table-cell table:style-name="ce702" table:formula="of:=HLOOKUP([.L14];[.$AF$25:.$AW$26];2;0)" office:value-type="float" office:value="4" calcext:value-type="float">
            <text:p>4.0</text:p>
          </table:table-cell>
          <table:table-cell/>
          <table:table-cell table:style-name="ce657" table:formula="of:=HLOOKUP([.N14];[.$AF$25:.$AW$26];2;0)" office:value-type="float" office:value="3.6" calcext:value-type="float">
            <text:p>3.6</text:p>
          </table:table-cell>
          <table:table-cell table:style-name="ce665" table:formula="of:=HLOOKUP([.O14];[.$AF$25:.$AW$26];2;0)" office:value-type="float" office:value="2.3" calcext:value-type="float">
            <text:p>2.3</text:p>
          </table:table-cell>
          <table:table-cell table:style-name="ce670" table:formula="of:=HLOOKUP([.P14];[.$AF$25:.$AW$26];2;0)" office:value-type="float" office:value="3" calcext:value-type="float">
            <text:p>3.0</text:p>
          </table:table-cell>
          <table:table-cell table:style-name="ce676" table:formula="of:=HLOOKUP([.Q14];[.$AF$25:.$AW$26];2;0)" office:value-type="float" office:value="1.3" calcext:value-type="float">
            <text:p>1.3</text:p>
          </table:table-cell>
          <table:table-cell table:style-name="ce676" table:formula="of:=HLOOKUP([.R14];[.$AF$25:.$AW$26];2;0)" office:value-type="float" office:value="4" calcext:value-type="float">
            <text:p>4.0</text:p>
          </table:table-cell>
          <table:table-cell/>
          <table:table-cell table:style-name="ce632" table:formula="of:=HLOOKUP([.T14];[.$AF$25:.$AW$26];2;0)" office:value-type="float" office:value="3" calcext:value-type="float">
            <text:p>3.0</text:p>
          </table:table-cell>
          <table:table-cell table:style-name="ce638" table:formula="of:=HLOOKUP([.U14];[.$AF$25:.$AW$26];2;0)" office:value-type="float" office:value="2.2" calcext:value-type="float">
            <text:p>2.2</text:p>
          </table:table-cell>
          <table:table-cell table:style-name="ce644" table:formula="of:=HLOOKUP([.V14];[.$AF$25:.$AW$26];2;0)" office:value-type="float" office:value="2.3" calcext:value-type="float">
            <text:p>2.3</text:p>
          </table:table-cell>
          <table:table-cell table:style-name="ce649" table:formula="of:=HLOOKUP([.W14];[.$AF$25:.$AW$26];2;0)" office:value-type="float" office:value="3.1" calcext:value-type="float">
            <text:p>3.1</text:p>
          </table:table-cell>
          <table:table-cell table:style-name="ce649" table:formula="of:=HLOOKUP([.X14];[.$AF$25:.$AW$26];2;0)" office:value-type="float" office:value="4.2" calcext:value-type="float">
            <text:p>4.2</text:p>
          </table:table-cell>
          <table:table-cell/>
          <table:table-cell table:style-name="ce607" table:formula="of:=HLOOKUP([.Z14];[.$AF$25:.$AW$26];2;0)" office:value-type="float" office:value="4.2" calcext:value-type="float">
            <text:p>4.2</text:p>
          </table:table-cell>
          <table:table-cell table:style-name="ce615" table:formula="of:=HLOOKUP([.AA14];[.$AF$25:.$AW$26];2;0)" office:value-type="float" office:value="2.3" calcext:value-type="float">
            <text:p>2.3</text:p>
          </table:table-cell>
          <table:table-cell table:style-name="ce622" table:formula="of:=HLOOKUP([.AB14];[.$AF$25:.$AW$26];2;0)" office:value-type="float" office:value="3" calcext:value-type="float">
            <text:p>3.0</text:p>
          </table:table-cell>
          <table:table-cell table:style-name="ce625" table:formula="of:=HLOOKUP([.AC14];[.$AF$25:.$AW$26];2;0)" office:value-type="float" office:value="3.1" calcext:value-type="float">
            <text:p>3.1</text:p>
          </table:table-cell>
          <table:table-cell table:style-name="ce625" table:formula="of:=HLOOKUP([.AD14];[.$AF$25:.$AW$26];2;0)" office:value-type="float" office:value="3.6" calcext:value-type="float">
            <text:p>3.6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9" table:number-columns-repeated="5"/>
          <table:table-cell/>
          <table:table-cell table:style-name="ce29" table:number-columns-repeated="5"/>
          <table:table-cell/>
          <table:table-cell table:style-name="ce29" table:number-columns-repeated="5"/>
          <table:table-cell/>
          <table:table-cell table:style-name="ce29" table:number-columns-repeated="5"/>
          <table:table-cell/>
          <table:table-cell table:style-name="ce29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52" table:formula="of:=SUM([.B35:.F37])-[.B37]" office:value-type="float" office:value="37.7" calcext:value-type="float" table:number-columns-spanned="2" table:number-rows-spanned="1">
            <text:p>37.7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H35:.L37])-[.I37]" office:value-type="float" office:value="37.7" calcext:value-type="float" table:number-columns-spanned="2" table:number-rows-spanned="1">
            <text:p>37.7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N35:.R37])-[.P37]" office:value-type="float" office:value="37.7" calcext:value-type="float" table:number-columns-spanned="2" table:number-rows-spanned="1">
            <text:p>37.7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T35:.X37])-[.W37]" office:value-type="float" office:value="37.7" calcext:value-type="float" table:number-columns-spanned="2" table:number-rows-spanned="1">
            <text:p>37.7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Z35:.AD37])-[.AD37]" office:value-type="float" office:value="37.7" calcext:value-type="float" table:number-columns-spanned="2" table:number-rows-spanned="1">
            <text:p>37.7</text:p>
          </table:table-cell>
          <table:covered-table-cell table:style-name="ce29"/>
          <table:table-cell table:style-name="ce29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658" table:formula="of:=HLOOKUP([.B16];[.$AF$25:.$AW$26];2;0)" office:value-type="float" office:value="4.4" calcext:value-type="float">
            <text:p>4.4</text:p>
          </table:table-cell>
          <table:table-cell table:style-name="ce666" table:formula="of:=HLOOKUP([.C16];[.$AF$25:.$AW$26];2;0)" office:value-type="float" office:value="4.2" calcext:value-type="float">
            <text:p>4.2</text:p>
          </table:table-cell>
          <table:table-cell table:style-name="ce671" table:formula="of:=HLOOKUP([.D16];[.$AF$25:.$AW$26];2;0)" office:value-type="float" office:value="3.2" calcext:value-type="float">
            <text:p>3.2</text:p>
          </table:table-cell>
          <table:table-cell table:style-name="ce677" table:formula="of:=HLOOKUP([.E16];[.$AF$25:.$AW$26];2;0)" office:value-type="float" office:value="3.6" calcext:value-type="float">
            <text:p>3.6</text:p>
          </table:table-cell>
          <table:table-cell table:style-name="ce677" table:formula="of:=HLOOKUP([.F16];[.$AF$25:.$AW$26];2;0)" office:value-type="float" office:value="4" calcext:value-type="float">
            <text:p>4.0</text:p>
          </table:table-cell>
          <table:table-cell/>
          <table:table-cell table:style-name="ce633" table:formula="of:=HLOOKUP([.H16];[.$AF$25:.$AW$26];2;0)" office:value-type="float" office:value="4.4" calcext:value-type="float">
            <text:p>4.4</text:p>
          </table:table-cell>
          <table:table-cell table:style-name="ce639" table:formula="of:=HLOOKUP([.I16];[.$AF$25:.$AW$26];2;0)" office:value-type="float" office:value="4.2" calcext:value-type="float">
            <text:p>4.2</text:p>
          </table:table-cell>
          <table:table-cell table:style-name="ce645" table:formula="of:=HLOOKUP([.J16];[.$AF$25:.$AW$26];2;0)" office:value-type="float" office:value="2.3" calcext:value-type="float">
            <text:p>2.3</text:p>
          </table:table-cell>
          <table:table-cell table:style-name="ce650" table:formula="of:=HLOOKUP([.K16];[.$AF$25:.$AW$26];2;0)" office:value-type="float" office:value="3" calcext:value-type="float">
            <text:p>3.0</text:p>
          </table:table-cell>
          <table:table-cell table:style-name="ce650" table:formula="of:=HLOOKUP([.L16];[.$AF$25:.$AW$26];2;0)" office:value-type="float" office:value="4" calcext:value-type="float">
            <text:p>4.0</text:p>
          </table:table-cell>
          <table:table-cell/>
          <table:table-cell table:style-name="ce608" table:formula="of:=HLOOKUP([.N16];[.$AF$25:.$AW$26];2;0)" office:value-type="float" office:value="4.4" calcext:value-type="float">
            <text:p>4.4</text:p>
          </table:table-cell>
          <table:table-cell table:style-name="ce616" table:formula="of:=HLOOKUP([.O16];[.$AF$25:.$AW$26];2;0)" office:value-type="float" office:value="4.2" calcext:value-type="float">
            <text:p>4.2</text:p>
          </table:table-cell>
          <table:table-cell table:style-name="ce623" table:formula="of:=HLOOKUP([.P16];[.$AF$25:.$AW$26];2;0)" office:value-type="float" office:value="3.2" calcext:value-type="float">
            <text:p>3.2</text:p>
          </table:table-cell>
          <table:table-cell table:style-name="ce626" table:formula="of:=HLOOKUP([.Q16];[.$AF$25:.$AW$26];2;0)" office:value-type="float" office:value="3.1" calcext:value-type="float">
            <text:p>3.1</text:p>
          </table:table-cell>
          <table:table-cell table:style-name="ce626" table:formula="of:=HLOOKUP([.R16];[.$AF$25:.$AW$26];2;0)" office:value-type="float" office:value="4" calcext:value-type="float">
            <text:p>4.0</text:p>
          </table:table-cell>
          <table:table-cell/>
          <table:table-cell table:style-name="ce553" table:formula="of:=HLOOKUP([.T16];[.$AF$25:.$AW$26];2;0)" office:value-type="float" office:value="4.2" calcext:value-type="float">
            <text:p>4.2</text:p>
          </table:table-cell>
          <table:table-cell table:style-name="ce568" table:formula="of:=HLOOKUP([.U16];[.$AF$25:.$AW$26];2;0)" office:value-type="float" office:value="4" calcext:value-type="float">
            <text:p>4.0</text:p>
          </table:table-cell>
          <table:table-cell table:style-name="ce577" table:formula="of:=HLOOKUP([.V16];[.$AF$25:.$AW$26];2;0)" office:value-type="float" office:value="3" calcext:value-type="float">
            <text:p>3.0</text:p>
          </table:table-cell>
          <table:table-cell table:style-name="ce587" table:formula="of:=HLOOKUP([.W16];[.$AF$25:.$AW$26];2;0)" office:value-type="float" office:value="3.6" calcext:value-type="float">
            <text:p>3.6</text:p>
          </table:table-cell>
          <table:table-cell table:style-name="ce587" table:formula="of:=HLOOKUP([.X16];[.$AF$25:.$AW$26];2;0)" office:value-type="float" office:value="4.4" calcext:value-type="float">
            <text:p>4.4</text:p>
          </table:table-cell>
          <table:table-cell/>
          <table:table-cell table:style-name="ce557" table:formula="of:=HLOOKUP([.Z16];[.$AF$25:.$AW$26];2;0)" office:value-type="float" office:value="4.4" calcext:value-type="float">
            <text:p>4.4</text:p>
          </table:table-cell>
          <table:table-cell table:style-name="ce569" table:formula="of:=HLOOKUP([.AA16];[.$AF$25:.$AW$26];2;0)" office:value-type="float" office:value="4.2" calcext:value-type="float">
            <text:p>4.2</text:p>
          </table:table-cell>
          <table:table-cell table:style-name="ce578" table:formula="of:=HLOOKUP([.AB16];[.$AF$25:.$AW$26];2;0)" office:value-type="float" office:value="2.3" calcext:value-type="float">
            <text:p>2.3</text:p>
          </table:table-cell>
          <table:table-cell table:style-name="ce588" table:formula="of:=HLOOKUP([.AC16];[.$AF$25:.$AW$26];2;0)" office:value-type="float" office:value="4" calcext:value-type="float">
            <text:p>4.0</text:p>
          </table:table-cell>
          <table:table-cell table:style-name="ce588" table:formula="of:=HLOOKUP([.AD16];[.$AF$25:.$AW$26];2;0)" office:value-type="float" office:value="3.6" calcext:value-type="float">
            <text:p>3.6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659" table:formula="of:=HLOOKUP([.B17];[.$AF$25:.$AW$26];2;0)" office:value-type="float" office:value="3.1" calcext:value-type="float">
            <text:p>3.1</text:p>
          </table:table-cell>
          <table:table-cell table:style-name="ce666" table:formula="of:=HLOOKUP([.C17];[.$AF$25:.$AW$26];2;0)" office:value-type="float" office:value="2.2" calcext:value-type="float">
            <text:p>2.2</text:p>
          </table:table-cell>
          <table:table-cell table:style-name="ce671" table:formula="of:=HLOOKUP([.D17];[.$AF$25:.$AW$26];2;0)" office:value-type="float" office:value="2" calcext:value-type="float">
            <text:p>2.0</text:p>
          </table:table-cell>
          <table:table-cell table:style-name="ce677" table:formula="of:=HLOOKUP([.E17];[.$AF$25:.$AW$26];2;0)" office:value-type="float" office:value="2.1" calcext:value-type="float">
            <text:p>2.1</text:p>
          </table:table-cell>
          <table:table-cell table:style-name="ce677" table:formula="of:=HLOOKUP([.F17];[.$AF$25:.$AW$26];2;0)" office:value-type="float" office:value="3" calcext:value-type="float">
            <text:p>3.0</text:p>
          </table:table-cell>
          <table:table-cell/>
          <table:table-cell table:style-name="ce634" table:formula="of:=HLOOKUP([.H17];[.$AF$25:.$AW$26];2;0)" office:value-type="float" office:value="3.1" calcext:value-type="float">
            <text:p>3.1</text:p>
          </table:table-cell>
          <table:table-cell table:style-name="ce639" table:formula="of:=HLOOKUP([.I17];[.$AF$25:.$AW$26];2;0)" office:value-type="float" office:value="2.1" calcext:value-type="float">
            <text:p>2.1</text:p>
          </table:table-cell>
          <table:table-cell table:style-name="ce645" table:formula="of:=HLOOKUP([.J17];[.$AF$25:.$AW$26];2;0)" office:value-type="float" office:value="1.3" calcext:value-type="float">
            <text:p>1.3</text:p>
          </table:table-cell>
          <table:table-cell table:style-name="ce650" table:formula="of:=HLOOKUP([.K17];[.$AF$25:.$AW$26];2;0)" office:value-type="float" office:value="2" calcext:value-type="float">
            <text:p>2.0</text:p>
          </table:table-cell>
          <table:table-cell table:style-name="ce650" table:formula="of:=HLOOKUP([.L17];[.$AF$25:.$AW$26];2;0)" office:value-type="float" office:value="3.2" calcext:value-type="float">
            <text:p>3.2</text:p>
          </table:table-cell>
          <table:table-cell/>
          <table:table-cell table:style-name="ce609" table:formula="of:=HLOOKUP([.N17];[.$AF$25:.$AW$26];2;0)" office:value-type="float" office:value="3" calcext:value-type="float">
            <text:p>3.0</text:p>
          </table:table-cell>
          <table:table-cell table:style-name="ce616" table:formula="of:=HLOOKUP([.O17];[.$AF$25:.$AW$26];2;0)" office:value-type="float" office:value="2.2" calcext:value-type="float">
            <text:p>2.2</text:p>
          </table:table-cell>
          <table:table-cell table:style-name="ce623" table:formula="of:=HLOOKUP([.P17];[.$AF$25:.$AW$26];2;0)" office:value-type="float" office:value="2" calcext:value-type="float">
            <text:p>2.0</text:p>
          </table:table-cell>
          <table:table-cell table:style-name="ce626" table:formula="of:=HLOOKUP([.Q17];[.$AF$25:.$AW$26];2;0)" office:value-type="float" office:value="1.3" calcext:value-type="float">
            <text:p>1.3</text:p>
          </table:table-cell>
          <table:table-cell table:style-name="ce626" table:formula="of:=HLOOKUP([.R17];[.$AF$25:.$AW$26];2;0)" office:value-type="float" office:value="2.3" calcext:value-type="float">
            <text:p>2.3</text:p>
          </table:table-cell>
          <table:table-cell/>
          <table:table-cell table:style-name="ce555" table:formula="of:=HLOOKUP([.T17];[.$AF$25:.$AW$26];2;0)" office:value-type="float" office:value="2.2" calcext:value-type="float">
            <text:p>2.2</text:p>
          </table:table-cell>
          <table:table-cell table:style-name="ce568" table:formula="of:=HLOOKUP([.U17];[.$AF$25:.$AW$26];2;0)" office:value-type="float" office:value="2" calcext:value-type="float">
            <text:p>2.0</text:p>
          </table:table-cell>
          <table:table-cell table:style-name="ce577" table:formula="of:=HLOOKUP([.V17];[.$AF$25:.$AW$26];2;0)" office:value-type="float" office:value="1.3" calcext:value-type="float">
            <text:p>1.3</text:p>
          </table:table-cell>
          <table:table-cell table:style-name="ce587" table:formula="of:=HLOOKUP([.W17];[.$AF$25:.$AW$26];2;0)" office:value-type="float" office:value="2.3" calcext:value-type="float">
            <text:p>2.3</text:p>
          </table:table-cell>
          <table:table-cell table:style-name="ce587" table:formula="of:=HLOOKUP([.X17];[.$AF$25:.$AW$26];2;0)" office:value-type="float" office:value="3.1" calcext:value-type="float">
            <text:p>3.1</text:p>
          </table:table-cell>
          <table:table-cell/>
          <table:table-cell table:style-name="ce558" table:formula="of:=HLOOKUP([.Z17];[.$AF$25:.$AW$26];2;0)" office:value-type="float" office:value="2.2" calcext:value-type="float">
            <text:p>2.2</text:p>
          </table:table-cell>
          <table:table-cell table:style-name="ce569" table:formula="of:=HLOOKUP([.AA17];[.$AF$25:.$AW$26];2;0)" office:value-type="float" office:value="2" calcext:value-type="float">
            <text:p>2.0</text:p>
          </table:table-cell>
          <table:table-cell table:style-name="ce578" table:formula="of:=HLOOKUP([.AB17];[.$AF$25:.$AW$26];2;0)" office:value-type="float" office:value="1.3" calcext:value-type="float">
            <text:p>1.3</text:p>
          </table:table-cell>
          <table:table-cell table:style-name="ce588" table:formula="of:=HLOOKUP([.AC17];[.$AF$25:.$AW$26];2;0)" office:value-type="float" office:value="3.1" calcext:value-type="float">
            <text:p>3.1</text:p>
          </table:table-cell>
          <table:table-cell table:style-name="ce588" table:formula="of:=HLOOKUP([.AD17];[.$AF$25:.$AW$26];2;0)" office:value-type="float" office:value="3.2" calcext:value-type="float">
            <text:p>3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741" table:formula="of:=HLOOKUP([.B18];[.$AF$25:.$AW$26];2;0)" office:value-type="float" office:value="3.6" calcext:value-type="float">
            <text:p>3.6</text:p>
          </table:table-cell>
          <table:table-cell table:style-name="ce666" table:formula="of:=HLOOKUP([.C18];[.$AF$25:.$AW$26];2;0)" office:value-type="float" office:value="1.1" calcext:value-type="float">
            <text:p>1.1</text:p>
          </table:table-cell>
          <table:table-cell table:style-name="ce671" table:formula="of:=HLOOKUP([.D18];[.$AF$25:.$AW$26];2;0)" office:value-type="float" office:value="1.2" calcext:value-type="float">
            <text:p>1.2</text:p>
          </table:table-cell>
          <table:table-cell table:style-name="ce677" table:formula="of:=HLOOKUP([.E18];[.$AF$25:.$AW$26];2;0)" office:value-type="float" office:value="1.3" calcext:value-type="float">
            <text:p>1.3</text:p>
          </table:table-cell>
          <table:table-cell table:style-name="ce677" table:formula="of:=HLOOKUP([.F18];[.$AF$25:.$AW$26];2;0)" office:value-type="float" office:value="2.3" calcext:value-type="float">
            <text:p>2.3</text:p>
          </table:table-cell>
          <table:table-cell/>
          <table:table-cell table:style-name="ce634" table:formula="of:=HLOOKUP([.H18];[.$AF$25:.$AW$26];2;0)" office:value-type="float" office:value="2.2" calcext:value-type="float">
            <text:p>2.2</text:p>
          </table:table-cell>
          <table:table-cell table:style-name="ce765" table:formula="of:=HLOOKUP([.I18];[.$AF$25:.$AW$26];2;0)" office:value-type="float" office:value="3.2" calcext:value-type="float">
            <text:p>3.2</text:p>
          </table:table-cell>
          <table:table-cell table:style-name="ce645" table:formula="of:=HLOOKUP([.J18];[.$AF$25:.$AW$26];2;0)" office:value-type="float" office:value="1.1" calcext:value-type="float">
            <text:p>1.1</text:p>
          </table:table-cell>
          <table:table-cell table:style-name="ce650" table:formula="of:=HLOOKUP([.K18];[.$AF$25:.$AW$26];2;0)" office:value-type="float" office:value="1.2" calcext:value-type="float">
            <text:p>1.2</text:p>
          </table:table-cell>
          <table:table-cell table:style-name="ce650" table:formula="of:=HLOOKUP([.L18];[.$AF$25:.$AW$26];2;0)" office:value-type="float" office:value="3.6" calcext:value-type="float">
            <text:p>3.6</text:p>
          </table:table-cell>
          <table:table-cell/>
          <table:table-cell table:style-name="ce609" table:formula="of:=HLOOKUP([.N18];[.$AF$25:.$AW$26];2;0)" office:value-type="float" office:value="2.1" calcext:value-type="float">
            <text:p>2.1</text:p>
          </table:table-cell>
          <table:table-cell table:style-name="ce616" table:formula="of:=HLOOKUP([.O18];[.$AF$25:.$AW$26];2;0)" office:value-type="float" office:value="1.2" calcext:value-type="float">
            <text:p>1.2</text:p>
          </table:table-cell>
          <table:table-cell table:style-name="ce786" table:formula="of:=HLOOKUP([.P18];[.$AF$25:.$AW$26];2;0)" office:value-type="float" office:value="3.1" calcext:value-type="float">
            <text:p>3.1</text:p>
          </table:table-cell>
          <table:table-cell table:style-name="ce626" table:formula="of:=HLOOKUP([.Q18];[.$AF$25:.$AW$26];2;0)" office:value-type="float" office:value="1.1" calcext:value-type="float">
            <text:p>1.1</text:p>
          </table:table-cell>
          <table:table-cell table:style-name="ce626" table:formula="of:=HLOOKUP([.R18];[.$AF$25:.$AW$26];2;0)" office:value-type="float" office:value="3.6" calcext:value-type="float">
            <text:p>3.6</text:p>
          </table:table-cell>
          <table:table-cell/>
          <table:table-cell table:style-name="ce555" table:formula="of:=HLOOKUP([.T18];[.$AF$25:.$AW$26];2;0)" office:value-type="float" office:value="2.1" calcext:value-type="float">
            <text:p>2.1</text:p>
          </table:table-cell>
          <table:table-cell table:style-name="ce568" table:formula="of:=HLOOKUP([.U18];[.$AF$25:.$AW$26];2;0)" office:value-type="float" office:value="1.2" calcext:value-type="float">
            <text:p>1.2</text:p>
          </table:table-cell>
          <table:table-cell table:style-name="ce577" table:formula="of:=HLOOKUP([.V18];[.$AF$25:.$AW$26];2;0)" office:value-type="float" office:value="1.1" calcext:value-type="float">
            <text:p>1.1</text:p>
          </table:table-cell>
          <table:table-cell table:style-name="ce811" table:formula="of:=HLOOKUP([.W18];[.$AF$25:.$AW$26];2;0)" office:value-type="float" office:value="2" calcext:value-type="float">
            <text:p>2.0</text:p>
          </table:table-cell>
          <table:table-cell table:style-name="ce587" table:formula="of:=HLOOKUP([.X18];[.$AF$25:.$AW$26];2;0)" office:value-type="float" office:value="3.2" calcext:value-type="float">
            <text:p>3.2</text:p>
          </table:table-cell>
          <table:table-cell/>
          <table:table-cell table:style-name="ce558" table:formula="of:=HLOOKUP([.Z18];[.$AF$25:.$AW$26];2;0)" office:value-type="float" office:value="2.1" calcext:value-type="float">
            <text:p>2.1</text:p>
          </table:table-cell>
          <table:table-cell table:style-name="ce569" table:formula="of:=HLOOKUP([.AA18];[.$AF$25:.$AW$26];2;0)" office:value-type="float" office:value="1.2" calcext:value-type="float">
            <text:p>1.2</text:p>
          </table:table-cell>
          <table:table-cell table:style-name="ce578" table:formula="of:=HLOOKUP([.AB18];[.$AF$25:.$AW$26];2;0)" office:value-type="float" office:value="1.1" calcext:value-type="float">
            <text:p>1.1</text:p>
          </table:table-cell>
          <table:table-cell table:style-name="ce588" table:formula="of:=HLOOKUP([.AC18];[.$AF$25:.$AW$26];2;0)" office:value-type="float" office:value="3" calcext:value-type="float">
            <text:p>3.0</text:p>
          </table:table-cell>
          <table:table-cell table:style-name="ce832" table:formula="of:=HLOOKUP([.AD18];[.$AF$25:.$AW$26];2;0)" office:value-type="float" office:value="4" calcext:value-type="float">
            <text:p>4.0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5'.Z30:'keys 5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30:'keys 5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30:'keys 5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30:'keys 5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30:'keys 5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35:'keys 5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35:'keys 5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35:'keys 5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35:'keys 5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35:'keys 5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25:'keys 5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25:'keys 5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25:'keys 5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25:'keys 5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25:'keys 5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Q25:'keys 5'.AT25 'keys 5'.AF25:'keys 5'.AO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6:'keys 5'.AI26 'keys 5'.AL26:'keys 5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5'.AJ26:'keys 5'.AM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5'.AP25:'keys 5'.AP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2:'keys 5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2:'keys 5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4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730"/>
        <table:table-column table:style-name="co1" table:default-cell-style-name="ce742"/>
        <table:table-column table:style-name="co1" table:default-cell-style-name="ce746"/>
        <table:table-column table:style-name="co1" table:number-columns-repeated="2" table:default-cell-style-name="ce750"/>
        <table:table-column table:style-name="co1" table:default-cell-style-name="ce29"/>
        <table:table-column table:style-name="co1" table:default-cell-style-name="ce730"/>
        <table:table-column table:style-name="co1" table:default-cell-style-name="Default"/>
        <table:table-column table:style-name="co1" table:default-cell-style-name="ce746"/>
        <table:table-column table:style-name="co1" table:number-columns-repeated="2" table:default-cell-style-name="ce750"/>
        <table:table-column table:style-name="co1" table:default-cell-style-name="ce29"/>
        <table:table-column table:style-name="co1" table:default-cell-style-name="ce536"/>
        <table:table-column table:style-name="co1" table:default-cell-style-name="ce742"/>
        <table:table-column table:style-name="co1" table:default-cell-style-name="ce538"/>
        <table:table-column table:style-name="co1" table:default-cell-style-name="ce750"/>
        <table:table-column table:style-name="co1" table:default-cell-style-name="Default"/>
        <table:table-column table:style-name="co1" table:default-cell-style-name="ce29"/>
        <table:table-column table:style-name="co1" table:default-cell-style-name="ce14"/>
        <table:table-column table:style-name="co1" table:default-cell-style-name="ce742"/>
        <table:table-column table:style-name="co1" table:default-cell-style-name="ce746"/>
        <table:table-column table:style-name="co1" table:default-cell-style-name="Default"/>
        <table:table-column table:style-name="co1" table:default-cell-style-name="ce829"/>
        <table:table-column table:style-name="co1" table:default-cell-style-name="ce29"/>
        <table:table-column table:style-name="co1" table:default-cell-style-name="ce730"/>
        <table:table-column table:style-name="co1" table:default-cell-style-name="ce742"/>
        <table:table-column table:style-name="co1" table:default-cell-style-name="ce746"/>
        <table:table-column table:style-name="co1" table:default-cell-style-name="ce750"/>
        <table:table-column table:style-name="co1" table:number-columns-repeated="33" table:default-cell-style-name="Default"/>
        <table:table-column table:style-name="co1" table:default-cell-style-name="ce153"/>
        <table:table-column table:style-name="co1" table:number-columns-repeated="36" table:default-cell-style-name="Default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/>
          <table:table-cell table:style-name="ce536" table:number-columns-repeated="3"/>
          <table:table-cell/>
          <table:table-cell table:style-name="ce790" office:value-type="string" calcext:value-type="string">
            <text:p>start priorities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number-columns-repeated="2"/>
          <table:table-cell table:style-name="ce790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792" office:value-type="float" office:value="14" calcext:value-type="float">
            <text:p>14</text:p>
          </table:table-cell>
          <table:table-cell table:style-name="ce793" office:value-type="float" office:value="6" calcext:value-type="float">
            <text:p>6</text:p>
          </table:table-cell>
          <table:table-cell table:style-name="ce792" office:value-type="float" office:value="3" calcext:value-type="float">
            <text:p>3</text:p>
          </table:table-cell>
          <table:table-cell table:style-name="ce793" office:value-type="float" office:value="5" calcext:value-type="float">
            <text:p>5</text:p>
          </table:table-cell>
          <table:table-cell table:style-name="ce792" office:value-type="float" office:value="13" calcext:value-type="float">
            <text:p>13</text:p>
          </table:table-cell>
          <table:table-cell table:style-name="Default"/>
          <table:table-cell table:style-name="ce812" table:formula="of:=SUM([.B25];[.H25];[.N25];[.T25];[.Z25];[.Z30];[.T30];[.N30];[.H30];[.B30];[.B35];[.H35];[.N35];[.T35];[.Z35])/[.$Z$6]" office:value-type="float" office:value="57" calcext:value-type="float">
            <text:p>57.0</text:p>
          </table:table-cell>
          <table:table-cell table:style-name="ce812" table:formula="of:=SUM([.C25];[.I25];[.O25];[.U25];[.AA25];[.AA30];[.U30];[.O30];[.I30];[.C30];[.C35];[.I35];[.O35];[.U35];[.AA35])/[.$Z$6]" office:value-type="float" office:value="38.8" calcext:value-type="float">
            <text:p>38.8</text:p>
          </table:table-cell>
          <table:table-cell table:style-name="ce812" table:formula="of:=SUM([.D25];[.J25];[.P25];[.V25];[.AB25];[.AB30];[.V30];[.P30];[.J30];[.D30];[.D35];[.J35];[.P35];[.V35];[.AB35])/[.$Z$6]" office:value-type="float" office:value="27.6" calcext:value-type="float">
            <text:p>27.6</text:p>
          </table:table-cell>
          <table:table-cell table:style-name="ce812" table:formula="of:=SUM([.E25];[.K25];[.Q25];[.W25];[.AC25];[.AC30];[.W30];[.Q30];[.K30];[.E30];[.E35];[.K35];[.Q35];[.W35];[.AC35])/[.$Z$6]" office:value-type="float" office:value="32.8" calcext:value-type="float">
            <text:p>32.8</text:p>
          </table:table-cell>
          <table:table-cell table:style-name="ce812" table:formula="of:=SUM([.F25];[.L25];[.R25];[.X25];[.AD25];[.AD30];[.X30];[.R30];[.L30];[.F30];[.F35];[.L35];[.R35];[.X35];[.AD35])/[.$Z$6]" office:value-type="float" office:value="48.7" calcext:value-type="float">
            <text:p>48.7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}}</text:p>
          </table:table-cell>
          <table:covered-table-cell table:number-columns-repeated="28" table:style-name="ce189"/>
          <table:table-cell table:style-name="ce841"/>
          <table:table-cell table:style-name="ce189"/>
          <table:table-cell table:style-name="Default"/>
          <table:table-cell table:style-name="ce189" table:number-columns-repeated="27"/>
          <table:table-cell table:number-columns-repeated="9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793" office:value-type="float" office:value="7" calcext:value-type="float">
            <text:p>7</text:p>
          </table:table-cell>
          <table:table-cell table:style-name="ce792" office:value-type="float" office:value="2" calcext:value-type="float">
            <text:p>2</text:p>
          </table:table-cell>
          <table:table-cell table:style-name="ce792" office:value-type="float" office:value="0" calcext:value-type="float">
            <text:p>0</text:p>
          </table:table-cell>
          <table:table-cell table:style-name="ce792" office:value-type="float" office:value="1" calcext:value-type="float">
            <text:p>1</text:p>
          </table:table-cell>
          <table:table-cell table:style-name="ce793" office:value-type="float" office:value="8" calcext:value-type="float">
            <text:p>8</text:p>
          </table:table-cell>
          <table:table-cell table:style-name="Default"/>
          <table:table-cell table:style-name="ce812" table:formula="of:=SUM([.B26];[.H26];[.N26];[.T26];[.Z26];[.Z31];[.T31];[.N31];[.H31];[.B31];[.B36];[.H36];[.N36];[.T36];[.Z36])/[.$Z$6]" office:value-type="float" office:value="35.4" calcext:value-type="float">
            <text:p>35.4</text:p>
          </table:table-cell>
          <table:table-cell table:style-name="ce812" table:formula="of:=SUM([.C26];[.I26];[.O26];[.U26];[.AA26];[.AA31];[.U31];[.O31];[.I31];[.C31];[.C36];[.I36];[.O36];[.U36];[.AA36])/[.$Z$6]" office:value-type="float" office:value="26.1" calcext:value-type="float">
            <text:p>26.1</text:p>
          </table:table-cell>
          <table:table-cell table:style-name="ce812" table:formula="of:=SUM([.D26];[.J26];[.P26];[.V26];[.AB26];[.AB31];[.V31];[.P31];[.J31];[.D31];[.D36];[.J36];[.P36];[.V36];[.AB36])/[.$Z$6]" office:value-type="float" office:value="23.1" calcext:value-type="float">
            <text:p>23.1</text:p>
          </table:table-cell>
          <table:table-cell table:style-name="ce812" table:formula="of:=SUM([.E26];[.K26];[.Q26];[.W26];[.AC26];[.AC31];[.W31];[.Q31];[.K31];[.E31];[.E36];[.K36];[.Q36];[.W36];[.AC36])/[.$Z$6]" office:value-type="float" office:value="23.3" calcext:value-type="float">
            <text:p>23.3</text:p>
          </table:table-cell>
          <table:table-cell table:style-name="ce812" table:formula="of:=SUM([.F26];[.L26];[.R26];[.X26];[.AD26];[.AD31];[.X31];[.R31];[.L31];[.F31];[.F36];[.L36];[.R36];[.X36];[.AD36])/[.$Z$6]" office:value-type="float" office:value="36.9" calcext:value-type="float">
            <text:p>36.9</text:p>
          </table:table-cell>
          <table:table-cell/>
          <table:covered-table-cell table:number-columns-repeated="29" table:style-name="ce189"/>
          <table:table-cell table:style-name="ce189" table:number-columns-repeated="30"/>
          <table:table-cell table:number-columns-repeated="9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792" office:value-type="float" office:value="11" calcext:value-type="float">
            <text:p>11</text:p>
          </table:table-cell>
          <table:table-cell table:style-name="ce793" office:value-type="float" office:value="10" calcext:value-type="float">
            <text:p>10</text:p>
          </table:table-cell>
          <table:table-cell table:style-name="ce793" office:value-type="float" office:value="9" calcext:value-type="float">
            <text:p>9</text:p>
          </table:table-cell>
          <table:table-cell table:style-name="ce792" office:value-type="float" office:value="4" calcext:value-type="float">
            <text:p>4</text:p>
          </table:table-cell>
          <table:table-cell table:style-name="ce792" office:value-type="float" office:value="12" calcext:value-type="float">
            <text:p>12</text:p>
          </table:table-cell>
          <table:table-cell table:style-name="Default"/>
          <table:table-cell table:style-name="ce812" table:formula="of:=SUM([.B27];[.H27];[.N27];[.T27];[.Z27];[.Z32];[.T32];[.N32];[.H32];[.B32];[.B37];[.H37];[.N37];[.T37];[.Z37])/[.$Z$6]" office:value-type="float" office:value="45.2" calcext:value-type="float">
            <text:p>45.2</text:p>
          </table:table-cell>
          <table:table-cell table:style-name="ce812" table:formula="of:=SUM([.C27];[.I27];[.O27];[.U27];[.AA27];[.AA32];[.U32];[.O32];[.I32];[.C32];[.C37];[.I37];[.O37];[.U37];[.AA37])/[.$Z$6]" office:value-type="float" office:value="44.4" calcext:value-type="float">
            <text:p>44.4</text:p>
          </table:table-cell>
          <table:table-cell table:style-name="ce812" table:formula="of:=SUM([.D27];[.J27];[.P27];[.V27];[.AB27];[.AB32];[.V32];[.P32];[.J32];[.D32];[.D37];[.J37];[.P37];[.V37];[.AB37])/[.$Z$6]" office:value-type="float" office:value="41.7" calcext:value-type="float">
            <text:p>41.7</text:p>
          </table:table-cell>
          <table:table-cell table:style-name="ce812" table:formula="of:=SUM([.E27];[.K27];[.Q27];[.W27];[.AC27];[.AC32];[.W32];[.Q32];[.K32];[.E32];[.E37];[.K37];[.Q37];[.W37];[.AC37])/[.$Z$6]" office:value-type="float" office:value="33.8" calcext:value-type="float">
            <text:p>33.8</text:p>
          </table:table-cell>
          <table:table-cell table:style-name="ce812" table:formula="of:=SUM([.F27];[.L27];[.R27];[.X27];[.AD27];[.AD32];[.X32];[.R32];[.L32];[.F32];[.F37];[.L37];[.R37];[.X37];[.AD37])/[.$Z$6]" office:value-type="float" office:value="48.7" calcext:value-type="float">
            <text:p>48.7</text:p>
          </table:table-cell>
          <table:table-cell table:style-name="ce184"/>
          <table:covered-table-cell table:number-columns-repeated="29" table:style-name="ce189"/>
          <table:table-cell table:style-name="ce841"/>
          <table:table-cell table:style-name="ce189" table:number-columns-repeated="29"/>
          <table:table-cell table:number-columns-repeated="9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99" table:number-columns-spanned="1" table:number-rows-spanned="2"/>
          <table:table-cell/>
          <table:table-cell table:style-name="ce537"/>
          <table:table-cell table:style-name="ce641"/>
          <table:table-cell table:style-name="ce538"/>
          <table:table-cell/>
          <table:table-cell table:style-name="Default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 table:style-name="Default"/>
          <table:table-cell table:style-name="ce682"/>
          <table:table-cell table:style-name="ce692"/>
          <table:table-cell table:style-name="ce682"/>
          <table:table-cell table:style-name="Default"/>
          <table:table-cell table:style-name="ce184" table:number-columns-repeated="2"/>
          <table:covered-table-cell table:style-name="ce184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54"/>
          <table:table-cell/>
          <table:covered-table-cell table:style-name="ce54"/>
          <table:covered-table-cell table:number-columns-repeated="2" table:style-name="ce590"/>
          <table:covered-table-cell table:style-name="ce99"/>
          <table:table-cell table:style-name="ce4" table:number-columns-repeated="4"/>
          <table:table-cell/>
          <table:table-cell table:style-name="Default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 table:style-name="Default"/>
          <table:table-cell table:style-name="ce813" office:value-type="float" office:value="1" calcext:value-type="float">
            <text:p>1.0</text:p>
          </table:table-cell>
          <table:table-cell table:style-name="Default" table:number-columns-repeated="3"/>
          <table:table-cell table:number-columns-repeated="2"/>
          <table:covered-table-cell table:number-columns-repeated="13"/>
          <table:covered-table-cell table:number-columns-repeated="3" table:style-name="ce184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33"/>
          <table:table-cell table:style-name="Default"/>
          <table:table-cell table:number-columns-repeated="36"/>
        </table:table-row>
        <table:table-row table:style-name="ro1">
          <table:table-cell table:style-name="ce540"/>
          <table:table-cell table:style-name="ce543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94"/>
          <table:table-cell office:value-type="float" office:value="9" calcext:value-type="float">
            <text:p>9</text:p>
          </table:table-cell>
          <table:table-cell table:style-name="ce543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94"/>
          <table:table-cell table:style-name="ce14" office:value-type="float" office:value="9" calcext:value-type="float">
            <text:p>9</text:p>
          </table:table-cell>
          <table:table-cell table:style-name="ce33" office:value-type="float" office:value="3" calcext:value-type="float">
            <text:p>3</text:p>
          </table:table-cell>
          <table:table-cell table:style-name="ce543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2]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9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X$2]" office:value-type="float" office:value="13" calcext:value-type="float">
            <text:p>13</text:p>
          </table:table-cell>
          <table:table-cell/>
          <table:table-cell table:style-name="ce139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39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39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39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39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39"/>
          <table:table-cell table:style-name="ce139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39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39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39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139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139"/>
          <table:table-cell table:style-name="ce139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139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139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39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39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139"/>
          <table:table-cell table:style-name="ce139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39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39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39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139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139"/>
          <table:table-cell table:style-name="ce139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139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139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139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139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177" table:number-columns-repeated="2"/>
          <table:table-cell table:style-name="ce177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829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594"/>
          <table:table-cell table:style-name="ce1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74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829" office:value-type="float" office:value="6" calcext:value-type="float">
            <text:p>6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829" office:value-type="float" office:value="7" calcext:value-type="float">
            <text:p>7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139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39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39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39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39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39"/>
          <table:table-cell table:style-name="ce139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139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139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139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139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39"/>
          <table:table-cell table:style-name="ce139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139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39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39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139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139"/>
          <table:table-cell table:style-name="ce139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39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139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139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139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139"/>
          <table:table-cell table:style-name="ce139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139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139" table:formula="of:=COM.MICROSOFT.CONCAT(&quot;&quot;&quot;&quot;;[.$D$3]; &quot;&quot;&quot;: &quot;; [.AB9])" office:value-type="string" office:string-value="&quot;7&quot;: 5" calcext:value-type="string">
            <text:p>"7": 5</text:p>
          </table:table-cell>
          <table:table-cell table:style-name="ce139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39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177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" calcext:value-type="string">
            <text:p>"1": { "0": 9, "1": 6, "2": 1, "3": 3, "4": 4, "5": 7, "6": 8, "7": 6, "8": 2, "9": 5, "10": 13, "11": 14, "12": 12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33" office:value-type="float" office:value="14" calcext:value-type="float">
            <text:p>14</text:p>
          </table:table-cell>
          <table:table-cell table:style-name="ce40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829" office:value-type="float" office:value="10" calcext:value-type="float">
            <text:p>10</text:p>
          </table:table-cell>
          <table:table-cell table:style-name="ce829" office:value-type="float" office:value="14" calcext:value-type="float">
            <text:p>14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750" office:value-type="float" office:value="14" calcext:value-type="float">
            <text:p>14</text:p>
          </table:table-cell>
          <table:table-cell/>
          <table:table-cell table:style-name="ce139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39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139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139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39"/>
          <table:table-cell table:style-name="ce139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139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139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39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39"/>
          <table:table-cell table:style-name="ce139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139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139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139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139"/>
          <table:table-cell table:style-name="ce139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139" table:formula="of:=COM.MICROSOFT.CONCAT(&quot;&quot;&quot;&quot;;[.$C$4]; &quot;&quot;&quot;: &quot;; [.U10])" office:value-type="string" office:string-value="&quot;11&quot;: 14" calcext:value-type="string">
            <text:p>"11": 14</text:p>
          </table:table-cell>
          <table:table-cell table:style-name="ce139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139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139"/>
          <table:table-cell table:style-name="ce139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139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39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139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139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style-name="ce177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ce731" table:number-columns-repeated="29"/>
          <table:table-cell table:style-name="ce700"/>
          <table:table-cell table:style-name="ce177" table:number-columns-repeated="27"/>
          <table:table-cell table:style-name="ce151" table:number-columns-repeated="2"/>
          <table:table-cell table:style-name="ce177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" calcext:value-type="string">
            <text:p>"3": { "0": 3, "1": 2, "2": 1, "3": 5, "4": 8, "5": 5, "6": 4, "7": 6, "8": 7, "9": 9, "10": 13, "11": 14, "12": 12, "13": 10, "14": 11}</text:p>
          </table:table-cell>
          <table:table-cell table:number-columns-repeated="36"/>
        </table:table-row>
        <table:table-row table:style-name="ro1">
          <table:table-cell table:style-name="ce541"/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746" office:value-type="float" office:value="4" calcext:value-type="float">
            <text:p>4</text:p>
          </table:table-cell>
          <table:table-cell table:style-name="ce829" office:value-type="float" office:value="9" calcext:value-type="float">
            <text:p>9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/>
          <table:table-cell table:style-name="ce141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141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141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41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141" table:formula="of:=COM.MICROSOFT.CONCAT(&quot;&quot;&quot;&quot;;[.$F$2]; &quot;&quot;&quot;: &quot;; [.F12])" office:value-type="string" office:string-value="&quot;4&quot;: 10" calcext:value-type="string">
            <text:p>"4": 10</text:p>
          </table:table-cell>
          <table:table-cell table:style-name="ce141"/>
          <table:table-cell table:style-name="ce141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41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141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41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41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41"/>
          <table:table-cell table:style-name="ce141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41" table:formula="of:=COM.MICROSOFT.CONCAT(&quot;&quot;&quot;&quot;;[.$C$2]; &quot;&quot;&quot;: &quot;; [.O12])" office:value-type="string" office:string-value="&quot;1&quot;: 8" calcext:value-type="string">
            <text:p>"1": 8</text:p>
          </table:table-cell>
          <table:table-cell table:style-name="ce141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41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141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41"/>
          <table:table-cell table:style-name="ce141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141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41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41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141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141"/>
          <table:table-cell table:style-name="ce141" table:formula="of:=COM.MICROSOFT.CONCAT(&quot;&quot;&quot;&quot;;[.$B$2]; &quot;&quot;&quot;: &quot;; [.Z12])" office:value-type="string" office:string-value="&quot;0&quot;: 13" calcext:value-type="string">
            <text:p>"0": 13</text:p>
          </table:table-cell>
          <table:table-cell table:style-name="ce141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50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41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141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151" table:number-columns-repeated="2"/>
          <table:table-cell table:style-name="ce154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4": { "0": 7, "1": 3, "2": 2, "3": 1, "4": 13, "5": 6, "6": 4, "7": 5, "8": 9, "9": 8, "10": 10, "11": 11, "12": 12, "13": 13, "14": 14}</text:p>
          </table:table-cell>
          <table:table-cell table:style-name="ce700" table:number-columns-repeated="26"/>
          <table:table-cell table:number-columns-repeated="10"/>
        </table:table-row>
        <table:table-row table:style-name="ro1">
          <table:table-cell table:style-name="ce540"/>
          <table:table-cell table:style-name="ce15" table:formula="of:=[.$T$3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829" office:value-type="float" office:value="7" calcext:value-type="float">
            <text:p>7</text:p>
          </table:table-cell>
          <table:table-cell table:style-name="ce594"/>
          <table:table-cell table:style-name="ce14" office:value-type="float" office:value="6" calcext:value-type="float">
            <text:p>6</text:p>
          </table:table-cell>
          <table:table-cell table:style-name="ce543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29" office:value-type="float" office:value="7" calcext:value-type="float">
            <text:p>7</text:p>
          </table:table-cell>
          <table:table-cell table:style-name="ce594"/>
          <table:table-cell table:style-name="ce1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43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3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table:formula="of:=[.$X$3]" office:value-type="float" office:value="8" calcext:value-type="float">
            <text:p>8</text:p>
          </table:table-cell>
          <table:table-cell/>
          <table:table-cell table:style-name="ce141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141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41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41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41" table:formula="of:=COM.MICROSOFT.CONCAT(&quot;&quot;&quot;&quot;;[.$F$3]; &quot;&quot;&quot;: &quot;; [.F13])" office:value-type="string" office:string-value="&quot;9&quot;: 7" calcext:value-type="string">
            <text:p>"9": 7</text:p>
          </table:table-cell>
          <table:table-cell table:style-name="ce141"/>
          <table:table-cell table:style-name="ce141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141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41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41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41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141"/>
          <table:table-cell table:style-name="ce141" table:formula="of:=COM.MICROSOFT.CONCAT(&quot;&quot;&quot;&quot;;[.$B$3]; &quot;&quot;&quot;: &quot;; [.N13])" office:value-type="string" office:string-value="&quot;5&quot;: 5" calcext:value-type="string">
            <text:p>"5": 5</text:p>
          </table:table-cell>
          <table:table-cell table:style-name="ce141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41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41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41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141"/>
          <table:table-cell table:style-name="ce141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41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41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41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41" table:formula="of:=COM.MICROSOFT.CONCAT(&quot;&quot;&quot;&quot;;[.$F$3]; &quot;&quot;&quot;: &quot;; [.X13])" office:value-type="string" office:string-value="&quot;9&quot;: 10" calcext:value-type="string">
            <text:p>"9": 10</text:p>
          </table:table-cell>
          <table:table-cell table:style-name="ce141"/>
          <table:table-cell table:style-name="ce141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141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141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41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41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177" table:number-columns-repeated="3"/>
          <table:table-cell table:number-columns-repeated="36"/>
        </table:table-row>
        <table:table-row table:style-name="ro1">
          <table:table-cell table:style-name="ce540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style-name="ce829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94"/>
          <table:table-cell table:style-name="ce14" office:value-type="float" office:value="11" calcext:value-type="float">
            <text:p>11</text:p>
          </table:table-cell>
          <table:table-cell table:style-name="ce33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829" office:value-type="float" office:value="4" calcext:value-type="float">
            <text:p>4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33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office:value-type="float" office:value="8" calcext:value-type="float">
            <text:p>8</text:p>
          </table:table-cell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7" calcext:value-type="float">
            <text:p>7</text:p>
          </table:table-cell>
          <table:table-cell table:style-name="ce829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594"/>
          <table:table-cell table:style-name="ce14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829" office:value-type="float" office:value="10" calcext:value-type="float">
            <text:p>10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141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141" table:formula="of:=COM.MICROSOFT.CONCAT(&quot;&quot;&quot;&quot;;[.$C$4]; &quot;&quot;&quot;: &quot;; [.C14])" office:value-type="string" office:string-value="&quot;11&quot;: 13" calcext:value-type="string">
            <text:p>"11": 13</text:p>
          </table:table-cell>
          <table:table-cell table:style-name="ce141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141" table:formula="of:=COM.MICROSOFT.CONCAT(&quot;&quot;&quot;&quot;;[.$E$4]; &quot;&quot;&quot;: &quot;; [.E14])" office:value-type="string" office:string-value="&quot;13&quot;: 6" calcext:value-type="string">
            <text:p>"13": 6</text:p>
          </table:table-cell>
          <table:table-cell table:style-name="ce141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141"/>
          <table:table-cell table:style-name="ce141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141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141" table:formula="of:=COM.MICROSOFT.CONCAT(&quot;&quot;&quot;&quot;;[.$D$4]; &quot;&quot;&quot;: &quot;; [.J14])" office:value-type="string" office:string-value="&quot;12&quot;: 10" calcext:value-type="string">
            <text:p>"12": 10</text:p>
          </table:table-cell>
          <table:table-cell table:style-name="ce141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141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141"/>
          <table:table-cell table:style-name="ce141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41" table:formula="of:=COM.MICROSOFT.CONCAT(&quot;&quot;&quot;&quot;;[.$C$4]; &quot;&quot;&quot;: &quot;; [.O14])" office:value-type="string" office:string-value="&quot;11&quot;: 6" calcext:value-type="string">
            <text:p>"11": 6</text:p>
          </table:table-cell>
          <table:table-cell table:style-name="ce141" table:formula="of:=COM.MICROSOFT.CONCAT(&quot;&quot;&quot;&quot;;[.$D$4]; &quot;&quot;&quot;: &quot;; [.P14])" office:value-type="string" office:string-value="&quot;12&quot;: 7" calcext:value-type="string">
            <text:p>"12": 7</text:p>
          </table:table-cell>
          <table:table-cell table:style-name="ce141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41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41"/>
          <table:table-cell table:style-name="ce141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141" table:formula="of:=COM.MICROSOFT.CONCAT(&quot;&quot;&quot;&quot;;[.$C$4]; &quot;&quot;&quot;: &quot;; [.U14])" office:value-type="string" office:string-value="&quot;11&quot;: 11" calcext:value-type="string">
            <text:p>"11": 11</text:p>
          </table:table-cell>
          <table:table-cell table:style-name="ce141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141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141" table:formula="of:=COM.MICROSOFT.CONCAT(&quot;&quot;&quot;&quot;;[.$F$4]; &quot;&quot;&quot;: &quot;; [.X14])" office:value-type="string" office:string-value="&quot;14&quot;: 12" calcext:value-type="string">
            <text:p>"14": 12</text:p>
          </table:table-cell>
          <table:table-cell table:style-name="ce141"/>
          <table:table-cell table:style-name="ce141" table:formula="of:=COM.MICROSOFT.CONCAT(&quot;&quot;&quot;&quot;;[.$B$4]; &quot;&quot;&quot;: &quot;; [.Z14])" office:value-type="string" office:string-value="&quot;10&quot;: 11" calcext:value-type="string">
            <text:p>"10": 11</text:p>
          </table:table-cell>
          <table:table-cell table:style-name="ce141" table:formula="of:=COM.MICROSOFT.CONCAT(&quot;&quot;&quot;&quot;;[.$C$4]; &quot;&quot;&quot;: &quot;; [.AA14])" office:value-type="string" office:string-value="&quot;11&quot;: 12" calcext:value-type="string">
            <text:p>"11": 12</text:p>
          </table:table-cell>
          <table:table-cell table:style-name="ce141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141" table:formula="of:=COM.MICROSOFT.CONCAT(&quot;&quot;&quot;&quot;;[.$E$4]; &quot;&quot;&quot;: &quot;; [.AC14])" office:value-type="string" office:string-value="&quot;13&quot;: 10" calcext:value-type="string">
            <text:p>"13": 10</text:p>
          </table:table-cell>
          <table:table-cell table:style-name="ce141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style-name="ce177" table:number-columns-repeated="2"/>
          <table:table-cell table:style-name="ce177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ce731" table:number-columns-repeated="29"/>
          <table:table-cell/>
          <table:table-cell table:style-name="ce177" table:number-columns-repeated="32"/>
          <table:table-cell table:number-columns-repeated="36"/>
        </table:table-row>
        <table:table-row table:style-name="ro1">
          <table:table-cell table:style-name="ce540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40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40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40" office:value-type="float" office:value="10" calcext:value-type="float">
            <text:p>10</text:p>
          </table:table-cell>
          <table:table-cell table:style-name="ce829" office:value-type="float" office:value="9" calcext:value-type="float">
            <text:p>9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829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829" office:value-type="float" office:value="10" calcext:value-type="float">
            <text:p>10</text:p>
          </table:table-cell>
          <table:table-cell table:style-name="ce829" office:value-type="float" office:value="11" calcext:value-type="float">
            <text:p>11</text:p>
          </table:table-cell>
          <table:table-cell table:style-name="ce540"/>
          <table:table-cell table:style-name="ce142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142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142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142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42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142"/>
          <table:table-cell table:style-name="ce142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42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142" table:formula="of:=COM.MICROSOFT.CONCAT(&quot;&quot;&quot;&quot;;[.$D$2]; &quot;&quot;&quot;: &quot;; [.J16])" office:value-type="string" office:string-value="&quot;2&quot;: 8" calcext:value-type="string">
            <text:p>"2": 8</text:p>
          </table:table-cell>
          <table:table-cell table:style-name="ce142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142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142"/>
          <table:table-cell table:style-name="ce142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42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42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142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142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42"/>
          <table:table-cell table:style-name="ce142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142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142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42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142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42"/>
          <table:table-cell table:style-name="ce142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142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142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142" table:formula="of:=COM.MICROSOFT.CONCAT(&quot;&quot;&quot;&quot;;[.$E$2]; &quot;&quot;&quot;: &quot;; [.AC16])" office:value-type="string" office:string-value="&quot;3&quot;: 10" calcext:value-type="string">
            <text:p>"3": 10</text:p>
          </table:table-cell>
          <table:table-cell table:style-name="ce142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177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" calcext:value-type="string">
            <text:p>"5": { "0": 14, "1": 9, "2": 4, "3": 5, "4": 10, "5": 7, "6": 1, "7": 2, "8": 3, "9": 7, "10": 12, "11": 13, "12": 11, "13": 6, "14": 8}</text:p>
          </table:table-cell>
          <table:table-cell table:number-columns-repeated="36"/>
        </table:table-row>
        <table:table-row table:style-name="ro1">
          <table:table-cell table:style-name="ce540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829"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594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40"/>
          <table:table-cell table:style-name="ce142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42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142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42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42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142"/>
          <table:table-cell table:style-name="ce142" table:formula="of:=COM.MICROSOFT.CONCAT(&quot;&quot;&quot;&quot;;[.$B$3]; &quot;&quot;&quot;: &quot;; [.H17])" office:value-type="string" office:string-value="&quot;5&quot;: 12" calcext:value-type="string">
            <text:p>"5": 12</text:p>
          </table:table-cell>
          <table:table-cell table:style-name="ce142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142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42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42" table:formula="of:=COM.MICROSOFT.CONCAT(&quot;&quot;&quot;&quot;;[.$F$3]; &quot;&quot;&quot;: &quot;; [.L17])" office:value-type="string" office:string-value="&quot;9&quot;: 6" calcext:value-type="string">
            <text:p>"9": 6</text:p>
          </table:table-cell>
          <table:table-cell table:style-name="ce142"/>
          <table:table-cell table:style-name="ce142" table:formula="of:=COM.MICROSOFT.CONCAT(&quot;&quot;&quot;&quot;;[.$B$3]; &quot;&quot;&quot;: &quot;; [.N17])" office:value-type="string" office:string-value="&quot;5&quot;: 10" calcext:value-type="string">
            <text:p>"5": 10</text:p>
          </table:table-cell>
          <table:table-cell table:style-name="ce142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42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42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42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142"/>
          <table:table-cell table:style-name="ce142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142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42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42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42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142"/>
          <table:table-cell table:style-name="ce142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42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142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42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142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177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" calcext:value-type="string">
            <text:p>"6": { "0": 14, "1": 8, "2": 3, "3": 5, "4": 13, "5": 6, "6": 2, "7": 1, "8": 2, "9": 7, "10": 11, "11": 9, "12": 10, "13": 4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5" table:formula="of:=[.$T$4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94"/>
          <table:table-cell office:value-type="float" office:value="7" calcext:value-type="float">
            <text:p>7</text:p>
          </table:table-cell>
          <table:table-cell table:style-name="ce543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43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11" calcext:value-type="float">
            <text:p>11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4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594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5" table:formula="of:=[.$X$4]" office:value-type="float" office:value="12" calcext:value-type="float">
            <text:p>12</text:p>
          </table:table-cell>
          <table:table-cell table:style-name="ce540"/>
          <table:table-cell table:style-name="ce142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142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42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42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42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42"/>
          <table:table-cell table:style-name="ce142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142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42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42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42" table:formula="of:=COM.MICROSOFT.CONCAT(&quot;&quot;&quot;&quot;;[.$F$4]; &quot;&quot;&quot;: &quot;; [.L18])" office:value-type="string" office:string-value="&quot;14&quot;: 9" calcext:value-type="string">
            <text:p>"14": 9</text:p>
          </table:table-cell>
          <table:table-cell table:style-name="ce142"/>
          <table:table-cell table:style-name="ce142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42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42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42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42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142"/>
          <table:table-cell table:style-name="ce142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42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42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42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42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42"/>
          <table:table-cell table:style-name="ce142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142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142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142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42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177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" calcext:value-type="string">
            <text:p>"7": { "0": 14, "1": 8, "2": 4, "3": 9, "4": 13, "5": 5, "6": 2, "7": 0, "8": 1, "9": 10, "10": 11, "11": 6, "12": 7, "13": 3, "14": 12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90" office:value-type="string" calcext:value-type="string">
            <text:p><text:s text:c="43"/>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number-columns-repeated="2"/>
          <table:table-cell table:style-name="ce177" table:number-columns-repeated="31"/>
          <table:table-cell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" calcext:value-type="string">
            <text:p>"8": { "0": 13, "1": 5, "2": 3, "3": 6, "4": 14, "5": 4, "6": 2, "7": 1, "8": 1, "9": 10, "10": 8, "11": 11, "12": 7, "13": 9, "14": 12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ce12" table:number-columns-spanned="29" table:number-rows-spanned="3"/>
          <table:covered-table-cell table:number-columns-repeated="28" table:style-name="ce18"/>
          <table:table-cell table:style-name="ce189"/>
          <table:table-cell table:style-name="ce143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}</text:p>
          </table:table-cell>
          <table:covered-table-cell table:number-columns-repeated="28" table:style-name="ce311"/>
          <table:table-cell table:style-name="ce177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2">
          <table:table-cell table:style-name="ce540"/>
          <table:covered-table-cell table:number-columns-repeated="29" table:style-name="ce18"/>
          <table:table-cell table:style-name="ce189"/>
          <table:covered-table-cell table:number-columns-repeated="29" table:style-name="ce311"/>
          <table:table-cell table:style-name="ce177" table:number-columns-repeated="3"/>
          <table:table-cell table:number-columns-repeated="36"/>
        </table:table-row>
        <table:table-row table:style-name="ro2">
          <table:table-cell table:style-name="ce540"/>
          <table:covered-table-cell table:number-columns-repeated="29" table:style-name="ce18"/>
          <table:table-cell table:style-name="ce189"/>
          <table:covered-table-cell table:number-columns-repeated="29" table:style-name="ce311"/>
          <table:table-cell table:style-name="ce177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2"/>
          <table:covered-table-cell table:number-columns-repeated="29" table:style-name="ce177"/>
          <table:table-cell table:style-name="ce177" table:number-columns-repeated="3"/>
          <table:table-cell table:number-columns-repeated="36"/>
        </table:table-row>
        <table:table-row table:style-name="ro2">
          <table:table-cell/>
          <table:table-cell table:style-name="ce548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39"/>
          <table:table-cell table:style-name="ce39" table:number-columns-repeated="4"/>
          <table:table-cell table:style-name="ce605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39"/>
          <table:table-cell table:style-name="ce39" table:number-columns-repeated="4"/>
          <table:table-cell table:style-name="ce548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39"/>
          <table:table-cell table:style-name="ce39" table:number-columns-repeated="4"/>
          <table:table-cell table:style-name="ce605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39"/>
          <table:table-cell table:style-name="ce39" table:number-columns-repeated="4"/>
          <table:table-cell table:style-name="ce548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39"/>
          <table:table-cell table:style-name="ce39" table:number-columns-repeated="3"/>
          <table:table-cell table:style-name="ce540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" calcext:value-type="string">
            <text:p>"10": { "0": 13, "1": 14, "2": 10, "3": 11, "4": 12, "5": 9, "6": 8, "7": 4, "8": 5, "9": 6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212" table:formula="of:=HLOOKUP([.B8];[.$AF$25:.$AW$26];2;0)" office:value-type="float" office:value="4.5" calcext:value-type="float">
            <text:p>4.5</text:p>
          </table:table-cell>
          <table:table-cell table:style-name="ce220" table:formula="of:=HLOOKUP([.C8];[.$AF$25:.$AW$26];2;0)" office:value-type="float" office:value="1.1" calcext:value-type="float">
            <text:p>1.1</text:p>
          </table:table-cell>
          <table:table-cell table:style-name="ce223" table:formula="of:=HLOOKUP([.D8];[.$AF$25:.$AW$26];2;0)" office:value-type="float" office:value="1.2" calcext:value-type="float">
            <text:p>1.2</text:p>
          </table:table-cell>
          <table:table-cell table:style-name="ce226" table:formula="of:=HLOOKUP([.E8];[.$AF$25:.$AW$26];2;0)" office:value-type="float" office:value="1.3" calcext:value-type="float">
            <text:p>1.3</text:p>
          </table:table-cell>
          <table:table-cell table:style-name="ce226" table:formula="of:=HLOOKUP([.F8];[.$AF$25:.$AW$26];2;0)" office:value-type="float" office:value="2" calcext:value-type="float">
            <text:p>2.0</text:p>
          </table:table-cell>
          <table:table-cell/>
          <table:table-cell table:style-name="ce229" table:formula="of:=HLOOKUP([.H8];[.$AF$25:.$AW$26];2;0)" office:value-type="float" office:value="3" calcext:value-type="float">
            <text:p>3.0</text:p>
          </table:table-cell>
          <table:table-cell table:style-name="ce235" table:formula="of:=HLOOKUP([.I8];[.$AF$25:.$AW$26];2;0)" office:value-type="float" office:value="2.1" calcext:value-type="float">
            <text:p>2.1</text:p>
          </table:table-cell>
          <table:table-cell table:style-name="ce241" table:formula="of:=HLOOKUP([.J8];[.$AF$25:.$AW$26];2;0)" office:value-type="float" office:value="1.1" calcext:value-type="float">
            <text:p>1.1</text:p>
          </table:table-cell>
          <table:table-cell table:style-name="ce244" table:formula="of:=HLOOKUP([.K8];[.$AF$25:.$AW$26];2;0)" office:value-type="float" office:value="1.3" calcext:value-type="float">
            <text:p>1.3</text:p>
          </table:table-cell>
          <table:table-cell table:style-name="ce244" table:formula="of:=HLOOKUP([.L8];[.$AF$25:.$AW$26];2;0)" office:value-type="float" office:value="1.6" calcext:value-type="float">
            <text:p>1.6</text:p>
          </table:table-cell>
          <table:table-cell/>
          <table:table-cell table:style-name="ce247" table:formula="of:=HLOOKUP([.N8];[.$AF$25:.$AW$26];2;0)" office:value-type="float" office:value="3" calcext:value-type="float">
            <text:p>3.0</text:p>
          </table:table-cell>
          <table:table-cell table:style-name="ce253" table:formula="of:=HLOOKUP([.O8];[.$AF$25:.$AW$26];2;0)" office:value-type="float" office:value="1.3" calcext:value-type="float">
            <text:p>1.3</text:p>
          </table:table-cell>
          <table:table-cell table:style-name="ce256" table:formula="of:=HLOOKUP([.P8];[.$AF$25:.$AW$26];2;0)" office:value-type="float" office:value="1.3" calcext:value-type="float">
            <text:p>1.3</text:p>
          </table:table-cell>
          <table:table-cell table:style-name="ce262" table:formula="of:=HLOOKUP([.Q8];[.$AF$25:.$AW$26];2;0)" office:value-type="float" office:value="1.1" calcext:value-type="float">
            <text:p>1.1</text:p>
          </table:table-cell>
          <table:table-cell table:style-name="ce262" table:formula="of:=HLOOKUP([.R8];[.$AF$25:.$AW$26];2;0)" office:value-type="float" office:value="2.3" calcext:value-type="float">
            <text:p>2.3</text:p>
          </table:table-cell>
          <table:table-cell/>
          <table:table-cell table:style-name="ce267" table:formula="of:=HLOOKUP([.T8];[.$AF$25:.$AW$26];2;0)" office:value-type="float" office:value="1.3" calcext:value-type="float">
            <text:p>1.3</text:p>
          </table:table-cell>
          <table:table-cell table:style-name="ce273" table:formula="of:=HLOOKUP([.U8];[.$AF$25:.$AW$26];2;0)" office:value-type="float" office:value="1.2" calcext:value-type="float">
            <text:p>1.2</text:p>
          </table:table-cell>
          <table:table-cell table:style-name="ce276" table:formula="of:=HLOOKUP([.V8];[.$AF$25:.$AW$26];2;0)" office:value-type="float" office:value="1.1" calcext:value-type="float">
            <text:p>1.1</text:p>
          </table:table-cell>
          <table:table-cell table:style-name="ce279" table:formula="of:=HLOOKUP([.W8];[.$AF$25:.$AW$26];2;0)" office:value-type="float" office:value="2" calcext:value-type="float">
            <text:p>2.0</text:p>
          </table:table-cell>
          <table:table-cell table:style-name="ce280" table:formula="of:=HLOOKUP([.X8];[.$AF$25:.$AW$26];2;0)" office:value-type="float" office:value="2.3" calcext:value-type="float">
            <text:p>2.3</text:p>
          </table:table-cell>
          <table:table-cell/>
          <table:table-cell table:style-name="ce286" table:formula="of:=HLOOKUP([.Z8];[.$AF$25:.$AW$26];2;0)" office:value-type="float" office:value="2.2" calcext:value-type="float">
            <text:p>2.2</text:p>
          </table:table-cell>
          <table:table-cell table:style-name="ce292" table:formula="of:=HLOOKUP([.AA8];[.$AF$25:.$AW$26];2;0)" office:value-type="float" office:value="1.3" calcext:value-type="float">
            <text:p>1.3</text:p>
          </table:table-cell>
          <table:table-cell table:style-name="ce295" table:formula="of:=HLOOKUP([.AB8];[.$AF$25:.$AW$26];2;0)" office:value-type="float" office:value="1.2" calcext:value-type="float">
            <text:p>1.2</text:p>
          </table:table-cell>
          <table:table-cell table:style-name="ce298" table:formula="of:=HLOOKUP([.AC8];[.$AF$25:.$AW$26];2;0)" office:value-type="float" office:value="1.1" calcext:value-type="float">
            <text:p>1.1</text:p>
          </table:table-cell>
          <table:table-cell table:style-name="ce301" table:formula="of:=HLOOKUP([.AD8];[.$AF$25:.$AW$26];2;0)" office:value-type="float" office:value="4" calcext:value-type="float">
            <text:p>4.0</text:p>
          </table:table-cell>
          <table:table-cell table:style-name="ce540"/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1" calcext:value-type="float">
            <text:p>1</text:p>
          </table:table-cell>
          <table:table-cell table:style-name="ce312" office:value-type="float" office:value="2" calcext:value-type="float">
            <text:p>2</text:p>
          </table:table-cell>
          <table:table-cell table:style-name="ce312" office:value-type="float" office:value="3" calcext:value-type="float">
            <text:p>3</text:p>
          </table:table-cell>
          <table:table-cell table:style-name="ce314" office:value-type="float" office:value="4" calcext:value-type="float">
            <text:p>4</text:p>
          </table:table-cell>
          <table:table-cell table:style-name="ce314" office:value-type="float" office:value="5" calcext:value-type="float">
            <text:p>5</text:p>
          </table:table-cell>
          <table:table-cell table:style-name="ce314" office:value-type="float" office:value="6" calcext:value-type="float">
            <text:p>6</text:p>
          </table:table-cell>
          <table:table-cell table:style-name="ce314" office:value-type="float" office:value="7" calcext:value-type="float">
            <text:p>7</text:p>
          </table:table-cell>
          <table:table-cell table:style-name="ce314" office:value-type="float" office:value="8" calcext:value-type="float">
            <text:p>8</text:p>
          </table:table-cell>
          <table:table-cell table:style-name="ce315" office:value-type="float" office:value="9" calcext:value-type="float">
            <text:p>9</text:p>
          </table:table-cell>
          <table:table-cell table:style-name="ce315" office:value-type="float" office:value="10" calcext:value-type="float">
            <text:p>10</text:p>
          </table:table-cell>
          <table:table-cell table:style-name="ce316" office:value-type="float" office:value="11" calcext:value-type="float">
            <text:p>11</text:p>
          </table:table-cell>
          <table:table-cell table:style-name="ce316" office:value-type="float" office:value="12" calcext:value-type="float">
            <text:p>12</text:p>
          </table:table-cell>
          <table:table-cell table:style-name="ce316" office:value-type="float" office:value="13" calcext:value-type="float">
            <text:p>13</text:p>
          </table:table-cell>
          <table:table-cell table:style-name="ce316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" calcext:value-type="string">
            <text:p>"11": { "0": 14, "1": 13, "2": 8, "3": 10, "4": 11, "5": 12, "6": 5, "7": 3, "8": 4, "9": 6, "10": 7, "11": 10, "12": 1, "13": 2, "14": 9}</text:p>
          </table:table-cell>
          <table:table-cell table:number-columns-repeated="36"/>
        </table:table-row>
        <table:table-row table:style-name="ro1">
          <table:table-cell/>
          <table:table-cell table:style-name="ce213" table:formula="of:=HLOOKUP([.B9];[.$AF$25:.$AW$26];2;0)" office:value-type="float" office:value="3" calcext:value-type="float">
            <text:p>3.0</text:p>
          </table:table-cell>
          <table:table-cell table:style-name="ce220" table:formula="of:=HLOOKUP([.C9];[.$AF$25:.$AW$26];2;0)" office:value-type="float" office:value="2.3" calcext:value-type="float">
            <text:p>2.3</text:p>
          </table:table-cell>
          <table:table-cell table:style-name="ce223" table:formula="of:=HLOOKUP([.D9];[.$AF$25:.$AW$26];2;0)" office:value-type="float" office:value="2.2" calcext:value-type="float">
            <text:p>2.2</text:p>
          </table:table-cell>
          <table:table-cell table:style-name="ce226" table:formula="of:=HLOOKUP([.E9];[.$AF$25:.$AW$26];2;0)" office:value-type="float" office:value="1.6" calcext:value-type="float">
            <text:p>1.6</text:p>
          </table:table-cell>
          <table:table-cell table:style-name="ce226" table:formula="of:=HLOOKUP([.F9];[.$AF$25:.$AW$26];2;0)" office:value-type="float" office:value="2.1" calcext:value-type="float">
            <text:p>2.1</text:p>
          </table:table-cell>
          <table:table-cell/>
          <table:table-cell table:style-name="ce230" table:formula="of:=HLOOKUP([.H9];[.$AF$25:.$AW$26];2;0)" office:value-type="float" office:value="2.2" calcext:value-type="float">
            <text:p>2.2</text:p>
          </table:table-cell>
          <table:table-cell table:style-name="ce236" table:formula="of:=HLOOKUP([.I9];[.$AF$25:.$AW$26];2;0)" office:value-type="float" office:value="2.3" calcext:value-type="float">
            <text:p>2.3</text:p>
          </table:table-cell>
          <table:table-cell table:style-name="ce241" table:formula="of:=HLOOKUP([.J9];[.$AF$25:.$AW$26];2;0)" office:value-type="float" office:value="2.1" calcext:value-type="float">
            <text:p>2.1</text:p>
          </table:table-cell>
          <table:table-cell table:style-name="ce244" table:formula="of:=HLOOKUP([.K9];[.$AF$25:.$AW$26];2;0)" office:value-type="float" office:value="1.2" calcext:value-type="float">
            <text:p>1.2</text:p>
          </table:table-cell>
          <table:table-cell table:style-name="ce244" table:formula="of:=HLOOKUP([.L9];[.$AF$25:.$AW$26];2;0)" office:value-type="float" office:value="2" calcext:value-type="float">
            <text:p>2.0</text:p>
          </table:table-cell>
          <table:table-cell/>
          <table:table-cell table:style-name="ce248" table:formula="of:=HLOOKUP([.N9];[.$AF$25:.$AW$26];2;0)" office:value-type="float" office:value="2.2" calcext:value-type="float">
            <text:p>2.2</text:p>
          </table:table-cell>
          <table:table-cell table:style-name="ce253" table:formula="of:=HLOOKUP([.O9];[.$AF$25:.$AW$26];2;0)" office:value-type="float" office:value="1.6" calcext:value-type="float">
            <text:p>1.6</text:p>
          </table:table-cell>
          <table:table-cell table:style-name="ce257" table:formula="of:=HLOOKUP([.P9];[.$AF$25:.$AW$26];2;0)" office:value-type="float" office:value="2" calcext:value-type="float">
            <text:p>2.0</text:p>
          </table:table-cell>
          <table:table-cell table:style-name="ce262" table:formula="of:=HLOOKUP([.Q9];[.$AF$25:.$AW$26];2;0)" office:value-type="float" office:value="1.2" calcext:value-type="float">
            <text:p>1.2</text:p>
          </table:table-cell>
          <table:table-cell table:style-name="ce262" table:formula="of:=HLOOKUP([.R9];[.$AF$25:.$AW$26];2;0)" office:value-type="float" office:value="2.1" calcext:value-type="float">
            <text:p>2.1</text:p>
          </table:table-cell>
          <table:table-cell/>
          <table:table-cell table:style-name="ce268" table:formula="of:=HLOOKUP([.T9];[.$AF$25:.$AW$26];2;0)" office:value-type="float" office:value="2" calcext:value-type="float">
            <text:p>2.0</text:p>
          </table:table-cell>
          <table:table-cell table:style-name="ce273" table:formula="of:=HLOOKUP([.U9];[.$AF$25:.$AW$26];2;0)" office:value-type="float" office:value="1.6" calcext:value-type="float">
            <text:p>1.6</text:p>
          </table:table-cell>
          <table:table-cell table:style-name="ce276" table:formula="of:=HLOOKUP([.V9];[.$AF$25:.$AW$26];2;0)" office:value-type="float" office:value="2.1" calcext:value-type="float">
            <text:p>2.1</text:p>
          </table:table-cell>
          <table:table-cell table:style-name="ce280" table:formula="of:=HLOOKUP([.W9];[.$AF$25:.$AW$26];2;0)" office:value-type="float" office:value="2.2" calcext:value-type="float">
            <text:p>2.2</text:p>
          </table:table-cell>
          <table:table-cell table:style-name="ce280" table:formula="of:=HLOOKUP([.X9];[.$AF$25:.$AW$26];2;0)" office:value-type="float" office:value="3" calcext:value-type="float">
            <text:p>3.0</text:p>
          </table:table-cell>
          <table:table-cell/>
          <table:table-cell table:style-name="ce287" table:formula="of:=HLOOKUP([.Z9];[.$AF$25:.$AW$26];2;0)" office:value-type="float" office:value="2.1" calcext:value-type="float">
            <text:p>2.1</text:p>
          </table:table-cell>
          <table:table-cell table:style-name="ce292" table:formula="of:=HLOOKUP([.AA9];[.$AF$25:.$AW$26];2;0)" office:value-type="float" office:value="1.6" calcext:value-type="float">
            <text:p>1.6</text:p>
          </table:table-cell>
          <table:table-cell table:style-name="ce295" table:formula="of:=HLOOKUP([.AB9];[.$AF$25:.$AW$26];2;0)" office:value-type="float" office:value="2" calcext:value-type="float">
            <text:p>2.0</text:p>
          </table:table-cell>
          <table:table-cell table:style-name="ce298" table:formula="of:=HLOOKUP([.AC9];[.$AF$25:.$AW$26];2;0)" office:value-type="float" office:value="3" calcext:value-type="float">
            <text:p>3.0</text:p>
          </table:table-cell>
          <table:table-cell table:style-name="ce298" table:formula="of:=HLOOKUP([.AD9];[.$AF$25:.$AW$26];2;0)" office:value-type="float" office:value="2.3" calcext:value-type="float">
            <text:p>2.3</text:p>
          </table:table-cell>
          <table:table-cell table:style-name="ce540"/>
          <table:table-cell table:style-name="ce837" office:value-type="float" office:value="1" calcext:value-type="float">
            <text:p>1.0</text:p>
          </table:table-cell>
          <table:table-cell table:style-name="ce837" office:value-type="float" office:value="1.1" calcext:value-type="float">
            <text:p>1.1</text:p>
          </table:table-cell>
          <table:table-cell table:style-name="ce837" office:value-type="float" office:value="1.2" calcext:value-type="float">
            <text:p>1.2</text:p>
          </table:table-cell>
          <table:table-cell table:style-name="ce837" office:value-type="float" office:value="1.3" calcext:value-type="float">
            <text:p>1.3</text:p>
          </table:table-cell>
          <table:table-cell table:style-name="ce837" office:value-type="float" office:value="1.6" calcext:value-type="float">
            <text:p>1.6</text:p>
          </table:table-cell>
          <table:table-cell table:style-name="ce837" office:value-type="float" office:value="2" calcext:value-type="float">
            <text:p>2.0</text:p>
          </table:table-cell>
          <table:table-cell table:style-name="ce837" office:value-type="float" office:value="2.1" calcext:value-type="float">
            <text:p>2.1</text:p>
          </table:table-cell>
          <table:table-cell table:style-name="ce837" office:value-type="float" office:value="2.2" calcext:value-type="float">
            <text:p>2.2</text:p>
          </table:table-cell>
          <table:table-cell table:style-name="ce837" office:value-type="float" office:value="2.3" calcext:value-type="float">
            <text:p>2.3</text:p>
          </table:table-cell>
          <table:table-cell table:style-name="ce837" office:value-type="float" office:value="3" calcext:value-type="float">
            <text:p>3.0</text:p>
          </table:table-cell>
          <table:table-cell table:style-name="ce837" office:value-type="float" office:value="3.1" calcext:value-type="float">
            <text:p>3.1</text:p>
          </table:table-cell>
          <table:table-cell table:style-name="ce837" office:value-type="float" office:value="3.2" calcext:value-type="float">
            <text:p>3.2</text:p>
          </table:table-cell>
          <table:table-cell table:style-name="ce837" office:value-type="float" office:value="3.5" calcext:value-type="float">
            <text:p>3.5</text:p>
          </table:table-cell>
          <table:table-cell table:style-name="ce837" office:value-type="float" office:value="4" calcext:value-type="float">
            <text:p>4.0</text:p>
          </table:table-cell>
          <table:table-cell table:style-name="ce837" office:value-type="float" office:value="4.5" calcext:value-type="float">
            <text:p>4.5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" calcext:value-type="string">
            <text:p>"12": { "0": 14, "1": 13, "2": 10, "3": 9, "4": 12, "5": 10, "6": 6, "7": 4, "8": 3, "9": 8, "10": 5, "11": 2, "12": 9, "13": 1, "14": 11}</text:p>
          </table:table-cell>
          <table:table-cell table:number-columns-repeated="36"/>
        </table:table-row>
        <table:table-row table:style-name="ro1">
          <table:table-cell/>
          <table:table-cell table:style-name="ce213" table:formula="of:=HLOOKUP([.B10];[.$AF$25:.$AW$26];2;0)" office:value-type="float" office:value="3.5" calcext:value-type="float">
            <text:p>3.5</text:p>
          </table:table-cell>
          <table:table-cell table:style-name="ce220" table:formula="of:=HLOOKUP([.C10];[.$AF$25:.$AW$26];2;0)" office:value-type="float" office:value="4.5" calcext:value-type="float">
            <text:p>4.5</text:p>
          </table:table-cell>
          <table:table-cell table:style-name="ce223" table:formula="of:=HLOOKUP([.D10];[.$AF$25:.$AW$26];2;0)" office:value-type="float" office:value="4" calcext:value-type="float">
            <text:p>4.0</text:p>
          </table:table-cell>
          <table:table-cell table:style-name="ce226" table:formula="of:=HLOOKUP([.E10];[.$AF$25:.$AW$26];2;0)" office:value-type="float" office:value="3.1" calcext:value-type="float">
            <text:p>3.1</text:p>
          </table:table-cell>
          <table:table-cell table:style-name="ce226" table:formula="of:=HLOOKUP([.F10];[.$AF$25:.$AW$26];2;0)" office:value-type="float" office:value="3.2" calcext:value-type="float">
            <text:p>3.2</text:p>
          </table:table-cell>
          <table:table-cell/>
          <table:table-cell table:style-name="ce230" table:formula="of:=HLOOKUP([.H10];[.$AF$25:.$AW$26];2;0)" office:value-type="float" office:value="4" calcext:value-type="float">
            <text:p>4.0</text:p>
          </table:table-cell>
          <table:table-cell table:style-name="ce236" table:formula="of:=HLOOKUP([.I10];[.$AF$25:.$AW$26];2;0)" office:value-type="float" office:value="4.5" calcext:value-type="float">
            <text:p>4.5</text:p>
          </table:table-cell>
          <table:table-cell table:style-name="ce241" table:formula="of:=HLOOKUP([.J10];[.$AF$25:.$AW$26];2;0)" office:value-type="float" office:value="3.5" calcext:value-type="float">
            <text:p>3.5</text:p>
          </table:table-cell>
          <table:table-cell table:style-name="ce244" table:formula="of:=HLOOKUP([.K10];[.$AF$25:.$AW$26];2;0)" office:value-type="float" office:value="3.1" calcext:value-type="float">
            <text:p>3.1</text:p>
          </table:table-cell>
          <table:table-cell table:style-name="ce244" table:formula="of:=HLOOKUP([.L10];[.$AF$25:.$AW$26];2;0)" office:value-type="float" office:value="3.2" calcext:value-type="float">
            <text:p>3.2</text:p>
          </table:table-cell>
          <table:table-cell/>
          <table:table-cell table:style-name="ce248" table:formula="of:=HLOOKUP([.N10];[.$AF$25:.$AW$26];2;0)" office:value-type="float" office:value="3.5" calcext:value-type="float">
            <text:p>3.5</text:p>
          </table:table-cell>
          <table:table-cell table:style-name="ce253" table:formula="of:=HLOOKUP([.O10];[.$AF$25:.$AW$26];2;0)" office:value-type="float" office:value="3.2" calcext:value-type="float">
            <text:p>3.2</text:p>
          </table:table-cell>
          <table:table-cell table:style-name="ce257" table:formula="of:=HLOOKUP([.P10];[.$AF$25:.$AW$26];2;0)" office:value-type="float" office:value="4" calcext:value-type="float">
            <text:p>4.0</text:p>
          </table:table-cell>
          <table:table-cell table:style-name="ce262" table:formula="of:=HLOOKUP([.Q10];[.$AF$25:.$AW$26];2;0)" office:value-type="float" office:value="3.1" calcext:value-type="float">
            <text:p>3.1</text:p>
          </table:table-cell>
          <table:table-cell table:style-name="ce262" table:formula="of:=HLOOKUP([.R10];[.$AF$25:.$AW$26];2;0)" office:value-type="float" office:value="4.5" calcext:value-type="float">
            <text:p>4.5</text:p>
          </table:table-cell>
          <table:table-cell/>
          <table:table-cell table:style-name="ce268" table:formula="of:=HLOOKUP([.T10];[.$AF$25:.$AW$26];2;0)" office:value-type="float" office:value="4" calcext:value-type="float">
            <text:p>4.0</text:p>
          </table:table-cell>
          <table:table-cell table:style-name="ce273" table:formula="of:=HLOOKUP([.U10];[.$AF$25:.$AW$26];2;0)" office:value-type="float" office:value="4.5" calcext:value-type="float">
            <text:p>4.5</text:p>
          </table:table-cell>
          <table:table-cell table:style-name="ce276" table:formula="of:=HLOOKUP([.V10];[.$AF$25:.$AW$26];2;0)" office:value-type="float" office:value="3.5" calcext:value-type="float">
            <text:p>3.5</text:p>
          </table:table-cell>
          <table:table-cell table:style-name="ce280" table:formula="of:=HLOOKUP([.W10];[.$AF$25:.$AW$26];2;0)" office:value-type="float" office:value="3.1" calcext:value-type="float">
            <text:p>3.1</text:p>
          </table:table-cell>
          <table:table-cell table:style-name="ce280" table:formula="of:=HLOOKUP([.X10];[.$AF$25:.$AW$26];2;0)" office:value-type="float" office:value="3.2" calcext:value-type="float">
            <text:p>3.2</text:p>
          </table:table-cell>
          <table:table-cell/>
          <table:table-cell table:style-name="ce287" table:formula="of:=HLOOKUP([.Z10];[.$AF$25:.$AW$26];2;0)" office:value-type="float" office:value="3.1" calcext:value-type="float">
            <text:p>3.1</text:p>
          </table:table-cell>
          <table:table-cell table:style-name="ce292" table:formula="of:=HLOOKUP([.AA10];[.$AF$25:.$AW$26];2;0)" office:value-type="float" office:value="3.2" calcext:value-type="float">
            <text:p>3.2</text:p>
          </table:table-cell>
          <table:table-cell table:style-name="ce295" table:formula="of:=HLOOKUP([.AB10];[.$AF$25:.$AW$26];2;0)" office:value-type="float" office:value="3.5" calcext:value-type="float">
            <text:p>3.5</text:p>
          </table:table-cell>
          <table:table-cell table:style-name="ce298" table:formula="of:=HLOOKUP([.AC10];[.$AF$25:.$AW$26];2;0)" office:value-type="float" office:value="4" calcext:value-type="float">
            <text:p>4.0</text:p>
          </table:table-cell>
          <table:table-cell table:style-name="ce298" table:formula="of:=HLOOKUP([.AD10];[.$AF$25:.$AW$26];2;0)" office:value-type="float" office:value="4.5" calcext:value-type="float">
            <text:p>4.5</text:p>
          </table:table-cell>
          <table:table-cell table:style-name="ce540"/>
          <table:table-cell table:number-columns-repeated="31"/>
          <table:table-cell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" calcext:value-type="string">
            <text:p>"13": { "0": 13, "1": 12, "2": 8, "3": 11, "4": 14, "5": 6, "6": 4, "7": 3, "8": 7, "9": 9, "10": 5, "11": 2, "12": 1, "13": 4, "14": 10}</text:p>
          </table:table-cell>
          <table:table-cell table:number-columns-repeated="36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style-name="ce177"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style-name="ce177" table:number-columns-repeated="17"/>
          <table:table-cell table:number-columns-repeated="13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" calcext:value-type="string">
            <text:p>"14": { "0": 14, "1": 13, "2": 12, "3": 10, "4": 11, "5": 7, "6": 5, "7": 3, "8": 2, "9": 9, "10": 8, "11": 6, "12": 4, "13": 1, "14": 12}</text:p>
          </table:table-cell>
          <table:table-cell table:number-columns-repeated="36"/>
        </table:table-row>
        <table:table-row table:style-name="ro1">
          <table:table-cell/>
          <table:table-cell table:style-name="ce552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3"/>
          <table:table-cell table:style-name="ce540"/>
          <table:table-cell table:number-columns-repeated="68"/>
        </table:table-row>
        <table:table-row table:style-name="ro1">
          <table:table-cell/>
          <table:table-cell table:style-name="ce214" table:formula="of:=HLOOKUP([.B12];[.$AF$25:.$AW$26];2;0)" office:value-type="float" office:value="4.5" calcext:value-type="float">
            <text:p>4.5</text:p>
          </table:table-cell>
          <table:table-cell table:style-name="ce221" table:formula="of:=HLOOKUP([.C12];[.$AF$25:.$AW$26];2;0)" office:value-type="float" office:value="3" calcext:value-type="float">
            <text:p>3.0</text:p>
          </table:table-cell>
          <table:table-cell table:style-name="ce224" table:formula="of:=HLOOKUP([.D12];[.$AF$25:.$AW$26];2;0)" office:value-type="float" office:value="1.6" calcext:value-type="float">
            <text:p>1.6</text:p>
          </table:table-cell>
          <table:table-cell table:style-name="ce227" table:formula="of:=HLOOKUP([.E12];[.$AF$25:.$AW$26];2;0)" office:value-type="float" office:value="2" calcext:value-type="float">
            <text:p>2.0</text:p>
          </table:table-cell>
          <table:table-cell table:style-name="ce227" table:formula="of:=HLOOKUP([.F12];[.$AF$25:.$AW$26];2;0)" office:value-type="float" office:value="3.1" calcext:value-type="float">
            <text:p>3.1</text:p>
          </table:table-cell>
          <table:table-cell/>
          <table:table-cell table:style-name="ce231" table:formula="of:=HLOOKUP([.H12];[.$AF$25:.$AW$26];2;0)" office:value-type="float" office:value="4.5" calcext:value-type="float">
            <text:p>4.5</text:p>
          </table:table-cell>
          <table:table-cell table:style-name="ce237" table:formula="of:=HLOOKUP([.I12];[.$AF$25:.$AW$26];2;0)" office:value-type="float" office:value="2.3" calcext:value-type="float">
            <text:p>2.3</text:p>
          </table:table-cell>
          <table:table-cell table:style-name="ce242" table:formula="of:=HLOOKUP([.J12];[.$AF$25:.$AW$26];2;0)" office:value-type="float" office:value="1.3" calcext:value-type="float">
            <text:p>1.3</text:p>
          </table:table-cell>
          <table:table-cell table:style-name="ce245" table:formula="of:=HLOOKUP([.K12];[.$AF$25:.$AW$26];2;0)" office:value-type="float" office:value="2" calcext:value-type="float">
            <text:p>2.0</text:p>
          </table:table-cell>
          <table:table-cell table:style-name="ce245" table:formula="of:=HLOOKUP([.L12];[.$AF$25:.$AW$26];2;0)" office:value-type="float" office:value="4" calcext:value-type="float">
            <text:p>4.0</text:p>
          </table:table-cell>
          <table:table-cell/>
          <table:table-cell table:style-name="ce249" table:formula="of:=HLOOKUP([.N12];[.$AF$25:.$AW$26];2;0)" office:value-type="float" office:value="4.5" calcext:value-type="float">
            <text:p>4.5</text:p>
          </table:table-cell>
          <table:table-cell table:style-name="ce254" table:formula="of:=HLOOKUP([.O12];[.$AF$25:.$AW$26];2;0)" office:value-type="float" office:value="2.3" calcext:value-type="float">
            <text:p>2.3</text:p>
          </table:table-cell>
          <table:table-cell table:style-name="ce258" table:formula="of:=HLOOKUP([.P12];[.$AF$25:.$AW$26];2;0)" office:value-type="float" office:value="1.6" calcext:value-type="float">
            <text:p>1.6</text:p>
          </table:table-cell>
          <table:table-cell table:style-name="ce263" table:formula="of:=HLOOKUP([.Q12];[.$AF$25:.$AW$26];2;0)" office:value-type="float" office:value="3" calcext:value-type="float">
            <text:p>3.0</text:p>
          </table:table-cell>
          <table:table-cell table:style-name="ce263" table:formula="of:=HLOOKUP([.R12];[.$AF$25:.$AW$26];2;0)" office:value-type="float" office:value="4" calcext:value-type="float">
            <text:p>4.0</text:p>
          </table:table-cell>
          <table:table-cell/>
          <table:table-cell table:style-name="ce269" table:formula="of:=HLOOKUP([.T12];[.$AF$25:.$AW$26];2;0)" office:value-type="float" office:value="4" calcext:value-type="float">
            <text:p>4.0</text:p>
          </table:table-cell>
          <table:table-cell table:style-name="ce274" table:formula="of:=HLOOKUP([.U12];[.$AF$25:.$AW$26];2;0)" office:value-type="float" office:value="2" calcext:value-type="float">
            <text:p>2.0</text:p>
          </table:table-cell>
          <table:table-cell table:style-name="ce277" table:formula="of:=HLOOKUP([.V12];[.$AF$25:.$AW$26];2;0)" office:value-type="float" office:value="1.3" calcext:value-type="float">
            <text:p>1.3</text:p>
          </table:table-cell>
          <table:table-cell table:style-name="ce281" table:formula="of:=HLOOKUP([.W12];[.$AF$25:.$AW$26];2;0)" office:value-type="float" office:value="2.1" calcext:value-type="float">
            <text:p>2.1</text:p>
          </table:table-cell>
          <table:table-cell table:style-name="ce281" table:formula="of:=HLOOKUP([.X12];[.$AF$25:.$AW$26];2;0)" office:value-type="float" office:value="4.5" calcext:value-type="float">
            <text:p>4.5</text:p>
          </table:table-cell>
          <table:table-cell/>
          <table:table-cell table:style-name="ce288" table:formula="of:=HLOOKUP([.Z12];[.$AF$25:.$AW$26];2;0)" office:value-type="float" office:value="4" calcext:value-type="float">
            <text:p>4.0</text:p>
          </table:table-cell>
          <table:table-cell table:style-name="ce293" table:formula="of:=HLOOKUP([.AA12];[.$AF$25:.$AW$26];2;0)" office:value-type="float" office:value="2.2" calcext:value-type="float">
            <text:p>2.2</text:p>
          </table:table-cell>
          <table:table-cell table:style-name="ce296" table:formula="of:=HLOOKUP([.AB12];[.$AF$25:.$AW$26];2;0)" office:value-type="float" office:value="1.6" calcext:value-type="float">
            <text:p>1.6</text:p>
          </table:table-cell>
          <table:table-cell table:style-name="ce299" table:formula="of:=HLOOKUP([.AC12];[.$AF$25:.$AW$26];2;0)" office:value-type="float" office:value="1.3" calcext:value-type="float">
            <text:p>1.3</text:p>
          </table:table-cell>
          <table:table-cell table:style-name="ce299" table:formula="of:=HLOOKUP([.AD12];[.$AF$25:.$AW$26];2;0)" office:value-type="float" office:value="3" calcext:value-type="float">
            <text:p>3.0</text:p>
          </table:table-cell>
          <table:table-cell table:style-name="ce540"/>
          <table:table-cell table:number-columns-repeated="31"/>
          <table:table-cell table:formula="of:=COM.MICROSOFT.TEXTJOIN(&quot;, &quot;;TRUE();[.BK24:.BK28])" office:value-type="string" office:string-value="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" calcext:value-type="string">
            <text:p>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</text:p>
          </table:table-cell>
          <table:table-cell table:number-columns-repeated="36"/>
        </table:table-row>
        <table:table-row table:style-name="ro1">
          <table:table-cell/>
          <table:table-cell table:style-name="ce215" table:formula="of:=HLOOKUP([.B13];[.$AF$25:.$AW$26];2;0)" office:value-type="float" office:value="2.2" calcext:value-type="float">
            <text:p>2.2</text:p>
          </table:table-cell>
          <table:table-cell table:style-name="ce221" table:formula="of:=HLOOKUP([.C13];[.$AF$25:.$AW$26];2;0)" office:value-type="float" office:value="1.1" calcext:value-type="float">
            <text:p>1.1</text:p>
          </table:table-cell>
          <table:table-cell table:style-name="ce224" table:formula="of:=HLOOKUP([.D13];[.$AF$25:.$AW$26];2;0)" office:value-type="float" office:value="1.2" calcext:value-type="float">
            <text:p>1.2</text:p>
          </table:table-cell>
          <table:table-cell table:style-name="ce227" table:formula="of:=HLOOKUP([.E13];[.$AF$25:.$AW$26];2;0)" office:value-type="float" office:value="1.3" calcext:value-type="float">
            <text:p>1.3</text:p>
          </table:table-cell>
          <table:table-cell table:style-name="ce227" table:formula="of:=HLOOKUP([.F13];[.$AF$25:.$AW$26];2;0)" office:value-type="float" office:value="2.2" calcext:value-type="float">
            <text:p>2.2</text:p>
          </table:table-cell>
          <table:table-cell/>
          <table:table-cell table:style-name="ce232" table:formula="of:=HLOOKUP([.H13];[.$AF$25:.$AW$26];2;0)" office:value-type="float" office:value="2.1" calcext:value-type="float">
            <text:p>2.1</text:p>
          </table:table-cell>
          <table:table-cell table:style-name="ce238" table:formula="of:=HLOOKUP([.I13];[.$AF$25:.$AW$26];2;0)" office:value-type="float" office:value="1.2" calcext:value-type="float">
            <text:p>1.2</text:p>
          </table:table-cell>
          <table:table-cell table:style-name="ce242" table:formula="of:=HLOOKUP([.J13];[.$AF$25:.$AW$26];2;0)" office:value-type="float" office:value="1.1" calcext:value-type="float">
            <text:p>1.1</text:p>
          </table:table-cell>
          <table:table-cell table:style-name="ce245" table:formula="of:=HLOOKUP([.K13];[.$AF$25:.$AW$26];2;0)" office:value-type="float" office:value="1.2" calcext:value-type="float">
            <text:p>1.2</text:p>
          </table:table-cell>
          <table:table-cell table:style-name="ce245" table:formula="of:=HLOOKUP([.L13];[.$AF$25:.$AW$26];2;0)" office:value-type="float" office:value="2.2" calcext:value-type="float">
            <text:p>2.2</text:p>
          </table:table-cell>
          <table:table-cell/>
          <table:table-cell table:style-name="ce250" table:formula="of:=HLOOKUP([.N13];[.$AF$25:.$AW$26];2;0)" office:value-type="float" office:value="2" calcext:value-type="float">
            <text:p>2.0</text:p>
          </table:table-cell>
          <table:table-cell table:style-name="ce254" table:formula="of:=HLOOKUP([.O13];[.$AF$25:.$AW$26];2;0)" office:value-type="float" office:value="1.2" calcext:value-type="float">
            <text:p>1.2</text:p>
          </table:table-cell>
          <table:table-cell table:style-name="ce259" table:formula="of:=HLOOKUP([.P13];[.$AF$25:.$AW$26];2;0)" office:value-type="float" office:value="1" calcext:value-type="float">
            <text:p>1.0</text:p>
          </table:table-cell>
          <table:table-cell table:style-name="ce263" table:formula="of:=HLOOKUP([.Q13];[.$AF$25:.$AW$26];2;0)" office:value-type="float" office:value="1.1" calcext:value-type="float">
            <text:p>1.1</text:p>
          </table:table-cell>
          <table:table-cell table:style-name="ce263" table:formula="of:=HLOOKUP([.R13];[.$AF$25:.$AW$26];2;0)" office:value-type="float" office:value="3.1" calcext:value-type="float">
            <text:p>3.1</text:p>
          </table:table-cell>
          <table:table-cell/>
          <table:table-cell table:style-name="ce270" table:formula="of:=HLOOKUP([.T13];[.$AF$25:.$AW$26];2;0)" office:value-type="float" office:value="1.6" calcext:value-type="float">
            <text:p>1.6</text:p>
          </table:table-cell>
          <table:table-cell table:style-name="ce274" table:formula="of:=HLOOKUP([.U13];[.$AF$25:.$AW$26];2;0)" office:value-type="float" office:value="1.2" calcext:value-type="float">
            <text:p>1.2</text:p>
          </table:table-cell>
          <table:table-cell table:style-name="ce277" table:formula="of:=HLOOKUP([.V13];[.$AF$25:.$AW$26];2;0)" office:value-type="float" office:value="1.1" calcext:value-type="float">
            <text:p>1.1</text:p>
          </table:table-cell>
          <table:table-cell table:style-name="ce282" table:formula="of:=HLOOKUP([.W13];[.$AF$25:.$AW$26];2;0)" office:value-type="float" office:value="1.1" calcext:value-type="float">
            <text:p>1.1</text:p>
          </table:table-cell>
          <table:table-cell table:style-name="ce281" table:formula="of:=HLOOKUP([.X13];[.$AF$25:.$AW$26];2;0)" office:value-type="float" office:value="3.1" calcext:value-type="float">
            <text:p>3.1</text:p>
          </table:table-cell>
          <table:table-cell/>
          <table:table-cell table:style-name="ce289" table:formula="of:=HLOOKUP([.Z13];[.$AF$25:.$AW$26];2;0)" office:value-type="float" office:value="2.1" calcext:value-type="float">
            <text:p>2.1</text:p>
          </table:table-cell>
          <table:table-cell table:style-name="ce293" table:formula="of:=HLOOKUP([.AA13];[.$AF$25:.$AW$26];2;0)" office:value-type="float" office:value="2" calcext:value-type="float">
            <text:p>2.0</text:p>
          </table:table-cell>
          <table:table-cell table:style-name="ce296" table:formula="of:=HLOOKUP([.AB13];[.$AF$25:.$AW$26];2;0)" office:value-type="float" office:value="1.2" calcext:value-type="float">
            <text:p>1.2</text:p>
          </table:table-cell>
          <table:table-cell table:style-name="ce299" table:formula="of:=HLOOKUP([.AC13];[.$AF$25:.$AW$26];2;0)" office:value-type="float" office:value="1.1" calcext:value-type="float">
            <text:p>1.1</text:p>
          </table:table-cell>
          <table:table-cell table:style-name="ce302" table:formula="of:=HLOOKUP([.AD13];[.$AF$25:.$AW$26];2;0)" office:value-type="float" office:value="2.3" calcext:value-type="float">
            <text:p>2.3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16" table:formula="of:=HLOOKUP([.B14];[.$AF$25:.$AW$26];2;0)" office:value-type="float" office:value="3.5" calcext:value-type="float">
            <text:p>3.5</text:p>
          </table:table-cell>
          <table:table-cell table:style-name="ce221" table:formula="of:=HLOOKUP([.C14];[.$AF$25:.$AW$26];2;0)" office:value-type="float" office:value="4" calcext:value-type="float">
            <text:p>4.0</text:p>
          </table:table-cell>
          <table:table-cell table:style-name="ce224" table:formula="of:=HLOOKUP([.D14];[.$AF$25:.$AW$26];2;0)" office:value-type="float" office:value="3.2" calcext:value-type="float">
            <text:p>3.2</text:p>
          </table:table-cell>
          <table:table-cell table:style-name="ce227" table:formula="of:=HLOOKUP([.E14];[.$AF$25:.$AW$26];2;0)" office:value-type="float" office:value="2.1" calcext:value-type="float">
            <text:p>2.1</text:p>
          </table:table-cell>
          <table:table-cell table:style-name="ce227" table:formula="of:=HLOOKUP([.F14];[.$AF$25:.$AW$26];2;0)" office:value-type="float" office:value="2.3" calcext:value-type="float">
            <text:p>2.3</text:p>
          </table:table-cell>
          <table:table-cell/>
          <table:table-cell table:style-name="ce232" table:formula="of:=HLOOKUP([.H14];[.$AF$25:.$AW$26];2;0)" office:value-type="float" office:value="3.2" calcext:value-type="float">
            <text:p>3.2</text:p>
          </table:table-cell>
          <table:table-cell table:style-name="ce237" table:formula="of:=HLOOKUP([.I14];[.$AF$25:.$AW$26];2;0)" office:value-type="float" office:value="3" calcext:value-type="float">
            <text:p>3.0</text:p>
          </table:table-cell>
          <table:table-cell table:style-name="ce242" table:formula="of:=HLOOKUP([.J14];[.$AF$25:.$AW$26];2;0)" office:value-type="float" office:value="3.1" calcext:value-type="float">
            <text:p>3.1</text:p>
          </table:table-cell>
          <table:table-cell table:style-name="ce245" table:formula="of:=HLOOKUP([.K14];[.$AF$25:.$AW$26];2;0)" office:value-type="float" office:value="1.6" calcext:value-type="float">
            <text:p>1.6</text:p>
          </table:table-cell>
          <table:table-cell table:style-name="ce245" table:formula="of:=HLOOKUP([.L14];[.$AF$25:.$AW$26];2;0)" office:value-type="float" office:value="3.5" calcext:value-type="float">
            <text:p>3.5</text:p>
          </table:table-cell>
          <table:table-cell/>
          <table:table-cell table:style-name="ce250" table:formula="of:=HLOOKUP([.N14];[.$AF$25:.$AW$26];2;0)" office:value-type="float" office:value="3.2" calcext:value-type="float">
            <text:p>3.2</text:p>
          </table:table-cell>
          <table:table-cell table:style-name="ce254" table:formula="of:=HLOOKUP([.O14];[.$AF$25:.$AW$26];2;0)" office:value-type="float" office:value="2.1" calcext:value-type="float">
            <text:p>2.1</text:p>
          </table:table-cell>
          <table:table-cell table:style-name="ce258" table:formula="of:=HLOOKUP([.P14];[.$AF$25:.$AW$26];2;0)" office:value-type="float" office:value="2.2" calcext:value-type="float">
            <text:p>2.2</text:p>
          </table:table-cell>
          <table:table-cell table:style-name="ce263" table:formula="of:=HLOOKUP([.Q14];[.$AF$25:.$AW$26];2;0)" office:value-type="float" office:value="1.3" calcext:value-type="float">
            <text:p>1.3</text:p>
          </table:table-cell>
          <table:table-cell table:style-name="ce263" table:formula="of:=HLOOKUP([.R14];[.$AF$25:.$AW$26];2;0)" office:value-type="float" office:value="3.5" calcext:value-type="float">
            <text:p>3.5</text:p>
          </table:table-cell>
          <table:table-cell/>
          <table:table-cell table:style-name="ce270" table:formula="of:=HLOOKUP([.T14];[.$AF$25:.$AW$26];2;0)" office:value-type="float" office:value="2.3" calcext:value-type="float">
            <text:p>2.3</text:p>
          </table:table-cell>
          <table:table-cell table:style-name="ce274" table:formula="of:=HLOOKUP([.U14];[.$AF$25:.$AW$26];2;0)" office:value-type="float" office:value="3.2" calcext:value-type="float">
            <text:p>3.2</text:p>
          </table:table-cell>
          <table:table-cell table:style-name="ce277" table:formula="of:=HLOOKUP([.V14];[.$AF$25:.$AW$26];2;0)" office:value-type="float" office:value="2.2" calcext:value-type="float">
            <text:p>2.2</text:p>
          </table:table-cell>
          <table:table-cell table:style-name="ce281" table:formula="of:=HLOOKUP([.W14];[.$AF$25:.$AW$26];2;0)" office:value-type="float" office:value="3" calcext:value-type="float">
            <text:p>3.0</text:p>
          </table:table-cell>
          <table:table-cell table:style-name="ce281" table:formula="of:=HLOOKUP([.X14];[.$AF$25:.$AW$26];2;0)" office:value-type="float" office:value="3.5" calcext:value-type="float">
            <text:p>3.5</text:p>
          </table:table-cell>
          <table:table-cell/>
          <table:table-cell table:style-name="ce289" table:formula="of:=HLOOKUP([.Z14];[.$AF$25:.$AW$26];2;0)" office:value-type="float" office:value="3.2" calcext:value-type="float">
            <text:p>3.2</text:p>
          </table:table-cell>
          <table:table-cell table:style-name="ce293" table:formula="of:=HLOOKUP([.AA14];[.$AF$25:.$AW$26];2;0)" office:value-type="float" office:value="3.5" calcext:value-type="float">
            <text:p>3.5</text:p>
          </table:table-cell>
          <table:table-cell table:style-name="ce296" table:formula="of:=HLOOKUP([.AB14];[.$AF$25:.$AW$26];2;0)" office:value-type="float" office:value="4.5" calcext:value-type="float">
            <text:p>4.5</text:p>
          </table:table-cell>
          <table:table-cell table:style-name="ce299" table:formula="of:=HLOOKUP([.AC14];[.$AF$25:.$AW$26];2;0)" office:value-type="float" office:value="3.1" calcext:value-type="float">
            <text:p>3.1</text:p>
          </table:table-cell>
          <table:table-cell table:style-name="ce299" table:formula="of:=HLOOKUP([.AD14];[.$AF$25:.$AW$26];2;0)" office:value-type="float" office:value="2.3" calcext:value-type="float">
            <text:p>2.3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9" table:number-columns-repeated="5"/>
          <table:table-cell/>
          <table:table-cell table:style-name="ce29" table:number-columns-repeated="5"/>
          <table:table-cell/>
          <table:table-cell table:style-name="ce29" table:number-columns-repeated="5"/>
          <table:table-cell/>
          <table:table-cell table:style-name="ce29" table:number-columns-repeated="5"/>
          <table:table-cell/>
          <table:table-cell table:style-name="ce29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52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N35:.R37])-[.P37]" office:value-type="float" office:value="36" calcext:value-type="float" table:number-columns-spanned="2" table:number-rows-spanned="1">
            <text:p>36.0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17" table:formula="of:=HLOOKUP([.B16];[.$AF$25:.$AW$26];2;0)" office:value-type="float" office:value="4" calcext:value-type="float">
            <text:p>4.0</text:p>
          </table:table-cell>
          <table:table-cell table:style-name="ce222" table:formula="of:=HLOOKUP([.C16];[.$AF$25:.$AW$26];2;0)" office:value-type="float" office:value="4.5" calcext:value-type="float">
            <text:p>4.5</text:p>
          </table:table-cell>
          <table:table-cell table:style-name="ce225" table:formula="of:=HLOOKUP([.D16];[.$AF$25:.$AW$26];2;0)" office:value-type="float" office:value="3.1" calcext:value-type="float">
            <text:p>3.1</text:p>
          </table:table-cell>
          <table:table-cell table:style-name="ce228" table:formula="of:=HLOOKUP([.E16];[.$AF$25:.$AW$26];2;0)" office:value-type="float" office:value="3.2" calcext:value-type="float">
            <text:p>3.2</text:p>
          </table:table-cell>
          <table:table-cell table:style-name="ce228" table:formula="of:=HLOOKUP([.F16];[.$AF$25:.$AW$26];2;0)" office:value-type="float" office:value="3.5" calcext:value-type="float">
            <text:p>3.5</text:p>
          </table:table-cell>
          <table:table-cell/>
          <table:table-cell table:style-name="ce233" table:formula="of:=HLOOKUP([.H16];[.$AF$25:.$AW$26];2;0)" office:value-type="float" office:value="4.5" calcext:value-type="float">
            <text:p>4.5</text:p>
          </table:table-cell>
          <table:table-cell table:style-name="ce239" table:formula="of:=HLOOKUP([.I16];[.$AF$25:.$AW$26];2;0)" office:value-type="float" office:value="4" calcext:value-type="float">
            <text:p>4.0</text:p>
          </table:table-cell>
          <table:table-cell table:style-name="ce243" table:formula="of:=HLOOKUP([.J16];[.$AF$25:.$AW$26];2;0)" office:value-type="float" office:value="2.3" calcext:value-type="float">
            <text:p>2.3</text:p>
          </table:table-cell>
          <table:table-cell table:style-name="ce246" table:formula="of:=HLOOKUP([.K16];[.$AF$25:.$AW$26];2;0)" office:value-type="float" office:value="3.1" calcext:value-type="float">
            <text:p>3.1</text:p>
          </table:table-cell>
          <table:table-cell table:style-name="ce246" table:formula="of:=HLOOKUP([.L16];[.$AF$25:.$AW$26];2;0)" office:value-type="float" office:value="3.2" calcext:value-type="float">
            <text:p>3.2</text:p>
          </table:table-cell>
          <table:table-cell/>
          <table:table-cell table:style-name="ce251" table:formula="of:=HLOOKUP([.N16];[.$AF$25:.$AW$26];2;0)" office:value-type="float" office:value="4.5" calcext:value-type="float">
            <text:p>4.5</text:p>
          </table:table-cell>
          <table:table-cell table:style-name="ce255" table:formula="of:=HLOOKUP([.O16];[.$AF$25:.$AW$26];2;0)" office:value-type="float" office:value="4" calcext:value-type="float">
            <text:p>4.0</text:p>
          </table:table-cell>
          <table:table-cell table:style-name="ce260" table:formula="of:=HLOOKUP([.P16];[.$AF$25:.$AW$26];2;0)" office:value-type="float" office:value="3.1" calcext:value-type="float">
            <text:p>3.1</text:p>
          </table:table-cell>
          <table:table-cell table:style-name="ce264" table:formula="of:=HLOOKUP([.Q16];[.$AF$25:.$AW$26];2;0)" office:value-type="float" office:value="3" calcext:value-type="float">
            <text:p>3.0</text:p>
          </table:table-cell>
          <table:table-cell table:style-name="ce264" table:formula="of:=HLOOKUP([.R16];[.$AF$25:.$AW$26];2;0)" office:value-type="float" office:value="3.5" calcext:value-type="float">
            <text:p>3.5</text:p>
          </table:table-cell>
          <table:table-cell/>
          <table:table-cell table:style-name="ce271" table:formula="of:=HLOOKUP([.T16];[.$AF$25:.$AW$26];2;0)" office:value-type="float" office:value="4" calcext:value-type="float">
            <text:p>4.0</text:p>
          </table:table-cell>
          <table:table-cell table:style-name="ce275" table:formula="of:=HLOOKUP([.U16];[.$AF$25:.$AW$26];2;0)" office:value-type="float" office:value="3.5" calcext:value-type="float">
            <text:p>3.5</text:p>
          </table:table-cell>
          <table:table-cell table:style-name="ce278" table:formula="of:=HLOOKUP([.V16];[.$AF$25:.$AW$26];2;0)" office:value-type="float" office:value="2.3" calcext:value-type="float">
            <text:p>2.3</text:p>
          </table:table-cell>
          <table:table-cell table:style-name="ce283" table:formula="of:=HLOOKUP([.W16];[.$AF$25:.$AW$26];2;0)" office:value-type="float" office:value="3.2" calcext:value-type="float">
            <text:p>3.2</text:p>
          </table:table-cell>
          <table:table-cell table:style-name="ce283" table:formula="of:=HLOOKUP([.X16];[.$AF$25:.$AW$26];2;0)" office:value-type="float" office:value="4.5" calcext:value-type="float">
            <text:p>4.5</text:p>
          </table:table-cell>
          <table:table-cell/>
          <table:table-cell table:style-name="ce290" table:formula="of:=HLOOKUP([.Z16];[.$AF$25:.$AW$26];2;0)" office:value-type="float" office:value="4.5" calcext:value-type="float">
            <text:p>4.5</text:p>
          </table:table-cell>
          <table:table-cell table:style-name="ce294" table:formula="of:=HLOOKUP([.AA16];[.$AF$25:.$AW$26];2;0)" office:value-type="float" office:value="4" calcext:value-type="float">
            <text:p>4.0</text:p>
          </table:table-cell>
          <table:table-cell table:style-name="ce297" table:formula="of:=HLOOKUP([.AB16];[.$AF$25:.$AW$26];2;0)" office:value-type="float" office:value="3.5" calcext:value-type="float">
            <text:p>3.5</text:p>
          </table:table-cell>
          <table:table-cell table:style-name="ce300" table:formula="of:=HLOOKUP([.AC16];[.$AF$25:.$AW$26];2;0)" office:value-type="float" office:value="3.1" calcext:value-type="float">
            <text:p>3.1</text:p>
          </table:table-cell>
          <table:table-cell table:style-name="ce300" table:formula="of:=HLOOKUP([.AD16];[.$AF$25:.$AW$26];2;0)" office:value-type="float" office:value="3.2" calcext:value-type="float">
            <text:p>3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18" table:formula="of:=HLOOKUP([.B17];[.$AF$25:.$AW$26];2;0)" office:value-type="float" office:value="3" calcext:value-type="float">
            <text:p>3.0</text:p>
          </table:table-cell>
          <table:table-cell table:style-name="ce222" table:formula="of:=HLOOKUP([.C17];[.$AF$25:.$AW$26];2;0)" office:value-type="float" office:value="2.3" calcext:value-type="float">
            <text:p>2.3</text:p>
          </table:table-cell>
          <table:table-cell table:style-name="ce225" table:formula="of:=HLOOKUP([.D17];[.$AF$25:.$AW$26];2;0)" office:value-type="float" office:value="1.6" calcext:value-type="float">
            <text:p>1.6</text:p>
          </table:table-cell>
          <table:table-cell table:style-name="ce228" table:formula="of:=HLOOKUP([.E17];[.$AF$25:.$AW$26];2;0)" office:value-type="float" office:value="2" calcext:value-type="float">
            <text:p>2.0</text:p>
          </table:table-cell>
          <table:table-cell table:style-name="ce228" table:formula="of:=HLOOKUP([.F17];[.$AF$25:.$AW$26];2;0)" office:value-type="float" office:value="2.1" calcext:value-type="float">
            <text:p>2.1</text:p>
          </table:table-cell>
          <table:table-cell/>
          <table:table-cell table:style-name="ce234" table:formula="of:=HLOOKUP([.H17];[.$AF$25:.$AW$26];2;0)" office:value-type="float" office:value="3.5" calcext:value-type="float">
            <text:p>3.5</text:p>
          </table:table-cell>
          <table:table-cell table:style-name="ce239" table:formula="of:=HLOOKUP([.I17];[.$AF$25:.$AW$26];2;0)" office:value-type="float" office:value="2" calcext:value-type="float">
            <text:p>2.0</text:p>
          </table:table-cell>
          <table:table-cell table:style-name="ce243" table:formula="of:=HLOOKUP([.J17];[.$AF$25:.$AW$26];2;0)" office:value-type="float" office:value="1.3" calcext:value-type="float">
            <text:p>1.3</text:p>
          </table:table-cell>
          <table:table-cell table:style-name="ce246" table:formula="of:=HLOOKUP([.K17];[.$AF$25:.$AW$26];2;0)" office:value-type="float" office:value="1.6" calcext:value-type="float">
            <text:p>1.6</text:p>
          </table:table-cell>
          <table:table-cell table:style-name="ce246" table:formula="of:=HLOOKUP([.L17];[.$AF$25:.$AW$26];2;0)" office:value-type="float" office:value="2.1" calcext:value-type="float">
            <text:p>2.1</text:p>
          </table:table-cell>
          <table:table-cell/>
          <table:table-cell table:style-name="ce252" table:formula="of:=HLOOKUP([.N17];[.$AF$25:.$AW$26];2;0)" office:value-type="float" office:value="3.1" calcext:value-type="float">
            <text:p>3.1</text:p>
          </table:table-cell>
          <table:table-cell table:style-name="ce255" table:formula="of:=HLOOKUP([.O17];[.$AF$25:.$AW$26];2;0)" office:value-type="float" office:value="2.1" calcext:value-type="float">
            <text:p>2.1</text:p>
          </table:table-cell>
          <table:table-cell table:style-name="ce260" table:formula="of:=HLOOKUP([.P17];[.$AF$25:.$AW$26];2;0)" office:value-type="float" office:value="1.6" calcext:value-type="float">
            <text:p>1.6</text:p>
          </table:table-cell>
          <table:table-cell table:style-name="ce264" table:formula="of:=HLOOKUP([.Q17];[.$AF$25:.$AW$26];2;0)" office:value-type="float" office:value="1.3" calcext:value-type="float">
            <text:p>1.3</text:p>
          </table:table-cell>
          <table:table-cell table:style-name="ce264" table:formula="of:=HLOOKUP([.R17];[.$AF$25:.$AW$26];2;0)" office:value-type="float" office:value="2.3" calcext:value-type="float">
            <text:p>2.3</text:p>
          </table:table-cell>
          <table:table-cell/>
          <table:table-cell table:style-name="ce272" table:formula="of:=HLOOKUP([.T17];[.$AF$25:.$AW$26];2;0)" office:value-type="float" office:value="2.1" calcext:value-type="float">
            <text:p>2.1</text:p>
          </table:table-cell>
          <table:table-cell table:style-name="ce275" table:formula="of:=HLOOKUP([.U17];[.$AF$25:.$AW$26];2;0)" office:value-type="float" office:value="1.6" calcext:value-type="float">
            <text:p>1.6</text:p>
          </table:table-cell>
          <table:table-cell table:style-name="ce278" table:formula="of:=HLOOKUP([.V17];[.$AF$25:.$AW$26];2;0)" office:value-type="float" office:value="1.3" calcext:value-type="float">
            <text:p>1.3</text:p>
          </table:table-cell>
          <table:table-cell table:style-name="ce283" table:formula="of:=HLOOKUP([.W17];[.$AF$25:.$AW$26];2;0)" office:value-type="float" office:value="2.2" calcext:value-type="float">
            <text:p>2.2</text:p>
          </table:table-cell>
          <table:table-cell table:style-name="ce283" table:formula="of:=HLOOKUP([.X17];[.$AF$25:.$AW$26];2;0)" office:value-type="float" office:value="3" calcext:value-type="float">
            <text:p>3.0</text:p>
          </table:table-cell>
          <table:table-cell/>
          <table:table-cell table:style-name="ce291" table:formula="of:=HLOOKUP([.Z17];[.$AF$25:.$AW$26];2;0)" office:value-type="float" office:value="2.2" calcext:value-type="float">
            <text:p>2.2</text:p>
          </table:table-cell>
          <table:table-cell table:style-name="ce294" table:formula="of:=HLOOKUP([.AA17];[.$AF$25:.$AW$26];2;0)" office:value-type="float" office:value="2" calcext:value-type="float">
            <text:p>2.0</text:p>
          </table:table-cell>
          <table:table-cell table:style-name="ce297" table:formula="of:=HLOOKUP([.AB17];[.$AF$25:.$AW$26];2;0)" office:value-type="float" office:value="1.3" calcext:value-type="float">
            <text:p>1.3</text:p>
          </table:table-cell>
          <table:table-cell table:style-name="ce300" table:formula="of:=HLOOKUP([.AC17];[.$AF$25:.$AW$26];2;0)" office:value-type="float" office:value="1.2" calcext:value-type="float">
            <text:p>1.2</text:p>
          </table:table-cell>
          <table:table-cell table:style-name="ce300" table:formula="of:=HLOOKUP([.AD17];[.$AF$25:.$AW$26];2;0)" office:value-type="float" office:value="3" calcext:value-type="float">
            <text:p>3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19" table:formula="of:=HLOOKUP([.B18];[.$AF$25:.$AW$26];2;0)" office:value-type="float" office:value="3.2" calcext:value-type="float">
            <text:p>3.2</text:p>
          </table:table-cell>
          <table:table-cell table:style-name="ce222" table:formula="of:=HLOOKUP([.C18];[.$AF$25:.$AW$26];2;0)" office:value-type="float" office:value="1.1" calcext:value-type="float">
            <text:p>1.1</text:p>
          </table:table-cell>
          <table:table-cell table:style-name="ce225" table:formula="of:=HLOOKUP([.D18];[.$AF$25:.$AW$26];2;0)" office:value-type="float" office:value="1.2" calcext:value-type="float">
            <text:p>1.2</text:p>
          </table:table-cell>
          <table:table-cell table:style-name="ce228" table:formula="of:=HLOOKUP([.E18];[.$AF$25:.$AW$26];2;0)" office:value-type="float" office:value="1.3" calcext:value-type="float">
            <text:p>1.3</text:p>
          </table:table-cell>
          <table:table-cell table:style-name="ce228" table:formula="of:=HLOOKUP([.F18];[.$AF$25:.$AW$26];2;0)" office:value-type="float" office:value="2.2" calcext:value-type="float">
            <text:p>2.2</text:p>
          </table:table-cell>
          <table:table-cell/>
          <table:table-cell table:style-name="ce234" table:formula="of:=HLOOKUP([.H18];[.$AF$25:.$AW$26];2;0)" office:value-type="float" office:value="2.2" calcext:value-type="float">
            <text:p>2.2</text:p>
          </table:table-cell>
          <table:table-cell table:style-name="ce240" table:formula="of:=HLOOKUP([.I18];[.$AF$25:.$AW$26];2;0)" office:value-type="float" office:value="3.1" calcext:value-type="float">
            <text:p>3.1</text:p>
          </table:table-cell>
          <table:table-cell table:style-name="ce243" table:formula="of:=HLOOKUP([.J18];[.$AF$25:.$AW$26];2;0)" office:value-type="float" office:value="1.1" calcext:value-type="float">
            <text:p>1.1</text:p>
          </table:table-cell>
          <table:table-cell table:style-name="ce246" table:formula="of:=HLOOKUP([.K18];[.$AF$25:.$AW$26];2;0)" office:value-type="float" office:value="1.2" calcext:value-type="float">
            <text:p>1.2</text:p>
          </table:table-cell>
          <table:table-cell table:style-name="ce246" table:formula="of:=HLOOKUP([.L18];[.$AF$25:.$AW$26];2;0)" office:value-type="float" office:value="3" calcext:value-type="float">
            <text:p>3.0</text:p>
          </table:table-cell>
          <table:table-cell/>
          <table:table-cell table:style-name="ce252" table:formula="of:=HLOOKUP([.N18];[.$AF$25:.$AW$26];2;0)" office:value-type="float" office:value="2" calcext:value-type="float">
            <text:p>2.0</text:p>
          </table:table-cell>
          <table:table-cell table:style-name="ce255" table:formula="of:=HLOOKUP([.O18];[.$AF$25:.$AW$26];2;0)" office:value-type="float" office:value="1.2" calcext:value-type="float">
            <text:p>1.2</text:p>
          </table:table-cell>
          <table:table-cell table:style-name="ce261" table:formula="of:=HLOOKUP([.P18];[.$AF$25:.$AW$26];2;0)" office:value-type="float" office:value="3" calcext:value-type="float">
            <text:p>3.0</text:p>
          </table:table-cell>
          <table:table-cell table:style-name="ce264" table:formula="of:=HLOOKUP([.Q18];[.$AF$25:.$AW$26];2;0)" office:value-type="float" office:value="1.1" calcext:value-type="float">
            <text:p>1.1</text:p>
          </table:table-cell>
          <table:table-cell table:style-name="ce264" table:formula="of:=HLOOKUP([.R18];[.$AF$25:.$AW$26];2;0)" office:value-type="float" office:value="3.2" calcext:value-type="float">
            <text:p>3.2</text:p>
          </table:table-cell>
          <table:table-cell/>
          <table:table-cell table:style-name="ce272" table:formula="of:=HLOOKUP([.T18];[.$AF$25:.$AW$26];2;0)" office:value-type="float" office:value="2" calcext:value-type="float">
            <text:p>2.0</text:p>
          </table:table-cell>
          <table:table-cell table:style-name="ce275" table:formula="of:=HLOOKUP([.U18];[.$AF$25:.$AW$26];2;0)" office:value-type="float" office:value="1.2" calcext:value-type="float">
            <text:p>1.2</text:p>
          </table:table-cell>
          <table:table-cell table:style-name="ce278" table:formula="of:=HLOOKUP([.V18];[.$AF$25:.$AW$26];2;0)" office:value-type="float" office:value="1.1" calcext:value-type="float">
            <text:p>1.1</text:p>
          </table:table-cell>
          <table:table-cell table:style-name="ce284" table:formula="of:=HLOOKUP([.W18];[.$AF$25:.$AW$26];2;0)" office:value-type="float" office:value="1.6" calcext:value-type="float">
            <text:p>1.6</text:p>
          </table:table-cell>
          <table:table-cell table:style-name="ce283" table:formula="of:=HLOOKUP([.X18];[.$AF$25:.$AW$26];2;0)" office:value-type="float" office:value="3.1" calcext:value-type="float">
            <text:p>3.1</text:p>
          </table:table-cell>
          <table:table-cell/>
          <table:table-cell table:style-name="ce291" table:formula="of:=HLOOKUP([.Z18];[.$AF$25:.$AW$26];2;0)" office:value-type="float" office:value="2.3" calcext:value-type="float">
            <text:p>2.3</text:p>
          </table:table-cell>
          <table:table-cell table:style-name="ce294" table:formula="of:=HLOOKUP([.AA18];[.$AF$25:.$AW$26];2;0)" office:value-type="float" office:value="2.1" calcext:value-type="float">
            <text:p>2.1</text:p>
          </table:table-cell>
          <table:table-cell table:style-name="ce297" table:formula="of:=HLOOKUP([.AB18];[.$AF$25:.$AW$26];2;0)" office:value-type="float" office:value="1.6" calcext:value-type="float">
            <text:p>1.6</text:p>
          </table:table-cell>
          <table:table-cell table:style-name="ce300" table:formula="of:=HLOOKUP([.AC18];[.$AF$25:.$AW$26];2;0)" office:value-type="float" office:value="1.1" calcext:value-type="float">
            <text:p>1.1</text:p>
          </table:table-cell>
          <table:table-cell table:style-name="ce303" table:formula="of:=HLOOKUP([.AD18];[.$AF$25:.$AW$26];2;0)" office:value-type="float" office:value="3.5" calcext:value-type="float">
            <text:p>3.5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4'.Z2:'keys 4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0:'keys 4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0:'keys 4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0:'keys 4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0:'keys 4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0:'keys 4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5:'keys 4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5:'keys 4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5:'keys 4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5:'keys 4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5:'keys 4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25:'keys 4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25:'keys 4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25:'keys 4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5:'keys 4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25:'keys 4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5:'keys 4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:'keys 4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6:'keys 4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3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730"/>
        <table:table-column table:style-name="co1" table:default-cell-style-name="ce742"/>
        <table:table-column table:style-name="co1" table:default-cell-style-name="ce746"/>
        <table:table-column table:style-name="co1" table:number-columns-repeated="2" table:default-cell-style-name="ce750"/>
        <table:table-column table:style-name="co1" table:default-cell-style-name="ce29"/>
        <table:table-column table:style-name="co1" table:default-cell-style-name="ce730"/>
        <table:table-column table:style-name="co1" table:default-cell-style-name="Default"/>
        <table:table-column table:style-name="co1" table:default-cell-style-name="ce746"/>
        <table:table-column table:style-name="co1" table:number-columns-repeated="2" table:default-cell-style-name="ce750"/>
        <table:table-column table:style-name="co1" table:default-cell-style-name="ce29"/>
        <table:table-column table:style-name="co1" table:default-cell-style-name="ce730"/>
        <table:table-column table:style-name="co1" table:default-cell-style-name="ce742"/>
        <table:table-column table:style-name="co1" table:default-cell-style-name="ce746"/>
        <table:table-column table:style-name="co1" table:default-cell-style-name="ce750"/>
        <table:table-column table:style-name="co1" table:default-cell-style-name="Default"/>
        <table:table-column table:style-name="co1" table:default-cell-style-name="ce29"/>
        <table:table-column table:style-name="co1" table:default-cell-style-name="ce730"/>
        <table:table-column table:style-name="co1" table:default-cell-style-name="ce742"/>
        <table:table-column table:style-name="co1" table:default-cell-style-name="ce746"/>
        <table:table-column table:style-name="co1" table:number-columns-repeated="2" table:default-cell-style-name="ce750"/>
        <table:table-column table:style-name="co1" table:default-cell-style-name="ce29"/>
        <table:table-column table:style-name="co1" table:default-cell-style-name="ce730"/>
        <table:table-column table:style-name="co1" table:default-cell-style-name="ce742"/>
        <table:table-column table:style-name="co1" table:default-cell-style-name="ce746"/>
        <table:table-column table:style-name="co1" table:default-cell-style-name="ce750"/>
        <table:table-column table:style-name="co1" table:number-columns-repeated="70" table:default-cell-style-name="Default"/>
        <table:table-column table:style-name="co1" table:number-columns-repeated="16285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/>
          <table:table-cell table:style-name="ce790" office:value-type="string" calcext:value-type="string">
            <text:p>start priorities</text:p>
          </table:table-cell>
          <table:table-cell table:style-name="Default" table:number-columns-repeated="10"/>
          <table:table-cell table:number-columns-repeated="2"/>
          <table:table-cell table:style-name="ce790" office:value-type="string" calcext:value-type="string">
            <text:p>json</text:p>
          </table:table-cell>
          <table:table-cell table:number-columns-repeated="67"/>
          <table:table-cell table:style-name="Default" table:number-columns-repeated="16285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table:style-name="ce536"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table:style-name="ce538"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374" office:value-type="float" office:value="14" calcext:value-type="float">
            <text:p>14</text:p>
          </table:table-cell>
          <table:table-cell table:style-name="ce375" office:value-type="float" office:value="6" calcext:value-type="float">
            <text:p>6</text:p>
          </table:table-cell>
          <table:table-cell table:style-name="ce374" office:value-type="float" office:value="3" calcext:value-type="float">
            <text:p>3</text:p>
          </table:table-cell>
          <table:table-cell table:style-name="ce375" office:value-type="float" office:value="5" calcext:value-type="float">
            <text:p>5</text:p>
          </table:table-cell>
          <table:table-cell table:style-name="ce374" office:value-type="float" office:value="13" calcext:value-type="float">
            <text:p>13</text:p>
          </table:table-cell>
          <table:table-cell table:style-name="Default"/>
          <table:table-cell table:style-name="ce394" table:formula="of:=SUM([.B25];[.H25];[.N25];[.T25];[.Z25];[.Z30];[.T30];[.N30];[.H30];[.B30];[.B35];[.H35];[.N35];[.T35];[.Z35])/[.$Z$6]" office:value-type="float" office:value="54.4" calcext:value-type="float">
            <text:p>54.4</text:p>
          </table:table-cell>
          <table:table-cell table:style-name="ce394" table:formula="of:=SUM([.C25];[.I25];[.O25];[.U25];[.AA25];[.AA30];[.U30];[.O30];[.I30];[.C30];[.C35];[.I35];[.O35];[.U35];[.AA35])/[.$Z$6]" office:value-type="float" office:value="38" calcext:value-type="float">
            <text:p>38.0</text:p>
          </table:table-cell>
          <table:table-cell table:style-name="ce394" table:formula="of:=SUM([.D25];[.J25];[.P25];[.V25];[.AB25];[.AB30];[.V30];[.P30];[.J30];[.D30];[.D35];[.J35];[.P35];[.V35];[.AB35])/[.$Z$6]" office:value-type="float" office:value="29.4" calcext:value-type="float">
            <text:p>29.4</text:p>
          </table:table-cell>
          <table:table-cell table:style-name="ce394" table:formula="of:=SUM([.E25];[.K25];[.Q25];[.W25];[.AC25];[.AC30];[.W30];[.Q30];[.K30];[.E30];[.E35];[.K35];[.Q35];[.W35];[.AC35])/[.$Z$6]" office:value-type="float" office:value="32.3" calcext:value-type="float">
            <text:p>32.3</text:p>
          </table:table-cell>
          <table:table-cell table:style-name="ce394" table:formula="of:=SUM([.F25];[.L25];[.R25];[.X25];[.AD25];[.AD30];[.X30];[.R30];[.L30];[.F30];[.F35];[.L35];[.R35];[.X35];[.AD35])/[.$Z$6]" office:value-type="float" office:value="46" calcext:value-type="float">
            <text:p>46.0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}</text:p>
          </table:table-cell>
          <table:covered-table-cell table:number-columns-repeated="28" table:style-name="ce189"/>
          <table:table-cell table:style-name="ce841"/>
          <table:table-cell table:style-name="ce189"/>
          <table:table-cell/>
          <table:table-cell table:style-name="ce189" table:number-columns-repeated="27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table:style-name="ce538"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375" office:value-type="float" office:value="8" calcext:value-type="float">
            <text:p>8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float" office:value="0" calcext:value-type="float">
            <text:p>0</text:p>
          </table:table-cell>
          <table:table-cell table:style-name="ce374" office:value-type="float" office:value="1" calcext:value-type="float">
            <text:p>1</text:p>
          </table:table-cell>
          <table:table-cell table:style-name="ce375" office:value-type="float" office:value="7" calcext:value-type="float">
            <text:p>7</text:p>
          </table:table-cell>
          <table:table-cell table:style-name="Default"/>
          <table:table-cell table:style-name="ce394" table:formula="of:=SUM([.B26];[.H26];[.N26];[.T26];[.Z26];[.Z31];[.T31];[.N31];[.H31];[.B31];[.B36];[.H36];[.N36];[.T36];[.Z36])/[.$Z$6]" office:value-type="float" office:value="38.1" calcext:value-type="float">
            <text:p>38.1</text:p>
          </table:table-cell>
          <table:table-cell table:style-name="ce394" table:formula="of:=SUM([.C26];[.I26];[.O26];[.U26];[.AA26];[.AA31];[.U31];[.O31];[.I31];[.C31];[.C36];[.I36];[.O36];[.U36];[.AA36])/[.$Z$6]" office:value-type="float" office:value="27" calcext:value-type="float">
            <text:p>27.0</text:p>
          </table:table-cell>
          <table:table-cell table:style-name="ce394" table:formula="of:=SUM([.D26];[.J26];[.P26];[.V26];[.AB26];[.AB31];[.V31];[.P31];[.J31];[.D31];[.D36];[.J36];[.P36];[.V36];[.AB36])/[.$Z$6]" office:value-type="float" office:value="22.9" calcext:value-type="float">
            <text:p>22.9</text:p>
          </table:table-cell>
          <table:table-cell table:style-name="ce394" table:formula="of:=SUM([.E26];[.K26];[.Q26];[.W26];[.AC26];[.AC31];[.W31];[.Q31];[.K31];[.E31];[.E36];[.K36];[.Q36];[.W36];[.AC36])/[.$Z$6]" office:value-type="float" office:value="22.9" calcext:value-type="float">
            <text:p>22.9</text:p>
          </table:table-cell>
          <table:table-cell table:style-name="ce394" table:formula="of:=SUM([.F26];[.L26];[.R26];[.X26];[.AD26];[.AD31];[.X31];[.R31];[.L31];[.F31];[.F36];[.L36];[.R36];[.X36];[.AD36])/[.$Z$6]" office:value-type="float" office:value="37.1" calcext:value-type="float">
            <text:p>37.1</text:p>
          </table:table-cell>
          <table:table-cell/>
          <table:covered-table-cell table:number-columns-repeated="29" table:style-name="ce189"/>
          <table:table-cell table:style-name="ce189" table:number-columns-repeated="30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table:style-name="ce536"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374" office:value-type="float" office:value="12" calcext:value-type="float">
            <text:p>12</text:p>
          </table:table-cell>
          <table:table-cell table:style-name="ce375" office:value-type="float" office:value="10" calcext:value-type="float">
            <text:p>10</text:p>
          </table:table-cell>
          <table:table-cell table:style-name="ce375" office:value-type="float" office:value="9" calcext:value-type="float">
            <text:p>9</text:p>
          </table:table-cell>
          <table:table-cell table:style-name="ce374" office:value-type="float" office:value="4" calcext:value-type="float">
            <text:p>4</text:p>
          </table:table-cell>
          <table:table-cell table:style-name="ce374" office:value-type="float" office:value="11" calcext:value-type="float">
            <text:p>11</text:p>
          </table:table-cell>
          <table:table-cell table:style-name="Default"/>
          <table:table-cell table:style-name="ce394" table:formula="of:=SUM([.B27];[.H27];[.N27];[.T27];[.Z27];[.Z32];[.T32];[.N32];[.H32];[.B32];[.B37];[.H37];[.N37];[.T37];[.Z37])/[.$Z$6]" office:value-type="float" office:value="49.4" calcext:value-type="float">
            <text:p>49.4</text:p>
          </table:table-cell>
          <table:table-cell table:style-name="ce394" table:formula="of:=SUM([.C27];[.I27];[.O27];[.U27];[.AA27];[.AA32];[.U32];[.O32];[.I32];[.C32];[.C37];[.I37];[.O37];[.U37];[.AA37])/[.$Z$6]" office:value-type="float" office:value="45.4" calcext:value-type="float">
            <text:p>45.4</text:p>
          </table:table-cell>
          <table:table-cell table:style-name="ce394" table:formula="of:=SUM([.D27];[.J27];[.P27];[.V27];[.AB27];[.AB32];[.V32];[.P32];[.J32];[.D32];[.D37];[.J37];[.P37];[.V37];[.AB37])/[.$Z$6]" office:value-type="float" office:value="41.4" calcext:value-type="float">
            <text:p>41.4</text:p>
          </table:table-cell>
          <table:table-cell table:style-name="ce394" table:formula="of:=SUM([.E27];[.K27];[.Q27];[.W27];[.AC27];[.AC32];[.W32];[.Q32];[.K32];[.E32];[.E37];[.K37];[.Q37];[.W37];[.AC37])/[.$Z$6]" office:value-type="float" office:value="33" calcext:value-type="float">
            <text:p>33.0</text:p>
          </table:table-cell>
          <table:table-cell table:style-name="ce394" table:formula="of:=SUM([.F27];[.L27];[.R27];[.X27];[.AD27];[.AD32];[.X32];[.R32];[.L32];[.F32];[.F37];[.L37];[.R37];[.X37];[.AD37])/[.$Z$6]" office:value-type="float" office:value="45.3" calcext:value-type="float">
            <text:p>45.3</text:p>
          </table:table-cell>
          <table:table-cell table:style-name="ce184"/>
          <table:covered-table-cell table:number-columns-repeated="29" table:style-name="ce189"/>
          <table:table-cell table:style-name="ce841"/>
          <table:table-cell table:style-name="ce189" table:number-columns-repeated="29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99" table:number-columns-spanned="1" table:number-rows-spanned="2"/>
          <table:table-cell table:style-name="ce536"/>
          <table:table-cell table:style-name="ce537"/>
          <table:table-cell table:style-name="ce641"/>
          <table:table-cell table:style-name="ce538"/>
          <table:table-cell/>
          <table:table-cell table:style-name="Default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 table:style-name="Default"/>
          <table:table-cell table:style-name="ce682"/>
          <table:table-cell table:style-name="ce692"/>
          <table:table-cell table:style-name="ce682"/>
          <table:table-cell table:style-name="Default"/>
          <table:table-cell table:style-name="ce184" table:number-columns-repeated="2"/>
          <table:covered-table-cell table:style-name="ce184"/>
          <table:covered-table-cell table:number-columns-repeated="28"/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54"/>
          <table:table-cell/>
          <table:covered-table-cell table:style-name="ce54"/>
          <table:covered-table-cell table:number-columns-repeated="2" table:style-name="ce590"/>
          <table:covered-table-cell table:style-name="ce99"/>
          <table:table-cell table:style-name="ce4" table:number-columns-repeated="4"/>
          <table:table-cell/>
          <table:table-cell table:style-name="Default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 table:style-name="Default"/>
          <table:table-cell table:style-name="ce813" office:value-type="float" office:value="1" calcext:value-type="float">
            <text:p>1.0</text:p>
          </table:table-cell>
          <table:table-cell table:style-name="Default" table:number-columns-repeated="3"/>
          <table:table-cell table:number-columns-repeated="2"/>
          <table:covered-table-cell table:number-columns-repeated="13"/>
          <table:covered-table-cell table:number-columns-repeated="3" table:style-name="ce184"/>
          <table:covered-table-cell table:number-columns-repeated="13"/>
          <table:table-cell table:number-columns-repeated="39"/>
          <table:table-cell table:style-name="Default" table:number-columns-repeated="16285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1"/>
          <table:table-cell table:number-columns-repeated="70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94"/>
          <table:table-cell office:value-type="float" office:value="9" calcext:value-type="float">
            <text:p>9</text:p>
          </table:table-cell>
          <table:table-cell table:style-name="ce543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94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543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2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9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X$2]" office:value-type="float" office:value="13" calcext:value-type="float">
            <text:p>13</text:p>
          </table:table-cell>
          <table:table-cell/>
          <table:table-cell table:style-name="ce708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08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708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708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708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708"/>
          <table:table-cell table:style-name="ce708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708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08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K8])" office:value-type="string" office:string-value="&quot;3&quot;: 2" calcext:value-type="string">
            <text:p>"3": 2</text:p>
          </table:table-cell>
          <table:table-cell table:style-name="ce708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708"/>
          <table:table-cell table:style-name="ce708" table:formula="of:=COM.MICROSOFT.CONCAT(&quot;&quot;&quot;&quot;;[.$B$2]; &quot;&quot;&quot;: &quot;; [.N8])" office:value-type="string" office:string-value="&quot;0&quot;: 8" calcext:value-type="string">
            <text:p>"0": 8</text:p>
          </table:table-cell>
          <table:table-cell table:style-name="ce708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08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R8])" office:value-type="string" office:string-value="&quot;4&quot;: 7" calcext:value-type="string">
            <text:p>"4": 7</text:p>
          </table:table-cell>
          <table:table-cell table:style-name="ce708"/>
          <table:table-cell table:style-name="ce708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708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708" table:formula="of:=COM.MICROSOFT.CONCAT(&quot;&quot;&quot;&quot;;[.$F$2]; &quot;&quot;&quot;: &quot;; [.X8])" office:value-type="string" office:string-value="&quot;4&quot;: 7" calcext:value-type="string">
            <text:p>"4": 7</text:p>
          </table:table-cell>
          <table:table-cell table:style-name="ce708"/>
          <table:table-cell table:style-name="ce708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708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708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708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" calcext:value-type="string">
            <text:p>"0": { "0": 14, "1": 1, "2": 2, "3": 3, "4": 5, "5": 9, "6": 8, "7": 7, "8": 4, "9": 6, "10": 12, "11": 13, "12": 14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94"/>
          <table:table-cell office:value-type="float" office:value="8" calcext:value-type="float">
            <text:p>8</text:p>
          </table:table-cell>
          <table:table-cell table:style-name="ce74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708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708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708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708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708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708"/>
          <table:table-cell table:style-name="ce708" table:formula="of:=COM.MICROSOFT.CONCAT(&quot;&quot;&quot;&quot;;[.$B$3]; &quot;&quot;&quot;: &quot;; [.H9])" office:value-type="string" office:string-value="&quot;5&quot;: 8" calcext:value-type="string">
            <text:p>"5": 8</text:p>
          </table:table-cell>
          <table:table-cell table:style-name="ce708" table:formula="of:=COM.MICROSOFT.CONCAT(&quot;&quot;&quot;&quot;;[.$C$3]; &quot;&quot;&quot;: &quot;; [.I9])" office:value-type="string" office:string-value="&quot;6&quot;: 7" calcext:value-type="string">
            <text:p>"6": 7</text:p>
          </table:table-cell>
          <table:table-cell table:style-name="ce708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708" table:formula="of:=COM.MICROSOFT.CONCAT(&quot;&quot;&quot;&quot;;[.$E$3]; &quot;&quot;&quot;: &quot;; [.K9])" office:value-type="string" office:string-value="&quot;8&quot;: 3" calcext:value-type="string">
            <text:p>"8": 3</text:p>
          </table:table-cell>
          <table:table-cell table:style-name="ce708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708"/>
          <table:table-cell table:style-name="ce708" table:formula="of:=COM.MICROSOFT.CONCAT(&quot;&quot;&quot;&quot;;[.$B$3]; &quot;&quot;&quot;: &quot;; [.N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708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708" table:formula="of:=COM.MICROSOFT.CONCAT(&quot;&quot;&quot;&quot;;[.$E$3]; &quot;&quot;&quot;: &quot;; [.Q9])" office:value-type="string" office:string-value="&quot;8&quot;: 3" calcext:value-type="string">
            <text:p>"8": 3</text:p>
          </table:table-cell>
          <table:table-cell table:style-name="ce708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708" table:formula="of:=COM.MICROSOFT.CONCAT(&quot;&quot;&quot;&quot;;[.$C$3]; &quot;&quot;&quot;: &quot;; [.U9])" office:value-type="string" office:string-value="&quot;6&quot;: 6" calcext:value-type="string">
            <text:p>"6": 6</text:p>
          </table:table-cell>
          <table:table-cell table:style-name="ce708" table:formula="of:=COM.MICROSOFT.CONCAT(&quot;&quot;&quot;&quot;;[.$D$3]; &quot;&quot;&quot;: &quot;; [.V9])" office:value-type="string" office:string-value="&quot;7&quot;: 8" calcext:value-type="string">
            <text:p>"7": 8</text:p>
          </table:table-cell>
          <table:table-cell table:style-name="ce708" table:formula="of:=COM.MICROSOFT.CONCAT(&quot;&quot;&quot;&quot;;[.$E$3]; &quot;&quot;&quot;: &quot;; [.W9])" office:value-type="string" office:string-value="&quot;8&quot;: 4" calcext:value-type="string">
            <text:p>"8": 4</text:p>
          </table:table-cell>
          <table:table-cell table:style-name="ce708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AA9])" office:value-type="string" office:string-value="&quot;6&quot;: 5" calcext:value-type="string">
            <text:p>"6": 5</text:p>
          </table:table-cell>
          <table:table-cell table:style-name="ce708" table:formula="of:=COM.MICROSOFT.CONCAT(&quot;&quot;&quot;&quot;;[.$D$3]; &quot;&quot;&quot;: &quot;; [.AB9])" office:value-type="string" office:string-value="&quot;7&quot;: 4" calcext:value-type="string">
            <text:p>"7": 4</text:p>
          </table:table-cell>
          <table:table-cell table:style-name="ce708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708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number-columns-repeated="2"/>
          <table:table-cell table:style-name="ce540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" calcext:value-type="string">
            <text:p>"1": { "0": 9, "1": 6, "2": 1, "3": 2, "4": 4, "5": 8, "6": 7, "7": 6, "8": 3, "9": 5, "10": 13, "11": 14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750" office:value-type="float" office:value="14" calcext:value-type="float">
            <text:p>14</text:p>
          </table:table-cell>
          <table:table-cell/>
          <table:table-cell table:style-name="ce708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708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D10])" office:value-type="string" office:string-value="&quot;12&quot;: 14" calcext:value-type="string">
            <text:p>"12": 14</text:p>
          </table:table-cell>
          <table:table-cell table:style-name="ce708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708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708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N10])" office:value-type="string" office:string-value="&quot;10&quot;: 14" calcext:value-type="string">
            <text:p>"10": 14</text:p>
          </table:table-cell>
          <table:table-cell table:style-name="ce708" table:formula="of:=COM.MICROSOFT.CONCAT(&quot;&quot;&quot;&quot;;[.$C$4]; &quot;&quot;&quot;: &quot;; [.O10])" office:value-type="string" office:string-value="&quot;11&quot;: 12" calcext:value-type="string">
            <text:p>"11": 12</text:p>
          </table:table-cell>
          <table:table-cell table:style-name="ce708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708" table:formula="of:=COM.MICROSOFT.CONCAT(&quot;&quot;&quot;&quot;;[.$E$4]; &quot;&quot;&quot;: &quot;; [.Q10])" office:value-type="string" office:string-value="&quot;13&quot;: 11" calcext:value-type="string">
            <text:p>"13": 11</text:p>
          </table:table-cell>
          <table:table-cell table:style-name="ce708" table:formula="of:=COM.MICROSOFT.CONCAT(&quot;&quot;&quot;&quot;;[.$F$4]; &quot;&quot;&quot;: &quot;; [.R10])" office:value-type="string" office:string-value="&quot;14&quot;: 13" calcext:value-type="string">
            <text:p>"14": 13</text:p>
          </table:table-cell>
          <table:table-cell table:style-name="ce708"/>
          <table:table-cell table:style-name="ce708" table:formula="of:=COM.MICROSOFT.CONCAT(&quot;&quot;&quot;&quot;;[.$B$4]; &quot;&quot;&quot;: &quot;; [.T10])" office:value-type="string" office:string-value="&quot;10&quot;: 14" calcext:value-type="string">
            <text:p>"10": 14</text:p>
          </table:table-cell>
          <table:table-cell table:style-name="ce708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708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708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708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number-columns-repeated="2"/>
          <table:table-cell table:style-name="ce540" table:formula="of:=COM.MICROSOFT.CONCAT(&quot;&quot;&quot;2&quot;&quot;: { &quot;;COM.MICROSOFT.TEXTJOIN(&quot;, &quot;;TRUE();[.AR8:.AV10]);&quot;}&quot;)" office:value-type="string" office:string-value="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" calcext:value-type="string">
            <text:p>"2": { "0": 8, "1": 2, "2": 3, "3": 1, "4": 7, "5": 6, "6": 4, "7": 5, "8": 3, "9": 9, "10": 14, "11": 12, "12": 10, "13": 11, "14": 13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40"/>
          <table:table-cell table:style-name="ce731" table:number-columns-repeated="29"/>
          <table:table-cell table:style-name="ce700"/>
          <table:table-cell table:number-columns-repeated="27"/>
          <table:table-cell table:style-name="ce700" table:number-columns-repeated="2"/>
          <table:table-cell table:number-columns-repeated="2"/>
          <table:table-cell table:style-name="ce540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" calcext:value-type="string">
            <text:p>"3": { "0": 3, "1": 2, "2": 1, "3": 5, "4": 7, "5": 5, "6": 6, "7": 8, "8": 4, "9": 9, "10": 14, "11": 13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1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74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594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/>
          <table:table-cell table:style-name="ce709" table:formula="of:=COM.MICROSOFT.CONCAT(&quot;&quot;&quot;&quot;;[.$B$2]; &quot;&quot;&quot;: &quot;; [.B12])" office:value-type="string" office:string-value="&quot;0&quot;: 12" calcext:value-type="string">
            <text:p>"0": 12</text:p>
          </table:table-cell>
          <table:table-cell table:style-name="ce709" table:formula="of:=COM.MICROSOFT.CONCAT(&quot;&quot;&quot;&quot;;[.$C$2]; &quot;&quot;&quot;: &quot;; [.C12])" office:value-type="string" office:string-value="&quot;1&quot;: 10" calcext:value-type="string">
            <text:p>"1": 10</text:p>
          </table:table-cell>
          <table:table-cell table:style-name="ce709" table:formula="of:=COM.MICROSOFT.CONCAT(&quot;&quot;&quot;&quot;;[.$D$2]; &quot;&quot;&quot;: &quot;; [.D12])" office:value-type="string" office:string-value="&quot;2&quot;: 6" calcext:value-type="string">
            <text:p>"2": 6</text:p>
          </table:table-cell>
          <table:table-cell table:style-name="ce709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709" table:formula="of:=COM.MICROSOFT.CONCAT(&quot;&quot;&quot;&quot;;[.$F$2]; &quot;&quot;&quot;: &quot;; [.F12])" office:value-type="string" office:string-value="&quot;4&quot;: 9" calcext:value-type="string">
            <text:p>"4": 9</text:p>
          </table:table-cell>
          <table:table-cell table:style-name="ce709"/>
          <table:table-cell table:style-name="ce709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709" table:formula="of:=COM.MICROSOFT.CONCAT(&quot;&quot;&quot;&quot;;[.$C$2]; &quot;&quot;&quot;: &quot;; [.I12])" office:value-type="string" office:string-value="&quot;1&quot;: 7" calcext:value-type="string">
            <text:p>"1": 7</text:p>
          </table:table-cell>
          <table:table-cell table:style-name="ce709" table:formula="of:=COM.MICROSOFT.CONCAT(&quot;&quot;&quot;&quot;;[.$D$2]; &quot;&quot;&quot;: &quot;; [.J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709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709"/>
          <table:table-cell table:style-name="ce709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709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709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Q12])" office:value-type="string" office:string-value="&quot;3&quot;: 6" calcext:value-type="string">
            <text:p>"3": 6</text:p>
          </table:table-cell>
          <table:table-cell table:style-name="ce709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709"/>
          <table:table-cell table:style-name="ce709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709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70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09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709" table:formula="of:=COM.MICROSOFT.CONCAT(&quot;&quot;&quot;&quot;;[.$F$2]; &quot;&quot;&quot;: &quot;; [.X12])" office:value-type="string" office:string-value="&quot;4&quot;: 10" calcext:value-type="string">
            <text:p>"4": 10</text:p>
          </table:table-cell>
          <table:table-cell table:style-name="ce709"/>
          <table:table-cell table:style-name="ce709" table:formula="of:=COM.MICROSOFT.CONCAT(&quot;&quot;&quot;&quot;;[.$B$2]; &quot;&quot;&quot;: &quot;; [.Z12])" office:value-type="string" office:string-value="&quot;0&quot;: 10" calcext:value-type="string">
            <text:p>"0": 10</text:p>
          </table:table-cell>
          <table:table-cell table:style-name="ce709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713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709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700" table:number-columns-repeated="2"/>
          <table:table-cell table:style-name="ce541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4": { "0": 7, "1": 3, "2": 2, "3": 1, "4": 13, "5": 6, "6": 5, "7": 4, "8": 9, "9": 8, "10": 10, "11": 11, "12": 12, "13": 13, "14": 14}</text:p>
          </table:table-cell>
          <table:table-cell table:style-name="ce700" table:number-columns-repeated="26"/>
          <table:table-cell table:number-columns-repeated="10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3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94"/>
          <table:table-cell office:value-type="float" office:value="10" calcext:value-type="float">
            <text:p>10</text:p>
          </table:table-cell>
          <table:table-cell table:style-name="ce543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94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543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3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X$3]" office:value-type="float" office:value="7" calcext:value-type="float">
            <text:p>7</text:p>
          </table:table-cell>
          <table:table-cell/>
          <table:table-cell table:style-name="ce709" table:formula="of:=COM.MICROSOFT.CONCAT(&quot;&quot;&quot;&quot;;[.$B$3]; &quot;&quot;&quot;: &quot;; [.B13])" office:value-type="string" office:string-value="&quot;5&quot;: 8" calcext:value-type="string">
            <text:p>"5": 8</text:p>
          </table:table-cell>
          <table:table-cell table:style-name="ce709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709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709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709" table:formula="of:=COM.MICROSOFT.CONCAT(&quot;&quot;&quot;&quot;;[.$F$3]; &quot;&quot;&quot;: &quot;; [.F13])" office:value-type="string" office:string-value="&quot;9&quot;: 4" calcext:value-type="string">
            <text:p>"9": 4</text:p>
          </table:table-cell>
          <table:table-cell table:style-name="ce709"/>
          <table:table-cell table:style-name="ce709" table:formula="of:=COM.MICROSOFT.CONCAT(&quot;&quot;&quot;&quot;;[.$B$3]; &quot;&quot;&quot;: &quot;; [.H13])" office:value-type="string" office:string-value="&quot;5&quot;: 10" calcext:value-type="string">
            <text:p>"5": 10</text:p>
          </table:table-cell>
          <table:table-cell table:style-name="ce70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709" table:formula="of:=COM.MICROSOFT.CONCAT(&quot;&quot;&quot;&quot;;[.$F$3]; &quot;&quot;&quot;: &quot;; [.L13])" office:value-type="string" office:string-value="&quot;9&quot;: 9" calcext:value-type="string">
            <text:p>"9": 9</text:p>
          </table:table-cell>
          <table:table-cell table:style-name="ce709"/>
          <table:table-cell table:style-name="ce709" table:formula="of:=COM.MICROSOFT.CONCAT(&quot;&quot;&quot;&quot;;[.$B$3]; &quot;&quot;&quot;: &quot;; [.N13])" office:value-type="string" office:string-value="&quot;5&quot;: 10" calcext:value-type="string">
            <text:p>"5": 10</text:p>
          </table:table-cell>
          <table:table-cell table:style-name="ce70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709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709"/>
          <table:table-cell table:style-name="ce709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70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X13])" office:value-type="string" office:string-value="&quot;9&quot;: 8" calcext:value-type="string">
            <text:p>"9": 8</text:p>
          </table:table-cell>
          <table:table-cell table:style-name="ce709"/>
          <table:table-cell table:style-name="ce709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709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709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709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AD13])" office:value-type="string" office:string-value="&quot;9&quot;: 7" calcext:value-type="string">
            <text:p>"9": 7</text:p>
          </table:table-cell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540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594"/>
          <table:table-cell office:value-type="float" office:value="12" calcext:value-type="float">
            <text:p>12</text:p>
          </table:table-cell>
          <table:table-cell table:style-name="ce74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594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709" table:formula="of:=COM.MICROSOFT.CONCAT(&quot;&quot;&quot;&quot;;[.$B$4]; &quot;&quot;&quot;: &quot;; [.B14])" office:value-type="string" office:string-value="&quot;10&quot;: 13" calcext:value-type="string">
            <text:p>"10": 13</text:p>
          </table:table-cell>
          <table:table-cell table:style-name="ce709" table:formula="of:=COM.MICROSOFT.CONCAT(&quot;&quot;&quot;&quot;;[.$C$4]; &quot;&quot;&quot;: &quot;; [.C14])" office:value-type="string" office:string-value="&quot;11&quot;: 14" calcext:value-type="string">
            <text:p>"11": 14</text:p>
          </table:table-cell>
          <table:table-cell table:style-name="ce709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709" table:formula="of:=COM.MICROSOFT.CONCAT(&quot;&quot;&quot;&quot;;[.$E$4]; &quot;&quot;&quot;: &quot;; [.E14])" office:value-type="string" office:string-value="&quot;13&quot;: 7" calcext:value-type="string">
            <text:p>"13": 7</text:p>
          </table:table-cell>
          <table:table-cell table:style-name="ce709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709"/>
          <table:table-cell table:style-name="ce709" table:formula="of:=COM.MICROSOFT.CONCAT(&quot;&quot;&quot;&quot;;[.$B$4]; &quot;&quot;&quot;: &quot;; [.H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I14])" office:value-type="string" office:string-value="&quot;11&quot;: 8" calcext:value-type="string">
            <text:p>"11": 8</text:p>
          </table:table-cell>
          <table:table-cell table:style-name="ce709" table:formula="of:=COM.MICROSOFT.CONCAT(&quot;&quot;&quot;&quot;;[.$D$4]; &quot;&quot;&quot;: &quot;; [.J14])" office:value-type="string" office:string-value="&quot;12&quot;: 6" calcext:value-type="string">
            <text:p>"12": 6</text:p>
          </table:table-cell>
          <table:table-cell table:style-name="ce709" table:formula="of:=COM.MICROSOFT.CONCAT(&quot;&quot;&quot;&quot;;[.$E$4]; &quot;&quot;&quot;: &quot;; [.K14])" office:value-type="string" office:string-value="&quot;13&quot;: 3" calcext:value-type="string">
            <text:p>"13": 3</text:p>
          </table:table-cell>
          <table:table-cell table:style-name="ce709" table:formula="of:=COM.MICROSOFT.CONCAT(&quot;&quot;&quot;&quot;;[.$F$4]; &quot;&quot;&quot;: &quot;; [.L14])" office:value-type="string" office:string-value="&quot;14&quot;: 11" calcext:value-type="string">
            <text:p>"14": 11</text:p>
          </table:table-cell>
          <table:table-cell table:style-name="ce709"/>
          <table:table-cell table:style-name="ce709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709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709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709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709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709"/>
          <table:table-cell table:style-name="ce709" table:formula="of:=COM.MICROSOFT.CONCAT(&quot;&quot;&quot;&quot;;[.$B$4]; &quot;&quot;&quot;: &quot;; [.T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U14])" office:value-type="string" office:string-value="&quot;11&quot;: 14" calcext:value-type="string">
            <text:p>"11": 14</text:p>
          </table:table-cell>
          <table:table-cell table:style-name="ce709" table:formula="of:=COM.MICROSOFT.CONCAT(&quot;&quot;&quot;&quot;;[.$D$4]; &quot;&quot;&quot;: &quot;; [.V14])" office:value-type="string" office:string-value="&quot;12&quot;: 11" calcext:value-type="string">
            <text:p>"12": 11</text:p>
          </table:table-cell>
          <table:table-cell table:style-name="ce709" table:formula="of:=COM.MICROSOFT.CONCAT(&quot;&quot;&quot;&quot;;[.$E$4]; &quot;&quot;&quot;: &quot;; [.W14])" office:value-type="string" office:string-value="&quot;13&quot;: 7" calcext:value-type="string">
            <text:p>"13": 7</text:p>
          </table:table-cell>
          <table:table-cell table:style-name="ce709" table:formula="of:=COM.MICROSOFT.CONCAT(&quot;&quot;&quot;&quot;;[.$F$4]; &quot;&quot;&quot;: &quot;; [.X14])" office:value-type="string" office:string-value="&quot;14&quot;: 9" calcext:value-type="string">
            <text:p>"14": 9</text:p>
          </table:table-cell>
          <table:table-cell table:style-name="ce709"/>
          <table:table-cell table:style-name="ce709" table:formula="of:=COM.MICROSOFT.CONCAT(&quot;&quot;&quot;&quot;;[.$B$4]; &quot;&quot;&quot;: &quot;; [.Z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AA14])" office:value-type="string" office:string-value="&quot;11&quot;: 13" calcext:value-type="string">
            <text:p>"11": 13</text:p>
          </table:table-cell>
          <table:table-cell table:style-name="ce709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709" table:formula="of:=COM.MICROSOFT.CONCAT(&quot;&quot;&quot;&quot;;[.$E$4]; &quot;&quot;&quot;: &quot;; [.AC14])" office:value-type="string" office:string-value="&quot;13&quot;: 11" calcext:value-type="string">
            <text:p>"13": 11</text:p>
          </table:table-cell>
          <table:table-cell table:style-name="ce709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40"/>
          <table:table-cell table:style-name="ce731" table:number-columns-repeated="29"/>
          <table:table-cell table:number-columns-repeated="69"/>
          <table:table-cell table:style-name="Default" table:number-columns-repeated="16285"/>
        </table:table-row>
        <table:table-row table:style-name="ro1">
          <table:table-cell table:style-name="ce540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74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750" office:value-type="float" office:value="10" calcext:value-type="float">
            <text:p>10</text:p>
          </table:table-cell>
          <table:table-cell table:style-name="ce540"/>
          <table:table-cell table:style-name="ce710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710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710" table:formula="of:=COM.MICROSOFT.CONCAT(&quot;&quot;&quot;&quot;;[.$D$2]; &quot;&quot;&quot;: &quot;; [.D16])" office:value-type="string" office:string-value="&quot;2&quot;: 12" calcext:value-type="string">
            <text:p>"2": 12</text:p>
          </table:table-cell>
          <table:table-cell table:style-name="ce710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710" table:formula="of:=COM.MICROSOFT.CONCAT(&quot;&quot;&quot;&quot;;[.$F$2]; &quot;&quot;&quot;: &quot;; [.F16])" office:value-type="string" office:string-value="&quot;4&quot;: 10" calcext:value-type="string">
            <text:p>"4": 10</text:p>
          </table:table-cell>
          <table:table-cell table:style-name="ce710"/>
          <table:table-cell table:style-name="ce710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I16])" office:value-type="string" office:string-value="&quot;1&quot;: 12" calcext:value-type="string">
            <text:p>"1": 12</text:p>
          </table:table-cell>
          <table:table-cell table:style-name="ce710" table:formula="of:=COM.MICROSOFT.CONCAT(&quot;&quot;&quot;&quot;;[.$D$2]; &quot;&quot;&quot;: &quot;; [.J16])" office:value-type="string" office:string-value="&quot;2&quot;: 9" calcext:value-type="string">
            <text:p>"2": 9</text:p>
          </table:table-cell>
          <table:table-cell table:style-name="ce710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710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710"/>
          <table:table-cell table:style-name="ce710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710" table:formula="of:=COM.MICROSOFT.CONCAT(&quot;&quot;&quot;&quot;;[.$D$2]; &quot;&quot;&quot;: &quot;; [.P16])" office:value-type="string" office:string-value="&quot;2&quot;: 9" calcext:value-type="string">
            <text:p>"2": 9</text:p>
          </table:table-cell>
          <table:table-cell table:style-name="ce710" table:formula="of:=COM.MICROSOFT.CONCAT(&quot;&quot;&quot;&quot;;[.$E$2]; &quot;&quot;&quot;: &quot;; [.Q16])" office:value-type="string" office:string-value="&quot;3&quot;: 10" calcext:value-type="string">
            <text:p>"3": 10</text:p>
          </table:table-cell>
          <table:table-cell table:style-name="ce710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710"/>
          <table:table-cell table:style-name="ce710" table:formula="of:=COM.MICROSOFT.CONCAT(&quot;&quot;&quot;&quot;;[.$B$2]; &quot;&quot;&quot;: &quot;; [.T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U16])" office:value-type="string" office:string-value="&quot;1&quot;: 10" calcext:value-type="string">
            <text:p>"1": 10</text:p>
          </table:table-cell>
          <table:table-cell table:style-name="ce710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710" table:formula="of:=COM.MICROSOFT.CONCAT(&quot;&quot;&quot;&quot;;[.$E$2]; &quot;&quot;&quot;: &quot;; [.W16])" office:value-type="string" office:string-value="&quot;3&quot;: 12" calcext:value-type="string">
            <text:p>"3": 12</text:p>
          </table:table-cell>
          <table:table-cell table:style-name="ce710" table:formula="of:=COM.MICROSOFT.CONCAT(&quot;&quot;&quot;&quot;;[.$F$2]; &quot;&quot;&quot;: &quot;; [.X16])" office:value-type="string" office:string-value="&quot;4&quot;: 13" calcext:value-type="string">
            <text:p>"4": 13</text:p>
          </table:table-cell>
          <table:table-cell table:style-name="ce710"/>
          <table:table-cell table:style-name="ce710" table:formula="of:=COM.MICROSOFT.CONCAT(&quot;&quot;&quot;&quot;;[.$B$2]; &quot;&quot;&quot;: &quot;; [.Z16])" office:value-type="string" office:string-value="&quot;0&quot;: 13" calcext:value-type="string">
            <text:p>"0": 13</text:p>
          </table:table-cell>
          <table:table-cell table:style-name="ce710" table:formula="of:=COM.MICROSOFT.CONCAT(&quot;&quot;&quot;&quot;;[.$C$2]; &quot;&quot;&quot;: &quot;; [.AA16])" office:value-type="string" office:string-value="&quot;1&quot;: 14" calcext:value-type="string">
            <text:p>"1": 14</text:p>
          </table:table-cell>
          <table:table-cell table:style-name="ce710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710" table:formula="of:=COM.MICROSOFT.CONCAT(&quot;&quot;&quot;&quot;;[.$E$2]; &quot;&quot;&quot;: &quot;; [.AC16])" office:value-type="string" office:string-value="&quot;3&quot;: 11" calcext:value-type="string">
            <text:p>"3": 11</text:p>
          </table:table-cell>
          <table:table-cell table:style-name="ce710" table:formula="of:=COM.MICROSOFT.CONCAT(&quot;&quot;&quot;&quot;;[.$F$2]; &quot;&quot;&quot;: &quot;; [.AD16])" office:value-type="string" office:string-value="&quot;4&quot;: 10" calcext:value-type="string">
            <text:p>"4": 10</text:p>
          </table:table-cell>
          <table:table-cell table:number-columns-repeated="2"/>
          <table:table-cell table:style-name="ce540" table:formula="of:=COM.MICROSOFT.CONCAT(&quot;&quot;&quot;5&quot;&quot;: { &quot;;COM.MICROSOFT.TEXTJOIN(&quot;, &quot;;TRUE();[.AF12:.AJ14]);&quot;}&quot;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" calcext:value-type="string">
            <text:p>"5": { "0": 12, "1": 10, "2": 6, "3": 5, "4": 9, "5": 8, "6": 1, "7": 2, "8": 3, "9": 4, "10": 13, "11": 14, "12": 11, "13": 7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74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94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40"/>
          <table:table-cell table:style-name="ce710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710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710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710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710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710"/>
          <table:table-cell table:style-name="ce710" table:formula="of:=COM.MICROSOFT.CONCAT(&quot;&quot;&quot;&quot;;[.$B$3]; &quot;&quot;&quot;: &quot;; [.H17])" office:value-type="string" office:string-value="&quot;5&quot;: 13" calcext:value-type="string">
            <text:p>"5": 13</text:p>
          </table:table-cell>
          <table:table-cell table:style-name="ce710" table:formula="of:=COM.MICROSOFT.CONCAT(&quot;&quot;&quot;&quot;;[.$C$3]; &quot;&quot;&quot;: &quot;; [.I17])" office:value-type="string" office:string-value="&quot;6&quot;: 6" calcext:value-type="string">
            <text:p>"6": 6</text:p>
          </table:table-cell>
          <table:table-cell table:style-name="ce710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710" table:formula="of:=COM.MICROSOFT.CONCAT(&quot;&quot;&quot;&quot;;[.$F$3]; &quot;&quot;&quot;: &quot;; [.L17])" office:value-type="string" office:string-value="&quot;9&quot;: 5" calcext:value-type="string">
            <text:p>"9": 5</text:p>
          </table:table-cell>
          <table:table-cell table:style-name="ce710"/>
          <table:table-cell table:style-name="ce710" table:formula="of:=COM.MICROSOFT.CONCAT(&quot;&quot;&quot;&quot;;[.$B$3]; &quot;&quot;&quot;: &quot;; [.N17])" office:value-type="string" office:string-value="&quot;5&quot;: 11" calcext:value-type="string">
            <text:p>"5": 11</text:p>
          </table:table-cell>
          <table:table-cell table:style-name="ce710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710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710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710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710"/>
          <table:table-cell table:style-name="ce710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710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710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710" table:formula="of:=COM.MICROSOFT.CONCAT(&quot;&quot;&quot;&quot;;[.$F$3]; &quot;&quot;&quot;: &quot;; [.X17])" office:value-type="string" office:string-value="&quot;9&quot;: 11" calcext:value-type="string">
            <text:p>"9": 11</text:p>
          </table:table-cell>
          <table:table-cell table:style-name="ce710"/>
          <table:table-cell table:style-name="ce710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710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71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710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number-columns-repeated="2"/>
          <table:table-cell table:style-name="ce540" table:formula="of:=COM.MICROSOFT.CONCAT(&quot;&quot;&quot;6&quot;&quot;: { &quot;;COM.MICROSOFT.TEXTJOIN(&quot;, &quot;;TRUE();[.AL12:.AP14]);&quot;}&quot;)" office:value-type="string" office:string-value="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" calcext:value-type="string">
            <text:p>"6": { "0": 14, "1": 7, "2": 4, "3": 5, "4": 13, "5": 10, "6": 2, "7": 1, "8": 2, "9": 9, "10": 12, "11": 8, "12": 6, "13": 3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4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94"/>
          <table:table-cell office:value-type="float" office:value="7" calcext:value-type="float">
            <text:p>7</text:p>
          </table:table-cell>
          <table:table-cell table:style-name="ce543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43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4]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594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43" table:formula="of:=[.$X$4]" office:value-type="float" office:value="11" calcext:value-type="float">
            <text:p>11</text:p>
          </table:table-cell>
          <table:table-cell table:style-name="ce540"/>
          <table:table-cell table:style-name="ce710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710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71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710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710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710"/>
          <table:table-cell table:style-name="ce710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71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710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710" table:formula="of:=COM.MICROSOFT.CONCAT(&quot;&quot;&quot;&quot;;[.$F$4]; &quot;&quot;&quot;: &quot;; [.L18])" office:value-type="string" office:string-value="&quot;14&quot;: 8" calcext:value-type="string">
            <text:p>"14": 8</text:p>
          </table:table-cell>
          <table:table-cell table:style-name="ce710"/>
          <table:table-cell table:style-name="ce710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71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71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R18])" office:value-type="string" office:string-value="&quot;14&quot;: 7" calcext:value-type="string">
            <text:p>"14": 7</text:p>
          </table:table-cell>
          <table:table-cell table:style-name="ce710"/>
          <table:table-cell table:style-name="ce710" table:formula="of:=COM.MICROSOFT.CONCAT(&quot;&quot;&quot;&quot;;[.$B$4]; &quot;&quot;&quot;: &quot;; [.T18])" office:value-type="string" office:string-value="&quot;10&quot;: 6" calcext:value-type="string">
            <text:p>"10": 6</text:p>
          </table:table-cell>
          <table:table-cell table:style-name="ce71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710" table:formula="of:=COM.MICROSOFT.CONCAT(&quot;&quot;&quot;&quot;;[.$F$4]; &quot;&quot;&quot;: &quot;; [.X18])" office:value-type="string" office:string-value="&quot;14&quot;: 9" calcext:value-type="string">
            <text:p>"14": 9</text:p>
          </table:table-cell>
          <table:table-cell table:style-name="ce710"/>
          <table:table-cell table:style-name="ce710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710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710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710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540" table:formula="of:=COM.MICROSOFT.CONCAT(&quot;&quot;&quot;7&quot;&quot;: { &quot;;COM.MICROSOFT.TEXTJOIN(&quot;, &quot;;TRUE();[.AR12:.AV14]);&quot;}&quot;)" office:value-type="string" office:string-value="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" calcext:value-type="string">
            <text:p>"7": { "0": 14, "1": 5, "2": 4, "3": 6, "4": 13, "5": 10, "6": 2, "7": 0, "8": 1, "9": 9, "10": 11, "11": 7, "12": 8, "13": 3, "14": 12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40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1"/>
          <table:table-cell table:number-columns-repeated="33"/>
          <table:table-cell table:style-name="ce540"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" calcext:value-type="string">
            <text:p>"8": { "0": 13, "1": 5, "2": 3, "3": 6, "4": 10, "5": 4, "6": 2, "7": 1, "8": 1, "9": 8, "10": 12, "11": 14, "12": 11, "13": 7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40"/>
          <table:table-cell table:style-name="ce732" table:number-columns-spanned="29" table:number-rows-spanned="3"/>
          <table:covered-table-cell table:number-columns-repeated="28" table:style-name="ce18"/>
          <table:table-cell table:style-name="ce189"/>
          <table:table-cell table:style-name="ce835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" calcext:value-type="string" table:number-columns-spanned="29" table:number-rows-spanned="4">
            <text:p>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</text:p>
          </table:table-cell>
          <table:covered-table-cell table:number-columns-repeated="28" table:style-name="ce189"/>
          <table:table-cell table:number-columns-repeated="2"/>
          <table:table-cell table:style-name="ce540" table:formula="of:=COM.MICROSOFT.CONCAT(&quot;&quot;&quot;9&quot;&quot;: { &quot;;COM.MICROSOFT.TEXTJOIN(&quot;, &quot;;TRUE();[.BD12:.BH14]);&quot;}&quot;)" office:value-type="string" office:string-value="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40"/>
          <table:covered-table-cell table:number-columns-repeated="29" table:style-name="ce18"/>
          <table:table-cell table:style-name="ce189"/>
          <table:covered-table-cell table:number-columns-repeated="29" table:style-name="ce189"/>
          <table:table-cell table:number-columns-repeated="39"/>
          <table:table-cell table:style-name="Default" table:number-columns-repeated="16285"/>
        </table:table-row>
        <table:table-row table:style-name="ro2">
          <table:table-cell table:style-name="ce540"/>
          <table:covered-table-cell table:number-columns-repeated="29" table:style-name="ce18"/>
          <table:table-cell table:style-name="ce189"/>
          <table:covered-table-cell table:number-columns-repeated="29" table:style-name="ce189"/>
          <table:table-cell table:number-columns-repeated="2"/>
          <table:table-cell table:style-name="ce540" table:formula="of:=COM.MICROSOFT.TEXTJOIN(&quot;, &quot;;TRUE();[.BK16:.BK20]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1"/>
          <table:table-cell table:number-columns-repeated="2"/>
          <table:covered-table-cell table:number-columns-repeated="29"/>
          <table:table-cell table:number-columns-repeated="39"/>
          <table:table-cell table:style-name="Default" table:number-columns-repeated="16285"/>
        </table:table-row>
        <table:table-row table:style-name="ro2">
          <table:table-cell/>
          <table:table-cell table:style-name="ce548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39"/>
          <table:table-cell table:style-name="ce39" table:number-columns-repeated="4"/>
          <table:table-cell table:style-name="ce605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39"/>
          <table:table-cell table:style-name="ce39" table:number-columns-repeated="4"/>
          <table:table-cell table:style-name="ce548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39"/>
          <table:table-cell table:style-name="ce39" table:number-columns-repeated="4"/>
          <table:table-cell table:style-name="ce605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39"/>
          <table:table-cell table:style-name="ce39" table:number-columns-repeated="4"/>
          <table:table-cell table:style-name="ce548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39"/>
          <table:table-cell table:style-name="ce39" table:number-columns-repeated="3"/>
          <table:table-cell table:style-name="ce540"/>
          <table:table-cell table:number-columns-repeated="31"/>
          <table:table-cell table:style-name="ce540"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" calcext:value-type="string">
            <text:p>"10": { "0": 13, "1": 14, "2": 12, "3": 11, "4": 10, "5": 9, "6": 8, "7": 4, "8": 5, "9": 6, "10": 12, "11": 1, "12": 2, "13": 3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21" table:formula="of:=HLOOKUP([.B8];[.$AF$25:.$AW$26];2;0)" office:value-type="float" office:value="4.5" calcext:value-type="float">
            <text:p>4.5</text:p>
          </table:table-cell>
          <table:table-cell table:style-name="ce329" table:formula="of:=HLOOKUP([.C8];[.$AF$25:.$AW$26];2;0)" office:value-type="float" office:value="1.1" calcext:value-type="float">
            <text:p>1.1</text:p>
          </table:table-cell>
          <table:table-cell table:style-name="ce332" table:formula="of:=HLOOKUP([.D8];[.$AF$25:.$AW$26];2;0)" office:value-type="float" office:value="1.2" calcext:value-type="float">
            <text:p>1.2</text:p>
          </table:table-cell>
          <table:table-cell table:style-name="ce335" table:formula="of:=HLOOKUP([.E8];[.$AF$25:.$AW$26];2;0)" office:value-type="float" office:value="1.3" calcext:value-type="float">
            <text:p>1.3</text:p>
          </table:table-cell>
          <table:table-cell table:style-name="ce335" table:formula="of:=HLOOKUP([.F8];[.$AF$25:.$AW$26];2;0)" office:value-type="float" office:value="2" calcext:value-type="float">
            <text:p>2.0</text:p>
          </table:table-cell>
          <table:table-cell/>
          <table:table-cell table:style-name="ce338" table:formula="of:=HLOOKUP([.H8];[.$AF$25:.$AW$26];2;0)" office:value-type="float" office:value="3" calcext:value-type="float">
            <text:p>3.0</text:p>
          </table:table-cell>
          <table:table-cell table:style-name="ce344" table:formula="of:=HLOOKUP([.I8];[.$AF$25:.$AW$26];2;0)" office:value-type="float" office:value="2.1" calcext:value-type="float">
            <text:p>2.1</text:p>
          </table:table-cell>
          <table:table-cell table:style-name="ce350" table:formula="of:=HLOOKUP([.J8];[.$AF$25:.$AW$26];2;0)" office:value-type="float" office:value="1.1" calcext:value-type="float">
            <text:p>1.1</text:p>
          </table:table-cell>
          <table:table-cell table:style-name="ce353" table:formula="of:=HLOOKUP([.K8];[.$AF$25:.$AW$26];2;0)" office:value-type="float" office:value="1.2" calcext:value-type="float">
            <text:p>1.2</text:p>
          </table:table-cell>
          <table:table-cell table:style-name="ce353" table:formula="of:=HLOOKUP([.L8];[.$AF$25:.$AW$26];2;0)" office:value-type="float" office:value="1.6" calcext:value-type="float">
            <text:p>1.6</text:p>
          </table:table-cell>
          <table:table-cell/>
          <table:table-cell table:style-name="ce356" table:formula="of:=HLOOKUP([.N8];[.$AF$25:.$AW$26];2;0)" office:value-type="float" office:value="2.3" calcext:value-type="float">
            <text:p>2.3</text:p>
          </table:table-cell>
          <table:table-cell table:style-name="ce362" table:formula="of:=HLOOKUP([.O8];[.$AF$25:.$AW$26];2;0)" office:value-type="float" office:value="1.2" calcext:value-type="float">
            <text:p>1.2</text:p>
          </table:table-cell>
          <table:table-cell table:style-name="ce365" table:formula="of:=HLOOKUP([.P8];[.$AF$25:.$AW$26];2;0)" office:value-type="float" office:value="1.3" calcext:value-type="float">
            <text:p>1.3</text:p>
          </table:table-cell>
          <table:table-cell table:style-name="ce371" table:formula="of:=HLOOKUP([.Q8];[.$AF$25:.$AW$26];2;0)" office:value-type="float" office:value="1.1" calcext:value-type="float">
            <text:p>1.1</text:p>
          </table:table-cell>
          <table:table-cell table:style-name="ce371" table:formula="of:=HLOOKUP([.R8];[.$AF$25:.$AW$26];2;0)" office:value-type="float" office:value="2.2" calcext:value-type="float">
            <text:p>2.2</text:p>
          </table:table-cell>
          <table:table-cell/>
          <table:table-cell table:style-name="ce376" table:formula="of:=HLOOKUP([.T8];[.$AF$25:.$AW$26];2;0)" office:value-type="float" office:value="1.3" calcext:value-type="float">
            <text:p>1.3</text:p>
          </table:table-cell>
          <table:table-cell table:style-name="ce382" table:formula="of:=HLOOKUP([.U8];[.$AF$25:.$AW$26];2;0)" office:value-type="float" office:value="1.2" calcext:value-type="float">
            <text:p>1.2</text:p>
          </table:table-cell>
          <table:table-cell table:style-name="ce385" table:formula="of:=HLOOKUP([.V8];[.$AF$25:.$AW$26];2;0)" office:value-type="float" office:value="1.1" calcext:value-type="float">
            <text:p>1.1</text:p>
          </table:table-cell>
          <table:table-cell table:style-name="ce388" table:formula="of:=HLOOKUP([.W8];[.$AF$25:.$AW$26];2;0)" office:value-type="float" office:value="2" calcext:value-type="float">
            <text:p>2.0</text:p>
          </table:table-cell>
          <table:table-cell table:style-name="ce389" table:formula="of:=HLOOKUP([.X8];[.$AF$25:.$AW$26];2;0)" office:value-type="float" office:value="2.2" calcext:value-type="float">
            <text:p>2.2</text:p>
          </table:table-cell>
          <table:table-cell/>
          <table:table-cell table:style-name="ce395" table:formula="of:=HLOOKUP([.Z8];[.$AF$25:.$AW$26];2;0)" office:value-type="float" office:value="2.2" calcext:value-type="float">
            <text:p>2.2</text:p>
          </table:table-cell>
          <table:table-cell table:style-name="ce401" table:formula="of:=HLOOKUP([.AA8];[.$AF$25:.$AW$26];2;0)" office:value-type="float" office:value="1.3" calcext:value-type="float">
            <text:p>1.3</text:p>
          </table:table-cell>
          <table:table-cell table:style-name="ce404" table:formula="of:=HLOOKUP([.AB8];[.$AF$25:.$AW$26];2;0)" office:value-type="float" office:value="1.2" calcext:value-type="float">
            <text:p>1.2</text:p>
          </table:table-cell>
          <table:table-cell table:style-name="ce407" table:formula="of:=HLOOKUP([.AC8];[.$AF$25:.$AW$26];2;0)" office:value-type="float" office:value="1.1" calcext:value-type="float">
            <text:p>1.1</text:p>
          </table:table-cell>
          <table:table-cell table:style-name="ce410" table:formula="of:=HLOOKUP([.AD8];[.$AF$25:.$AW$26];2;0)" office:value-type="float" office:value="4" calcext:value-type="float">
            <text:p>4.0</text:p>
          </table:table-cell>
          <table:table-cell table:style-name="ce540"/>
          <table:table-cell table:style-name="ce417" office:value-type="float" office:value="0" calcext:value-type="float">
            <text:p>0</text:p>
          </table:table-cell>
          <table:table-cell table:style-name="ce417" office:value-type="float" office:value="1" calcext:value-type="float">
            <text:p>1</text:p>
          </table:table-cell>
          <table:table-cell table:style-name="ce417" office:value-type="float" office:value="2" calcext:value-type="float">
            <text:p>2</text:p>
          </table:table-cell>
          <table:table-cell table:style-name="ce417" office:value-type="float" office:value="3" calcext:value-type="float">
            <text:p>3</text:p>
          </table:table-cell>
          <table:table-cell table:style-name="ce419" office:value-type="float" office:value="4" calcext:value-type="float">
            <text:p>4</text:p>
          </table:table-cell>
          <table:table-cell table:style-name="ce419" office:value-type="float" office:value="5" calcext:value-type="float">
            <text:p>5</text:p>
          </table:table-cell>
          <table:table-cell table:style-name="ce419" office:value-type="float" office:value="6" calcext:value-type="float">
            <text:p>6</text:p>
          </table:table-cell>
          <table:table-cell table:style-name="ce419" office:value-type="float" office:value="7" calcext:value-type="float">
            <text:p>7</text:p>
          </table:table-cell>
          <table:table-cell table:style-name="ce419" office:value-type="float" office:value="8" calcext:value-type="float">
            <text:p>8</text:p>
          </table:table-cell>
          <table:table-cell table:style-name="ce420" office:value-type="float" office:value="9" calcext:value-type="float">
            <text:p>9</text:p>
          </table:table-cell>
          <table:table-cell table:style-name="ce420" office:value-type="float" office:value="10" calcext:value-type="float">
            <text:p>10</text:p>
          </table:table-cell>
          <table:table-cell table:style-name="ce421" office:value-type="float" office:value="11" calcext:value-type="float">
            <text:p>11</text:p>
          </table:table-cell>
          <table:table-cell table:style-name="ce421" office:value-type="float" office:value="12" calcext:value-type="float">
            <text:p>12</text:p>
          </table:table-cell>
          <table:table-cell table:style-name="ce421" office:value-type="float" office:value="13" calcext:value-type="float">
            <text:p>13</text:p>
          </table:table-cell>
          <table:table-cell table:style-name="ce421" office:value-type="float" office:value="14" calcext:value-type="float">
            <text:p>14</text:p>
          </table:table-cell>
          <table:table-cell table:number-columns-repeated="16"/>
          <table:table-cell table:style-name="ce540" table:formula="of:=COM.MICROSOFT.CONCAT(&quot;&quot;&quot;11&quot;&quot;: { &quot;;COM.MICROSOFT.TEXTJOIN(&quot;, &quot;;TRUE();[.AL16:.AP18]);&quot;}&quot;)" office:value-type="string" office:string-value="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" calcext:value-type="string">
            <text:p>"11": { "0": 14, "1": 12, "2": 9, "3": 10, "4": 11, "5": 13, "6": 6, "7": 3, "8": 4, "9": 5, "10": 7, "11": 10, "12": 1, "13": 2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22" table:formula="of:=HLOOKUP([.B9];[.$AF$25:.$AW$26];2;0)" office:value-type="float" office:value="3" calcext:value-type="float">
            <text:p>3.0</text:p>
          </table:table-cell>
          <table:table-cell table:style-name="ce329" table:formula="of:=HLOOKUP([.C9];[.$AF$25:.$AW$26];2;0)" office:value-type="float" office:value="2.3" calcext:value-type="float">
            <text:p>2.3</text:p>
          </table:table-cell>
          <table:table-cell table:style-name="ce332" table:formula="of:=HLOOKUP([.D9];[.$AF$25:.$AW$26];2;0)" office:value-type="float" office:value="2.2" calcext:value-type="float">
            <text:p>2.2</text:p>
          </table:table-cell>
          <table:table-cell table:style-name="ce335" table:formula="of:=HLOOKUP([.E9];[.$AF$25:.$AW$26];2;0)" office:value-type="float" office:value="1.6" calcext:value-type="float">
            <text:p>1.6</text:p>
          </table:table-cell>
          <table:table-cell table:style-name="ce335" table:formula="of:=HLOOKUP([.F9];[.$AF$25:.$AW$26];2;0)" office:value-type="float" office:value="2.1" calcext:value-type="float">
            <text:p>2.1</text:p>
          </table:table-cell>
          <table:table-cell/>
          <table:table-cell table:style-name="ce339" table:formula="of:=HLOOKUP([.H9];[.$AF$25:.$AW$26];2;0)" office:value-type="float" office:value="2.3" calcext:value-type="float">
            <text:p>2.3</text:p>
          </table:table-cell>
          <table:table-cell table:style-name="ce345" table:formula="of:=HLOOKUP([.I9];[.$AF$25:.$AW$26];2;0)" office:value-type="float" office:value="2.2" calcext:value-type="float">
            <text:p>2.2</text:p>
          </table:table-cell>
          <table:table-cell table:style-name="ce350" table:formula="of:=HLOOKUP([.J9];[.$AF$25:.$AW$26];2;0)" office:value-type="float" office:value="2.1" calcext:value-type="float">
            <text:p>2.1</text:p>
          </table:table-cell>
          <table:table-cell table:style-name="ce353" table:formula="of:=HLOOKUP([.K9];[.$AF$25:.$AW$26];2;0)" office:value-type="float" office:value="1.3" calcext:value-type="float">
            <text:p>1.3</text:p>
          </table:table-cell>
          <table:table-cell table:style-name="ce353" table:formula="of:=HLOOKUP([.L9];[.$AF$25:.$AW$26];2;0)" office:value-type="float" office:value="2" calcext:value-type="float">
            <text:p>2.0</text:p>
          </table:table-cell>
          <table:table-cell/>
          <table:table-cell table:style-name="ce357" table:formula="of:=HLOOKUP([.N9];[.$AF$25:.$AW$26];2;0)" office:value-type="float" office:value="2.1" calcext:value-type="float">
            <text:p>2.1</text:p>
          </table:table-cell>
          <table:table-cell table:style-name="ce362" table:formula="of:=HLOOKUP([.O9];[.$AF$25:.$AW$26];2;0)" office:value-type="float" office:value="1.6" calcext:value-type="float">
            <text:p>1.6</text:p>
          </table:table-cell>
          <table:table-cell table:style-name="ce366" table:formula="of:=HLOOKUP([.P9];[.$AF$25:.$AW$26];2;0)" office:value-type="float" office:value="2" calcext:value-type="float">
            <text:p>2.0</text:p>
          </table:table-cell>
          <table:table-cell table:style-name="ce371" table:formula="of:=HLOOKUP([.Q9];[.$AF$25:.$AW$26];2;0)" office:value-type="float" office:value="1.3" calcext:value-type="float">
            <text:p>1.3</text:p>
          </table:table-cell>
          <table:table-cell table:style-name="ce371" table:formula="of:=HLOOKUP([.R9];[.$AF$25:.$AW$26];2;0)" office:value-type="float" office:value="3" calcext:value-type="float">
            <text:p>3.0</text:p>
          </table:table-cell>
          <table:table-cell/>
          <table:table-cell table:style-name="ce377" table:formula="of:=HLOOKUP([.T9];[.$AF$25:.$AW$26];2;0)" office:value-type="float" office:value="2" calcext:value-type="float">
            <text:p>2.0</text:p>
          </table:table-cell>
          <table:table-cell table:style-name="ce382" table:formula="of:=HLOOKUP([.U9];[.$AF$25:.$AW$26];2;0)" office:value-type="float" office:value="2.1" calcext:value-type="float">
            <text:p>2.1</text:p>
          </table:table-cell>
          <table:table-cell table:style-name="ce385" table:formula="of:=HLOOKUP([.V9];[.$AF$25:.$AW$26];2;0)" office:value-type="float" office:value="2.3" calcext:value-type="float">
            <text:p>2.3</text:p>
          </table:table-cell>
          <table:table-cell table:style-name="ce389" table:formula="of:=HLOOKUP([.W9];[.$AF$25:.$AW$26];2;0)" office:value-type="float" office:value="1.6" calcext:value-type="float">
            <text:p>1.6</text:p>
          </table:table-cell>
          <table:table-cell table:style-name="ce389" table:formula="of:=HLOOKUP([.X9];[.$AF$25:.$AW$26];2;0)" office:value-type="float" office:value="3" calcext:value-type="float">
            <text:p>3.0</text:p>
          </table:table-cell>
          <table:table-cell/>
          <table:table-cell table:style-name="ce396" table:formula="of:=HLOOKUP([.Z9];[.$AF$25:.$AW$26];2;0)" office:value-type="float" office:value="2.1" calcext:value-type="float">
            <text:p>2.1</text:p>
          </table:table-cell>
          <table:table-cell table:style-name="ce401" table:formula="of:=HLOOKUP([.AA9];[.$AF$25:.$AW$26];2;0)" office:value-type="float" office:value="2" calcext:value-type="float">
            <text:p>2.0</text:p>
          </table:table-cell>
          <table:table-cell table:style-name="ce404" table:formula="of:=HLOOKUP([.AB9];[.$AF$25:.$AW$26];2;0)" office:value-type="float" office:value="1.6" calcext:value-type="float">
            <text:p>1.6</text:p>
          </table:table-cell>
          <table:table-cell table:style-name="ce407" table:formula="of:=HLOOKUP([.AC9];[.$AF$25:.$AW$26];2;0)" office:value-type="float" office:value="3" calcext:value-type="float">
            <text:p>3.0</text:p>
          </table:table-cell>
          <table:table-cell table:style-name="ce407" table:formula="of:=HLOOKUP([.AD9];[.$AF$25:.$AW$26];2;0)" office:value-type="float" office:value="2.3" calcext:value-type="float">
            <text:p>2.3</text:p>
          </table:table-cell>
          <table:table-cell table:style-name="ce540"/>
          <table:table-cell table:style-name="ce418" office:value-type="float" office:value="1" calcext:value-type="float">
            <text:p>1.0</text:p>
          </table:table-cell>
          <table:table-cell table:style-name="ce418" office:value-type="float" office:value="1.1" calcext:value-type="float">
            <text:p>1.1</text:p>
          </table:table-cell>
          <table:table-cell table:style-name="ce418" office:value-type="float" office:value="1.2" calcext:value-type="float">
            <text:p>1.2</text:p>
          </table:table-cell>
          <table:table-cell table:style-name="ce418" office:value-type="float" office:value="1.3" calcext:value-type="float">
            <text:p>1.3</text:p>
          </table:table-cell>
          <table:table-cell table:style-name="ce418" office:value-type="float" office:value="1.6" calcext:value-type="float">
            <text:p>1.6</text:p>
          </table:table-cell>
          <table:table-cell table:style-name="ce418" office:value-type="float" office:value="2" calcext:value-type="float">
            <text:p>2.0</text:p>
          </table:table-cell>
          <table:table-cell table:style-name="ce418" office:value-type="float" office:value="2.1" calcext:value-type="float">
            <text:p>2.1</text:p>
          </table:table-cell>
          <table:table-cell table:style-name="ce418" office:value-type="float" office:value="2.2" calcext:value-type="float">
            <text:p>2.2</text:p>
          </table:table-cell>
          <table:table-cell table:style-name="ce418" office:value-type="float" office:value="2.3" calcext:value-type="float">
            <text:p>2.3</text:p>
          </table:table-cell>
          <table:table-cell table:style-name="ce418" office:value-type="float" office:value="3" calcext:value-type="float">
            <text:p>3.0</text:p>
          </table:table-cell>
          <table:table-cell table:style-name="ce418" office:value-type="float" office:value="3.1" calcext:value-type="float">
            <text:p>3.1</text:p>
          </table:table-cell>
          <table:table-cell table:style-name="ce418" office:value-type="float" office:value="3.2" calcext:value-type="float">
            <text:p>3.2</text:p>
          </table:table-cell>
          <table:table-cell table:style-name="ce418" office:value-type="float" office:value="3.5" calcext:value-type="float">
            <text:p>3.5</text:p>
          </table:table-cell>
          <table:table-cell table:style-name="ce418" office:value-type="float" office:value="4" calcext:value-type="float">
            <text:p>4.0</text:p>
          </table:table-cell>
          <table:table-cell table:style-name="ce418" office:value-type="float" office:value="4.5" calcext:value-type="float">
            <text:p>4.5</text:p>
          </table:table-cell>
          <table:table-cell table:number-columns-repeated="16"/>
          <table:table-cell table:style-name="ce540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" calcext:value-type="string">
            <text:p>"12": { "0": 14, "1": 13, "2": 9, "3": 10, "4": 12, "5": 11, "6": 6, "7": 4, "8": 3, "9": 8, "10": 5, "11": 2, "12": 9, "13": 1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22" table:formula="of:=HLOOKUP([.B10];[.$AF$25:.$AW$26];2;0)" office:value-type="float" office:value="3.5" calcext:value-type="float">
            <text:p>3.5</text:p>
          </table:table-cell>
          <table:table-cell table:style-name="ce329" table:formula="of:=HLOOKUP([.C10];[.$AF$25:.$AW$26];2;0)" office:value-type="float" office:value="4" calcext:value-type="float">
            <text:p>4.0</text:p>
          </table:table-cell>
          <table:table-cell table:style-name="ce332" table:formula="of:=HLOOKUP([.D10];[.$AF$25:.$AW$26];2;0)" office:value-type="float" office:value="4.5" calcext:value-type="float">
            <text:p>4.5</text:p>
          </table:table-cell>
          <table:table-cell table:style-name="ce335" table:formula="of:=HLOOKUP([.E10];[.$AF$25:.$AW$26];2;0)" office:value-type="float" office:value="3.1" calcext:value-type="float">
            <text:p>3.1</text:p>
          </table:table-cell>
          <table:table-cell table:style-name="ce335" table:formula="of:=HLOOKUP([.F10];[.$AF$25:.$AW$26];2;0)" office:value-type="float" office:value="3.2" calcext:value-type="float">
            <text:p>3.2</text:p>
          </table:table-cell>
          <table:table-cell/>
          <table:table-cell table:style-name="ce339" table:formula="of:=HLOOKUP([.H10];[.$AF$25:.$AW$26];2;0)" office:value-type="float" office:value="4" calcext:value-type="float">
            <text:p>4.0</text:p>
          </table:table-cell>
          <table:table-cell table:style-name="ce345" table:formula="of:=HLOOKUP([.I10];[.$AF$25:.$AW$26];2;0)" office:value-type="float" office:value="4.5" calcext:value-type="float">
            <text:p>4.5</text:p>
          </table:table-cell>
          <table:table-cell table:style-name="ce350" table:formula="of:=HLOOKUP([.J10];[.$AF$25:.$AW$26];2;0)" office:value-type="float" office:value="3.5" calcext:value-type="float">
            <text:p>3.5</text:p>
          </table:table-cell>
          <table:table-cell table:style-name="ce353" table:formula="of:=HLOOKUP([.K10];[.$AF$25:.$AW$26];2;0)" office:value-type="float" office:value="3.1" calcext:value-type="float">
            <text:p>3.1</text:p>
          </table:table-cell>
          <table:table-cell table:style-name="ce353" table:formula="of:=HLOOKUP([.L10];[.$AF$25:.$AW$26];2;0)" office:value-type="float" office:value="3.2" calcext:value-type="float">
            <text:p>3.2</text:p>
          </table:table-cell>
          <table:table-cell/>
          <table:table-cell table:style-name="ce357" table:formula="of:=HLOOKUP([.N10];[.$AF$25:.$AW$26];2;0)" office:value-type="float" office:value="4.5" calcext:value-type="float">
            <text:p>4.5</text:p>
          </table:table-cell>
          <table:table-cell table:style-name="ce362" table:formula="of:=HLOOKUP([.O10];[.$AF$25:.$AW$26];2;0)" office:value-type="float" office:value="3.5" calcext:value-type="float">
            <text:p>3.5</text:p>
          </table:table-cell>
          <table:table-cell table:style-name="ce366" table:formula="of:=HLOOKUP([.P10];[.$AF$25:.$AW$26];2;0)" office:value-type="float" office:value="3.1" calcext:value-type="float">
            <text:p>3.1</text:p>
          </table:table-cell>
          <table:table-cell table:style-name="ce371" table:formula="of:=HLOOKUP([.Q10];[.$AF$25:.$AW$26];2;0)" office:value-type="float" office:value="3.2" calcext:value-type="float">
            <text:p>3.2</text:p>
          </table:table-cell>
          <table:table-cell table:style-name="ce371" table:formula="of:=HLOOKUP([.R10];[.$AF$25:.$AW$26];2;0)" office:value-type="float" office:value="4" calcext:value-type="float">
            <text:p>4.0</text:p>
          </table:table-cell>
          <table:table-cell/>
          <table:table-cell table:style-name="ce377" table:formula="of:=HLOOKUP([.T10];[.$AF$25:.$AW$26];2;0)" office:value-type="float" office:value="4.5" calcext:value-type="float">
            <text:p>4.5</text:p>
          </table:table-cell>
          <table:table-cell table:style-name="ce382" table:formula="of:=HLOOKUP([.U10];[.$AF$25:.$AW$26];2;0)" office:value-type="float" office:value="4" calcext:value-type="float">
            <text:p>4.0</text:p>
          </table:table-cell>
          <table:table-cell table:style-name="ce385" table:formula="of:=HLOOKUP([.V10];[.$AF$25:.$AW$26];2;0)" office:value-type="float" office:value="3.5" calcext:value-type="float">
            <text:p>3.5</text:p>
          </table:table-cell>
          <table:table-cell table:style-name="ce389" table:formula="of:=HLOOKUP([.W10];[.$AF$25:.$AW$26];2;0)" office:value-type="float" office:value="3.1" calcext:value-type="float">
            <text:p>3.1</text:p>
          </table:table-cell>
          <table:table-cell table:style-name="ce389" table:formula="of:=HLOOKUP([.X10];[.$AF$25:.$AW$26];2;0)" office:value-type="float" office:value="3.2" calcext:value-type="float">
            <text:p>3.2</text:p>
          </table:table-cell>
          <table:table-cell/>
          <table:table-cell table:style-name="ce396" table:formula="of:=HLOOKUP([.Z10];[.$AF$25:.$AW$26];2;0)" office:value-type="float" office:value="3.1" calcext:value-type="float">
            <text:p>3.1</text:p>
          </table:table-cell>
          <table:table-cell table:style-name="ce401" table:formula="of:=HLOOKUP([.AA10];[.$AF$25:.$AW$26];2;0)" office:value-type="float" office:value="3.2" calcext:value-type="float">
            <text:p>3.2</text:p>
          </table:table-cell>
          <table:table-cell table:style-name="ce404" table:formula="of:=HLOOKUP([.AB10];[.$AF$25:.$AW$26];2;0)" office:value-type="float" office:value="3.5" calcext:value-type="float">
            <text:p>3.5</text:p>
          </table:table-cell>
          <table:table-cell table:style-name="ce407" table:formula="of:=HLOOKUP([.AC10];[.$AF$25:.$AW$26];2;0)" office:value-type="float" office:value="4" calcext:value-type="float">
            <text:p>4.0</text:p>
          </table:table-cell>
          <table:table-cell table:style-name="ce407" table:formula="of:=HLOOKUP([.AD10];[.$AF$25:.$AW$26];2;0)" office:value-type="float" office:value="4.5" calcext:value-type="float">
            <text:p>4.5</text:p>
          </table:table-cell>
          <table:table-cell table:style-name="ce540"/>
          <table:table-cell table:number-columns-repeated="31"/>
          <table:table-cell table:style-name="ce540" table:formula="of:=COM.MICROSOFT.CONCAT(&quot;&quot;&quot;13&quot;&quot;: { &quot;;COM.MICROSOFT.TEXTJOIN(&quot;, &quot;;TRUE();[.AX16:.BB18]);&quot;}&quot;)" office:value-type="string" office:string-value="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" calcext:value-type="string">
            <text:p>"13": { "0": 14, "1": 10, "2": 8, "3": 12, "4": 13, "5": 5, "6": 4, "7": 3, "8": 7, "9": 11, "10": 6, "11": 2, "12": 1, "13": 4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number-columns-repeated="30"/>
          <table:table-cell table:style-name="ce540" table:formula="of:=COM.MICROSOFT.CONCAT(&quot;&quot;&quot;14&quot;&quot;: { &quot;;COM.MICROSOFT.TEXTJOIN(&quot;, &quot;;TRUE();[.BD16:.BH18]);&quot;}&quot;)" office:value-type="string" office:string-value="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52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3"/>
          <table:table-cell table:style-name="ce540"/>
          <table:table-cell table:number-columns-repeated="31"/>
          <table:table-cell table:style-name="ce540"/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23" table:formula="of:=HLOOKUP([.B12];[.$AF$25:.$AW$26];2;0)" office:value-type="float" office:value="3.5" calcext:value-type="float">
            <text:p>3.5</text:p>
          </table:table-cell>
          <table:table-cell table:style-name="ce330" table:formula="of:=HLOOKUP([.C12];[.$AF$25:.$AW$26];2;0)" office:value-type="float" office:value="3.1" calcext:value-type="float">
            <text:p>3.1</text:p>
          </table:table-cell>
          <table:table-cell table:style-name="ce333" table:formula="of:=HLOOKUP([.D12];[.$AF$25:.$AW$26];2;0)" office:value-type="float" office:value="2.1" calcext:value-type="float">
            <text:p>2.1</text:p>
          </table:table-cell>
          <table:table-cell table:style-name="ce336" table:formula="of:=HLOOKUP([.E12];[.$AF$25:.$AW$26];2;0)" office:value-type="float" office:value="2" calcext:value-type="float">
            <text:p>2.0</text:p>
          </table:table-cell>
          <table:table-cell table:style-name="ce336" table:formula="of:=HLOOKUP([.F12];[.$AF$25:.$AW$26];2;0)" office:value-type="float" office:value="3" calcext:value-type="float">
            <text:p>3.0</text:p>
          </table:table-cell>
          <table:table-cell/>
          <table:table-cell table:style-name="ce340" table:formula="of:=HLOOKUP([.H12];[.$AF$25:.$AW$26];2;0)" office:value-type="float" office:value="4.5" calcext:value-type="float">
            <text:p>4.5</text:p>
          </table:table-cell>
          <table:table-cell table:style-name="ce346" table:formula="of:=HLOOKUP([.I12];[.$AF$25:.$AW$26];2;0)" office:value-type="float" office:value="2.2" calcext:value-type="float">
            <text:p>2.2</text:p>
          </table:table-cell>
          <table:table-cell table:style-name="ce351" table:formula="of:=HLOOKUP([.J12];[.$AF$25:.$AW$26];2;0)" office:value-type="float" office:value="1.6" calcext:value-type="float">
            <text:p>1.6</text:p>
          </table:table-cell>
          <table:table-cell table:style-name="ce354" table:formula="of:=HLOOKUP([.K12];[.$AF$25:.$AW$26];2;0)" office:value-type="float" office:value="2" calcext:value-type="float">
            <text:p>2.0</text:p>
          </table:table-cell>
          <table:table-cell table:style-name="ce354" table:formula="of:=HLOOKUP([.L12];[.$AF$25:.$AW$26];2;0)" office:value-type="float" office:value="4" calcext:value-type="float">
            <text:p>4.0</text:p>
          </table:table-cell>
          <table:table-cell/>
          <table:table-cell table:style-name="ce358" table:formula="of:=HLOOKUP([.N12];[.$AF$25:.$AW$26];2;0)" office:value-type="float" office:value="4.5" calcext:value-type="float">
            <text:p>4.5</text:p>
          </table:table-cell>
          <table:table-cell table:style-name="ce363" table:formula="of:=HLOOKUP([.O12];[.$AF$25:.$AW$26];2;0)" office:value-type="float" office:value="2" calcext:value-type="float">
            <text:p>2.0</text:p>
          </table:table-cell>
          <table:table-cell table:style-name="ce367" table:formula="of:=HLOOKUP([.P12];[.$AF$25:.$AW$26];2;0)" office:value-type="float" office:value="1.6" calcext:value-type="float">
            <text:p>1.6</text:p>
          </table:table-cell>
          <table:table-cell table:style-name="ce372" table:formula="of:=HLOOKUP([.Q12];[.$AF$25:.$AW$26];2;0)" office:value-type="float" office:value="2.1" calcext:value-type="float">
            <text:p>2.1</text:p>
          </table:table-cell>
          <table:table-cell table:style-name="ce372" table:formula="of:=HLOOKUP([.R12];[.$AF$25:.$AW$26];2;0)" office:value-type="float" office:value="4" calcext:value-type="float">
            <text:p>4.0</text:p>
          </table:table-cell>
          <table:table-cell/>
          <table:table-cell table:style-name="ce378" table:formula="of:=HLOOKUP([.T12];[.$AF$25:.$AW$26];2;0)" office:value-type="float" office:value="4" calcext:value-type="float">
            <text:p>4.0</text:p>
          </table:table-cell>
          <table:table-cell table:style-name="ce383" table:formula="of:=HLOOKUP([.U12];[.$AF$25:.$AW$26];2;0)" office:value-type="float" office:value="2" calcext:value-type="float">
            <text:p>2.0</text:p>
          </table:table-cell>
          <table:table-cell table:style-name="ce386" table:formula="of:=HLOOKUP([.V12];[.$AF$25:.$AW$26];2;0)" office:value-type="float" office:value="1.3" calcext:value-type="float">
            <text:p>1.3</text:p>
          </table:table-cell>
          <table:table-cell table:style-name="ce390" table:formula="of:=HLOOKUP([.W12];[.$AF$25:.$AW$26];2;0)" office:value-type="float" office:value="2.1" calcext:value-type="float">
            <text:p>2.1</text:p>
          </table:table-cell>
          <table:table-cell table:style-name="ce390" table:formula="of:=HLOOKUP([.X12];[.$AF$25:.$AW$26];2;0)" office:value-type="float" office:value="3.1" calcext:value-type="float">
            <text:p>3.1</text:p>
          </table:table-cell>
          <table:table-cell/>
          <table:table-cell table:style-name="ce397" table:formula="of:=HLOOKUP([.Z12];[.$AF$25:.$AW$26];2;0)" office:value-type="float" office:value="3.1" calcext:value-type="float">
            <text:p>3.1</text:p>
          </table:table-cell>
          <table:table-cell table:style-name="ce402" table:formula="of:=HLOOKUP([.AA12];[.$AF$25:.$AW$26];2;0)" office:value-type="float" office:value="2.2" calcext:value-type="float">
            <text:p>2.2</text:p>
          </table:table-cell>
          <table:table-cell table:style-name="ce405" table:formula="of:=HLOOKUP([.AB12];[.$AF$25:.$AW$26];2;0)" office:value-type="float" office:value="1.6" calcext:value-type="float">
            <text:p>1.6</text:p>
          </table:table-cell>
          <table:table-cell table:style-name="ce408" table:formula="of:=HLOOKUP([.AC12];[.$AF$25:.$AW$26];2;0)" office:value-type="float" office:value="1.3" calcext:value-type="float">
            <text:p>1.3</text:p>
          </table:table-cell>
          <table:table-cell table:style-name="ce408" table:formula="of:=HLOOKUP([.AD12];[.$AF$25:.$AW$26];2;0)" office:value-type="float" office:value="3" calcext:value-type="float">
            <text:p>3.0</text:p>
          </table:table-cell>
          <table:table-cell table:style-name="ce540"/>
          <table:table-cell table:number-columns-repeated="31"/>
          <table:table-cell table:style-name="ce540" table:formula="of:=COM.MICROSOFT.TEXTJOIN(&quot;, &quot;;TRUE();[.BK24:.BK28]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24" table:formula="of:=HLOOKUP([.B13];[.$AF$25:.$AW$26];2;0)" office:value-type="float" office:value="2.3" calcext:value-type="float">
            <text:p>2.3</text:p>
          </table:table-cell>
          <table:table-cell table:style-name="ce330" table:formula="of:=HLOOKUP([.C13];[.$AF$25:.$AW$26];2;0)" office:value-type="float" office:value="1.1" calcext:value-type="float">
            <text:p>1.1</text:p>
          </table:table-cell>
          <table:table-cell table:style-name="ce333" table:formula="of:=HLOOKUP([.D13];[.$AF$25:.$AW$26];2;0)" office:value-type="float" office:value="1.2" calcext:value-type="float">
            <text:p>1.2</text:p>
          </table:table-cell>
          <table:table-cell table:style-name="ce336" table:formula="of:=HLOOKUP([.E13];[.$AF$25:.$AW$26];2;0)" office:value-type="float" office:value="1.3" calcext:value-type="float">
            <text:p>1.3</text:p>
          </table:table-cell>
          <table:table-cell table:style-name="ce336" table:formula="of:=HLOOKUP([.F13];[.$AF$25:.$AW$26];2;0)" office:value-type="float" office:value="1.6" calcext:value-type="float">
            <text:p>1.6</text:p>
          </table:table-cell>
          <table:table-cell/>
          <table:table-cell table:style-name="ce341" table:formula="of:=HLOOKUP([.H13];[.$AF$25:.$AW$26];2;0)" office:value-type="float" office:value="3.1" calcext:value-type="float">
            <text:p>3.1</text:p>
          </table:table-cell>
          <table:table-cell table:style-name="ce347" table:formula="of:=HLOOKUP([.I13];[.$AF$25:.$AW$26];2;0)" office:value-type="float" office:value="1.2" calcext:value-type="float">
            <text:p>1.2</text:p>
          </table:table-cell>
          <table:table-cell table:style-name="ce351" table:formula="of:=HLOOKUP([.J13];[.$AF$25:.$AW$26];2;0)" office:value-type="float" office:value="1.1" calcext:value-type="float">
            <text:p>1.1</text:p>
          </table:table-cell>
          <table:table-cell table:style-name="ce354" table:formula="of:=HLOOKUP([.K13];[.$AF$25:.$AW$26];2;0)" office:value-type="float" office:value="1.2" calcext:value-type="float">
            <text:p>1.2</text:p>
          </table:table-cell>
          <table:table-cell table:style-name="ce354" table:formula="of:=HLOOKUP([.L13];[.$AF$25:.$AW$26];2;0)" office:value-type="float" office:value="3" calcext:value-type="float">
            <text:p>3.0</text:p>
          </table:table-cell>
          <table:table-cell/>
          <table:table-cell table:style-name="ce359" table:formula="of:=HLOOKUP([.N13];[.$AF$25:.$AW$26];2;0)" office:value-type="float" office:value="3.1" calcext:value-type="float">
            <text:p>3.1</text:p>
          </table:table-cell>
          <table:table-cell table:style-name="ce363" table:formula="of:=HLOOKUP([.O13];[.$AF$25:.$AW$26];2;0)" office:value-type="float" office:value="1.2" calcext:value-type="float">
            <text:p>1.2</text:p>
          </table:table-cell>
          <table:table-cell table:style-name="ce368" table:formula="of:=HLOOKUP([.P13];[.$AF$25:.$AW$26];2;0)" office:value-type="float" office:value="1" calcext:value-type="float">
            <text:p>1.0</text:p>
          </table:table-cell>
          <table:table-cell table:style-name="ce372" table:formula="of:=HLOOKUP([.Q13];[.$AF$25:.$AW$26];2;0)" office:value-type="float" office:value="1.1" calcext:value-type="float">
            <text:p>1.1</text:p>
          </table:table-cell>
          <table:table-cell table:style-name="ce372" table:formula="of:=HLOOKUP([.R13];[.$AF$25:.$AW$26];2;0)" office:value-type="float" office:value="3" calcext:value-type="float">
            <text:p>3.0</text:p>
          </table:table-cell>
          <table:table-cell/>
          <table:table-cell table:style-name="ce379" table:formula="of:=HLOOKUP([.T13];[.$AF$25:.$AW$26];2;0)" office:value-type="float" office:value="1.6" calcext:value-type="float">
            <text:p>1.6</text:p>
          </table:table-cell>
          <table:table-cell table:style-name="ce383" table:formula="of:=HLOOKUP([.U13];[.$AF$25:.$AW$26];2;0)" office:value-type="float" office:value="1.2" calcext:value-type="float">
            <text:p>1.2</text:p>
          </table:table-cell>
          <table:table-cell table:style-name="ce386" table:formula="of:=HLOOKUP([.V13];[.$AF$25:.$AW$26];2;0)" office:value-type="float" office:value="1.1" calcext:value-type="float">
            <text:p>1.1</text:p>
          </table:table-cell>
          <table:table-cell table:style-name="ce391" table:formula="of:=HLOOKUP([.W13];[.$AF$25:.$AW$26];2;0)" office:value-type="float" office:value="1.1" calcext:value-type="float">
            <text:p>1.1</text:p>
          </table:table-cell>
          <table:table-cell table:style-name="ce390" table:formula="of:=HLOOKUP([.X13];[.$AF$25:.$AW$26];2;0)" office:value-type="float" office:value="2.3" calcext:value-type="float">
            <text:p>2.3</text:p>
          </table:table-cell>
          <table:table-cell/>
          <table:table-cell table:style-name="ce398" table:formula="of:=HLOOKUP([.Z13];[.$AF$25:.$AW$26];2;0)" office:value-type="float" office:value="2.1" calcext:value-type="float">
            <text:p>2.1</text:p>
          </table:table-cell>
          <table:table-cell table:style-name="ce402" table:formula="of:=HLOOKUP([.AA13];[.$AF$25:.$AW$26];2;0)" office:value-type="float" office:value="2" calcext:value-type="float">
            <text:p>2.0</text:p>
          </table:table-cell>
          <table:table-cell table:style-name="ce405" table:formula="of:=HLOOKUP([.AB13];[.$AF$25:.$AW$26];2;0)" office:value-type="float" office:value="1.2" calcext:value-type="float">
            <text:p>1.2</text:p>
          </table:table-cell>
          <table:table-cell table:style-name="ce408" table:formula="of:=HLOOKUP([.AC13];[.$AF$25:.$AW$26];2;0)" office:value-type="float" office:value="1.1" calcext:value-type="float">
            <text:p>1.1</text:p>
          </table:table-cell>
          <table:table-cell table:style-name="ce411" table:formula="of:=HLOOKUP([.AD13];[.$AF$25:.$AW$26];2;0)" office:value-type="float" office:value="2.2" calcext:value-type="float">
            <text:p>2.2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25" table:formula="of:=HLOOKUP([.B14];[.$AF$25:.$AW$26];2;0)" office:value-type="float" office:value="4" calcext:value-type="float">
            <text:p>4.0</text:p>
          </table:table-cell>
          <table:table-cell table:style-name="ce330" table:formula="of:=HLOOKUP([.C14];[.$AF$25:.$AW$26];2;0)" office:value-type="float" office:value="4.5" calcext:value-type="float">
            <text:p>4.5</text:p>
          </table:table-cell>
          <table:table-cell table:style-name="ce333" table:formula="of:=HLOOKUP([.D14];[.$AF$25:.$AW$26];2;0)" office:value-type="float" office:value="3.2" calcext:value-type="float">
            <text:p>3.2</text:p>
          </table:table-cell>
          <table:table-cell table:style-name="ce336" table:formula="of:=HLOOKUP([.E14];[.$AF$25:.$AW$26];2;0)" office:value-type="float" office:value="2.2" calcext:value-type="float">
            <text:p>2.2</text:p>
          </table:table-cell>
          <table:table-cell table:style-name="ce336" table:formula="of:=HLOOKUP([.F14];[.$AF$25:.$AW$26];2;0)" office:value-type="float" office:value="2.3" calcext:value-type="float">
            <text:p>2.3</text:p>
          </table:table-cell>
          <table:table-cell/>
          <table:table-cell table:style-name="ce341" table:formula="of:=HLOOKUP([.H14];[.$AF$25:.$AW$26];2;0)" office:value-type="float" office:value="3.5" calcext:value-type="float">
            <text:p>3.5</text:p>
          </table:table-cell>
          <table:table-cell table:style-name="ce346" table:formula="of:=HLOOKUP([.I14];[.$AF$25:.$AW$26];2;0)" office:value-type="float" office:value="2.3" calcext:value-type="float">
            <text:p>2.3</text:p>
          </table:table-cell>
          <table:table-cell table:style-name="ce351" table:formula="of:=HLOOKUP([.J14];[.$AF$25:.$AW$26];2;0)" office:value-type="float" office:value="2.1" calcext:value-type="float">
            <text:p>2.1</text:p>
          </table:table-cell>
          <table:table-cell table:style-name="ce354" table:formula="of:=HLOOKUP([.K14];[.$AF$25:.$AW$26];2;0)" office:value-type="float" office:value="1.3" calcext:value-type="float">
            <text:p>1.3</text:p>
          </table:table-cell>
          <table:table-cell table:style-name="ce354" table:formula="of:=HLOOKUP([.L14];[.$AF$25:.$AW$26];2;0)" office:value-type="float" office:value="3.2" calcext:value-type="float">
            <text:p>3.2</text:p>
          </table:table-cell>
          <table:table-cell/>
          <table:table-cell table:style-name="ce359" table:formula="of:=HLOOKUP([.N14];[.$AF$25:.$AW$26];2;0)" office:value-type="float" office:value="3.2" calcext:value-type="float">
            <text:p>3.2</text:p>
          </table:table-cell>
          <table:table-cell table:style-name="ce363" table:formula="of:=HLOOKUP([.O14];[.$AF$25:.$AW$26];2;0)" office:value-type="float" office:value="2.2" calcext:value-type="float">
            <text:p>2.2</text:p>
          </table:table-cell>
          <table:table-cell table:style-name="ce367" table:formula="of:=HLOOKUP([.P14];[.$AF$25:.$AW$26];2;0)" office:value-type="float" office:value="2.3" calcext:value-type="float">
            <text:p>2.3</text:p>
          </table:table-cell>
          <table:table-cell table:style-name="ce372" table:formula="of:=HLOOKUP([.Q14];[.$AF$25:.$AW$26];2;0)" office:value-type="float" office:value="1.3" calcext:value-type="float">
            <text:p>1.3</text:p>
          </table:table-cell>
          <table:table-cell table:style-name="ce372" table:formula="of:=HLOOKUP([.R14];[.$AF$25:.$AW$26];2;0)" office:value-type="float" office:value="3.5" calcext:value-type="float">
            <text:p>3.5</text:p>
          </table:table-cell>
          <table:table-cell/>
          <table:table-cell table:style-name="ce379" table:formula="of:=HLOOKUP([.T14];[.$AF$25:.$AW$26];2;0)" office:value-type="float" office:value="3.5" calcext:value-type="float">
            <text:p>3.5</text:p>
          </table:table-cell>
          <table:table-cell table:style-name="ce383" table:formula="of:=HLOOKUP([.U14];[.$AF$25:.$AW$26];2;0)" office:value-type="float" office:value="4.5" calcext:value-type="float">
            <text:p>4.5</text:p>
          </table:table-cell>
          <table:table-cell table:style-name="ce386" table:formula="of:=HLOOKUP([.V14];[.$AF$25:.$AW$26];2;0)" office:value-type="float" office:value="3.2" calcext:value-type="float">
            <text:p>3.2</text:p>
          </table:table-cell>
          <table:table-cell table:style-name="ce390" table:formula="of:=HLOOKUP([.W14];[.$AF$25:.$AW$26];2;0)" office:value-type="float" office:value="2.2" calcext:value-type="float">
            <text:p>2.2</text:p>
          </table:table-cell>
          <table:table-cell table:style-name="ce390" table:formula="of:=HLOOKUP([.X14];[.$AF$25:.$AW$26];2;0)" office:value-type="float" office:value="3" calcext:value-type="float">
            <text:p>3.0</text:p>
          </table:table-cell>
          <table:table-cell/>
          <table:table-cell table:style-name="ce398" table:formula="of:=HLOOKUP([.Z14];[.$AF$25:.$AW$26];2;0)" office:value-type="float" office:value="3.5" calcext:value-type="float">
            <text:p>3.5</text:p>
          </table:table-cell>
          <table:table-cell table:style-name="ce402" table:formula="of:=HLOOKUP([.AA14];[.$AF$25:.$AW$26];2;0)" office:value-type="float" office:value="4" calcext:value-type="float">
            <text:p>4.0</text:p>
          </table:table-cell>
          <table:table-cell table:style-name="ce405" table:formula="of:=HLOOKUP([.AB14];[.$AF$25:.$AW$26];2;0)" office:value-type="float" office:value="4.5" calcext:value-type="float">
            <text:p>4.5</text:p>
          </table:table-cell>
          <table:table-cell table:style-name="ce408" table:formula="of:=HLOOKUP([.AC14];[.$AF$25:.$AW$26];2;0)" office:value-type="float" office:value="3.2" calcext:value-type="float">
            <text:p>3.2</text:p>
          </table:table-cell>
          <table:table-cell table:style-name="ce408" table:formula="of:=HLOOKUP([.AD14];[.$AF$25:.$AW$26];2;0)" office:value-type="float" office:value="2.3" calcext:value-type="float">
            <text:p>2.3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29" table:number-columns-repeated="5"/>
          <table:table-cell/>
          <table:table-cell table:style-name="ce29" table:number-columns-repeated="5"/>
          <table:table-cell/>
          <table:table-cell table:style-name="ce29" table:number-columns-repeated="5"/>
          <table:table-cell/>
          <table:table-cell table:style-name="ce29" table:number-columns-repeated="5"/>
          <table:table-cell/>
          <table:table-cell table:style-name="ce29" table:number-columns-repeated="5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552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N35:.R37])-[.P37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3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26" table:formula="of:=HLOOKUP([.B16];[.$AF$25:.$AW$26];2;0)" office:value-type="float" office:value="4" calcext:value-type="float">
            <text:p>4.0</text:p>
          </table:table-cell>
          <table:table-cell table:style-name="ce331" table:formula="of:=HLOOKUP([.C16];[.$AF$25:.$AW$26];2;0)" office:value-type="float" office:value="4.5" calcext:value-type="float">
            <text:p>4.5</text:p>
          </table:table-cell>
          <table:table-cell table:style-name="ce334" table:formula="of:=HLOOKUP([.D16];[.$AF$25:.$AW$26];2;0)" office:value-type="float" office:value="3.5" calcext:value-type="float">
            <text:p>3.5</text:p>
          </table:table-cell>
          <table:table-cell table:style-name="ce337" table:formula="of:=HLOOKUP([.E16];[.$AF$25:.$AW$26];2;0)" office:value-type="float" office:value="3.2" calcext:value-type="float">
            <text:p>3.2</text:p>
          </table:table-cell>
          <table:table-cell table:style-name="ce337" table:formula="of:=HLOOKUP([.F16];[.$AF$25:.$AW$26];2;0)" office:value-type="float" office:value="3.1" calcext:value-type="float">
            <text:p>3.1</text:p>
          </table:table-cell>
          <table:table-cell/>
          <table:table-cell table:style-name="ce342" table:formula="of:=HLOOKUP([.H16];[.$AF$25:.$AW$26];2;0)" office:value-type="float" office:value="4.5" calcext:value-type="float">
            <text:p>4.5</text:p>
          </table:table-cell>
          <table:table-cell table:style-name="ce348" table:formula="of:=HLOOKUP([.I16];[.$AF$25:.$AW$26];2;0)" office:value-type="float" office:value="3.5" calcext:value-type="float">
            <text:p>3.5</text:p>
          </table:table-cell>
          <table:table-cell table:style-name="ce352" table:formula="of:=HLOOKUP([.J16];[.$AF$25:.$AW$26];2;0)" office:value-type="float" office:value="3" calcext:value-type="float">
            <text:p>3.0</text:p>
          </table:table-cell>
          <table:table-cell table:style-name="ce355" table:formula="of:=HLOOKUP([.K16];[.$AF$25:.$AW$26];2;0)" office:value-type="float" office:value="3.1" calcext:value-type="float">
            <text:p>3.1</text:p>
          </table:table-cell>
          <table:table-cell table:style-name="ce355" table:formula="of:=HLOOKUP([.L16];[.$AF$25:.$AW$26];2;0)" office:value-type="float" office:value="3.2" calcext:value-type="float">
            <text:p>3.2</text:p>
          </table:table-cell>
          <table:table-cell/>
          <table:table-cell table:style-name="ce360" table:formula="of:=HLOOKUP([.N16];[.$AF$25:.$AW$26];2;0)" office:value-type="float" office:value="4.5" calcext:value-type="float">
            <text:p>4.5</text:p>
          </table:table-cell>
          <table:table-cell table:style-name="ce364" table:formula="of:=HLOOKUP([.O16];[.$AF$25:.$AW$26];2;0)" office:value-type="float" office:value="4" calcext:value-type="float">
            <text:p>4.0</text:p>
          </table:table-cell>
          <table:table-cell table:style-name="ce369" table:formula="of:=HLOOKUP([.P16];[.$AF$25:.$AW$26];2;0)" office:value-type="float" office:value="3" calcext:value-type="float">
            <text:p>3.0</text:p>
          </table:table-cell>
          <table:table-cell table:style-name="ce373" table:formula="of:=HLOOKUP([.Q16];[.$AF$25:.$AW$26];2;0)" office:value-type="float" office:value="3.1" calcext:value-type="float">
            <text:p>3.1</text:p>
          </table:table-cell>
          <table:table-cell table:style-name="ce373" table:formula="of:=HLOOKUP([.R16];[.$AF$25:.$AW$26];2;0)" office:value-type="float" office:value="3.5" calcext:value-type="float">
            <text:p>3.5</text:p>
          </table:table-cell>
          <table:table-cell/>
          <table:table-cell table:style-name="ce380" table:formula="of:=HLOOKUP([.T16];[.$AF$25:.$AW$26];2;0)" office:value-type="float" office:value="4.5" calcext:value-type="float">
            <text:p>4.5</text:p>
          </table:table-cell>
          <table:table-cell table:style-name="ce384" table:formula="of:=HLOOKUP([.U16];[.$AF$25:.$AW$26];2;0)" office:value-type="float" office:value="3.1" calcext:value-type="float">
            <text:p>3.1</text:p>
          </table:table-cell>
          <table:table-cell table:style-name="ce387" table:formula="of:=HLOOKUP([.V16];[.$AF$25:.$AW$26];2;0)" office:value-type="float" office:value="2.3" calcext:value-type="float">
            <text:p>2.3</text:p>
          </table:table-cell>
          <table:table-cell table:style-name="ce392" table:formula="of:=HLOOKUP([.W16];[.$AF$25:.$AW$26];2;0)" office:value-type="float" office:value="3.5" calcext:value-type="float">
            <text:p>3.5</text:p>
          </table:table-cell>
          <table:table-cell table:style-name="ce392" table:formula="of:=HLOOKUP([.X16];[.$AF$25:.$AW$26];2;0)" office:value-type="float" office:value="4" calcext:value-type="float">
            <text:p>4.0</text:p>
          </table:table-cell>
          <table:table-cell/>
          <table:table-cell table:style-name="ce399" table:formula="of:=HLOOKUP([.Z16];[.$AF$25:.$AW$26];2;0)" office:value-type="float" office:value="4" calcext:value-type="float">
            <text:p>4.0</text:p>
          </table:table-cell>
          <table:table-cell table:style-name="ce403" table:formula="of:=HLOOKUP([.AA16];[.$AF$25:.$AW$26];2;0)" office:value-type="float" office:value="4.5" calcext:value-type="float">
            <text:p>4.5</text:p>
          </table:table-cell>
          <table:table-cell table:style-name="ce406" table:formula="of:=HLOOKUP([.AB16];[.$AF$25:.$AW$26];2;0)" office:value-type="float" office:value="3.5" calcext:value-type="float">
            <text:p>3.5</text:p>
          </table:table-cell>
          <table:table-cell table:style-name="ce409" table:formula="of:=HLOOKUP([.AC16];[.$AF$25:.$AW$26];2;0)" office:value-type="float" office:value="3.2" calcext:value-type="float">
            <text:p>3.2</text:p>
          </table:table-cell>
          <table:table-cell table:style-name="ce409" table:formula="of:=HLOOKUP([.AD16];[.$AF$25:.$AW$26];2;0)" office:value-type="float" office:value="3.1" calcext:value-type="float">
            <text:p>3.1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27" table:formula="of:=HLOOKUP([.B17];[.$AF$25:.$AW$26];2;0)" office:value-type="float" office:value="3" calcext:value-type="float">
            <text:p>3.0</text:p>
          </table:table-cell>
          <table:table-cell table:style-name="ce331" table:formula="of:=HLOOKUP([.C17];[.$AF$25:.$AW$26];2;0)" office:value-type="float" office:value="2.3" calcext:value-type="float">
            <text:p>2.3</text:p>
          </table:table-cell>
          <table:table-cell table:style-name="ce334" table:formula="of:=HLOOKUP([.D17];[.$AF$25:.$AW$26];2;0)" office:value-type="float" office:value="1.6" calcext:value-type="float">
            <text:p>1.6</text:p>
          </table:table-cell>
          <table:table-cell table:style-name="ce337" table:formula="of:=HLOOKUP([.E17];[.$AF$25:.$AW$26];2;0)" office:value-type="float" office:value="2" calcext:value-type="float">
            <text:p>2.0</text:p>
          </table:table-cell>
          <table:table-cell table:style-name="ce337" table:formula="of:=HLOOKUP([.F17];[.$AF$25:.$AW$26];2;0)" office:value-type="float" office:value="2.1" calcext:value-type="float">
            <text:p>2.1</text:p>
          </table:table-cell>
          <table:table-cell/>
          <table:table-cell table:style-name="ce343" table:formula="of:=HLOOKUP([.H17];[.$AF$25:.$AW$26];2;0)" office:value-type="float" office:value="4" calcext:value-type="float">
            <text:p>4.0</text:p>
          </table:table-cell>
          <table:table-cell table:style-name="ce348" table:formula="of:=HLOOKUP([.I17];[.$AF$25:.$AW$26];2;0)" office:value-type="float" office:value="2.1" calcext:value-type="float">
            <text:p>2.1</text:p>
          </table:table-cell>
          <table:table-cell table:style-name="ce352" table:formula="of:=HLOOKUP([.J17];[.$AF$25:.$AW$26];2;0)" office:value-type="float" office:value="1.3" calcext:value-type="float">
            <text:p>1.3</text:p>
          </table:table-cell>
          <table:table-cell table:style-name="ce355" table:formula="of:=HLOOKUP([.K17];[.$AF$25:.$AW$26];2;0)" office:value-type="float" office:value="1.6" calcext:value-type="float">
            <text:p>1.6</text:p>
          </table:table-cell>
          <table:table-cell table:style-name="ce355" table:formula="of:=HLOOKUP([.L17];[.$AF$25:.$AW$26];2;0)" office:value-type="float" office:value="2" calcext:value-type="float">
            <text:p>2.0</text:p>
          </table:table-cell>
          <table:table-cell/>
          <table:table-cell table:style-name="ce361" table:formula="of:=HLOOKUP([.N17];[.$AF$25:.$AW$26];2;0)" office:value-type="float" office:value="3.2" calcext:value-type="float">
            <text:p>3.2</text:p>
          </table:table-cell>
          <table:table-cell table:style-name="ce364" table:formula="of:=HLOOKUP([.O17];[.$AF$25:.$AW$26];2;0)" office:value-type="float" office:value="2.1" calcext:value-type="float">
            <text:p>2.1</text:p>
          </table:table-cell>
          <table:table-cell table:style-name="ce369" table:formula="of:=HLOOKUP([.P17];[.$AF$25:.$AW$26];2;0)" office:value-type="float" office:value="1.6" calcext:value-type="float">
            <text:p>1.6</text:p>
          </table:table-cell>
          <table:table-cell table:style-name="ce373" table:formula="of:=HLOOKUP([.Q17];[.$AF$25:.$AW$26];2;0)" office:value-type="float" office:value="1.3" calcext:value-type="float">
            <text:p>1.3</text:p>
          </table:table-cell>
          <table:table-cell table:style-name="ce373" table:formula="of:=HLOOKUP([.R17];[.$AF$25:.$AW$26];2;0)" office:value-type="float" office:value="2.3" calcext:value-type="float">
            <text:p>2.3</text:p>
          </table:table-cell>
          <table:table-cell/>
          <table:table-cell table:style-name="ce381" table:formula="of:=HLOOKUP([.T17];[.$AF$25:.$AW$26];2;0)" office:value-type="float" office:value="2" calcext:value-type="float">
            <text:p>2.0</text:p>
          </table:table-cell>
          <table:table-cell table:style-name="ce384" table:formula="of:=HLOOKUP([.U17];[.$AF$25:.$AW$26];2;0)" office:value-type="float" office:value="1.6" calcext:value-type="float">
            <text:p>1.6</text:p>
          </table:table-cell>
          <table:table-cell table:style-name="ce387" table:formula="of:=HLOOKUP([.V17];[.$AF$25:.$AW$26];2;0)" office:value-type="float" office:value="1.3" calcext:value-type="float">
            <text:p>1.3</text:p>
          </table:table-cell>
          <table:table-cell table:style-name="ce392" table:formula="of:=HLOOKUP([.W17];[.$AF$25:.$AW$26];2;0)" office:value-type="float" office:value="2.2" calcext:value-type="float">
            <text:p>2.2</text:p>
          </table:table-cell>
          <table:table-cell table:style-name="ce392" table:formula="of:=HLOOKUP([.X17];[.$AF$25:.$AW$26];2;0)" office:value-type="float" office:value="3.2" calcext:value-type="float">
            <text:p>3.2</text:p>
          </table:table-cell>
          <table:table-cell/>
          <table:table-cell table:style-name="ce400" table:formula="of:=HLOOKUP([.Z17];[.$AF$25:.$AW$26];2;0)" office:value-type="float" office:value="2.2" calcext:value-type="float">
            <text:p>2.2</text:p>
          </table:table-cell>
          <table:table-cell table:style-name="ce403" table:formula="of:=HLOOKUP([.AA17];[.$AF$25:.$AW$26];2;0)" office:value-type="float" office:value="2" calcext:value-type="float">
            <text:p>2.0</text:p>
          </table:table-cell>
          <table:table-cell table:style-name="ce406" table:formula="of:=HLOOKUP([.AB17];[.$AF$25:.$AW$26];2;0)" office:value-type="float" office:value="1.3" calcext:value-type="float">
            <text:p>1.3</text:p>
          </table:table-cell>
          <table:table-cell table:style-name="ce409" table:formula="of:=HLOOKUP([.AC17];[.$AF$25:.$AW$26];2;0)" office:value-type="float" office:value="1.2" calcext:value-type="float">
            <text:p>1.2</text:p>
          </table:table-cell>
          <table:table-cell table:style-name="ce409" table:formula="of:=HLOOKUP([.AD17];[.$AF$25:.$AW$26];2;0)" office:value-type="float" office:value="3" calcext:value-type="float">
            <text:p>3.0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28" table:formula="of:=HLOOKUP([.B18];[.$AF$25:.$AW$26];2;0)" office:value-type="float" office:value="3.5" calcext:value-type="float">
            <text:p>3.5</text:p>
          </table:table-cell>
          <table:table-cell table:style-name="ce331" table:formula="of:=HLOOKUP([.C18];[.$AF$25:.$AW$26];2;0)" office:value-type="float" office:value="1.1" calcext:value-type="float">
            <text:p>1.1</text:p>
          </table:table-cell>
          <table:table-cell table:style-name="ce334" table:formula="of:=HLOOKUP([.D18];[.$AF$25:.$AW$26];2;0)" office:value-type="float" office:value="1.2" calcext:value-type="float">
            <text:p>1.2</text:p>
          </table:table-cell>
          <table:table-cell table:style-name="ce337" table:formula="of:=HLOOKUP([.E18];[.$AF$25:.$AW$26];2;0)" office:value-type="float" office:value="1.3" calcext:value-type="float">
            <text:p>1.3</text:p>
          </table:table-cell>
          <table:table-cell table:style-name="ce337" table:formula="of:=HLOOKUP([.F18];[.$AF$25:.$AW$26];2;0)" office:value-type="float" office:value="2.2" calcext:value-type="float">
            <text:p>2.2</text:p>
          </table:table-cell>
          <table:table-cell/>
          <table:table-cell table:style-name="ce343" table:formula="of:=HLOOKUP([.H18];[.$AF$25:.$AW$26];2;0)" office:value-type="float" office:value="2.2" calcext:value-type="float">
            <text:p>2.2</text:p>
          </table:table-cell>
          <table:table-cell table:style-name="ce349" table:formula="of:=HLOOKUP([.I18];[.$AF$25:.$AW$26];2;0)" office:value-type="float" office:value="3.1" calcext:value-type="float">
            <text:p>3.1</text:p>
          </table:table-cell>
          <table:table-cell table:style-name="ce352" table:formula="of:=HLOOKUP([.J18];[.$AF$25:.$AW$26];2;0)" office:value-type="float" office:value="1.1" calcext:value-type="float">
            <text:p>1.1</text:p>
          </table:table-cell>
          <table:table-cell table:style-name="ce355" table:formula="of:=HLOOKUP([.K18];[.$AF$25:.$AW$26];2;0)" office:value-type="float" office:value="1.2" calcext:value-type="float">
            <text:p>1.2</text:p>
          </table:table-cell>
          <table:table-cell table:style-name="ce355" table:formula="of:=HLOOKUP([.L18];[.$AF$25:.$AW$26];2;0)" office:value-type="float" office:value="2.3" calcext:value-type="float">
            <text:p>2.3</text:p>
          </table:table-cell>
          <table:table-cell/>
          <table:table-cell table:style-name="ce361" table:formula="of:=HLOOKUP([.N18];[.$AF$25:.$AW$26];2;0)" office:value-type="float" office:value="2" calcext:value-type="float">
            <text:p>2.0</text:p>
          </table:table-cell>
          <table:table-cell table:style-name="ce364" table:formula="of:=HLOOKUP([.O18];[.$AF$25:.$AW$26];2;0)" office:value-type="float" office:value="1.2" calcext:value-type="float">
            <text:p>1.2</text:p>
          </table:table-cell>
          <table:table-cell table:style-name="ce370" table:formula="of:=HLOOKUP([.P18];[.$AF$25:.$AW$26];2;0)" office:value-type="float" office:value="3" calcext:value-type="float">
            <text:p>3.0</text:p>
          </table:table-cell>
          <table:table-cell table:style-name="ce373" table:formula="of:=HLOOKUP([.Q18];[.$AF$25:.$AW$26];2;0)" office:value-type="float" office:value="1.1" calcext:value-type="float">
            <text:p>1.1</text:p>
          </table:table-cell>
          <table:table-cell table:style-name="ce373" table:formula="of:=HLOOKUP([.R18];[.$AF$25:.$AW$26];2;0)" office:value-type="float" office:value="2.2" calcext:value-type="float">
            <text:p>2.2</text:p>
          </table:table-cell>
          <table:table-cell/>
          <table:table-cell table:style-name="ce381" table:formula="of:=HLOOKUP([.T18];[.$AF$25:.$AW$26];2;0)" office:value-type="float" office:value="2.1" calcext:value-type="float">
            <text:p>2.1</text:p>
          </table:table-cell>
          <table:table-cell table:style-name="ce384" table:formula="of:=HLOOKUP([.U18];[.$AF$25:.$AW$26];2;0)" office:value-type="float" office:value="1.2" calcext:value-type="float">
            <text:p>1.2</text:p>
          </table:table-cell>
          <table:table-cell table:style-name="ce387" table:formula="of:=HLOOKUP([.V18];[.$AF$25:.$AW$26];2;0)" office:value-type="float" office:value="1.1" calcext:value-type="float">
            <text:p>1.1</text:p>
          </table:table-cell>
          <table:table-cell table:style-name="ce393" table:formula="of:=HLOOKUP([.W18];[.$AF$25:.$AW$26];2;0)" office:value-type="float" office:value="1.6" calcext:value-type="float">
            <text:p>1.6</text:p>
          </table:table-cell>
          <table:table-cell table:style-name="ce392" table:formula="of:=HLOOKUP([.X18];[.$AF$25:.$AW$26];2;0)" office:value-type="float" office:value="3" calcext:value-type="float">
            <text:p>3.0</text:p>
          </table:table-cell>
          <table:table-cell/>
          <table:table-cell table:style-name="ce400" table:formula="of:=HLOOKUP([.Z18];[.$AF$25:.$AW$26];2;0)" office:value-type="float" office:value="2.3" calcext:value-type="float">
            <text:p>2.3</text:p>
          </table:table-cell>
          <table:table-cell table:style-name="ce403" table:formula="of:=HLOOKUP([.AA18];[.$AF$25:.$AW$26];2;0)" office:value-type="float" office:value="2.1" calcext:value-type="float">
            <text:p>2.1</text:p>
          </table:table-cell>
          <table:table-cell table:style-name="ce406" table:formula="of:=HLOOKUP([.AB18];[.$AF$25:.$AW$26];2;0)" office:value-type="float" office:value="1.6" calcext:value-type="float">
            <text:p>1.6</text:p>
          </table:table-cell>
          <table:table-cell table:style-name="ce409" table:formula="of:=HLOOKUP([.AC18];[.$AF$25:.$AW$26];2;0)" office:value-type="float" office:value="1.1" calcext:value-type="float">
            <text:p>1.1</text:p>
          </table:table-cell>
          <table:table-cell table:style-name="ce412" table:formula="of:=HLOOKUP([.AD18];[.$AF$25:.$AW$26];2;0)" office:value-type="float" office:value="3.2" calcext:value-type="float">
            <text:p>3.2</text:p>
          </table:table-cell>
          <table:table-cell table:number-columns-repeated="69"/>
          <table:table-cell table:style-name="Default" table:number-columns-repeated="16285"/>
        </table:table-row>
        <calcext:conditional-formats>
          <calcext:conditional-format calcext:target-range-address="'keys 3'.Z2:'keys 3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0:'keys 3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0:'keys 3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0:'keys 3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0:'keys 3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0:'keys 3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5:'keys 3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5:'keys 3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5:'keys 3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5:'keys 3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5:'keys 3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25:'keys 3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25:'keys 3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25:'keys 3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5:'keys 3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25:'keys 3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5:'keys 3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:'keys 3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6:'keys 3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Sheet4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536" table:number-columns-repeated="4"/>
          <table:table-cell table:style-name="ce579" table:number-columns-repeated="3"/>
          <table:table-cell table:style-name="ce307" office:value-type="string" calcext:value-type="string">
            <text:p>L</text:p>
          </table:table-cell>
          <table:table-cell table:style-name="ce308"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 table:number-columns-repeated="3"/>
        </table:table-row>
        <table:table-row table:style-name="ro1">
          <table:table-cell table:style-name="ce537" office:value-type="string" calcext:value-type="string">
            <text:p>,</text:p>
          </table:table-cell>
          <table:table-cell table:style-name="ce538" office:value-type="string" calcext:value-type="string">
            <text:p>.</text:p>
          </table:table-cell>
          <table:table-cell table:style-name="ce537" office:value-type="string" calcext:value-type="string">
            <text:p>m</text:p>
          </table:table-cell>
          <table:table-cell table:style-name="ce536" office:value-type="string" calcext:value-type="string">
            <text:p>o</text:p>
          </table:table-cell>
          <table:table-cell table:style-name="ce579" office:value-type="string" calcext:value-type="string">
            <text:p>f</text:p>
          </table:table-cell>
          <table:table-cell table:style-name="ce579" office:value-type="string" calcext:value-type="string">
            <text:p>j</text:p>
          </table:table-cell>
          <table:table-cell table:style-name="ce579" office:value-type="string" calcext:value-type="string">
            <text:p>brk</text:p>
          </table:table-cell>
          <table:table-cell table:style-name="ce4" table:number-columns-repeated="2"/>
          <table:table-cell table:style-name="ce579" office:value-type="string" calcext:value-type="string">
            <text:p>[</text:p>
          </table:table-cell>
          <table:table-cell table:style-name="ce579" office:value-type="string" calcext:value-type="string">
            <text:p>]</text:p>
          </table:table-cell>
          <table:table-cell table:style-name="ce629" office:value-type="string" calcext:value-type="string">
            <text:p>h</text:p>
          </table:table-cell>
          <table:table-cell table:style-name="ce536" office:value-type="string" calcext:value-type="string">
            <text:p>t</text:p>
          </table:table-cell>
          <table:table-cell table:style-name="ce537" office:value-type="string" calcext:value-type="string">
            <text:p>c</text:p>
          </table:table-cell>
          <table:table-cell table:style-name="ce538" office:value-type="string" calcext:value-type="string">
            <text:p>-</text:p>
          </table:table-cell>
          <table:table-cell table:style-name="ce537"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538" office:value-type="string" calcext:value-type="string">
            <text:p>tab</text:p>
          </table:table-cell>
          <table:table-cell table:style-name="ce538" office:value-type="string" calcext:value-type="string">
            <text:p>u</text:p>
          </table:table-cell>
          <table:table-cell table:style-name="ce537" office:value-type="string" calcext:value-type="string">
            <text:p>n</text:p>
          </table:table-cell>
          <table:table-cell table:style-name="ce536" office:value-type="string" calcext:value-type="string">
            <text:p>e</text:p>
          </table:table-cell>
          <table:table-cell table:style-name="ce579" office:value-type="string" calcext:value-type="string">
            <text:p>r</text:p>
          </table:table-cell>
          <table:table-cell table:style-name="ce579" office:value-type="string" calcext:value-type="string">
            <text:p>p</text:p>
          </table:table-cell>
          <table:table-cell table:style-name="ce579" office:value-type="string" calcext:value-type="string">
            <text:p>/</text:p>
          </table:table-cell>
          <table:table-cell table:style-name="ce579" office:value-type="string" calcext:value-type="string">
            <text:p>\</text:p>
          </table:table-cell>
          <table:table-cell table:style-name="ce579" office:value-type="string" calcext:value-type="string">
            <text:p>ins</text:p>
          </table:table-cell>
          <table:table-cell table:style-name="ce579" office:value-type="string" calcext:value-type="string">
            <text:p>'</text:p>
          </table:table-cell>
          <table:table-cell table:style-name="ce579" office:value-type="string" calcext:value-type="string">
            <text:p>w</text:p>
          </table:table-cell>
          <table:table-cell table:style-name="ce629" office:value-type="string" calcext:value-type="string">
            <text:p>i</text:p>
          </table:table-cell>
          <table:table-cell table:style-name="ce536" office:value-type="string" calcext:value-type="string">
            <text:p>a</text:p>
          </table:table-cell>
          <table:table-cell table:style-name="ce537" office:value-type="string" calcext:value-type="string">
            <text:p>s</text:p>
          </table:table-cell>
          <table:table-cell table:style-name="ce538" office:value-type="string" calcext:value-type="string">
            <text:p>b</text:p>
          </table:table-cell>
          <table:table-cell table:style-name="ce538" office:value-type="string" calcext:value-type="string">
            <text:p>ent</text:p>
          </table:table-cell>
          <table:table-cell table:number-columns-repeated="3"/>
        </table:table-row>
        <table:table-row table:style-name="ro1">
          <table:table-cell table:style-name="ce538" office:value-type="string" calcext:value-type="string">
            <text:p>del</text:p>
          </table:table-cell>
          <table:table-cell table:style-name="ce538" office:value-type="string" calcext:value-type="string">
            <text:p>x</text:p>
          </table:table-cell>
          <table:table-cell table:style-name="ce537" office:value-type="string" calcext:value-type="string">
            <text:p>v</text:p>
          </table:table-cell>
          <table:table-cell table:style-name="ce536" office:value-type="string" calcext:value-type="string">
            <text:p>g</text:p>
          </table:table-cell>
          <table:table-cell table:style-name="ce579" office:value-type="string" calcext:value-type="string">
            <text:p>d</text:p>
          </table:table-cell>
          <table:table-cell table:style-name="ce589" office:value-type="string" calcext:value-type="string">
            <text:p>q</text:p>
          </table:table-cell>
          <table:table-cell table:style-name="ce579" office:value-type="string" calcext:value-type="string">
            <text:p>hm</text:p>
          </table:table-cell>
          <table:table-cell table:style-name="ce579" office:value-type="string" calcext:value-type="string">
            <text:p>en</text:p>
          </table:table-cell>
          <table:table-cell table:style-name="ce579" office:value-type="string" calcext:value-type="string">
            <text:p>caps</text:p>
          </table:table-cell>
          <table:table-cell table:style-name="ce579" office:value-type="string" calcext:value-type="string">
            <text:p>;</text:p>
          </table:table-cell>
          <table:table-cell table:style-name="ce579" office:value-type="string" calcext:value-type="string">
            <text:p>k</text:p>
          </table:table-cell>
          <table:table-cell table:style-name="ce629" office:value-type="string" calcext:value-type="string">
            <text:p>l</text:p>
          </table:table-cell>
          <table:table-cell table:style-name="ce536" office:value-type="string" calcext:value-type="string">
            <text:p>y</text:p>
          </table:table-cell>
          <table:table-cell table:style-name="ce537" office:value-type="string" calcext:value-type="string">
            <text:p>z</text:p>
          </table:table-cell>
          <table:table-cell table:style-name="ce538" office:value-type="string" calcext:value-type="string">
            <text:p>fn</text:p>
          </table:table-cell>
          <table:table-cell table:style-name="ce538" office:value-type="string" calcext:value-type="string">
            <text:p>bs</text:p>
          </table:table-cell>
          <table:table-cell table:number-columns-repeated="3"/>
        </table:table-row>
        <table:table-row table:style-name="ro1">
          <table:table-cell table:style-name="ce538" office:value-type="string" calcext:value-type="string">
            <text:p>alt</text:p>
          </table:table-cell>
          <table:table-cell table:style-name="ce542" office:value-type="string" calcext:value-type="string">
            <text:p>fn</text:p>
          </table:table-cell>
          <table:table-cell table:style-name="ce537"/>
          <table:table-cell table:style-name="ce536"/>
          <table:table-cell table:style-name="ce54" office:value-type="string" calcext:value-type="string" table:number-columns-spanned="1" table:number-rows-spanned="2">
            <text:p>ctrl</text:p>
          </table:table-cell>
          <table:table-cell table:style-name="ce54" office:value-type="string" calcext:value-type="string" table:number-columns-spanned="1" table:number-rows-spanned="2">
            <text:p>spc</text:p>
          </table:table-cell>
          <table:table-cell table:style-name="ce54" office:value-type="string" calcext:value-type="string" table:number-columns-spanned="1" table:number-rows-spanned="2">
            <text:p>shft</text:p>
          </table:table-cell>
          <table:table-cell table:style-name="ce54" office:value-type="string" calcext:value-type="string" table:number-columns-spanned="1" table:number-rows-spanned="2">
            <text:p>ent</text:p>
          </table:table-cell>
          <table:table-cell table:style-name="ce309" office:value-type="string" calcext:value-type="string" table:number-columns-spanned="1" table:number-rows-spanned="2">
            <text:p>alt</text:p>
          </table:table-cell>
          <table:table-cell table:style-name="ce54" office:value-type="string" calcext:value-type="string" table:number-columns-spanned="1" table:number-rows-spanned="2">
            <text:p>shft</text:p>
          </table:table-cell>
          <table:table-cell table:style-name="ce54" office:value-type="string" calcext:value-type="string" table:number-columns-spanned="1" table:number-rows-spanned="2">
            <text:p>spc</text:p>
          </table:table-cell>
          <table:table-cell table:style-name="ce99" office:value-type="string" calcext:value-type="string" table:number-columns-spanned="1" table:number-rows-spanned="2">
            <text:p>ctrl</text:p>
          </table:table-cell>
          <table:table-cell table:style-name="ce536"/>
          <table:table-cell table:style-name="ce537"/>
          <table:table-cell table:style-name="ce641"/>
          <table:table-cell table:style-name="ce538"/>
          <table:table-cell table:number-columns-repeated="3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number-columns-repeated="2" table:style-name="ce54"/>
          <table:covered-table-cell table:number-columns-repeated="2" table:style-name="ce590"/>
          <table:covered-table-cell table:style-name="ce99"/>
          <table:table-cell table:style-name="ce4" table:number-columns-repeated="4"/>
          <table:table-cell table:number-columns-repeated="3"/>
        </table:table-row>
        <table:table-row table:style-name="ro2">
          <table:table-cell table:number-columns-repeated="19"/>
        </table:table-row>
        <table:table-row table:style-name="ro1" table:number-rows-repeated="3">
          <table:table-cell table:number-columns-repeated="19"/>
        </table:table-row>
        <table:table-row table:style-name="ro2">
          <table:table-cell table:number-columns-repeated="19"/>
        </table:table-row>
        <table:table-row table:style-name="ro1" table:number-rows-repeated="3">
          <table:table-cell table:number-columns-repeated="19"/>
        </table:table-row>
        <table:table-row table:style-name="ro2">
          <table:table-cell table:number-columns-repeated="19"/>
        </table:table-row>
        <table:table-row table:style-name="ro1" table:number-rows-repeated="3">
          <table:table-cell table:number-columns-repeated="19"/>
        </table:table-row>
        <table:table-row table:style-name="ro2" table:number-rows-repeated="6">
          <table:table-cell table:number-columns-repeated="19"/>
        </table:table-row>
        <table:table-row table:style-name="ro1" table:number-rows-repeated="12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1" number:min-decimal-places="1" number:min-integer-digits="1"/>
    </number:number-style>
    <number:number-style style:name="N149">
      <number:number number:decimal-places="1" number:min-decimal-places="1" number:min-integer-digits="1" number:grouping="true"/>
    </number:number-style>
    <style:style style:name="Default" style:family="table-cell" style:data-style-name="N0">
      <style:table-cell-properties fo:background-color="#003366"/>
      <style:text-properties fo:color="#ffffff"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style:text-align-source="fix" style:repeat-content="false" fo:border="1.11pt double #ffcf03" style:border-line-width="0.002cm 0.035cm 0.002cm"/>
      <style:paragraph-properties fo:text-align="center"/>
      <style:text-properties fo:color="#ffcc00" fo:font-size="18pt" fo:font-weight="bold"/>
    </style:style>
    <style:style style:name="Heading_20_1" style:display-name="Heading 1" style:family="table-cell" style:parent-style-name="Heading">
      <style:text-properties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121">
      <style:table-cell-properties fo:background-color="#336699" fo:border="0.06pt solid #ffcf03" style:shadow="none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Result2" style:family="table-cell" style:parent-style-name="Result" style:data-style-name="N120">
      <style:text-properties fo:color="#ffffff" fo:font-style="italic" fo:font-weight="normal"/>
    </style:style>
    <style:style style:name="Background" style:family="table-cell" style:parent-style-name="Default">
      <style:table-cell-properties fo:background-color="#000033"/>
      <style:text-properties fo:color="#cccccc"/>
    </style:style>
    <style:style style:name="Card" style:family="table-cell" style:parent-style-name="Default">
      <style:table-cell-properties fo:padding-bottom="0.035cm" fo:padding-left="0.335cm" fo:padding-right="0.035cm" fo:padding-top="0.035cm"/>
    </style:style>
    <style:style style:name="Input" style:family="table-cell" style:parent-style-name="Default" style:data-style-name="N121">
      <style:table-cell-properties fo:background-color="#ffff66" style:cell-protect="none" style:print-content="true" style:text-align-source="value-type" style:repeat-content="false" fo:border="0.06pt solid #ffcf03" style:shadow="none"/>
      <style:text-properties fo:color="#000033"/>
    </style:style>
    <style:style style:name="Card_20_TL" style:display-name="Card TL" style:family="table-cell" style:parent-style-name="Card">
      <style:table-cell-properties fo:border-bottom="none" fo:border-left="1.11pt double #ffcf03" style:border-line-width-left="0.002cm 0.035cm 0.002cm" fo:border-right="none" fo:border-top="1.11pt double #ffcf03" style:border-line-width-top="0.002cm 0.035cm 0.002cm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ffcf03" style:border-line-width-top="0.002cm 0.035cm 0.002cm"/>
    </style:style>
    <style:style style:name="Card_20_TR" style:display-name="Card TR" style:family="table-cell" style:parent-style-name="Card">
      <style:table-cell-properties fo:border-bottom="none" fo:border-left="none" fo:border-right="1.11pt double #ffcf03" style:border-line-width-right="0.002cm 0.035cm 0.002cm" fo:border-top="1.11pt double #ffcf03" style:border-line-width-top="0.002cm 0.035cm 0.002cm"/>
    </style:style>
    <style:style style:name="Card_20_L" style:display-name="Card L" style:family="table-cell" style:parent-style-name="Card">
      <style:table-cell-properties fo:border-bottom="none" fo:border-left="1.11pt double #ffcf03" style:border-line-width-left="0.002cm 0.035cm 0.002cm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ffcf03" style:border-line-width-right="0.002cm 0.035cm 0.002cm" fo:border-top="none"/>
    </style:style>
    <style:style style:name="Card_20_B" style:display-name="Card B" style:family="table-cell" style:parent-style-name="Card">
      <style:table-cell-properties fo:border-bottom="1.11pt double #ffcf03" style:border-line-width-bottom="0.002cm 0.035cm 0.002cm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ffcf03" style:border-line-width-bottom="0.002cm 0.035cm 0.002cm" fo:border-left="1.11pt double #ffcf03" style:border-line-width-left="0.002cm 0.035cm 0.002cm" fo:border-right="none" fo:border-top="none"/>
    </style:style>
    <style:style style:name="Card_20_BR" style:display-name="Card BR" style:family="table-cell" style:parent-style-name="Card">
      <style:table-cell-properties fo:border-bottom="1.11pt double #ffcf03" style:border-line-width-bottom="0.002cm 0.035cm 0.002cm" fo:border-left="none" fo:border-right="1.11pt double #ffcf03" style:border-line-width-right="0.002cm 0.035cm 0.002cm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wrap-option="wrap" fo:border="0.06pt solid #ffcf03" fo:padding="0.035cm" style:vertical-align="automatic"/>
      <style:paragraph-properties fo:text-align="center" fo:margin-left="0cm"/>
      <style:text-properties fo:color="#ffcf03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6-05-24">00/00/0000</text:date></text:span><text:span text:style-name="MT1">, </text:span><text:span text:style-name="MT1"><text:time style:data-style-name="N2" text:time-value="21:55:35.8065825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/ </text:span>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5-24T22:42:35.338461700</dc:date>
    <meta:generator>LibreOffice/26.2.0.3$Windows_X86_64 LibreOffice_project/620$Build-3</meta:generator>
    <meta:editing-duration>P2DT21H16M58S</meta:editing-duration>
    <meta:editing-cycles>545</meta:editing-cycles>
    <meta:document-statistic meta:table-count="4" meta:cell-count="2530" meta:object-count="0"/>
    <meta:user-defined meta:name="AppVersion">16.0300</meta:user-defined>
  </office:meta>
</office:document-meta>
</file>
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7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4": { "0": 7, "1": 3, "2": 2, "3": 1, "4": 13, "5": 7, "6": 3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38" table:formula="of:=[.$AH$4]+[.$U$3]" office:value-type="float" office:value="10" calcext:value-type="float">
            <text:p>10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" calcext:value-type="string">
            <text:p>"8": { "0": 15, "1": 7, "2": 3, "3": 8, "4": 14, "5": 5, "6": 2, "7": 1, "8": 0, "9": 11, "10": 13, "11": 10, "12": 10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_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2" calcext:value-type="float">
            <text:p>2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float" office:value="2" calcext:value-type="float">
            <text:p>2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178"/>
          <table:table-cell table:style-name="ce178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178"/>
          <table:table-cell table:style-name="ce178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178"/>
          <table:table-cell table:style-name="ce17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4, &quot;12&quot;: 4, &quot;13&quot;: 3, &quot;14&quot;: 5}" calcext:value-type="string">
            <text:p>"0": { "0": 3, "1": 0, "2": 0, "3": 0, "4": 2, "5": 2, "6": 2, "7": 2, "8": 1, "9": 2, "10": 4, "11": 4, "12": 4, "13": 3, "14": 5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3, &quot;12&quot;: 4, &quot;13&quot;: 3, &quot;14&quot;: 5}" calcext:value-type="string">
            <text:p>"1": { "0": 2, "1": 1, "2": 0, "3": 1, "4": 1, "5": 2, "6": 1, "7": 1, "8": 0, "9": 1, "10": 5, "11": 3, "12": 4, "13": 3, "14": 5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5" calcext:value-type="float">
            <text:p>5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3" calcext:value-type="float">
            <text:p>3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5" calcext:value-type="float">
            <text:p>5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5" calcext:value-type="float">
            <text:p>5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4" calcext:value-type="float">
            <text:p>4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4, &quot;12&quot;: 3, &quot;13&quot;: 3, &quot;14&quot;: 5}" calcext:value-type="string">
            <text:p>"2": { "0": 2, "1": 0, "2": 0, "3": 1, "4": 1, "5": 1, "6": 0, "7": 1, "8": 0, "9": 1, "10": 5, "11": 4, "12": 3, "13": 3, "14": 5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4, &quot;12&quot;: 4, &quot;13&quot;: 2, &quot;14&quot;: 4}" calcext:value-type="string">
            <text:p>"3": { "0": 1, "1": 0, "2": 0, "3": 1, "4": 2, "5": 2, "6": 1, "7": 1, "8": 1, "9": 2, "10": 5, "11": 4, "12": 4, "13": 2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4, &quot;12&quot;: 4, &quot;13&quot;: 2, &quot;14&quot;: 4}" calcext:value-type="string">
            <text:p>"4": { "0": 3, "1": 1, "2": 1, "3": 1, "4": 3, "5": 3, "6": 1, "7": 1, "8": 1, "9": 2, "10": 5, "11": 4, "12": 4, "13": 2, "14": 4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3" calcext:value-type="string">
            <text:p>"11": 3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5" calcext:value-type="string">
            <text:p>"14": 5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4" calcext:value-type="string">
            <text:p>"14": 4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4, &quot;12&quot;: 4, &quot;13&quot;: 3, &quot;14&quot;: 5}, &quot;1&quot;: { &quot;0&quot;: 2, &quot;1&quot;: 1, &quot;2&quot;: 0, &quot;3&quot;: 1, &quot;4&quot;: 1, &quot;5&quot;: 2, &quot;6&quot;: 1, &quot;7&quot;: 1, &quot;8&quot;: 0, &quot;9&quot;: 1, &quot;10&quot;: 5, &quot;11&quot;: 3, &quot;12&quot;: 4, &quot;13&quot;: 3, &quot;14&quot;: 5}, &quot;2&quot;: { &quot;0&quot;: 2, &quot;1&quot;: 0, &quot;2&quot;: 0, &quot;3&quot;: 1, &quot;4&quot;: 1, &quot;5&quot;: 1, &quot;6&quot;: 0, &quot;7&quot;: 1, &quot;8&quot;: 0, &quot;9&quot;: 1, &quot;10&quot;: 5, &quot;11&quot;: 4, &quot;12&quot;: 3, &quot;13&quot;: 3, &quot;14&quot;: 5}, &quot;3&quot;: { &quot;0&quot;: 1, &quot;1&quot;: 0, &quot;2&quot;: 0, &quot;3&quot;: 1, &quot;4&quot;: 2, &quot;5&quot;: 2, &quot;6&quot;: 1, &quot;7&quot;: 1, &quot;8&quot;: 1, &quot;9&quot;: 2, &quot;10&quot;: 5, &quot;11&quot;: 4, &quot;12&quot;: 4, &quot;13&quot;: 2, &quot;14&quot;: 4}, &quot;4&quot;: { &quot;0&quot;: 3, &quot;1&quot;: 1, &quot;2&quot;: 1, &quot;3&quot;: 1, &quot;4&quot;: 3, &quot;5&quot;: 3, &quot;6&quot;: 1, &quot;7&quot;: 1, &quot;8&quot;: 1, &quot;9&quot;: 2, &quot;10&quot;: 5, &quot;11&quot;: 4, &quot;12&quot;: 4, &quot;13&quot;: 2, &quot;14&quot;: 4}" calcext:value-type="string">
            <text:p>"0": { "0": 3, "1": 0, "2": 0, "3": 0, "4": 2, "5": 2, "6": 2, "7": 2, "8": 1, "9": 2, "10": 4, "11": 4, "12": 4, "13": 3, "14": 5}, "1": { "0": 2, "1": 1, "2": 0, "3": 1, "4": 1, "5": 2, "6": 1, "7": 1, "8": 0, "9": 1, "10": 5, "11": 3, "12": 4, "13": 3, "14": 5}, "2": { "0": 2, "1": 0, "2": 0, "3": 1, "4": 1, "5": 1, "6": 0, "7": 1, "8": 0, "9": 1, "10": 5, "11": 4, "12": 3, "13": 3, "14": 5}, "3": { "0": 1, "1": 0, "2": 0, "3": 1, "4": 2, "5": 2, "6": 1, "7": 1, "8": 1, "9": 2, "10": 5, "11": 4, "12": 4, "13": 2, "14": 4}, "4": { "0": 3, "1": 1, "2": 1, "3": 1, "4": 3, "5": 3, "6": 1, "7": 1, "8": 1, "9": 2, "10": 5, "11": 4, "12": 4, "13": 2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3, &quot;12&quot;: 2, &quot;13&quot;: 1, &quot;14&quot;: 3}" calcext:value-type="string">
            <text:p>"5": { "0": 4, "1": 2, "2": 1, "3": 2, "4": 4, "5": 1, "6": 0, "7": 0, "8": 0, "9": 2, "10": 3, "11": 3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2, &quot;12&quot;: 2, &quot;13&quot;: 1, &quot;14&quot;: 3}" calcext:value-type="string">
            <text:p>"6": { "0": 5, "1": 2, "2": 0, "3": 2, "4": 4, "5": 1, "6": 0, "7": 0, "8": 0, "9": 1, "10": 3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2" calcext:value-type="float">
            <text:p>2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3" calcext:value-type="float">
            <text:p>3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2" calcext:value-type="float">
            <text:p>2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3" calcext:value-type="float">
            <text:p>3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2" calcext:value-type="float">
            <text:p>2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3" calcext:value-type="float">
            <text:p>3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2" calcext:value-type="float">
            <text:p>2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3" calcext:value-type="float">
            <text:p>3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2, &quot;12&quot;: 2, &quot;13&quot;: 1, &quot;14&quot;: 3}" calcext:value-type="string">
            <text:p>"7": { "0": 5, "1": 3, "2": 1, "3": 2, "4": 4, "5": 1, "6": 0, "7": 0, "8": 0, "9": 1, "10": 3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2, &quot;12&quot;: 3, &quot;13&quot;: 1, &quot;14&quot;: 3}" calcext:value-type="string">
            <text:p>"8": { "0": 4, "1": 2, "2": 0, "3": 2, "4": 4, "5": 1, "6": 0, "7": 0, "8": 0, "9": 2, "10": 3, "11": 2, "12": 3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2, &quot;12&quot;: 2, &quot;13&quot;: 1, &quot;14&quot;: 3}" calcext:value-type="string">
            <text:p>"9": { "0": 5, "1": 2, "2": 1, "3": 2, "4": 4, "5": 3, "6": 1, "7": 1, "8": 1, "9": 1, "10": 4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3" calcext:value-type="string">
            <text:p>"14": 3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3, &quot;12&quot;: 2, &quot;13&quot;: 1, &quot;14&quot;: 3}, &quot;6&quot;: { &quot;0&quot;: 5, &quot;1&quot;: 2, &quot;2&quot;: 0, &quot;3&quot;: 2, &quot;4&quot;: 4, &quot;5&quot;: 1, &quot;6&quot;: 0, &quot;7&quot;: 0, &quot;8&quot;: 0, &quot;9&quot;: 1, &quot;10&quot;: 3, &quot;11&quot;: 2, &quot;12&quot;: 2, &quot;13&quot;: 1, &quot;14&quot;: 3}, &quot;7&quot;: { &quot;0&quot;: 5, &quot;1&quot;: 3, &quot;2&quot;: 1, &quot;3&quot;: 2, &quot;4&quot;: 4, &quot;5&quot;: 1, &quot;6&quot;: 0, &quot;7&quot;: 0, &quot;8&quot;: 0, &quot;9&quot;: 1, &quot;10&quot;: 3, &quot;11&quot;: 2, &quot;12&quot;: 2, &quot;13&quot;: 1, &quot;14&quot;: 3}, &quot;8&quot;: { &quot;0&quot;: 4, &quot;1&quot;: 2, &quot;2&quot;: 0, &quot;3&quot;: 2, &quot;4&quot;: 4, &quot;5&quot;: 1, &quot;6&quot;: 0, &quot;7&quot;: 0, &quot;8&quot;: 0, &quot;9&quot;: 2, &quot;10&quot;: 3, &quot;11&quot;: 2, &quot;12&quot;: 3, &quot;13&quot;: 1, &quot;14&quot;: 3}, &quot;9&quot;: { &quot;0&quot;: 5, &quot;1&quot;: 2, &quot;2&quot;: 1, &quot;3&quot;: 2, &quot;4&quot;: 4, &quot;5&quot;: 3, &quot;6&quot;: 1, &quot;7&quot;: 1, &quot;8&quot;: 1, &quot;9&quot;: 1, &quot;10&quot;: 4, &quot;11&quot;: 2, &quot;12&quot;: 2, &quot;13&quot;: 1, &quot;14&quot;: 3}" calcext:value-type="string">
            <text:p>"5": { "0": 4, "1": 2, "2": 1, "3": 2, "4": 4, "5": 1, "6": 0, "7": 0, "8": 0, "9": 2, "10": 3, "11": 3, "12": 2, "13": 1, "14": 3}, "6": { "0": 5, "1": 2, "2": 0, "3": 2, "4": 4, "5": 1, "6": 0, "7": 0, "8": 0, "9": 1, "10": 3, "11": 2, "12": 2, "13": 1, "14": 3}, "7": { "0": 5, "1": 3, "2": 1, "3": 2, "4": 4, "5": 1, "6": 0, "7": 0, "8": 0, "9": 1, "10": 3, "11": 2, "12": 2, "13": 1, "14": 3}, "8": { "0": 4, "1": 2, "2": 0, "3": 2, "4": 4, "5": 1, "6": 0, "7": 0, "8": 0, "9": 2, "10": 3, "11": 2, "12": 3, "13": 1, "14": 3}, "9": { "0": 5, "1": 2, "2": 1, "3": 2, "4": 4, "5": 3, "6": 1, "7": 1, "8": 1, "9": 1, "10": 4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24:.L26])-[.I26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35" calcext:value-type="float" table:number-columns-spanned="2" table:number-rows-spanned="1">
            <text:p>35</text:p>
          </table:table-cell>
          <table:covered-table-cell table:style-name="ce98"/>
          <table:table-cell table:style-name="ce98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5]+[.$U$4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3" calcext:value-type="float">
            <text:p>3</text:p>
          </table:table-cell>
          <table:table-cell table:style-name="ce98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3, &quot;4&quot;: 6, &quot;5&quot;: 3, &quot;6&quot;: 1, &quot;7&quot;: 0, &quot;8&quot;: 1, &quot;9&quot;: 3, &quot;10&quot;: 1, &quot;11&quot;: 1, &quot;12&quot;: 0, &quot;13&quot;: 0, &quot;14&quot;: 1}" calcext:value-type="string">
            <text:p>"11": { "0": 6, "1": 3, "2": 2, "3": 3, "4": 6, "5": 3, "6": 1, "7": 0, "8": 1, "9": 3, "10": 1, "11": 1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2" calcext:value-type="float">
            <text:p>2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2, &quot;9&quot;: 3, &quot;10&quot;: 1, &quot;11&quot;: 0, &quot;12&quot;: 1, &quot;13&quot;: 0, &quot;14&quot;: 1}" calcext:value-type="string">
            <text:p>"12": { "0": 6, "1": 4, "2": 2, "3": 4, "4": 6, "5": 3, "6": 2, "7": 1, "8": 2, "9": 3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2}" calcext:value-type="string">
            <text:p>"14": { "0": 6, "1": 4, "2": 3, "3": 3, "4": 5, "5": 4, "6": 2, "7": 2, "8": 1, "9": 2, "10": 3, "11": 1, "12": 1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3, &quot;4&quot;: 6, &quot;5&quot;: 3, &quot;6&quot;: 1, &quot;7&quot;: 0, &quot;8&quot;: 1, &quot;9&quot;: 3, &quot;10&quot;: 1, &quot;11&quot;: 1, &quot;12&quot;: 0, &quot;13&quot;: 0, &quot;14&quot;: 1}, &quot;12&quot;: { &quot;0&quot;: 6, &quot;1&quot;: 4, &quot;2&quot;: 2, &quot;3&quot;: 4, &quot;4&quot;: 6, &quot;5&quot;: 3, &quot;6&quot;: 2, &quot;7&quot;: 1, &quot;8&quot;: 2, &quot;9&quot;: 3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2}" calcext:value-type="string">
            <text:p>"10": { "0": 5, "1": 4, "2": 2, "3": 3, "4": 6, "5": 2, "6": 1, "7": 1, "8": 1, "9": 3, "10": 2, "11": 0, "12": 0, "13": 0, "14": 2}, "11": { "0": 6, "1": 3, "2": 2, "3": 3, "4": 6, "5": 3, "6": 1, "7": 0, "8": 1, "9": 3, "10": 1, "11": 1, "12": 0, "13": 0, "14": 1}, "12": { "0": 6, "1": 4, "2": 2, "3": 4, "4": 6, "5": 3, "6": 2, "7": 1, "8": 2, "9": 3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4, &quot;12&quot;: 4, &quot;13&quot;: 3, &quot;14&quot;: 5}, &quot;1&quot;: { &quot;0&quot;: 2, &quot;1&quot;: 1, &quot;2&quot;: 0, &quot;3&quot;: 1, &quot;4&quot;: 1, &quot;5&quot;: 2, &quot;6&quot;: 1, &quot;7&quot;: 1, &quot;8&quot;: 0, &quot;9&quot;: 1, &quot;10&quot;: 5, &quot;11&quot;: 3, &quot;12&quot;: 4, &quot;13&quot;: 3, &quot;14&quot;: 5}, &quot;2&quot;: { &quot;0&quot;: 2, &quot;1&quot;: 0, &quot;2&quot;: 0, &quot;3&quot;: 1, &quot;4&quot;: 1, &quot;5&quot;: 1, &quot;6&quot;: 0, &quot;7&quot;: 1, &quot;8&quot;: 0, &quot;9&quot;: 1, &quot;10&quot;: 5, &quot;11&quot;: 4, &quot;12&quot;: 3, &quot;13&quot;: 3, &quot;14&quot;: 5}, &quot;3&quot;: { &quot;0&quot;: 1, &quot;1&quot;: 0, &quot;2&quot;: 0, &quot;3&quot;: 1, &quot;4&quot;: 2, &quot;5&quot;: 2, &quot;6&quot;: 1, &quot;7&quot;: 1, &quot;8&quot;: 1, &quot;9&quot;: 2, &quot;10&quot;: 5, &quot;11&quot;: 4, &quot;12&quot;: 4, &quot;13&quot;: 2, &quot;14&quot;: 4}, &quot;4&quot;: { &quot;0&quot;: 3, &quot;1&quot;: 1, &quot;2&quot;: 1, &quot;3&quot;: 1, &quot;4&quot;: 3, &quot;5&quot;: 3, &quot;6&quot;: 1, &quot;7&quot;: 1, &quot;8&quot;: 1, &quot;9&quot;: 2, &quot;10&quot;: 5, &quot;11&quot;: 4, &quot;12&quot;: 4, &quot;13&quot;: 2, &quot;14&quot;: 4}, &quot;5&quot;: { &quot;0&quot;: 4, &quot;1&quot;: 2, &quot;2&quot;: 1, &quot;3&quot;: 2, &quot;4&quot;: 4, &quot;5&quot;: 1, &quot;6&quot;: 0, &quot;7&quot;: 0, &quot;8&quot;: 0, &quot;9&quot;: 2, &quot;10&quot;: 3, &quot;11&quot;: 3, &quot;12&quot;: 2, &quot;13&quot;: 1, &quot;14&quot;: 3}, &quot;6&quot;: { &quot;0&quot;: 5, &quot;1&quot;: 2, &quot;2&quot;: 0, &quot;3&quot;: 2, &quot;4&quot;: 4, &quot;5&quot;: 1, &quot;6&quot;: 0, &quot;7&quot;: 0, &quot;8&quot;: 0, &quot;9&quot;: 1, &quot;10&quot;: 3, &quot;11&quot;: 2, &quot;12&quot;: 2, &quot;13&quot;: 1, &quot;14&quot;: 3}, &quot;7&quot;: { &quot;0&quot;: 5, &quot;1&quot;: 3, &quot;2&quot;: 1, &quot;3&quot;: 2, &quot;4&quot;: 4, &quot;5&quot;: 1, &quot;6&quot;: 0, &quot;7&quot;: 0, &quot;8&quot;: 0, &quot;9&quot;: 1, &quot;10&quot;: 3, &quot;11&quot;: 2, &quot;12&quot;: 2, &quot;13&quot;: 1, &quot;14&quot;: 3}, &quot;8&quot;: { &quot;0&quot;: 4, &quot;1&quot;: 2, &quot;2&quot;: 0, &quot;3&quot;: 2, &quot;4&quot;: 4, &quot;5&quot;: 1, &quot;6&quot;: 0, &quot;7&quot;: 0, &quot;8&quot;: 0, &quot;9&quot;: 2, &quot;10&quot;: 3, &quot;11&quot;: 2, &quot;12&quot;: 3, &quot;13&quot;: 1, &quot;14&quot;: 3}, &quot;9&quot;: { &quot;0&quot;: 5, &quot;1&quot;: 2, &quot;2&quot;: 1, &quot;3&quot;: 2, &quot;4&quot;: 4, &quot;5&quot;: 3, &quot;6&quot;: 1, &quot;7&quot;: 1, &quot;8&quot;: 1, &quot;9&quot;: 1, &quot;10&quot;: 4, &quot;11&quot;: 2, &quot;12&quot;: 2, &quot;13&quot;: 1, &quot;14&quot;: 3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3, &quot;4&quot;: 6, &quot;5&quot;: 3, &quot;6&quot;: 1, &quot;7&quot;: 0, &quot;8&quot;: 1, &quot;9&quot;: 3, &quot;10&quot;: 1, &quot;11&quot;: 1, &quot;12&quot;: 0, &quot;13&quot;: 0, &quot;14&quot;: 1}, &quot;12&quot;: { &quot;0&quot;: 6, &quot;1&quot;: 4, &quot;2&quot;: 2, &quot;3&quot;: 4, &quot;4&quot;: 6, &quot;5&quot;: 3, &quot;6&quot;: 2, &quot;7&quot;: 1, &quot;8&quot;: 2, &quot;9&quot;: 3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2}}" calcext:value-type="string">
            <text:p>{"0": { "0": 3, "1": 0, "2": 0, "3": 0, "4": 2, "5": 2, "6": 2, "7": 2, "8": 1, "9": 2, "10": 4, "11": 4, "12": 4, "13": 3, "14": 5}, "1": { "0": 2, "1": 1, "2": 0, "3": 1, "4": 1, "5": 2, "6": 1, "7": 1, "8": 0, "9": 1, "10": 5, "11": 3, "12": 4, "13": 3, "14": 5}, "2": { "0": 2, "1": 0, "2": 0, "3": 1, "4": 1, "5": 1, "6": 0, "7": 1, "8": 0, "9": 1, "10": 5, "11": 4, "12": 3, "13": 3, "14": 5}, "3": { "0": 1, "1": 0, "2": 0, "3": 1, "4": 2, "5": 2, "6": 1, "7": 1, "8": 1, "9": 2, "10": 5, "11": 4, "12": 4, "13": 2, "14": 4}, "4": { "0": 3, "1": 1, "2": 1, "3": 1, "4": 3, "5": 3, "6": 1, "7": 1, "8": 1, "9": 2, "10": 5, "11": 4, "12": 4, "13": 2, "14": 4}, "5": { "0": 4, "1": 2, "2": 1, "3": 2, "4": 4, "5": 1, "6": 0, "7": 0, "8": 0, "9": 2, "10": 3, "11": 3, "12": 2, "13": 1, "14": 3}, "6": { "0": 5, "1": 2, "2": 0, "3": 2, "4": 4, "5": 1, "6": 0, "7": 0, "8": 0, "9": 1, "10": 3, "11": 2, "12": 2, "13": 1, "14": 3}, "7": { "0": 5, "1": 3, "2": 1, "3": 2, "4": 4, "5": 1, "6": 0, "7": 0, "8": 0, "9": 1, "10": 3, "11": 2, "12": 2, "13": 1, "14": 3}, "8": { "0": 4, "1": 2, "2": 0, "3": 2, "4": 4, "5": 1, "6": 0, "7": 0, "8": 0, "9": 2, "10": 3, "11": 2, "12": 3, "13": 1, "14": 3}, "9": { "0": 5, "1": 2, "2": 1, "3": 2, "4": 4, "5": 3, "6": 1, "7": 1, "8": 1, "9": 1, "10": 4, "11": 2, "12": 2, "13": 1, "14": 3}, "10": { "0": 5, "1": 4, "2": 2, "3": 3, "4": 6, "5": 2, "6": 1, "7": 1, "8": 1, "9": 3, "10": 2, "11": 0, "12": 0, "13": 0, "14": 2}, "11": { "0": 6, "1": 3, "2": 2, "3": 3, "4": 6, "5": 3, "6": 1, "7": 0, "8": 1, "9": 3, "10": 1, "11": 1, "12": 0, "13": 0, "14": 1}, "12": { "0": 6, "1": 4, "2": 2, "3": 4, "4": 6, "5": 3, "6": 2, "7": 1, "8": 2, "9": 3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2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0T18:49:12.645267400</dc:date>
    <meta:generator>LibreOffice/26.2.0.3$Windows_X86_64 LibreOffice_project/620$Build-3</meta:generator>
    <meta:editing-duration>P1DT9M3S</meta:editing-duration>
    <meta:editing-cycles>352</meta:editing-cycles>
    <meta:document-statistic meta:table-count="2" meta:cell-count="1082" meta:object-count="0"/>
    <meta:user-defined meta:name="AppVersion">16.0300</meta:user-defined>
  </office:meta>
</office:document-meta>
</file>
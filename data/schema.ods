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ext-properties fo:color="#808080"/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/>
    </style:style>
    <style:style style:name="ce143" style:family="table-cell" style:parent-style-name="Default">
      <style:table-cell-properties fo:wrap-option="wrap" style:vertical-align="top"/>
      <style:text-properties fo:color="#808080" fo:font-size="6pt"/>
    </style:style>
    <style:style style:name="ce144" style:family="table-cell" style:parent-style-name="Default">
      <style:table-cell-properties fo:wrap-option="no-wrap"/>
      <style:text-properties fo:color="#808080"/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style:vertical-align="middle"/>
      <style:text-properties fo:color="#808080"/>
    </style:style>
    <style:style style:name="ce841" style:family="table-cell" style:parent-style-name="Default">
      <style:table-cell-properties fo:wrap-option="no-wrap" style:rotation-align="none"/>
    </style:style>
    <style:style style:name="ce153" style:family="table-cell" style:parent-style-name="Default">
      <style:table-cell-properties style:rotation-align="none"/>
      <style:text-properties fo:color="#808080"/>
    </style:style>
    <style:style style:name="ce154" style:family="table-cell" style:parent-style-name="Default">
      <style:table-cell-properties style:rotation-align="none" style:vertical-align="middle"/>
      <style:text-properties fo:color="#808080"/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253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25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255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256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257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4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266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6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1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4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3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712" style:family="table-cell" style:parent-style-name="Default" style:data-style-name="N4">
      <style:table-cell-properties style:shrink-to-fit="true"/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6.1" calcext:value-type="float">
            <text:p>56.1</text:p>
          </table:table-cell>
          <table:table-cell table:style-name="ce812" table:formula="of:=SUM([.C25];[.I25];[.O25];[.U25];[.AA25];[.AA30];[.U30];[.O30];[.I30];[.C30];[.C35];[.I35];[.O35];[.U35];[.AA35])/[.$Z$6]" office:value-type="float" office:value="37.6" calcext:value-type="float">
            <text:p>37.6</text:p>
          </table:table-cell>
          <table:table-cell table:style-name="ce812" table:formula="of:=SUM([.D25];[.J25];[.P25];[.V25];[.AB25];[.AB30];[.V30];[.P30];[.J30];[.D30];[.D35];[.J35];[.P35];[.V35];[.AB35])/[.$Z$6]" office:value-type="float" office:value="28.6" calcext:value-type="float">
            <text:p>28.6</text:p>
          </table:table-cell>
          <table:table-cell table:style-name="ce812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812" table:formula="of:=SUM([.F25];[.L25];[.R25];[.X25];[.AD25];[.AD30];[.X30];[.R30];[.L30];[.F30];[.F35];[.L35];[.R35];[.X35];[.AD35])/[.$Z$6]" office:value-type="float" office:value="46.9" calcext:value-type="float">
            <text:p>46.9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2, &quot;11&quot;: 10, &quot;12&quot;: 9, &quot;13&quot;: 4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2, "11": 10, "12": 9, "13": 4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8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3, "1": 10, "2": 8, "3": 12, "4": 14, "5": 5, "6": 4, "7": 3, "8": 7, "9": 11, "10": 6, "11": 2, "12": 1, "13": 4, "14": 9}, "14": { "0": 14, "1": 13, "2": 12, "3": 10, "4": 11, "5": 7, "6": 5, "7": 3, "8": 2, "9": 9, "10": 8, "11": 6, "12": 4, "13": 1, "14": 11}}}</text:p>
          </table:table-cell>
          <table:covered-table-cell table:number-columns-repeated="28" table:style-name="ce137"/>
          <table:table-cell table:style-name="ce841"/>
          <table:table-cell table:style-name="ce137"/>
          <table:table-cell/>
          <table:table-cell table:style-name="ce137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7" calcext:value-type="float">
            <text:p>37.0</text:p>
          </table:table-cell>
          <table:table-cell table:style-name="ce812" table:formula="of:=SUM([.C26];[.I26];[.O26];[.U26];[.AA26];[.AA31];[.U31];[.O31];[.I31];[.C31];[.C36];[.I36];[.O36];[.U36];[.AA36])/[.$Z$6]" office:value-type="float" office:value="26.2" calcext:value-type="float">
            <text:p>26.2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1" calcext:value-type="float">
            <text:p>36.1</text:p>
          </table:table-cell>
          <table:table-cell/>
          <table:covered-table-cell table:number-columns-repeated="29" table:style-name="ce137"/>
          <table:table-cell table:style-name="ce137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2" calcext:value-type="float">
            <text:p>12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1" calcext:value-type="float">
            <text:p>11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7.4" calcext:value-type="float">
            <text:p>47.4</text:p>
          </table:table-cell>
          <table:table-cell table:style-name="ce812" table:formula="of:=SUM([.C27];[.I27];[.O27];[.U27];[.AA27];[.AA32];[.U32];[.O32];[.I32];[.C32];[.C37];[.I37];[.O37];[.U37];[.AA37])/[.$Z$6]" office:value-type="float" office:value="46.4" calcext:value-type="float">
            <text:p>46.4</text:p>
          </table:table-cell>
          <table:table-cell table:style-name="ce812" table:formula="of:=SUM([.D27];[.J27];[.P27];[.V27];[.AB27];[.AB32];[.V32];[.P32];[.J32];[.D32];[.D37];[.J37];[.P37];[.V37];[.AB37])/[.$Z$6]" office:value-type="float" office:value="42.7" calcext:value-type="float">
            <text:p>42.7</text:p>
          </table:table-cell>
          <table:table-cell table:style-name="ce812" table:formula="of:=SUM([.E27];[.K27];[.Q27];[.W27];[.AC27];[.AC32];[.W32];[.Q32];[.K32];[.E32];[.E37];[.K37];[.Q37];[.W37];[.AC37])/[.$Z$6]" office:value-type="float" office:value="33.1" calcext:value-type="float">
            <text:p>33.1</text:p>
          </table:table-cell>
          <table:table-cell table:style-name="ce812" table:formula="of:=SUM([.F27];[.L27];[.R27];[.X27];[.AD27];[.AD32];[.X32];[.R32];[.L32];[.F32];[.F37];[.L37];[.R37];[.X37];[.AD37])/[.$Z$6]" office:value-type="float" office:value="45.8" calcext:value-type="float">
            <text:p>45.8</text:p>
          </table:table-cell>
          <table:table-cell table:style-name="ce701"/>
          <table:covered-table-cell table:number-columns-repeated="29" table:style-name="ce137"/>
          <table:table-cell table:style-name="ce841"/>
          <table:table-cell table:style-name="ce137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68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38"/>
          <table:table-cell/>
          <table:covered-table-cell table:style-name="ce38"/>
          <table:covered-table-cell table:number-columns-repeated="2" table:style-name="ce590"/>
          <table:covered-table-cell table:style-name="ce68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594"/>
          <table:table-cell table:style-name="ce9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594"/>
          <table:table-cell table:style-name="ce9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40" table:number-columns-repeated="2"/>
          <table:table-cell table:style-name="ce14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9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594"/>
          <table:table-cell table:style-name="ce9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40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40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40" table:number-columns-repeated="27"/>
          <table:table-cell table:style-name="ce151" table:number-columns-repeated="2"/>
          <table:table-cell table:style-name="ce140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8" table:formula="of:=[.$T$3]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594"/>
          <table:table-cell table:style-name="ce9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8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40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9" calcext:value-type="float">
            <text:p>9</text:p>
          </table:table-cell>
          <table:table-cell table:style-name="ce39" office:value-type="float" office:value="4" calcext:value-type="float">
            <text:p>4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I14])" office:value-type="string" office:string-value="&quot;11&quot;: 10" calcext:value-type="string">
            <text:p>"11": 10</text:p>
          </table:table-cell>
          <table:table-cell table:style-name="ce141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41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41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41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40" table:number-columns-repeated="2"/>
          <table:table-cell table:style-name="ce14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40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39" office:value-type="float" office:value="14" calcext:value-type="float">
            <text:p>14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42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40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42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40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2, &quot;11&quot;: 10, &quot;12&quot;: 9, &quot;13&quot;: 4, &quot;14&quot;: 11}" calcext:value-type="string">
            <text:p>"6": { "0": 14, "1": 8, "2": 3, "3": 5, "4": 13, "5": 6, "6": 2, "7": 1, "8": 2, "9": 7, "10": 12, "11": 10, "12": 9, "13": 4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8" table:formula="of:=[.$T$4]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8" table:formula="of:=[.$U$4]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39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8" table:formula="of:=[.$X$4]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style-name="ce140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40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13"/>
          <table:table-cell table:style-name="ce137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2, &quot;11&quot;: 10, &quot;12&quot;: 9, &quot;13&quot;: 4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2, "11": 10, "12": 9, "13": 4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8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3, "1": 10, "2": 8, "3": 12, "4": 14, "5": 5, "6": 4, "7": 3, "8": 7, "9": 11, "10": 6, "11": 2, "12": 1, "13": 4, "14": 9}, "14": { "0": 14, "1": 13, "2": 12, "3": 10, "4": 11, "5": 7, "6": 5, "7": 3, "8": 2, "9": 9, "10": 8, "11": 6, "12": 4, "13": 1, "14": 11}}</text:p>
          </table:table-cell>
          <table:covered-table-cell table:number-columns-repeated="28" table:style-name="ce144"/>
          <table:table-cell table:style-name="ce140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" calcext:value-type="string">
            <text:p>"9": { "0": 10, "1": 7, "2": 4, "3": 3, "4": 9, "5": 6, "6": 5, "7": 2, "8": 1, "9": 8, "10": 12, "11": 13, "12": 14, "13": 11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3"/>
          <table:table-cell table:style-name="ce137"/>
          <table:covered-table-cell table:number-columns-repeated="29" table:style-name="ce144"/>
          <table:table-cell table:style-name="ce140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3"/>
          <table:table-cell table:style-name="ce137"/>
          <table:covered-table-cell table:number-columns-repeated="29" table:style-name="ce144"/>
          <table:table-cell table:style-name="ce140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2, &quot;11&quot;: 10, &quot;12&quot;: 9, &quot;13&quot;: 4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8, &quot;10&quot;: 12, &quot;11&quot;: 13, &quot;12&quot;: 14, &quot;13&quot;: 11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2, "11": 10, "12": 9, "13": 4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8, "10": 12, "11": 13, "12": 14, "13": 11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40"/>
          <table:table-cell table:style-name="ce140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22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1.6" calcext:value-type="float">
            <text:p>1.6</text:p>
          </table:table-cell>
          <table:table-cell table:style-name="ce22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22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2.3" calcext:value-type="float">
            <text:p>2.3</text:p>
          </table:table-cell>
          <table:table-cell table:style-name="ce22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3" calcext:value-type="float">
            <text:p>1.3</text:p>
          </table:table-cell>
          <table:table-cell table:style-name="ce823" table:formula="of:=HLOOKUP([.AB8];[.$AF$25:.$AW$26];2;0)" office:value-type="float" office:value="1.2" calcext:value-type="float">
            <text:p>1.2</text:p>
          </table:table-cell>
          <table:table-cell table:style-name="ce826" table:formula="of:=HLOOKUP([.AC8];[.$AF$25:.$AW$26];2;0)" office:value-type="float" office:value="1.1" calcext:value-type="float">
            <text:p>1.1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22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22"/>
          <table:table-cell table:style-name="ce661" table:formula="of:=HLOOKUP([.N9];[.$AF$25:.$AW$26];2;0)" office:value-type="float" office:value="2.2" calcext:value-type="float">
            <text:p>2.2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1" calcext:value-type="float">
            <text:p>2.1</text:p>
          </table:table-cell>
          <table:table-cell table:style-name="ce22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3" calcext:value-type="float">
            <text:p>3.0</text:p>
          </table:table-cell>
          <table:table-cell table:style-name="ce22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2" calcext:value-type="float">
            <text:p>2.0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22"/>
          <table:table-cell table:style-name="ce636" table:formula="of:=HLOOKUP([.H10];[.$AF$25:.$AW$26];2;0)" office:value-type="float" office:value="4" calcext:value-type="float">
            <text:p>4.0</text:p>
          </table:table-cell>
          <table:table-cell table:style-name="ce640" table:formula="of:=HLOOKUP([.I10];[.$AF$25:.$AW$26];2;0)" office:value-type="float" office:value="4.5" calcext:value-type="float">
            <text:p>4.5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22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22"/>
          <table:table-cell table:style-name="ce688" table:formula="of:=HLOOKUP([.T10];[.$AF$25:.$AW$26];2;0)" office:value-type="float" office:value="4" calcext:value-type="float">
            <text:p>4.0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5" calcext:value-type="float">
            <text:p>3.5</text:p>
          </table:table-cell>
          <table:table-cell table:style-name="ce704" table:formula="of:=HLOOKUP([.W10];[.$AF$25:.$AW$26];2;0)" office:value-type="float" office:value="3.1" calcext:value-type="float">
            <text:p>3.1</text:p>
          </table:table-cell>
          <table:table-cell table:style-name="ce704" table:formula="of:=HLOOKUP([.X10];[.$AF$25:.$AW$26];2;0)" office:value-type="float" office:value="3.2" calcext:value-type="float">
            <text:p>3.2</text:p>
          </table:table-cell>
          <table:table-cell table:style-name="ce22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" calcext:value-type="string">
            <text:p>"13": { "0": 13, "1": 10, "2": 8, "3": 12, "4": 14, "5": 5, "6": 4, "7": 3, "8": 7, "9": 11, "10": 6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4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40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" calcext:value-type="string">
            <text:p>"14": { "0": 14, "1": 13, "2": 12, "3": 10, "4": 11, "5": 7, "6": 5, "7": 3, "8": 2, "9": 9, "10": 8, "11": 6, "12": 4, "13": 1, "14": 11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" calcext:value-type="float">
            <text:p>2.0</text:p>
          </table:table-cell>
          <table:table-cell table:style-name="ce703" table:formula="of:=HLOOKUP([.F12];[.$AF$25:.$AW$26];2;0)" office:value-type="float" office:value="3.1" calcext:value-type="float">
            <text:p>3.1</text:p>
          </table:table-cell>
          <table:table-cell table:style-name="ce22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22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" calcext:value-type="float">
            <text:p>2.0</text:p>
          </table:table-cell>
          <table:table-cell table:style-name="ce670" table:formula="of:=HLOOKUP([.P12];[.$AF$25:.$AW$26];2;0)" office:value-type="float" office:value="1.6" calcext:value-type="float">
            <text:p>1.6</text:p>
          </table:table-cell>
          <table:table-cell table:style-name="ce676" table:formula="of:=HLOOKUP([.Q12];[.$AF$25:.$AW$26];2;0)" office:value-type="float" office:value="2.1" calcext:value-type="float">
            <text:p>2.1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22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3.1" calcext:value-type="float">
            <text:p>3.1</text:p>
          </table:table-cell>
          <table:table-cell table:style-name="ce22"/>
          <table:table-cell table:style-name="ce606" table:formula="of:=HLOOKUP([.Z12];[.$AF$25:.$AW$26];2;0)" office:value-type="float" office:value="3.1" calcext:value-type="float">
            <text:p>3.1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3, &quot;1&quot;: 10, &quot;2&quot;: 8, &quot;3&quot;: 12, &quot;4&quot;: 14, &quot;5&quot;: 5, &quot;6&quot;: 4, &quot;7&quot;: 3, &quot;8&quot;: 7, &quot;9&quot;: 11, &quot;10&quot;: 6, &quot;11&quot;: 2, &quot;12&quot;: 1, &quot;13&quot;: 4, &quot;14&quot;: 9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3, "1": 10, "2": 8, "3": 12, "4": 14, "5": 5, "6": 4, "7": 3, "8": 7, "9": 11, "10": 6, "11": 2, "12": 1, "13": 4, "14": 9}, "14": { "0": 14, "1": 13, "2": 12, "3": 10, "4": 11, "5": 7, "6": 5, "7": 3, "8": 2, "9": 9, "10": 8, "11": 6, "12": 4, "13": 1, "14": 11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2" calcext:value-type="float">
            <text:p>2.2</text:p>
          </table:table-cell>
          <table:table-cell table:style-name="ce22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22"/>
          <table:table-cell table:style-name="ce657" table:formula="of:=HLOOKUP([.N13];[.$AF$25:.$AW$26];2;0)" office:value-type="float" office:value="3.1" calcext:value-type="float">
            <text:p>3.1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" calcext:value-type="float">
            <text:p>3.0</text:p>
          </table:table-cell>
          <table:table-cell table:style-name="ce22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2.3" calcext:value-type="float">
            <text:p>2.3</text:p>
          </table:table-cell>
          <table:table-cell table:style-name="ce22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2" calcext:value-type="float">
            <text:p>2.0</text:p>
          </table:table-cell>
          <table:table-cell table:style-name="ce622" table:formula="of:=HLOOKUP([.AB13];[.$AF$25:.$AW$26];2;0)" office:value-type="float" office:value="1.2" calcext:value-type="float">
            <text:p>1.2</text:p>
          </table:table-cell>
          <table:table-cell table:style-name="ce625" table:formula="of:=HLOOKUP([.AC13];[.$AF$25:.$AW$26];2;0)" office:value-type="float" office:value="1.1" calcext:value-type="float">
            <text:p>1.1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4" calcext:value-type="float">
            <text:p>4.0</text:p>
          </table:table-cell>
          <table:table-cell table:style-name="ce698" table:formula="of:=HLOOKUP([.D14];[.$AF$25:.$AW$26];2;0)" office:value-type="float" office:value="3.2" calcext:value-type="float">
            <text:p>3.2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2.3" calcext:value-type="float">
            <text:p>2.3</text:p>
          </table:table-cell>
          <table:table-cell table:style-name="ce22"/>
          <table:table-cell table:style-name="ce684" table:formula="of:=HLOOKUP([.H14];[.$AF$25:.$AW$26];2;0)" office:value-type="float" office:value="3.5" calcext:value-type="float">
            <text:p>3.5</text:p>
          </table:table-cell>
          <table:table-cell table:style-name="ce693" table:formula="of:=HLOOKUP([.I14];[.$AF$25:.$AW$26];2;0)" office:value-type="float" office:value="3.1" calcext:value-type="float">
            <text:p>3.1</text:p>
          </table:table-cell>
          <table:table-cell table:style-name="ce697" table:formula="of:=HLOOKUP([.J14];[.$AF$25:.$AW$26];2;0)" office:value-type="float" office:value="3" calcext:value-type="float">
            <text:p>3.0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2" calcext:value-type="float">
            <text:p>3.2</text:p>
          </table:table-cell>
          <table:table-cell table:style-name="ce22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22"/>
          <table:table-cell table:style-name="ce632" table:formula="of:=HLOOKUP([.T14];[.$AF$25:.$AW$26];2;0)" office:value-type="float" office:value="3.5" calcext:value-type="float">
            <text:p>3.5</text:p>
          </table:table-cell>
          <table:table-cell table:style-name="ce638" table:formula="of:=HLOOKUP([.U14];[.$AF$25:.$AW$26];2;0)" office:value-type="float" office:value="4.5" calcext:value-type="float">
            <text:p>4.5</text:p>
          </table:table-cell>
          <table:table-cell table:style-name="ce644" table:formula="of:=HLOOKUP([.V14];[.$AF$25:.$AW$26];2;0)" office:value-type="float" office:value="3.2" calcext:value-type="float">
            <text:p>3.2</text:p>
          </table:table-cell>
          <table:table-cell table:style-name="ce649" table:formula="of:=HLOOKUP([.W14];[.$AF$25:.$AW$26];2;0)" office:value-type="float" office:value="2.2" calcext:value-type="float">
            <text:p>2.2</text:p>
          </table:table-cell>
          <table:table-cell table:style-name="ce649" table:formula="of:=HLOOKUP([.X14];[.$AF$25:.$AW$26];2;0)" office:value-type="float" office:value="3" calcext:value-type="float">
            <text:p>3.0</text:p>
          </table:table-cell>
          <table:table-cell table:style-name="ce22"/>
          <table:table-cell table:style-name="ce607" table:formula="of:=HLOOKUP([.Z14];[.$AF$25:.$AW$26];2;0)" office:value-type="float" office:value="3.5" calcext:value-type="float">
            <text:p>3.5</text:p>
          </table:table-cell>
          <table:table-cell table:style-name="ce615" table:formula="of:=HLOOKUP([.AA14];[.$AF$25:.$AW$26];2;0)" office:value-type="float" office:value="4" calcext:value-type="float">
            <text:p>4.0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2" calcext:value-type="float">
            <text:p>3.2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" calcext:value-type="float">
            <text:p>4.0</text:p>
          </table:table-cell>
          <table:table-cell table:style-name="ce666" table:formula="of:=HLOOKUP([.C16];[.$AF$25:.$AW$26];2;0)" office:value-type="float" office:value="4.5" calcext:value-type="float">
            <text:p>4.5</text:p>
          </table:table-cell>
          <table:table-cell table:style-name="ce671" table:formula="of:=HLOOKUP([.D16];[.$AF$25:.$AW$26];2;0)" office:value-type="float" office:value="3.5" calcext:value-type="float">
            <text:p>3.5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1" calcext:value-type="float">
            <text:p>3.1</text:p>
          </table:table-cell>
          <table:table-cell table:style-name="ce22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3.5" calcext:value-type="float">
            <text:p>3.5</text:p>
          </table:table-cell>
          <table:table-cell table:style-name="ce645" table:formula="of:=HLOOKUP([.J16];[.$AF$25:.$AW$26];2;0)" office:value-type="float" office:value="3" calcext:value-type="float">
            <text:p>3.0</text:p>
          </table:table-cell>
          <table:table-cell table:style-name="ce650" table:formula="of:=HLOOKUP([.K16];[.$AF$25:.$AW$26];2;0)" office:value-type="float" office:value="3.1" calcext:value-type="float">
            <text:p>3.1</text:p>
          </table:table-cell>
          <table:table-cell table:style-name="ce650" table:formula="of:=HLOOKUP([.L16];[.$AF$25:.$AW$26];2;0)" office:value-type="float" office:value="3.2" calcext:value-type="float">
            <text:p>3.2</text:p>
          </table:table-cell>
          <table:table-cell table:style-name="ce22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" calcext:value-type="float">
            <text:p>3.0</text:p>
          </table:table-cell>
          <table:table-cell table:style-name="ce626" table:formula="of:=HLOOKUP([.Q16];[.$AF$25:.$AW$26];2;0)" office:value-type="float" office:value="3.1" calcext:value-type="float">
            <text:p>3.1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22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1" calcext:value-type="float">
            <text:p>3.1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5" calcext:value-type="float">
            <text:p>3.5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22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float" office:value="3.5" calcext:value-type="float">
            <text:p>3.5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3" calcext:value-type="float">
            <text:p>2.3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1" calcext:value-type="float">
            <text:p>2.1</text:p>
          </table:table-cell>
          <table:table-cell table:style-name="ce22"/>
          <table:table-cell table:style-name="ce634" table:formula="of:=HLOOKUP([.H17];[.$AF$25:.$AW$26];2;0)" office:value-type="float" office:value="4" calcext:value-type="float">
            <text:p>4.0</text:p>
          </table:table-cell>
          <table:table-cell table:style-name="ce639" table:formula="of:=HLOOKUP([.I17];[.$AF$25:.$AW$26];2;0)" office:value-type="float" office:value="2.1" calcext:value-type="float">
            <text:p>2.1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2" calcext:value-type="float">
            <text:p>2.0</text:p>
          </table:table-cell>
          <table:table-cell table:style-name="ce22"/>
          <table:table-cell table:style-name="ce609" table:formula="of:=HLOOKUP([.N17];[.$AF$25:.$AW$26];2;0)" office:value-type="float" office:value="3.2" calcext:value-type="float">
            <text:p>3.2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 table:style-name="ce22"/>
          <table:table-cell table:style-name="ce555" table:formula="of:=HLOOKUP([.T17];[.$AF$25:.$AW$26];2;0)" office:value-type="float" office:value="2" calcext:value-type="float">
            <text:p>2.0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.2" calcext:value-type="float">
            <text:p>3.2</text:p>
          </table:table-cell>
          <table:table-cell table:style-name="ce22"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1.2" calcext:value-type="float">
            <text:p>1.2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5" calcext:value-type="float">
            <text:p>3.5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22"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2.3" calcext:value-type="float">
            <text:p>2.3</text:p>
          </table:table-cell>
          <table:table-cell table:style-name="ce22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2.2" calcext:value-type="float">
            <text:p>2.2</text:p>
          </table:table-cell>
          <table:table-cell table:style-name="ce22"/>
          <table:table-cell table:style-name="ce555" table:formula="of:=HLOOKUP([.T18];[.$AF$25:.$AW$26];2;0)" office:value-type="float" office:value="2.1" calcext:value-type="float">
            <text:p>2.1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" calcext:value-type="float">
            <text:p>3.0</text:p>
          </table:table-cell>
          <table:table-cell table:style-name="ce22"/>
          <table:table-cell table:style-name="ce558" table:formula="of:=HLOOKUP([.Z18];[.$AF$25:.$AW$26];2;0)" office:value-type="float" office:value="2.3" calcext:value-type="float">
            <text:p>2.3</text:p>
          </table:table-cell>
          <table:table-cell table:style-name="ce569" table:formula="of:=HLOOKUP([.AA18];[.$AF$25:.$AW$26];2;0)" office:value-type="float" office:value="2.1" calcext:value-type="float">
            <text:p>2.1</text:p>
          </table:table-cell>
          <table:table-cell table:style-name="ce578" table:formula="of:=HLOOKUP([.AB18];[.$AF$25:.$AW$26];2;0)" office:value-type="float" office:value="1.6" calcext:value-type="float">
            <text:p>1.6</text:p>
          </table:table-cell>
          <table:table-cell table:style-name="ce588" table:formula="of:=HLOOKUP([.AC18];[.$AF$25:.$AW$26];2;0)" office:value-type="float" office:value="1.1" calcext:value-type="float">
            <text:p>1.1</text:p>
          </table:table-cell>
          <table:table-cell table:style-name="ce832" table:formula="of:=HLOOKUP([.AD18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10" office:value-type="float" office:value="14" calcext:value-type="float">
            <text:p>14</text:p>
          </table:table-cell>
          <table:table-cell table:style-name="ce211" office:value-type="float" office:value="6" calcext:value-type="float">
            <text:p>6</text:p>
          </table:table-cell>
          <table:table-cell table:style-name="ce210" office:value-type="float" office:value="3" calcext:value-type="float">
            <text:p>3</text:p>
          </table:table-cell>
          <table:table-cell table:style-name="ce211" office:value-type="float" office:value="5" calcext:value-type="float">
            <text:p>5</text:p>
          </table:table-cell>
          <table:table-cell table:style-name="ce210" office:value-type="float" office:value="13" calcext:value-type="float">
            <text:p>13</text:p>
          </table:table-cell>
          <table:table-cell/>
          <table:table-cell table:style-name="ce230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230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230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230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230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37"/>
          <table:table-cell table:style-name="ce841"/>
          <table:table-cell table:style-name="ce137"/>
          <table:table-cell/>
          <table:table-cell table:style-name="ce137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11" office:value-type="float" office:value="8" calcext:value-type="float">
            <text:p>8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1" office:value-type="float" office:value="7" calcext:value-type="float">
            <text:p>7</text:p>
          </table:table-cell>
          <table:table-cell/>
          <table:table-cell table:style-name="ce230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230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230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230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230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37"/>
          <table:table-cell table:style-name="ce137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10" office:value-type="float" office:value="12" calcext:value-type="float">
            <text:p>12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9" calcext:value-type="float">
            <text:p>9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11" calcext:value-type="float">
            <text:p>11</text:p>
          </table:table-cell>
          <table:table-cell/>
          <table:table-cell table:style-name="ce230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230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230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230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230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01"/>
          <table:covered-table-cell table:number-columns-repeated="29" table:style-name="ce137"/>
          <table:table-cell table:style-name="ce841"/>
          <table:table-cell table:style-name="ce137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68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38"/>
          <table:table-cell/>
          <table:covered-table-cell table:style-name="ce38"/>
          <table:covered-table-cell table:number-columns-repeated="2" table:style-name="ce590"/>
          <table:covered-table-cell table:style-name="ce68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13"/>
          <table:table-cell table:style-name="ce137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37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3"/>
          <table:table-cell table:style-name="ce137"/>
          <table:covered-table-cell table:number-columns-repeated="29" table:style-name="ce137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3"/>
          <table:table-cell table:style-name="ce137"/>
          <table:covered-table-cell table:number-columns-repeated="29" table:style-name="ce137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57" table:formula="of:=HLOOKUP([.B8];[.$AF$25:.$AW$26];2;0)" office:value-type="float" office:value="4.5" calcext:value-type="float">
            <text:p>4.5</text:p>
          </table:table-cell>
          <table:table-cell table:style-name="ce165" table:formula="of:=HLOOKUP([.C8];[.$AF$25:.$AW$26];2;0)" office:value-type="float" office:value="1.1" calcext:value-type="float">
            <text:p>1.1</text:p>
          </table:table-cell>
          <table:table-cell table:style-name="ce168" table:formula="of:=HLOOKUP([.D8];[.$AF$25:.$AW$26];2;0)" office:value-type="float" office:value="1.2" calcext:value-type="float">
            <text:p>1.2</text:p>
          </table:table-cell>
          <table:table-cell table:style-name="ce171" table:formula="of:=HLOOKUP([.E8];[.$AF$25:.$AW$26];2;0)" office:value-type="float" office:value="1.3" calcext:value-type="float">
            <text:p>1.3</text:p>
          </table:table-cell>
          <table:table-cell table:style-name="ce171" table:formula="of:=HLOOKUP([.F8];[.$AF$25:.$AW$26];2;0)" office:value-type="float" office:value="2" calcext:value-type="float">
            <text:p>2.0</text:p>
          </table:table-cell>
          <table:table-cell table:style-name="ce22"/>
          <table:table-cell table:style-name="ce174" table:formula="of:=HLOOKUP([.H8];[.$AF$25:.$AW$26];2;0)" office:value-type="float" office:value="3" calcext:value-type="float">
            <text:p>3.0</text:p>
          </table:table-cell>
          <table:table-cell table:style-name="ce180" table:formula="of:=HLOOKUP([.I8];[.$AF$25:.$AW$26];2;0)" office:value-type="float" office:value="2.1" calcext:value-type="float">
            <text:p>2.1</text:p>
          </table:table-cell>
          <table:table-cell table:style-name="ce186" table:formula="of:=HLOOKUP([.J8];[.$AF$25:.$AW$26];2;0)" office:value-type="float" office:value="1.1" calcext:value-type="float">
            <text:p>1.1</text:p>
          </table:table-cell>
          <table:table-cell table:style-name="ce189" table:formula="of:=HLOOKUP([.K8];[.$AF$25:.$AW$26];2;0)" office:value-type="float" office:value="1.2" calcext:value-type="float">
            <text:p>1.2</text:p>
          </table:table-cell>
          <table:table-cell table:style-name="ce189" table:formula="of:=HLOOKUP([.L8];[.$AF$25:.$AW$26];2;0)" office:value-type="float" office:value="1.6" calcext:value-type="float">
            <text:p>1.6</text:p>
          </table:table-cell>
          <table:table-cell table:style-name="ce22"/>
          <table:table-cell table:style-name="ce192" table:formula="of:=HLOOKUP([.N8];[.$AF$25:.$AW$26];2;0)" office:value-type="float" office:value="2.3" calcext:value-type="float">
            <text:p>2.3</text:p>
          </table:table-cell>
          <table:table-cell table:style-name="ce198" table:formula="of:=HLOOKUP([.O8];[.$AF$25:.$AW$26];2;0)" office:value-type="float" office:value="1.2" calcext:value-type="float">
            <text:p>1.2</text:p>
          </table:table-cell>
          <table:table-cell table:style-name="ce201" table:formula="of:=HLOOKUP([.P8];[.$AF$25:.$AW$26];2;0)" office:value-type="float" office:value="1.3" calcext:value-type="float">
            <text:p>1.3</text:p>
          </table:table-cell>
          <table:table-cell table:style-name="ce207" table:formula="of:=HLOOKUP([.Q8];[.$AF$25:.$AW$26];2;0)" office:value-type="float" office:value="1.1" calcext:value-type="float">
            <text:p>1.1</text:p>
          </table:table-cell>
          <table:table-cell table:style-name="ce207" table:formula="of:=HLOOKUP([.R8];[.$AF$25:.$AW$26];2;0)" office:value-type="float" office:value="2.2" calcext:value-type="float">
            <text:p>2.2</text:p>
          </table:table-cell>
          <table:table-cell table:style-name="ce22"/>
          <table:table-cell table:style-name="ce212" table:formula="of:=HLOOKUP([.T8];[.$AF$25:.$AW$26];2;0)" office:value-type="float" office:value="1.3" calcext:value-type="float">
            <text:p>1.3</text:p>
          </table:table-cell>
          <table:table-cell table:style-name="ce218" table:formula="of:=HLOOKUP([.U8];[.$AF$25:.$AW$26];2;0)" office:value-type="float" office:value="1.2" calcext:value-type="float">
            <text:p>1.2</text:p>
          </table:table-cell>
          <table:table-cell table:style-name="ce221" table:formula="of:=HLOOKUP([.V8];[.$AF$25:.$AW$26];2;0)" office:value-type="float" office:value="1.1" calcext:value-type="float">
            <text:p>1.1</text:p>
          </table:table-cell>
          <table:table-cell table:style-name="ce224" table:formula="of:=HLOOKUP([.W8];[.$AF$25:.$AW$26];2;0)" office:value-type="float" office:value="2" calcext:value-type="float">
            <text:p>2.0</text:p>
          </table:table-cell>
          <table:table-cell table:style-name="ce225" table:formula="of:=HLOOKUP([.X8];[.$AF$25:.$AW$26];2;0)" office:value-type="float" office:value="2.2" calcext:value-type="float">
            <text:p>2.2</text:p>
          </table:table-cell>
          <table:table-cell table:style-name="ce22"/>
          <table:table-cell table:style-name="ce231" table:formula="of:=HLOOKUP([.Z8];[.$AF$25:.$AW$26];2;0)" office:value-type="float" office:value="2.2" calcext:value-type="float">
            <text:p>2.2</text:p>
          </table:table-cell>
          <table:table-cell table:style-name="ce237" table:formula="of:=HLOOKUP([.AA8];[.$AF$25:.$AW$26];2;0)" office:value-type="float" office:value="1.3" calcext:value-type="float">
            <text:p>1.3</text:p>
          </table:table-cell>
          <table:table-cell table:style-name="ce240" table:formula="of:=HLOOKUP([.AB8];[.$AF$25:.$AW$26];2;0)" office:value-type="float" office:value="1.2" calcext:value-type="float">
            <text:p>1.2</text:p>
          </table:table-cell>
          <table:table-cell table:style-name="ce243" table:formula="of:=HLOOKUP([.AC8];[.$AF$25:.$AW$26];2;0)" office:value-type="float" office:value="1.1" calcext:value-type="float">
            <text:p>1.1</text:p>
          </table:table-cell>
          <table:table-cell table:style-name="ce246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58" table:formula="of:=HLOOKUP([.B9];[.$AF$25:.$AW$26];2;0)" office:value-type="float" office:value="3" calcext:value-type="float">
            <text:p>3.0</text:p>
          </table:table-cell>
          <table:table-cell table:style-name="ce165" table:formula="of:=HLOOKUP([.C9];[.$AF$25:.$AW$26];2;0)" office:value-type="float" office:value="2.3" calcext:value-type="float">
            <text:p>2.3</text:p>
          </table:table-cell>
          <table:table-cell table:style-name="ce168" table:formula="of:=HLOOKUP([.D9];[.$AF$25:.$AW$26];2;0)" office:value-type="float" office:value="2.2" calcext:value-type="float">
            <text:p>2.2</text:p>
          </table:table-cell>
          <table:table-cell table:style-name="ce171" table:formula="of:=HLOOKUP([.E9];[.$AF$25:.$AW$26];2;0)" office:value-type="float" office:value="1.6" calcext:value-type="float">
            <text:p>1.6</text:p>
          </table:table-cell>
          <table:table-cell table:style-name="ce171" table:formula="of:=HLOOKUP([.F9];[.$AF$25:.$AW$26];2;0)" office:value-type="float" office:value="2.1" calcext:value-type="float">
            <text:p>2.1</text:p>
          </table:table-cell>
          <table:table-cell table:style-name="ce22"/>
          <table:table-cell table:style-name="ce175" table:formula="of:=HLOOKUP([.H9];[.$AF$25:.$AW$26];2;0)" office:value-type="float" office:value="2.3" calcext:value-type="float">
            <text:p>2.3</text:p>
          </table:table-cell>
          <table:table-cell table:style-name="ce181" table:formula="of:=HLOOKUP([.I9];[.$AF$25:.$AW$26];2;0)" office:value-type="float" office:value="2.2" calcext:value-type="float">
            <text:p>2.2</text:p>
          </table:table-cell>
          <table:table-cell table:style-name="ce186" table:formula="of:=HLOOKUP([.J9];[.$AF$25:.$AW$26];2;0)" office:value-type="float" office:value="2.1" calcext:value-type="float">
            <text:p>2.1</text:p>
          </table:table-cell>
          <table:table-cell table:style-name="ce189" table:formula="of:=HLOOKUP([.K9];[.$AF$25:.$AW$26];2;0)" office:value-type="float" office:value="1.3" calcext:value-type="float">
            <text:p>1.3</text:p>
          </table:table-cell>
          <table:table-cell table:style-name="ce189" table:formula="of:=HLOOKUP([.L9];[.$AF$25:.$AW$26];2;0)" office:value-type="float" office:value="2" calcext:value-type="float">
            <text:p>2.0</text:p>
          </table:table-cell>
          <table:table-cell table:style-name="ce22"/>
          <table:table-cell table:style-name="ce193" table:formula="of:=HLOOKUP([.N9];[.$AF$25:.$AW$26];2;0)" office:value-type="float" office:value="2.1" calcext:value-type="float">
            <text:p>2.1</text:p>
          </table:table-cell>
          <table:table-cell table:style-name="ce198" table:formula="of:=HLOOKUP([.O9];[.$AF$25:.$AW$26];2;0)" office:value-type="float" office:value="1.6" calcext:value-type="float">
            <text:p>1.6</text:p>
          </table:table-cell>
          <table:table-cell table:style-name="ce202" table:formula="of:=HLOOKUP([.P9];[.$AF$25:.$AW$26];2;0)" office:value-type="float" office:value="2" calcext:value-type="float">
            <text:p>2.0</text:p>
          </table:table-cell>
          <table:table-cell table:style-name="ce207" table:formula="of:=HLOOKUP([.Q9];[.$AF$25:.$AW$26];2;0)" office:value-type="float" office:value="1.3" calcext:value-type="float">
            <text:p>1.3</text:p>
          </table:table-cell>
          <table:table-cell table:style-name="ce207" table:formula="of:=HLOOKUP([.R9];[.$AF$25:.$AW$26];2;0)" office:value-type="float" office:value="3" calcext:value-type="float">
            <text:p>3.0</text:p>
          </table:table-cell>
          <table:table-cell table:style-name="ce22"/>
          <table:table-cell table:style-name="ce213" table:formula="of:=HLOOKUP([.T9];[.$AF$25:.$AW$26];2;0)" office:value-type="float" office:value="2" calcext:value-type="float">
            <text:p>2.0</text:p>
          </table:table-cell>
          <table:table-cell table:style-name="ce218" table:formula="of:=HLOOKUP([.U9];[.$AF$25:.$AW$26];2;0)" office:value-type="float" office:value="2.1" calcext:value-type="float">
            <text:p>2.1</text:p>
          </table:table-cell>
          <table:table-cell table:style-name="ce221" table:formula="of:=HLOOKUP([.V9];[.$AF$25:.$AW$26];2;0)" office:value-type="float" office:value="2.3" calcext:value-type="float">
            <text:p>2.3</text:p>
          </table:table-cell>
          <table:table-cell table:style-name="ce225" table:formula="of:=HLOOKUP([.W9];[.$AF$25:.$AW$26];2;0)" office:value-type="float" office:value="1.6" calcext:value-type="float">
            <text:p>1.6</text:p>
          </table:table-cell>
          <table:table-cell table:style-name="ce225" table:formula="of:=HLOOKUP([.X9];[.$AF$25:.$AW$26];2;0)" office:value-type="float" office:value="3" calcext:value-type="float">
            <text:p>3.0</text:p>
          </table:table-cell>
          <table:table-cell table:style-name="ce22"/>
          <table:table-cell table:style-name="ce232" table:formula="of:=HLOOKUP([.Z9];[.$AF$25:.$AW$26];2;0)" office:value-type="float" office:value="2.1" calcext:value-type="float">
            <text:p>2.1</text:p>
          </table:table-cell>
          <table:table-cell table:style-name="ce237" table:formula="of:=HLOOKUP([.AA9];[.$AF$25:.$AW$26];2;0)" office:value-type="float" office:value="2" calcext:value-type="float">
            <text:p>2.0</text:p>
          </table:table-cell>
          <table:table-cell table:style-name="ce240" table:formula="of:=HLOOKUP([.AB9];[.$AF$25:.$AW$26];2;0)" office:value-type="float" office:value="1.6" calcext:value-type="float">
            <text:p>1.6</text:p>
          </table:table-cell>
          <table:table-cell table:style-name="ce243" table:formula="of:=HLOOKUP([.AC9];[.$AF$25:.$AW$26];2;0)" office:value-type="float" office:value="3" calcext:value-type="float">
            <text:p>3.0</text:p>
          </table:table-cell>
          <table:table-cell table:style-name="ce243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254" office:value-type="float" office:value="1" calcext:value-type="float">
            <text:p>1.0</text:p>
          </table:table-cell>
          <table:table-cell table:style-name="ce254" office:value-type="float" office:value="1.1" calcext:value-type="float">
            <text:p>1.1</text:p>
          </table:table-cell>
          <table:table-cell table:style-name="ce254" office:value-type="float" office:value="1.2" calcext:value-type="float">
            <text:p>1.2</text:p>
          </table:table-cell>
          <table:table-cell table:style-name="ce254" office:value-type="float" office:value="1.3" calcext:value-type="float">
            <text:p>1.3</text:p>
          </table:table-cell>
          <table:table-cell table:style-name="ce254" office:value-type="float" office:value="1.6" calcext:value-type="float">
            <text:p>1.6</text:p>
          </table:table-cell>
          <table:table-cell table:style-name="ce254" office:value-type="float" office:value="2" calcext:value-type="float">
            <text:p>2.0</text:p>
          </table:table-cell>
          <table:table-cell table:style-name="ce254" office:value-type="float" office:value="2.1" calcext:value-type="float">
            <text:p>2.1</text:p>
          </table:table-cell>
          <table:table-cell table:style-name="ce254" office:value-type="float" office:value="2.2" calcext:value-type="float">
            <text:p>2.2</text:p>
          </table:table-cell>
          <table:table-cell table:style-name="ce254" office:value-type="float" office:value="2.3" calcext:value-type="float">
            <text:p>2.3</text:p>
          </table:table-cell>
          <table:table-cell table:style-name="ce254" office:value-type="float" office:value="3" calcext:value-type="float">
            <text:p>3.0</text:p>
          </table:table-cell>
          <table:table-cell table:style-name="ce254" office:value-type="float" office:value="3.1" calcext:value-type="float">
            <text:p>3.1</text:p>
          </table:table-cell>
          <table:table-cell table:style-name="ce254" office:value-type="float" office:value="3.2" calcext:value-type="float">
            <text:p>3.2</text:p>
          </table:table-cell>
          <table:table-cell table:style-name="ce254" office:value-type="float" office:value="3.5" calcext:value-type="float">
            <text:p>3.5</text:p>
          </table:table-cell>
          <table:table-cell table:style-name="ce254" office:value-type="float" office:value="4" calcext:value-type="float">
            <text:p>4.0</text:p>
          </table:table-cell>
          <table:table-cell table:style-name="ce254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58" table:formula="of:=HLOOKUP([.B10];[.$AF$25:.$AW$26];2;0)" office:value-type="float" office:value="3.5" calcext:value-type="float">
            <text:p>3.5</text:p>
          </table:table-cell>
          <table:table-cell table:style-name="ce165" table:formula="of:=HLOOKUP([.C10];[.$AF$25:.$AW$26];2;0)" office:value-type="float" office:value="4" calcext:value-type="float">
            <text:p>4.0</text:p>
          </table:table-cell>
          <table:table-cell table:style-name="ce168" table:formula="of:=HLOOKUP([.D10];[.$AF$25:.$AW$26];2;0)" office:value-type="float" office:value="4.5" calcext:value-type="float">
            <text:p>4.5</text:p>
          </table:table-cell>
          <table:table-cell table:style-name="ce171" table:formula="of:=HLOOKUP([.E10];[.$AF$25:.$AW$26];2;0)" office:value-type="float" office:value="3.1" calcext:value-type="float">
            <text:p>3.1</text:p>
          </table:table-cell>
          <table:table-cell table:style-name="ce171" table:formula="of:=HLOOKUP([.F10];[.$AF$25:.$AW$26];2;0)" office:value-type="float" office:value="3.2" calcext:value-type="float">
            <text:p>3.2</text:p>
          </table:table-cell>
          <table:table-cell table:style-name="ce22"/>
          <table:table-cell table:style-name="ce175" table:formula="of:=HLOOKUP([.H10];[.$AF$25:.$AW$26];2;0)" office:value-type="float" office:value="4" calcext:value-type="float">
            <text:p>4.0</text:p>
          </table:table-cell>
          <table:table-cell table:style-name="ce181" table:formula="of:=HLOOKUP([.I10];[.$AF$25:.$AW$26];2;0)" office:value-type="float" office:value="4.5" calcext:value-type="float">
            <text:p>4.5</text:p>
          </table:table-cell>
          <table:table-cell table:style-name="ce186" table:formula="of:=HLOOKUP([.J10];[.$AF$25:.$AW$26];2;0)" office:value-type="float" office:value="3.5" calcext:value-type="float">
            <text:p>3.5</text:p>
          </table:table-cell>
          <table:table-cell table:style-name="ce189" table:formula="of:=HLOOKUP([.K10];[.$AF$25:.$AW$26];2;0)" office:value-type="float" office:value="3.1" calcext:value-type="float">
            <text:p>3.1</text:p>
          </table:table-cell>
          <table:table-cell table:style-name="ce189" table:formula="of:=HLOOKUP([.L10];[.$AF$25:.$AW$26];2;0)" office:value-type="float" office:value="3.2" calcext:value-type="float">
            <text:p>3.2</text:p>
          </table:table-cell>
          <table:table-cell table:style-name="ce22"/>
          <table:table-cell table:style-name="ce193" table:formula="of:=HLOOKUP([.N10];[.$AF$25:.$AW$26];2;0)" office:value-type="float" office:value="4.5" calcext:value-type="float">
            <text:p>4.5</text:p>
          </table:table-cell>
          <table:table-cell table:style-name="ce198" table:formula="of:=HLOOKUP([.O10];[.$AF$25:.$AW$26];2;0)" office:value-type="float" office:value="3.5" calcext:value-type="float">
            <text:p>3.5</text:p>
          </table:table-cell>
          <table:table-cell table:style-name="ce202" table:formula="of:=HLOOKUP([.P10];[.$AF$25:.$AW$26];2;0)" office:value-type="float" office:value="3.1" calcext:value-type="float">
            <text:p>3.1</text:p>
          </table:table-cell>
          <table:table-cell table:style-name="ce207" table:formula="of:=HLOOKUP([.Q10];[.$AF$25:.$AW$26];2;0)" office:value-type="float" office:value="3.2" calcext:value-type="float">
            <text:p>3.2</text:p>
          </table:table-cell>
          <table:table-cell table:style-name="ce207" table:formula="of:=HLOOKUP([.R10];[.$AF$25:.$AW$26];2;0)" office:value-type="float" office:value="4" calcext:value-type="float">
            <text:p>4.0</text:p>
          </table:table-cell>
          <table:table-cell table:style-name="ce22"/>
          <table:table-cell table:style-name="ce213" table:formula="of:=HLOOKUP([.T10];[.$AF$25:.$AW$26];2;0)" office:value-type="float" office:value="4.5" calcext:value-type="float">
            <text:p>4.5</text:p>
          </table:table-cell>
          <table:table-cell table:style-name="ce218" table:formula="of:=HLOOKUP([.U10];[.$AF$25:.$AW$26];2;0)" office:value-type="float" office:value="4" calcext:value-type="float">
            <text:p>4.0</text:p>
          </table:table-cell>
          <table:table-cell table:style-name="ce221" table:formula="of:=HLOOKUP([.V10];[.$AF$25:.$AW$26];2;0)" office:value-type="float" office:value="3.5" calcext:value-type="float">
            <text:p>3.5</text:p>
          </table:table-cell>
          <table:table-cell table:style-name="ce225" table:formula="of:=HLOOKUP([.W10];[.$AF$25:.$AW$26];2;0)" office:value-type="float" office:value="3.1" calcext:value-type="float">
            <text:p>3.1</text:p>
          </table:table-cell>
          <table:table-cell table:style-name="ce225" table:formula="of:=HLOOKUP([.X10];[.$AF$25:.$AW$26];2;0)" office:value-type="float" office:value="3.2" calcext:value-type="float">
            <text:p>3.2</text:p>
          </table:table-cell>
          <table:table-cell table:style-name="ce22"/>
          <table:table-cell table:style-name="ce232" table:formula="of:=HLOOKUP([.Z10];[.$AF$25:.$AW$26];2;0)" office:value-type="float" office:value="3.1" calcext:value-type="float">
            <text:p>3.1</text:p>
          </table:table-cell>
          <table:table-cell table:style-name="ce237" table:formula="of:=HLOOKUP([.AA10];[.$AF$25:.$AW$26];2;0)" office:value-type="float" office:value="3.2" calcext:value-type="float">
            <text:p>3.2</text:p>
          </table:table-cell>
          <table:table-cell table:style-name="ce240" table:formula="of:=HLOOKUP([.AB10];[.$AF$25:.$AW$26];2;0)" office:value-type="float" office:value="3.5" calcext:value-type="float">
            <text:p>3.5</text:p>
          </table:table-cell>
          <table:table-cell table:style-name="ce243" table:formula="of:=HLOOKUP([.AC10];[.$AF$25:.$AW$26];2;0)" office:value-type="float" office:value="4" calcext:value-type="float">
            <text:p>4.0</text:p>
          </table:table-cell>
          <table:table-cell table:style-name="ce243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59" table:formula="of:=HLOOKUP([.B12];[.$AF$25:.$AW$26];2;0)" office:value-type="float" office:value="3.5" calcext:value-type="float">
            <text:p>3.5</text:p>
          </table:table-cell>
          <table:table-cell table:style-name="ce166" table:formula="of:=HLOOKUP([.C12];[.$AF$25:.$AW$26];2;0)" office:value-type="float" office:value="3.1" calcext:value-type="float">
            <text:p>3.1</text:p>
          </table:table-cell>
          <table:table-cell table:style-name="ce169" table:formula="of:=HLOOKUP([.D12];[.$AF$25:.$AW$26];2;0)" office:value-type="float" office:value="2.1" calcext:value-type="float">
            <text:p>2.1</text:p>
          </table:table-cell>
          <table:table-cell table:style-name="ce172" table:formula="of:=HLOOKUP([.E12];[.$AF$25:.$AW$26];2;0)" office:value-type="float" office:value="2" calcext:value-type="float">
            <text:p>2.0</text:p>
          </table:table-cell>
          <table:table-cell table:style-name="ce172" table:formula="of:=HLOOKUP([.F12];[.$AF$25:.$AW$26];2;0)" office:value-type="float" office:value="3" calcext:value-type="float">
            <text:p>3.0</text:p>
          </table:table-cell>
          <table:table-cell table:style-name="ce22"/>
          <table:table-cell table:style-name="ce176" table:formula="of:=HLOOKUP([.H12];[.$AF$25:.$AW$26];2;0)" office:value-type="float" office:value="4.5" calcext:value-type="float">
            <text:p>4.5</text:p>
          </table:table-cell>
          <table:table-cell table:style-name="ce182" table:formula="of:=HLOOKUP([.I12];[.$AF$25:.$AW$26];2;0)" office:value-type="float" office:value="2.2" calcext:value-type="float">
            <text:p>2.2</text:p>
          </table:table-cell>
          <table:table-cell table:style-name="ce187" table:formula="of:=HLOOKUP([.J12];[.$AF$25:.$AW$26];2;0)" office:value-type="float" office:value="1.6" calcext:value-type="float">
            <text:p>1.6</text:p>
          </table:table-cell>
          <table:table-cell table:style-name="ce190" table:formula="of:=HLOOKUP([.K12];[.$AF$25:.$AW$26];2;0)" office:value-type="float" office:value="2" calcext:value-type="float">
            <text:p>2.0</text:p>
          </table:table-cell>
          <table:table-cell table:style-name="ce190" table:formula="of:=HLOOKUP([.L12];[.$AF$25:.$AW$26];2;0)" office:value-type="float" office:value="4" calcext:value-type="float">
            <text:p>4.0</text:p>
          </table:table-cell>
          <table:table-cell table:style-name="ce22"/>
          <table:table-cell table:style-name="ce194" table:formula="of:=HLOOKUP([.N12];[.$AF$25:.$AW$26];2;0)" office:value-type="float" office:value="4.5" calcext:value-type="float">
            <text:p>4.5</text:p>
          </table:table-cell>
          <table:table-cell table:style-name="ce199" table:formula="of:=HLOOKUP([.O12];[.$AF$25:.$AW$26];2;0)" office:value-type="float" office:value="2" calcext:value-type="float">
            <text:p>2.0</text:p>
          </table:table-cell>
          <table:table-cell table:style-name="ce203" table:formula="of:=HLOOKUP([.P12];[.$AF$25:.$AW$26];2;0)" office:value-type="float" office:value="1.6" calcext:value-type="float">
            <text:p>1.6</text:p>
          </table:table-cell>
          <table:table-cell table:style-name="ce208" table:formula="of:=HLOOKUP([.Q12];[.$AF$25:.$AW$26];2;0)" office:value-type="float" office:value="2.1" calcext:value-type="float">
            <text:p>2.1</text:p>
          </table:table-cell>
          <table:table-cell table:style-name="ce208" table:formula="of:=HLOOKUP([.R12];[.$AF$25:.$AW$26];2;0)" office:value-type="float" office:value="4" calcext:value-type="float">
            <text:p>4.0</text:p>
          </table:table-cell>
          <table:table-cell table:style-name="ce22"/>
          <table:table-cell table:style-name="ce214" table:formula="of:=HLOOKUP([.T12];[.$AF$25:.$AW$26];2;0)" office:value-type="float" office:value="4" calcext:value-type="float">
            <text:p>4.0</text:p>
          </table:table-cell>
          <table:table-cell table:style-name="ce219" table:formula="of:=HLOOKUP([.U12];[.$AF$25:.$AW$26];2;0)" office:value-type="float" office:value="2" calcext:value-type="float">
            <text:p>2.0</text:p>
          </table:table-cell>
          <table:table-cell table:style-name="ce222" table:formula="of:=HLOOKUP([.V12];[.$AF$25:.$AW$26];2;0)" office:value-type="float" office:value="1.3" calcext:value-type="float">
            <text:p>1.3</text:p>
          </table:table-cell>
          <table:table-cell table:style-name="ce226" table:formula="of:=HLOOKUP([.W12];[.$AF$25:.$AW$26];2;0)" office:value-type="float" office:value="2.1" calcext:value-type="float">
            <text:p>2.1</text:p>
          </table:table-cell>
          <table:table-cell table:style-name="ce226" table:formula="of:=HLOOKUP([.X12];[.$AF$25:.$AW$26];2;0)" office:value-type="float" office:value="3.1" calcext:value-type="float">
            <text:p>3.1</text:p>
          </table:table-cell>
          <table:table-cell table:style-name="ce22"/>
          <table:table-cell table:style-name="ce233" table:formula="of:=HLOOKUP([.Z12];[.$AF$25:.$AW$26];2;0)" office:value-type="float" office:value="3.1" calcext:value-type="float">
            <text:p>3.1</text:p>
          </table:table-cell>
          <table:table-cell table:style-name="ce238" table:formula="of:=HLOOKUP([.AA12];[.$AF$25:.$AW$26];2;0)" office:value-type="float" office:value="2.2" calcext:value-type="float">
            <text:p>2.2</text:p>
          </table:table-cell>
          <table:table-cell table:style-name="ce241" table:formula="of:=HLOOKUP([.AB12];[.$AF$25:.$AW$26];2;0)" office:value-type="float" office:value="1.6" calcext:value-type="float">
            <text:p>1.6</text:p>
          </table:table-cell>
          <table:table-cell table:style-name="ce244" table:formula="of:=HLOOKUP([.AC12];[.$AF$25:.$AW$26];2;0)" office:value-type="float" office:value="1.3" calcext:value-type="float">
            <text:p>1.3</text:p>
          </table:table-cell>
          <table:table-cell table:style-name="ce244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60" table:formula="of:=HLOOKUP([.B13];[.$AF$25:.$AW$26];2;0)" office:value-type="float" office:value="2.3" calcext:value-type="float">
            <text:p>2.3</text:p>
          </table:table-cell>
          <table:table-cell table:style-name="ce166" table:formula="of:=HLOOKUP([.C13];[.$AF$25:.$AW$26];2;0)" office:value-type="float" office:value="1.1" calcext:value-type="float">
            <text:p>1.1</text:p>
          </table:table-cell>
          <table:table-cell table:style-name="ce169" table:formula="of:=HLOOKUP([.D13];[.$AF$25:.$AW$26];2;0)" office:value-type="float" office:value="1.2" calcext:value-type="float">
            <text:p>1.2</text:p>
          </table:table-cell>
          <table:table-cell table:style-name="ce172" table:formula="of:=HLOOKUP([.E13];[.$AF$25:.$AW$26];2;0)" office:value-type="float" office:value="1.3" calcext:value-type="float">
            <text:p>1.3</text:p>
          </table:table-cell>
          <table:table-cell table:style-name="ce172" table:formula="of:=HLOOKUP([.F13];[.$AF$25:.$AW$26];2;0)" office:value-type="float" office:value="1.6" calcext:value-type="float">
            <text:p>1.6</text:p>
          </table:table-cell>
          <table:table-cell table:style-name="ce22"/>
          <table:table-cell table:style-name="ce177" table:formula="of:=HLOOKUP([.H13];[.$AF$25:.$AW$26];2;0)" office:value-type="float" office:value="3.1" calcext:value-type="float">
            <text:p>3.1</text:p>
          </table:table-cell>
          <table:table-cell table:style-name="ce183" table:formula="of:=HLOOKUP([.I13];[.$AF$25:.$AW$26];2;0)" office:value-type="float" office:value="1.2" calcext:value-type="float">
            <text:p>1.2</text:p>
          </table:table-cell>
          <table:table-cell table:style-name="ce187" table:formula="of:=HLOOKUP([.J13];[.$AF$25:.$AW$26];2;0)" office:value-type="float" office:value="1.1" calcext:value-type="float">
            <text:p>1.1</text:p>
          </table:table-cell>
          <table:table-cell table:style-name="ce190" table:formula="of:=HLOOKUP([.K13];[.$AF$25:.$AW$26];2;0)" office:value-type="float" office:value="1.2" calcext:value-type="float">
            <text:p>1.2</text:p>
          </table:table-cell>
          <table:table-cell table:style-name="ce190" table:formula="of:=HLOOKUP([.L13];[.$AF$25:.$AW$26];2;0)" office:value-type="float" office:value="3" calcext:value-type="float">
            <text:p>3.0</text:p>
          </table:table-cell>
          <table:table-cell table:style-name="ce22"/>
          <table:table-cell table:style-name="ce195" table:formula="of:=HLOOKUP([.N13];[.$AF$25:.$AW$26];2;0)" office:value-type="float" office:value="3.1" calcext:value-type="float">
            <text:p>3.1</text:p>
          </table:table-cell>
          <table:table-cell table:style-name="ce199" table:formula="of:=HLOOKUP([.O13];[.$AF$25:.$AW$26];2;0)" office:value-type="float" office:value="1.2" calcext:value-type="float">
            <text:p>1.2</text:p>
          </table:table-cell>
          <table:table-cell table:style-name="ce204" table:formula="of:=HLOOKUP([.P13];[.$AF$25:.$AW$26];2;0)" office:value-type="float" office:value="1" calcext:value-type="float">
            <text:p>1.0</text:p>
          </table:table-cell>
          <table:table-cell table:style-name="ce208" table:formula="of:=HLOOKUP([.Q13];[.$AF$25:.$AW$26];2;0)" office:value-type="float" office:value="1.1" calcext:value-type="float">
            <text:p>1.1</text:p>
          </table:table-cell>
          <table:table-cell table:style-name="ce208" table:formula="of:=HLOOKUP([.R13];[.$AF$25:.$AW$26];2;0)" office:value-type="float" office:value="3" calcext:value-type="float">
            <text:p>3.0</text:p>
          </table:table-cell>
          <table:table-cell table:style-name="ce22"/>
          <table:table-cell table:style-name="ce215" table:formula="of:=HLOOKUP([.T13];[.$AF$25:.$AW$26];2;0)" office:value-type="float" office:value="1.6" calcext:value-type="float">
            <text:p>1.6</text:p>
          </table:table-cell>
          <table:table-cell table:style-name="ce219" table:formula="of:=HLOOKUP([.U13];[.$AF$25:.$AW$26];2;0)" office:value-type="float" office:value="1.2" calcext:value-type="float">
            <text:p>1.2</text:p>
          </table:table-cell>
          <table:table-cell table:style-name="ce222" table:formula="of:=HLOOKUP([.V13];[.$AF$25:.$AW$26];2;0)" office:value-type="float" office:value="1.1" calcext:value-type="float">
            <text:p>1.1</text:p>
          </table:table-cell>
          <table:table-cell table:style-name="ce227" table:formula="of:=HLOOKUP([.W13];[.$AF$25:.$AW$26];2;0)" office:value-type="float" office:value="1.1" calcext:value-type="float">
            <text:p>1.1</text:p>
          </table:table-cell>
          <table:table-cell table:style-name="ce226" table:formula="of:=HLOOKUP([.X13];[.$AF$25:.$AW$26];2;0)" office:value-type="float" office:value="2.3" calcext:value-type="float">
            <text:p>2.3</text:p>
          </table:table-cell>
          <table:table-cell table:style-name="ce22"/>
          <table:table-cell table:style-name="ce234" table:formula="of:=HLOOKUP([.Z13];[.$AF$25:.$AW$26];2;0)" office:value-type="float" office:value="2.1" calcext:value-type="float">
            <text:p>2.1</text:p>
          </table:table-cell>
          <table:table-cell table:style-name="ce238" table:formula="of:=HLOOKUP([.AA13];[.$AF$25:.$AW$26];2;0)" office:value-type="float" office:value="2" calcext:value-type="float">
            <text:p>2.0</text:p>
          </table:table-cell>
          <table:table-cell table:style-name="ce241" table:formula="of:=HLOOKUP([.AB13];[.$AF$25:.$AW$26];2;0)" office:value-type="float" office:value="1.2" calcext:value-type="float">
            <text:p>1.2</text:p>
          </table:table-cell>
          <table:table-cell table:style-name="ce244" table:formula="of:=HLOOKUP([.AC13];[.$AF$25:.$AW$26];2;0)" office:value-type="float" office:value="1.1" calcext:value-type="float">
            <text:p>1.1</text:p>
          </table:table-cell>
          <table:table-cell table:style-name="ce247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61" table:formula="of:=HLOOKUP([.B14];[.$AF$25:.$AW$26];2;0)" office:value-type="float" office:value="4" calcext:value-type="float">
            <text:p>4.0</text:p>
          </table:table-cell>
          <table:table-cell table:style-name="ce166" table:formula="of:=HLOOKUP([.C14];[.$AF$25:.$AW$26];2;0)" office:value-type="float" office:value="4.5" calcext:value-type="float">
            <text:p>4.5</text:p>
          </table:table-cell>
          <table:table-cell table:style-name="ce169" table:formula="of:=HLOOKUP([.D14];[.$AF$25:.$AW$26];2;0)" office:value-type="float" office:value="3.2" calcext:value-type="float">
            <text:p>3.2</text:p>
          </table:table-cell>
          <table:table-cell table:style-name="ce172" table:formula="of:=HLOOKUP([.E14];[.$AF$25:.$AW$26];2;0)" office:value-type="float" office:value="2.2" calcext:value-type="float">
            <text:p>2.2</text:p>
          </table:table-cell>
          <table:table-cell table:style-name="ce172" table:formula="of:=HLOOKUP([.F14];[.$AF$25:.$AW$26];2;0)" office:value-type="float" office:value="2.3" calcext:value-type="float">
            <text:p>2.3</text:p>
          </table:table-cell>
          <table:table-cell table:style-name="ce22"/>
          <table:table-cell table:style-name="ce177" table:formula="of:=HLOOKUP([.H14];[.$AF$25:.$AW$26];2;0)" office:value-type="float" office:value="3.5" calcext:value-type="float">
            <text:p>3.5</text:p>
          </table:table-cell>
          <table:table-cell table:style-name="ce182" table:formula="of:=HLOOKUP([.I14];[.$AF$25:.$AW$26];2;0)" office:value-type="float" office:value="2.3" calcext:value-type="float">
            <text:p>2.3</text:p>
          </table:table-cell>
          <table:table-cell table:style-name="ce187" table:formula="of:=HLOOKUP([.J14];[.$AF$25:.$AW$26];2;0)" office:value-type="float" office:value="2.1" calcext:value-type="float">
            <text:p>2.1</text:p>
          </table:table-cell>
          <table:table-cell table:style-name="ce190" table:formula="of:=HLOOKUP([.K14];[.$AF$25:.$AW$26];2;0)" office:value-type="float" office:value="1.3" calcext:value-type="float">
            <text:p>1.3</text:p>
          </table:table-cell>
          <table:table-cell table:style-name="ce190" table:formula="of:=HLOOKUP([.L14];[.$AF$25:.$AW$26];2;0)" office:value-type="float" office:value="3.2" calcext:value-type="float">
            <text:p>3.2</text:p>
          </table:table-cell>
          <table:table-cell table:style-name="ce22"/>
          <table:table-cell table:style-name="ce195" table:formula="of:=HLOOKUP([.N14];[.$AF$25:.$AW$26];2;0)" office:value-type="float" office:value="3.2" calcext:value-type="float">
            <text:p>3.2</text:p>
          </table:table-cell>
          <table:table-cell table:style-name="ce199" table:formula="of:=HLOOKUP([.O14];[.$AF$25:.$AW$26];2;0)" office:value-type="float" office:value="2.2" calcext:value-type="float">
            <text:p>2.2</text:p>
          </table:table-cell>
          <table:table-cell table:style-name="ce203" table:formula="of:=HLOOKUP([.P14];[.$AF$25:.$AW$26];2;0)" office:value-type="float" office:value="2.3" calcext:value-type="float">
            <text:p>2.3</text:p>
          </table:table-cell>
          <table:table-cell table:style-name="ce208" table:formula="of:=HLOOKUP([.Q14];[.$AF$25:.$AW$26];2;0)" office:value-type="float" office:value="1.3" calcext:value-type="float">
            <text:p>1.3</text:p>
          </table:table-cell>
          <table:table-cell table:style-name="ce208" table:formula="of:=HLOOKUP([.R14];[.$AF$25:.$AW$26];2;0)" office:value-type="float" office:value="3.5" calcext:value-type="float">
            <text:p>3.5</text:p>
          </table:table-cell>
          <table:table-cell table:style-name="ce22"/>
          <table:table-cell table:style-name="ce215" table:formula="of:=HLOOKUP([.T14];[.$AF$25:.$AW$26];2;0)" office:value-type="float" office:value="3.5" calcext:value-type="float">
            <text:p>3.5</text:p>
          </table:table-cell>
          <table:table-cell table:style-name="ce219" table:formula="of:=HLOOKUP([.U14];[.$AF$25:.$AW$26];2;0)" office:value-type="float" office:value="4.5" calcext:value-type="float">
            <text:p>4.5</text:p>
          </table:table-cell>
          <table:table-cell table:style-name="ce222" table:formula="of:=HLOOKUP([.V14];[.$AF$25:.$AW$26];2;0)" office:value-type="float" office:value="3.2" calcext:value-type="float">
            <text:p>3.2</text:p>
          </table:table-cell>
          <table:table-cell table:style-name="ce226" table:formula="of:=HLOOKUP([.W14];[.$AF$25:.$AW$26];2;0)" office:value-type="float" office:value="2.2" calcext:value-type="float">
            <text:p>2.2</text:p>
          </table:table-cell>
          <table:table-cell table:style-name="ce226" table:formula="of:=HLOOKUP([.X14];[.$AF$25:.$AW$26];2;0)" office:value-type="float" office:value="3" calcext:value-type="float">
            <text:p>3.0</text:p>
          </table:table-cell>
          <table:table-cell table:style-name="ce22"/>
          <table:table-cell table:style-name="ce234" table:formula="of:=HLOOKUP([.Z14];[.$AF$25:.$AW$26];2;0)" office:value-type="float" office:value="3.5" calcext:value-type="float">
            <text:p>3.5</text:p>
          </table:table-cell>
          <table:table-cell table:style-name="ce238" table:formula="of:=HLOOKUP([.AA14];[.$AF$25:.$AW$26];2;0)" office:value-type="float" office:value="4" calcext:value-type="float">
            <text:p>4.0</text:p>
          </table:table-cell>
          <table:table-cell table:style-name="ce241" table:formula="of:=HLOOKUP([.AB14];[.$AF$25:.$AW$26];2;0)" office:value-type="float" office:value="4.5" calcext:value-type="float">
            <text:p>4.5</text:p>
          </table:table-cell>
          <table:table-cell table:style-name="ce244" table:formula="of:=HLOOKUP([.AC14];[.$AF$25:.$AW$26];2;0)" office:value-type="float" office:value="3.2" calcext:value-type="float">
            <text:p>3.2</text:p>
          </table:table-cell>
          <table:table-cell table:style-name="ce244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2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62" table:formula="of:=HLOOKUP([.B16];[.$AF$25:.$AW$26];2;0)" office:value-type="float" office:value="4" calcext:value-type="float">
            <text:p>4.0</text:p>
          </table:table-cell>
          <table:table-cell table:style-name="ce167" table:formula="of:=HLOOKUP([.C16];[.$AF$25:.$AW$26];2;0)" office:value-type="float" office:value="4.5" calcext:value-type="float">
            <text:p>4.5</text:p>
          </table:table-cell>
          <table:table-cell table:style-name="ce170" table:formula="of:=HLOOKUP([.D16];[.$AF$25:.$AW$26];2;0)" office:value-type="float" office:value="3.5" calcext:value-type="float">
            <text:p>3.5</text:p>
          </table:table-cell>
          <table:table-cell table:style-name="ce173" table:formula="of:=HLOOKUP([.E16];[.$AF$25:.$AW$26];2;0)" office:value-type="float" office:value="3.2" calcext:value-type="float">
            <text:p>3.2</text:p>
          </table:table-cell>
          <table:table-cell table:style-name="ce173" table:formula="of:=HLOOKUP([.F16];[.$AF$25:.$AW$26];2;0)" office:value-type="float" office:value="3.1" calcext:value-type="float">
            <text:p>3.1</text:p>
          </table:table-cell>
          <table:table-cell table:style-name="ce22"/>
          <table:table-cell table:style-name="ce178" table:formula="of:=HLOOKUP([.H16];[.$AF$25:.$AW$26];2;0)" office:value-type="float" office:value="4.5" calcext:value-type="float">
            <text:p>4.5</text:p>
          </table:table-cell>
          <table:table-cell table:style-name="ce184" table:formula="of:=HLOOKUP([.I16];[.$AF$25:.$AW$26];2;0)" office:value-type="float" office:value="3.5" calcext:value-type="float">
            <text:p>3.5</text:p>
          </table:table-cell>
          <table:table-cell table:style-name="ce188" table:formula="of:=HLOOKUP([.J16];[.$AF$25:.$AW$26];2;0)" office:value-type="float" office:value="3" calcext:value-type="float">
            <text:p>3.0</text:p>
          </table:table-cell>
          <table:table-cell table:style-name="ce191" table:formula="of:=HLOOKUP([.K16];[.$AF$25:.$AW$26];2;0)" office:value-type="float" office:value="3.1" calcext:value-type="float">
            <text:p>3.1</text:p>
          </table:table-cell>
          <table:table-cell table:style-name="ce191" table:formula="of:=HLOOKUP([.L16];[.$AF$25:.$AW$26];2;0)" office:value-type="float" office:value="3.2" calcext:value-type="float">
            <text:p>3.2</text:p>
          </table:table-cell>
          <table:table-cell table:style-name="ce22"/>
          <table:table-cell table:style-name="ce196" table:formula="of:=HLOOKUP([.N16];[.$AF$25:.$AW$26];2;0)" office:value-type="float" office:value="4.5" calcext:value-type="float">
            <text:p>4.5</text:p>
          </table:table-cell>
          <table:table-cell table:style-name="ce200" table:formula="of:=HLOOKUP([.O16];[.$AF$25:.$AW$26];2;0)" office:value-type="float" office:value="4" calcext:value-type="float">
            <text:p>4.0</text:p>
          </table:table-cell>
          <table:table-cell table:style-name="ce205" table:formula="of:=HLOOKUP([.P16];[.$AF$25:.$AW$26];2;0)" office:value-type="float" office:value="3" calcext:value-type="float">
            <text:p>3.0</text:p>
          </table:table-cell>
          <table:table-cell table:style-name="ce209" table:formula="of:=HLOOKUP([.Q16];[.$AF$25:.$AW$26];2;0)" office:value-type="float" office:value="3.1" calcext:value-type="float">
            <text:p>3.1</text:p>
          </table:table-cell>
          <table:table-cell table:style-name="ce209" table:formula="of:=HLOOKUP([.R16];[.$AF$25:.$AW$26];2;0)" office:value-type="float" office:value="3.5" calcext:value-type="float">
            <text:p>3.5</text:p>
          </table:table-cell>
          <table:table-cell table:style-name="ce22"/>
          <table:table-cell table:style-name="ce216" table:formula="of:=HLOOKUP([.T16];[.$AF$25:.$AW$26];2;0)" office:value-type="float" office:value="4.5" calcext:value-type="float">
            <text:p>4.5</text:p>
          </table:table-cell>
          <table:table-cell table:style-name="ce220" table:formula="of:=HLOOKUP([.U16];[.$AF$25:.$AW$26];2;0)" office:value-type="float" office:value="3.1" calcext:value-type="float">
            <text:p>3.1</text:p>
          </table:table-cell>
          <table:table-cell table:style-name="ce223" table:formula="of:=HLOOKUP([.V16];[.$AF$25:.$AW$26];2;0)" office:value-type="float" office:value="2.3" calcext:value-type="float">
            <text:p>2.3</text:p>
          </table:table-cell>
          <table:table-cell table:style-name="ce228" table:formula="of:=HLOOKUP([.W16];[.$AF$25:.$AW$26];2;0)" office:value-type="float" office:value="3.5" calcext:value-type="float">
            <text:p>3.5</text:p>
          </table:table-cell>
          <table:table-cell table:style-name="ce228" table:formula="of:=HLOOKUP([.X16];[.$AF$25:.$AW$26];2;0)" office:value-type="float" office:value="4" calcext:value-type="float">
            <text:p>4.0</text:p>
          </table:table-cell>
          <table:table-cell table:style-name="ce22"/>
          <table:table-cell table:style-name="ce235" table:formula="of:=HLOOKUP([.Z16];[.$AF$25:.$AW$26];2;0)" office:value-type="float" office:value="4" calcext:value-type="float">
            <text:p>4.0</text:p>
          </table:table-cell>
          <table:table-cell table:style-name="ce239" table:formula="of:=HLOOKUP([.AA16];[.$AF$25:.$AW$26];2;0)" office:value-type="float" office:value="4.5" calcext:value-type="float">
            <text:p>4.5</text:p>
          </table:table-cell>
          <table:table-cell table:style-name="ce242" table:formula="of:=HLOOKUP([.AB16];[.$AF$25:.$AW$26];2;0)" office:value-type="float" office:value="3.5" calcext:value-type="float">
            <text:p>3.5</text:p>
          </table:table-cell>
          <table:table-cell table:style-name="ce245" table:formula="of:=HLOOKUP([.AC16];[.$AF$25:.$AW$26];2;0)" office:value-type="float" office:value="3.2" calcext:value-type="float">
            <text:p>3.2</text:p>
          </table:table-cell>
          <table:table-cell table:style-name="ce245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63" table:formula="of:=HLOOKUP([.B17];[.$AF$25:.$AW$26];2;0)" office:value-type="float" office:value="3" calcext:value-type="float">
            <text:p>3.0</text:p>
          </table:table-cell>
          <table:table-cell table:style-name="ce167" table:formula="of:=HLOOKUP([.C17];[.$AF$25:.$AW$26];2;0)" office:value-type="float" office:value="2.3" calcext:value-type="float">
            <text:p>2.3</text:p>
          </table:table-cell>
          <table:table-cell table:style-name="ce170" table:formula="of:=HLOOKUP([.D17];[.$AF$25:.$AW$26];2;0)" office:value-type="float" office:value="1.6" calcext:value-type="float">
            <text:p>1.6</text:p>
          </table:table-cell>
          <table:table-cell table:style-name="ce173" table:formula="of:=HLOOKUP([.E17];[.$AF$25:.$AW$26];2;0)" office:value-type="float" office:value="2" calcext:value-type="float">
            <text:p>2.0</text:p>
          </table:table-cell>
          <table:table-cell table:style-name="ce173" table:formula="of:=HLOOKUP([.F17];[.$AF$25:.$AW$26];2;0)" office:value-type="float" office:value="2.1" calcext:value-type="float">
            <text:p>2.1</text:p>
          </table:table-cell>
          <table:table-cell table:style-name="ce22"/>
          <table:table-cell table:style-name="ce179" table:formula="of:=HLOOKUP([.H17];[.$AF$25:.$AW$26];2;0)" office:value-type="float" office:value="4" calcext:value-type="float">
            <text:p>4.0</text:p>
          </table:table-cell>
          <table:table-cell table:style-name="ce184" table:formula="of:=HLOOKUP([.I17];[.$AF$25:.$AW$26];2;0)" office:value-type="float" office:value="2.1" calcext:value-type="float">
            <text:p>2.1</text:p>
          </table:table-cell>
          <table:table-cell table:style-name="ce188" table:formula="of:=HLOOKUP([.J17];[.$AF$25:.$AW$26];2;0)" office:value-type="float" office:value="1.3" calcext:value-type="float">
            <text:p>1.3</text:p>
          </table:table-cell>
          <table:table-cell table:style-name="ce191" table:formula="of:=HLOOKUP([.K17];[.$AF$25:.$AW$26];2;0)" office:value-type="float" office:value="1.6" calcext:value-type="float">
            <text:p>1.6</text:p>
          </table:table-cell>
          <table:table-cell table:style-name="ce191" table:formula="of:=HLOOKUP([.L17];[.$AF$25:.$AW$26];2;0)" office:value-type="float" office:value="2" calcext:value-type="float">
            <text:p>2.0</text:p>
          </table:table-cell>
          <table:table-cell table:style-name="ce22"/>
          <table:table-cell table:style-name="ce197" table:formula="of:=HLOOKUP([.N17];[.$AF$25:.$AW$26];2;0)" office:value-type="float" office:value="3.2" calcext:value-type="float">
            <text:p>3.2</text:p>
          </table:table-cell>
          <table:table-cell table:style-name="ce200" table:formula="of:=HLOOKUP([.O17];[.$AF$25:.$AW$26];2;0)" office:value-type="float" office:value="2.1" calcext:value-type="float">
            <text:p>2.1</text:p>
          </table:table-cell>
          <table:table-cell table:style-name="ce205" table:formula="of:=HLOOKUP([.P17];[.$AF$25:.$AW$26];2;0)" office:value-type="float" office:value="1.6" calcext:value-type="float">
            <text:p>1.6</text:p>
          </table:table-cell>
          <table:table-cell table:style-name="ce209" table:formula="of:=HLOOKUP([.Q17];[.$AF$25:.$AW$26];2;0)" office:value-type="float" office:value="1.3" calcext:value-type="float">
            <text:p>1.3</text:p>
          </table:table-cell>
          <table:table-cell table:style-name="ce209" table:formula="of:=HLOOKUP([.R17];[.$AF$25:.$AW$26];2;0)" office:value-type="float" office:value="2.3" calcext:value-type="float">
            <text:p>2.3</text:p>
          </table:table-cell>
          <table:table-cell table:style-name="ce22"/>
          <table:table-cell table:style-name="ce217" table:formula="of:=HLOOKUP([.T17];[.$AF$25:.$AW$26];2;0)" office:value-type="float" office:value="2" calcext:value-type="float">
            <text:p>2.0</text:p>
          </table:table-cell>
          <table:table-cell table:style-name="ce220" table:formula="of:=HLOOKUP([.U17];[.$AF$25:.$AW$26];2;0)" office:value-type="float" office:value="1.6" calcext:value-type="float">
            <text:p>1.6</text:p>
          </table:table-cell>
          <table:table-cell table:style-name="ce223" table:formula="of:=HLOOKUP([.V17];[.$AF$25:.$AW$26];2;0)" office:value-type="float" office:value="1.3" calcext:value-type="float">
            <text:p>1.3</text:p>
          </table:table-cell>
          <table:table-cell table:style-name="ce228" table:formula="of:=HLOOKUP([.W17];[.$AF$25:.$AW$26];2;0)" office:value-type="float" office:value="2.2" calcext:value-type="float">
            <text:p>2.2</text:p>
          </table:table-cell>
          <table:table-cell table:style-name="ce228" table:formula="of:=HLOOKUP([.X17];[.$AF$25:.$AW$26];2;0)" office:value-type="float" office:value="3.2" calcext:value-type="float">
            <text:p>3.2</text:p>
          </table:table-cell>
          <table:table-cell table:style-name="ce22"/>
          <table:table-cell table:style-name="ce236" table:formula="of:=HLOOKUP([.Z17];[.$AF$25:.$AW$26];2;0)" office:value-type="float" office:value="2.2" calcext:value-type="float">
            <text:p>2.2</text:p>
          </table:table-cell>
          <table:table-cell table:style-name="ce239" table:formula="of:=HLOOKUP([.AA17];[.$AF$25:.$AW$26];2;0)" office:value-type="float" office:value="2" calcext:value-type="float">
            <text:p>2.0</text:p>
          </table:table-cell>
          <table:table-cell table:style-name="ce242" table:formula="of:=HLOOKUP([.AB17];[.$AF$25:.$AW$26];2;0)" office:value-type="float" office:value="1.3" calcext:value-type="float">
            <text:p>1.3</text:p>
          </table:table-cell>
          <table:table-cell table:style-name="ce245" table:formula="of:=HLOOKUP([.AC17];[.$AF$25:.$AW$26];2;0)" office:value-type="float" office:value="1.2" calcext:value-type="float">
            <text:p>1.2</text:p>
          </table:table-cell>
          <table:table-cell table:style-name="ce245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64" table:formula="of:=HLOOKUP([.B18];[.$AF$25:.$AW$26];2;0)" office:value-type="float" office:value="3.5" calcext:value-type="float">
            <text:p>3.5</text:p>
          </table:table-cell>
          <table:table-cell table:style-name="ce167" table:formula="of:=HLOOKUP([.C18];[.$AF$25:.$AW$26];2;0)" office:value-type="float" office:value="1.1" calcext:value-type="float">
            <text:p>1.1</text:p>
          </table:table-cell>
          <table:table-cell table:style-name="ce170" table:formula="of:=HLOOKUP([.D18];[.$AF$25:.$AW$26];2;0)" office:value-type="float" office:value="1.2" calcext:value-type="float">
            <text:p>1.2</text:p>
          </table:table-cell>
          <table:table-cell table:style-name="ce173" table:formula="of:=HLOOKUP([.E18];[.$AF$25:.$AW$26];2;0)" office:value-type="float" office:value="1.3" calcext:value-type="float">
            <text:p>1.3</text:p>
          </table:table-cell>
          <table:table-cell table:style-name="ce173" table:formula="of:=HLOOKUP([.F18];[.$AF$25:.$AW$26];2;0)" office:value-type="float" office:value="2.2" calcext:value-type="float">
            <text:p>2.2</text:p>
          </table:table-cell>
          <table:table-cell table:style-name="ce22"/>
          <table:table-cell table:style-name="ce179" table:formula="of:=HLOOKUP([.H18];[.$AF$25:.$AW$26];2;0)" office:value-type="float" office:value="2.2" calcext:value-type="float">
            <text:p>2.2</text:p>
          </table:table-cell>
          <table:table-cell table:style-name="ce185" table:formula="of:=HLOOKUP([.I18];[.$AF$25:.$AW$26];2;0)" office:value-type="float" office:value="3.1" calcext:value-type="float">
            <text:p>3.1</text:p>
          </table:table-cell>
          <table:table-cell table:style-name="ce188" table:formula="of:=HLOOKUP([.J18];[.$AF$25:.$AW$26];2;0)" office:value-type="float" office:value="1.1" calcext:value-type="float">
            <text:p>1.1</text:p>
          </table:table-cell>
          <table:table-cell table:style-name="ce191" table:formula="of:=HLOOKUP([.K18];[.$AF$25:.$AW$26];2;0)" office:value-type="float" office:value="1.2" calcext:value-type="float">
            <text:p>1.2</text:p>
          </table:table-cell>
          <table:table-cell table:style-name="ce191" table:formula="of:=HLOOKUP([.L18];[.$AF$25:.$AW$26];2;0)" office:value-type="float" office:value="2.3" calcext:value-type="float">
            <text:p>2.3</text:p>
          </table:table-cell>
          <table:table-cell table:style-name="ce22"/>
          <table:table-cell table:style-name="ce197" table:formula="of:=HLOOKUP([.N18];[.$AF$25:.$AW$26];2;0)" office:value-type="float" office:value="2" calcext:value-type="float">
            <text:p>2.0</text:p>
          </table:table-cell>
          <table:table-cell table:style-name="ce200" table:formula="of:=HLOOKUP([.O18];[.$AF$25:.$AW$26];2;0)" office:value-type="float" office:value="1.2" calcext:value-type="float">
            <text:p>1.2</text:p>
          </table:table-cell>
          <table:table-cell table:style-name="ce206" table:formula="of:=HLOOKUP([.P18];[.$AF$25:.$AW$26];2;0)" office:value-type="float" office:value="3" calcext:value-type="float">
            <text:p>3.0</text:p>
          </table:table-cell>
          <table:table-cell table:style-name="ce209" table:formula="of:=HLOOKUP([.Q18];[.$AF$25:.$AW$26];2;0)" office:value-type="float" office:value="1.1" calcext:value-type="float">
            <text:p>1.1</text:p>
          </table:table-cell>
          <table:table-cell table:style-name="ce209" table:formula="of:=HLOOKUP([.R18];[.$AF$25:.$AW$26];2;0)" office:value-type="float" office:value="2.2" calcext:value-type="float">
            <text:p>2.2</text:p>
          </table:table-cell>
          <table:table-cell table:style-name="ce22"/>
          <table:table-cell table:style-name="ce217" table:formula="of:=HLOOKUP([.T18];[.$AF$25:.$AW$26];2;0)" office:value-type="float" office:value="2.1" calcext:value-type="float">
            <text:p>2.1</text:p>
          </table:table-cell>
          <table:table-cell table:style-name="ce220" table:formula="of:=HLOOKUP([.U18];[.$AF$25:.$AW$26];2;0)" office:value-type="float" office:value="1.2" calcext:value-type="float">
            <text:p>1.2</text:p>
          </table:table-cell>
          <table:table-cell table:style-name="ce223" table:formula="of:=HLOOKUP([.V18];[.$AF$25:.$AW$26];2;0)" office:value-type="float" office:value="1.1" calcext:value-type="float">
            <text:p>1.1</text:p>
          </table:table-cell>
          <table:table-cell table:style-name="ce229" table:formula="of:=HLOOKUP([.W18];[.$AF$25:.$AW$26];2;0)" office:value-type="float" office:value="1.6" calcext:value-type="float">
            <text:p>1.6</text:p>
          </table:table-cell>
          <table:table-cell table:style-name="ce228" table:formula="of:=HLOOKUP([.X18];[.$AF$25:.$AW$26];2;0)" office:value-type="float" office:value="3" calcext:value-type="float">
            <text:p>3.0</text:p>
          </table:table-cell>
          <table:table-cell table:style-name="ce22"/>
          <table:table-cell table:style-name="ce236" table:formula="of:=HLOOKUP([.Z18];[.$AF$25:.$AW$26];2;0)" office:value-type="float" office:value="2.3" calcext:value-type="float">
            <text:p>2.3</text:p>
          </table:table-cell>
          <table:table-cell table:style-name="ce239" table:formula="of:=HLOOKUP([.AA18];[.$AF$25:.$AW$26];2;0)" office:value-type="float" office:value="2.1" calcext:value-type="float">
            <text:p>2.1</text:p>
          </table:table-cell>
          <table:table-cell table:style-name="ce242" table:formula="of:=HLOOKUP([.AB18];[.$AF$25:.$AW$26];2;0)" office:value-type="float" office:value="1.6" calcext:value-type="float">
            <text:p>1.6</text:p>
          </table:table-cell>
          <table:table-cell table:style-name="ce245" table:formula="of:=HLOOKUP([.AC18];[.$AF$25:.$AW$26];2;0)" office:value-type="float" office:value="1.1" calcext:value-type="float">
            <text:p>1.1</text:p>
          </table:table-cell>
          <table:table-cell table:style-name="ce248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60"/>
        <table:table-column table:style-name="co1" table:default-cell-style-name="ce536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44"/>
        <table:table-column table:style-name="co1" table:default-cell-style-name="Default"/>
        <table:table-column table:style-name="co1" table:default-cell-style-name="ce570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36"/>
        <table:table-column table:style-name="co1" table:default-cell-style-name="ce560"/>
        <table:table-column table:style-name="co1" table:default-cell-style-name="ce538"/>
        <table:table-column table:style-name="co1" table:default-cell-style-name="ce581"/>
        <table:table-column table:style-name="co1" table:number-columns-repeated="2" table:default-cell-style-name="Default"/>
        <table:table-column table:style-name="co1" table:default-cell-style-name="ce544"/>
        <table:table-column table:style-name="co1" table:default-cell-style-name="ce560"/>
        <table:table-column table:style-name="co1" table:default-cell-style-name="ce570"/>
        <table:table-column table:style-name="co1" table:default-cell-style-name="Default"/>
        <table:table-column table:style-name="co1" table:default-cell-style-name="ce581"/>
        <table:table-column table:style-name="co1" table:number-columns-repeated="7" table:default-cell-style-name="Default"/>
        <table:table-column table:style-name="co1" table:default-cell-style-name="ce540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 table:number-columns-repeated="2"/>
          <table:table-cell table:style-name="ce68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Default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7"/>
          <table:table-cell table:style-name="ce718" office:value-type="float" office:value="3" calcext:value-type="float">
            <text:p>3</text:p>
          </table:table-cell>
          <table:table-cell table:style-name="ce721" office:value-type="float" office:value="1" calcext:value-type="float">
            <text:p>1</text:p>
          </table:table-cell>
          <table:table-cell table:style-name="ce724" office:value-type="float" office:value="0" calcext:value-type="float">
            <text:p>0</text:p>
          </table:table-cell>
          <table:table-cell table:style-name="ce725" office:value-type="float" office:value="1" calcext:value-type="float">
            <text:p>1</text:p>
          </table:table-cell>
          <table:table-cell table:style-name="ce718" office:value-type="float" office:value="3" calcext:value-type="float">
            <text:p>3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7"/>
          <table:table-cell table:style-name="ce719" office:value-type="float" office:value="1" calcext:value-type="float">
            <text:p>1</text:p>
          </table:table-cell>
          <table:table-cell table:number-columns-repeated="3" table:style-name="ce722" office:value-type="float" office:value="0" calcext:value-type="float">
            <text:p>0</text:p>
          </table:table-cell>
          <table:table-cell table:style-name="ce727" office:value-type="float" office:value="1" calcext:value-type="float">
            <text:p>1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3"/>
          <table:table-cell table:number-columns-repeated="6"/>
          <table:table-cell table:style-name="ce720" office:value-type="float" office:value="2" calcext:value-type="float">
            <text:p>2</text:p>
          </table:table-cell>
          <table:table-cell table:style-name="ce723" office:value-type="float" office:value="2" calcext:value-type="float">
            <text:p>2</text:p>
          </table:table-cell>
          <table:table-cell table:style-name="ce723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28" office:value-type="float" office:value="1" calcext:value-type="float">
            <text:p>1</text:p>
          </table:table-cell>
          <table:table-cell table:style-name="ce701" table:number-columns-repeated="2"/>
          <table:table-cell table:style-name="ce729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table:style-name="ce542"/>
          <table:table-cell table:style-name="ce537"/>
          <table:table-cell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68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15"/>
          <table:table-cell table:style-name="ce729" table:number-columns-repeated="3"/>
          <table:table-cell table:style-name="ce540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38"/>
          <table:table-cell/>
          <table:covered-table-cell table:style-name="ce38"/>
          <table:covered-table-cell table:number-columns-repeated="2" table:style-name="ce590"/>
          <table:covered-table-cell table:style-name="ce68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266"/>
          <table:table-cell table:style-name="ce266" table:number-columns-repeated="4"/>
          <table:table-cell table:style-name="ce714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266"/>
          <table:table-cell table:style-name="ce266" table:number-columns-repeated="4"/>
          <table:table-cell table:style-name="ce714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266"/>
          <table:table-cell table:style-name="ce266" table:number-columns-repeated="4"/>
          <table:table-cell table:style-name="ce714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266"/>
          <table:table-cell table:style-name="ce266" table:number-columns-repeated="4"/>
          <table:table-cell table:style-name="ce714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266"/>
          <table:table-cell table:style-name="ce266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3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543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5" table:formula="of:=[.$AF$4]+[.$U$2]+[.$U$4]" office:value-type="float" office:value="4" calcext:value-type="float">
            <text:p>4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2]+[.$U$4]" office:value-type="float" office:value="4" calcext:value-type="float">
            <text:p>4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2]+[.$U$4]" office:value-type="float" office:value="3" calcext:value-type="float">
            <text:p>3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5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1"/>
          <table:table-cell table:style-name="ce708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708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00"/>
          <table:table-cell table:style-name="ce541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00"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708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708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708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708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708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708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4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4"/>
          <table:table-cell table:style-name="ce714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6" table:formula="of:=[.$AF$2]+[.$U$2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4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2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3]" office:value-type="float" office:value="3" calcext:value-type="float">
            <text:p>3</text:p>
          </table:table-cell>
          <table:table-cell table:style-name="ce621" table:formula="of:=[.$AH$2]+[.$U$2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5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97"/>
          <table:table-cell table:style-name="ce546" table:formula="of:=[.$AF$2]+[.$U$4]+[.$U$5]" office:value-type="float" office:value="5" calcext:value-type="float">
            <text:p>5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40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7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style-name="ce547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7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7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7" table:formula="of:=[.$AJ$3]" office:value-type="float" office:value="1" calcext:value-type="float">
            <text:p>1</text:p>
          </table:table-cell>
          <table:table-cell table:style-name="ce540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5" table:formula="of:=[.$AF$4]+[.$U$2]" office:value-type="float" office:value="3" calcext:value-type="float">
            <text:p>3</text:p>
          </table:table-cell>
          <table:table-cell table:style-name="ce612" table:formula="of:=[.$AG$4]+[.$U$3]" office:value-type="float" office:value="4" calcext:value-type="float">
            <text:p>4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4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2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2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3]" office:value-type="float" office:value="3" calcext:value-type="float">
            <text:p>3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98"/>
          <table:table-cell table:style-name="ce545" table:formula="of:=[.$AF$4]+[.$U$5]+[.$U$4]" office:value-type="float" office:value="4" calcext:value-type="float">
            <text:p>4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94" table:number-columns-repeated="5"/>
          <table:table-cell/>
          <table:table-cell table:style-name="ce594" table:number-columns-repeated="5"/>
          <table:table-cell/>
          <table:table-cell table:style-name="ce594" table:number-columns-repeated="17"/>
          <table:table-cell table:style-name="ce540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709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713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40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709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40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709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709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709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40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594"/>
          <table:table-cell table:style-name="ce594" table:number-columns-repeated="4"/>
          <table:table-cell table:style-name="ce714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6" table:formula="of:=[.$AF$2]+[.$U$2]+[.$U$4]" office:value-type="float" office:value="5" calcext:value-type="float">
            <text:p>5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5]+[.$U$4]" office:value-type="float" office:value="2" calcext:value-type="float">
            <text:p>2</text:p>
          </table:table-cell>
          <table:table-cell table:style-name="ce591" table:formula="of:=[.$AI$2]+[.$U$4]+[.$U$5]" office:value-type="float" office:value="3" calcext:value-type="float">
            <text:p>3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2]+[.$U$4]" office:value-type="float" office:value="3" calcext:value-type="float">
            <text:p>3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2]+[.$U$4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+[.$U$3]+[.$U$4]" office:value-type="float" office:value="4" calcext:value-type="float">
            <text:p>4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4]+[.$U$2]" office:value-type="float" office:value="5" calcext:value-type="float">
            <text:p>5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3]+[.$U$4]" office:value-type="float" office:value="3" calcext:value-type="float">
            <text:p>3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2]+[.$U$4]" office:value-type="float" office:value="5" calcext:value-type="float">
            <text:p>5</text:p>
          </table:table-cell>
          <table:table-cell table:style-name="ce540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544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+[.$U$5]" office:value-type="float" office:value="2" calcext:value-type="float">
            <text:p>2</text:p>
          </table:table-cell>
          <table:table-cell table:style-name="ce594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3]" office:value-type="float" office:value="4" calcext:value-type="float">
            <text:p>4</text:p>
          </table:table-cell>
          <table:table-cell table:style-name="ce560"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3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543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4]" office:value-type="float" office:value="1" calcext:value-type="float">
            <text:p>1</text:p>
          </table:table-cell>
          <table:table-cell table:style-name="ce540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6" table:number-columns-repeated="29"/>
          <table:table-cell table:style-name="ce540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710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710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710"/>
          <table:table-cell table:style-name="ce710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710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40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710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710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40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710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710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40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0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68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ce652" office:value-type="float" office:value="14" calcext:value-type="float">
            <text:p>14</text:p>
          </table:table-cell>
          <table:table-cell table:style-name="ce662" office:value-type="float" office:value="6" calcext:value-type="float">
            <text:p>6</text:p>
          </table:table-cell>
          <table:table-cell table:style-name="ce668" office:value-type="float" office:value="3" calcext:value-type="float">
            <text:p>3</text:p>
          </table:table-cell>
          <table:table-cell table:style-name="ce673" office:value-type="float" office:value="7" calcext:value-type="float">
            <text:p>7</text:p>
          </table:table-cell>
          <table:table-cell table:style-name="ce652" office:value-type="float" office:value="13" calcext:value-type="float">
            <text:p>13</text:p>
          </table:table-cell>
          <table:table-cell table:number-columns-repeated="2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53" office:value-type="float" office:value="5" calcext:value-type="float">
            <text:p>5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54" office:value-type="float" office:value="12" calcext:value-type="float">
            <text:p>12</text:p>
          </table:table-cell>
          <table:table-cell table:style-name="ce664" office:value-type="float" office:value="10" calcext:value-type="float">
            <text:p>10</text:p>
          </table:table-cell>
          <table:table-cell table:style-name="ce669" office:value-type="float" office:value="8" calcext:value-type="float">
            <text:p>8</text:p>
          </table:table-cell>
          <table:table-cell table:style-name="ce674" office:value-type="float" office:value="4" calcext:value-type="float">
            <text:p>4</text:p>
          </table:table-cell>
          <table:table-cell table:style-name="ce664" office:value-type="float" office:value="11" calcext:value-type="float">
            <text:p>11</text:p>
          </table:table-cell>
          <table:table-cell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68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8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38"/>
          <table:table-cell/>
          <table:covered-table-cell table:style-name="ce38"/>
          <table:covered-table-cell table:number-columns-repeated="2" table:style-name="ce590"/>
          <table:covered-table-cell table:style-name="ce68"/>
          <table:table-cell table:style-name="ce4" table:number-columns-repeated="4"/>
          <table:table-cell table:number-columns-repeated="27"/>
          <table:table-cell table:style-name="ce701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08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4" table:formula="of:=[.$T$3]+[.$AA$2]" office:value-type="float" office:value="6" calcext:value-type="float">
            <text:p>6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08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5" table:formula="of:=[.$T$4]+[.$AA$2]+[.$AA$4]" office:value-type="float" office:value="14" calcext:value-type="float">
            <text:p>14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612" table:formula="of:=[.$U$4]+[.$AA$2]+[.$AA$4]" office:value-type="float" office:value="12" calcext:value-type="float">
            <text:p>12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642" table:formula="of:=[.$V$4]+[.$AA$2]+[.$AA$4]" office:value-type="float" office:value="10" calcext:value-type="float">
            <text:p>10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1"/>
          <table:table-cell table:style-name="ce546" table:formula="of:=[.$T$2]+[.$AA$2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91" table:formula="of:=[.$X$2]+[.$AA$4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613" table:formula="of:=[.$U$2]+[.$AA$2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564" table:formula="of:=[.$U$2]+[.$AA$3]" office:value-type="float" office:value="8" calcext:value-type="float">
            <text:p>8</text:p>
          </table:table-cell>
          <table:table-cell table:style-name="ce621" table:formula="of:=[.$V$2]+[.$AA$2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55" table:formula="of:=[.$T$2]+[.$AA$5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 table:style-name="ce597"/>
          <table:table-cell table:style-name="ce655" table:formula="of:=[.$T$2]+[.$AA$4]+[.$AA$5]" office:value-type="float" office:value="16" calcext:value-type="float">
            <text:p>16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00"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7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47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7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7" table:formula="of:=[.$W$3]" office:value-type="float" office:value="0" calcext:value-type="float">
            <text:p>0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7" table:formula="of:=[.$X$3]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5" table:formula="of:=[.$T$4]+[.$AA$2]" office:value-type="float" office:value="13" calcext:value-type="float">
            <text:p>13</text:p>
          </table:table-cell>
          <table:table-cell table:style-name="ce562" table:formula="of:=[.$U$4]+[.$AA$3]" office:value-type="float" office:value="12" calcext:value-type="float">
            <text:p>12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92" table:formula="of:=[.$X$4]+[.$AA$4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12" table:formula="of:=[.$U$4]+[.$AA$2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642" table:formula="of:=[.$V$4]+[.$AA$2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2" table:formula="of:=[.$V$4]+[.$AA$3]" office:value-type="float" office:value="10" calcext:value-type="float">
            <text:p>10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+[.$AA$4]" office:value-type="float" office:value="14" calcext:value-type="float">
            <text:p>14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709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0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709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6" table:formula="of:=[.$T$2]+[.$AA$2]+[.$AA$4]" office:value-type="float" office:value="16" calcext:value-type="float">
            <text:p>16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573" table:formula="of:=[.$V$2]+[.$AA$5]+[.$AA$4]" office:value-type="float" office:value="5" calcext:value-type="float">
            <text:p>5</text:p>
          </table:table-cell>
          <table:table-cell table:style-name="ce584" table:formula="of:=[.$W$2]+[.$AA$4]+[.$AA$5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613" table:formula="of:=[.$U$2]+[.$AA$2]+[.$AA$4]" office:value-type="float" office:value="8" calcext:value-type="float">
            <text:p>8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84" table:formula="of:=[.$W$2]+[.$AA$5]+[.$AA$4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546" table:formula="of:=[.$T$2]+[.$AA$3]+[.$AA$4]" office:value-type="float" office:value="17" calcext:value-type="float">
            <text:p>17</text:p>
          </table:table-cell>
          <table:table-cell table:style-name="ce613" table:formula="of:=[.$U$2]+[.$AA$3]+[.$AA$4]" office:value-type="float" office:value="9" calcext:value-type="float">
            <text:p>9</text:p>
          </table:table-cell>
          <table:table-cell table:style-name="ce621" table:formula="of:=[.$V$2]+[.$AA$2]+[.$AA$4]" office:value-type="float" office:value="5" calcext:value-type="float">
            <text:p>5</text:p>
          </table:table-cell>
          <table:table-cell table:style-name="ce591" table:formula="of:=[.$W$2]+[.$AA$3]+[.$AA$4]" office:value-type="float" office:value="10" calcext:value-type="float">
            <text:p>10</text:p>
          </table:table-cell>
          <table:table-cell table:style-name="ce591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+[.$AA$3]+[.$AA$4]" office:value-type="float" office:value="9" calcext:value-type="float">
            <text:p>9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4]+[.$AA$2]" office:value-type="float" office:value="15" calcext:value-type="float">
            <text:p>15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696" table:formula="of:=[.$V$2]+[.$AA$3]+[.$AA$4]" office:value-type="float" office:value="6" calcext:value-type="float">
            <text:p>6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2]+[.$AA$4]" office:value-type="float" office:value="15" calcext:value-type="float">
            <text:p>15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710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710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710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4" table:formula="of:=[.$T$3]+[.$AA$2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2" table:formula="of:=[.$X$3]+[.$AA$4]+[.$AA$5]" office:value-type="float" office:value="11" calcext:value-type="float">
            <text:p>11</text:p>
          </table:table-cell>
          <table:table-cell table:style-name="ce594"/>
          <table:table-cell table:style-name="ce604" table:formula="of:=[.$T$3]+[.$AA$3]" office:value-type="float" office:value="7" calcext:value-type="float">
            <text:p>7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628" table:formula="of:=[.$X$3]+[.$AA$3]" office:value-type="float" office:value="11" calcext:value-type="float">
            <text:p>11</text:p>
          </table:table-cell>
          <table:table-cell table:style-name="ce594"/>
          <table:table-cell table:style-name="ce544" table:formula="of:=[.$T$3]+[.$AA$3]" office:value-type="float" office:value="7" calcext:value-type="float">
            <text:p>7</text:p>
          </table:table-cell>
          <table:table-cell table:style-name="ce560" table:formula="of:=[.$U$3]+[.$AA$3]" office:value-type="float" office:value="4" calcext:value-type="float">
            <text:p>4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+[.$AA$3]" office:value-type="float" office:value="2" calcext:value-type="float">
            <text:p>2</text:p>
          </table:table-cell>
          <table:table-cell table:style-name="ce581" table:formula="of:=[.$X$3]+[.$AA$3]" office:value-type="float" office:value="11" calcext:value-type="float">
            <text:p>11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4" table:formula="of:=[.$T$3]+[.$AA$4]+[.$AA$3]" office:value-type="float" office:value="8" calcext:value-type="float">
            <text:p>8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71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710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1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31"/>
          <table:table-cell table:style-name="ce540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548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28"/>
          <table:table-cell table:style-name="ce28" table:number-columns-repeated="4"/>
          <table:table-cell table:style-name="ce60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28"/>
          <table:table-cell table:style-name="ce28" table:number-columns-repeated="4"/>
          <table:table-cell table:style-name="ce548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28"/>
          <table:table-cell table:style-name="ce28" table:number-columns-repeated="4"/>
          <table:table-cell table:style-name="ce60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28"/>
          <table:table-cell table:style-name="ce28" table:number-columns-repeated="4"/>
          <table:table-cell table:style-name="ce548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9" table:formula="of:=HLOOKUP([.B8];[.$AF$25:.$AW$26];2;0)" office:value-type="float" office:value="5" calcext:value-type="float">
            <text:p>5.0</text:p>
          </table:table-cell>
          <table:table-cell table:style-name="ce567" table:formula="of:=HLOOKUP([.C8];[.$AF$25:.$AW$26];2;0)" office:value-type="float" office:value="1.2" calcext:value-type="float">
            <text:p>1.2</text:p>
          </table:table-cell>
          <table:table-cell table:style-name="ce576" table:formula="of:=HLOOKUP([.D8];[.$AF$25:.$AW$26];2;0)" office:value-type="float" office:value="1.1" calcext:value-type="float">
            <text:p>1.1</text:p>
          </table:table-cell>
          <table:table-cell table:style-name="ce586" table:formula="of:=HLOOKUP([.E8];[.$AF$25:.$AW$26];2;0)" office:value-type="float" office:value="1" calcext:value-type="float">
            <text:p>1.0</text:p>
          </table:table-cell>
          <table:table-cell table:style-name="ce586" table:formula="of:=HLOOKUP([.F8];[.$AF$25:.$AW$26];2;0)" office:value-type="float" office:value="3.2" calcext:value-type="float">
            <text:p>3.2</text:p>
          </table:table-cell>
          <table:table-cell table:style-name="ce22"/>
          <table:table-cell table:style-name="ce335" table:formula="of:=HLOOKUP([.H8];[.$AF$25:.$AW$26];2;0)" office:value-type="float" office:value="2.2" calcext:value-type="float">
            <text:p>2.2</text:p>
          </table:table-cell>
          <table:table-cell table:style-name="ce614" table:formula="of:=HLOOKUP([.I8];[.$AF$25:.$AW$26];2;0)" office:value-type="float" office:value="2.2" calcext:value-type="float">
            <text:p>2.2</text:p>
          </table:table-cell>
          <table:table-cell table:style-name="ce347" table:formula="of:=HLOOKUP([.J8];[.$AF$25:.$AW$26];2;0)" office:value-type="float" office:value="1.1" calcext:value-type="float">
            <text:p>1.1</text:p>
          </table:table-cell>
          <table:table-cell table:style-name="ce350" table:formula="of:=HLOOKUP([.K8];[.$AF$25:.$AW$26];2;0)" office:value-type="float" office:value="1.1" calcext:value-type="float">
            <text:p>1.1</text:p>
          </table:table-cell>
          <table:table-cell table:style-name="ce350" table:formula="of:=HLOOKUP([.L8];[.$AF$25:.$AW$26];2;0)" office:value-type="float" office:value="3.1" calcext:value-type="float">
            <text:p>3.1</text:p>
          </table:table-cell>
          <table:table-cell table:style-name="ce22"/>
          <table:table-cell table:style-name="ce354" table:formula="of:=HLOOKUP([.N8];[.$AF$25:.$AW$26];2;0)" office:value-type="float" office:value="2.2" calcext:value-type="float">
            <text:p>2.2</text:p>
          </table:table-cell>
          <table:table-cell table:style-name="ce361" table:formula="of:=HLOOKUP([.O8];[.$AF$25:.$AW$26];2;0)" office:value-type="float" office:value="1.2" calcext:value-type="float">
            <text:p>1.2</text:p>
          </table:table-cell>
          <table:table-cell table:style-name="ce643" table:formula="of:=HLOOKUP([.P8];[.$AF$25:.$AW$26];2;0)" office:value-type="float" office:value="1.3" calcext:value-type="float">
            <text:p>1.3</text:p>
          </table:table-cell>
          <table:table-cell table:style-name="ce370" table:formula="of:=HLOOKUP([.Q8];[.$AF$25:.$AW$26];2;0)" office:value-type="float" office:value="1.1" calcext:value-type="float">
            <text:p>1.1</text:p>
          </table:table-cell>
          <table:table-cell table:style-name="ce370" table:formula="of:=HLOOKUP([.R8];[.$AF$25:.$AW$26];2;0)" office:value-type="float" office:value="3.1" calcext:value-type="float">
            <text:p>3.1</text:p>
          </table:table-cell>
          <table:table-cell table:style-name="ce22"/>
          <table:table-cell table:style-name="ce377" table:formula="of:=HLOOKUP([.T8];[.$AF$25:.$AW$26];2;0)" office:value-type="float" office:value="2.1" calcext:value-type="float">
            <text:p>2.1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91" table:formula="of:=HLOOKUP([.V8];[.$AF$25:.$AW$26];2;0)" office:value-type="float" office:value="1.1" calcext:value-type="float">
            <text:p>1.1</text:p>
          </table:table-cell>
          <table:table-cell table:style-name="ce675" table:formula="of:=HLOOKUP([.W8];[.$AF$25:.$AW$26];2;0)" office:value-type="float" office:value="2.3" calcext:value-type="float">
            <text:p>2.3</text:p>
          </table:table-cell>
          <table:table-cell table:style-name="ce397" table:formula="of:=HLOOKUP([.X8];[.$AF$25:.$AW$26];2;0)" office:value-type="float" office:value="3.2" calcext:value-type="float">
            <text:p>3.2</text:p>
          </table:table-cell>
          <table:table-cell table:style-name="ce22"/>
          <table:table-cell table:style-name="ce403" table:formula="of:=HLOOKUP([.Z8];[.$AF$25:.$AW$26];2;0)" office:value-type="float" office:value="2.3" calcext:value-type="float">
            <text:p>2.3</text:p>
          </table:table-cell>
          <table:table-cell table:style-name="ce409" table:formula="of:=HLOOKUP([.AA8];[.$AF$25:.$AW$26];2;0)" office:value-type="float" office:value="1.3" calcext:value-type="float">
            <text:p>1.3</text:p>
          </table:table-cell>
          <table:table-cell table:style-name="ce413" table:formula="of:=HLOOKUP([.AB8];[.$AF$25:.$AW$26];2;0)" office:value-type="float" office:value="1.2" calcext:value-type="float">
            <text:p>1.2</text:p>
          </table:table-cell>
          <table:table-cell table:style-name="ce416" table:formula="of:=HLOOKUP([.AC8];[.$AF$25:.$AW$26];2;0)" office:value-type="float" office:value="1.1" calcext:value-type="float">
            <text:p>1.1</text:p>
          </table:table-cell>
          <table:table-cell table:style-name="ce705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711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1" office:value-type="float" office:value="2" calcext:value-type="float">
            <text:p>2</text:p>
          </table:table-cell>
          <table:table-cell table:style-name="ce711" office:value-type="float" office:value="3" calcext:value-type="float">
            <text:p>3</text:p>
          </table:table-cell>
          <table:table-cell table:style-name="ce711" office:value-type="float" office:value="4" calcext:value-type="float">
            <text:p>4</text:p>
          </table:table-cell>
          <table:table-cell table:style-name="ce711" office:value-type="float" office:value="5" calcext:value-type="float">
            <text:p>5</text:p>
          </table:table-cell>
          <table:table-cell table:style-name="ce711" office:value-type="float" office:value="6" calcext:value-type="float">
            <text:p>6</text:p>
          </table:table-cell>
          <table:table-cell table:style-name="ce711" office:value-type="float" office:value="7" calcext:value-type="float">
            <text:p>7</text:p>
          </table:table-cell>
          <table:table-cell table:style-name="ce711" office:value-type="float" office:value="8" calcext:value-type="float">
            <text:p>8</text:p>
          </table:table-cell>
          <table:table-cell table:style-name="ce711" office:value-type="float" office:value="9" calcext:value-type="float">
            <text:p>9</text:p>
          </table:table-cell>
          <table:table-cell table:style-name="ce711" office:value-type="float" office:value="10" calcext:value-type="float">
            <text:p>10</text:p>
          </table:table-cell>
          <table:table-cell table:style-name="ce711" office:value-type="float" office:value="11" calcext:value-type="float">
            <text:p>11</text:p>
          </table:table-cell>
          <table:table-cell table:style-name="ce711" office:value-type="float" office:value="12" calcext:value-type="float">
            <text:p>12</text:p>
          </table:table-cell>
          <table:table-cell table:style-name="ce711" office:value-type="float" office:value="13" calcext:value-type="float">
            <text:p>13</text:p>
          </table:table-cell>
          <table:table-cell table:style-name="ce711" office:value-type="float" office:value="14" calcext:value-type="float">
            <text:p>14</text:p>
          </table:table-cell>
          <table:table-cell table:style-name="ce711" office:value-type="float" office:value="15" calcext:value-type="float">
            <text:p>15</text:p>
          </table:table-cell>
          <table:table-cell table:style-name="ce711" office:value-type="float" office:value="16" calcext:value-type="float">
            <text:p>16</text:p>
          </table:table-cell>
          <table:table-cell table:style-name="ce711" office:value-type="float" office:value="17" calcext:value-type="float">
            <text:p>17</text:p>
          </table:table-cell>
          <table:table-cell table:number-columns-repeated="13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9];[.$AF$25:.$AW$26];2;0)" office:value-type="float" office:value="2.2" calcext:value-type="float">
            <text:p>2.2</text:p>
          </table:table-cell>
          <table:table-cell table:style-name="ce567" table:formula="of:=HLOOKUP([.C9];[.$AF$25:.$AW$26];2;0)" office:value-type="float" office:value="2" calcext:value-type="float">
            <text:p>2.0</text:p>
          </table:table-cell>
          <table:table-cell table:style-name="ce576" table:formula="of:=HLOOKUP([.D9];[.$AF$25:.$AW$26];2;0)" office:value-type="float" office:value="1.3" calcext:value-type="float">
            <text:p>1.3</text:p>
          </table:table-cell>
          <table:table-cell table:style-name="ce586" table:formula="of:=HLOOKUP([.E9];[.$AF$25:.$AW$26];2;0)" office:value-type="float" office:value="1.1" calcext:value-type="float">
            <text:p>1.1</text:p>
          </table:table-cell>
          <table:table-cell table:style-name="ce586" table:formula="of:=HLOOKUP([.F9];[.$AF$25:.$AW$26];2;0)" office:value-type="float" office:value="3.2" calcext:value-type="float">
            <text:p>3.2</text:p>
          </table:table-cell>
          <table:table-cell table:style-name="ce22"/>
          <table:table-cell table:style-name="ce336" table:formula="of:=HLOOKUP([.H9];[.$AF$25:.$AW$26];2;0)" office:value-type="float" office:value="2.2" calcext:value-type="float">
            <text:p>2.2</text:p>
          </table:table-cell>
          <table:table-cell table:style-name="ce342" table:formula="of:=HLOOKUP([.I9];[.$AF$25:.$AW$26];2;0)" office:value-type="float" office:value="1.3" calcext:value-type="float">
            <text:p>1.3</text:p>
          </table:table-cell>
          <table:table-cell table:style-name="ce347" table:formula="of:=HLOOKUP([.J9];[.$AF$25:.$AW$26];2;0)" office:value-type="float" office:value="1.2" calcext:value-type="float">
            <text:p>1.2</text:p>
          </table:table-cell>
          <table:table-cell table:style-name="ce350" table:formula="of:=HLOOKUP([.K9];[.$AF$25:.$AW$26];2;0)" office:value-type="float" office:value="1" calcext:value-type="float">
            <text:p>1.0</text:p>
          </table:table-cell>
          <table:table-cell table:style-name="ce350" table:formula="of:=HLOOKUP([.L9];[.$AF$25:.$AW$26];2;0)" office:value-type="float" office:value="3.1" calcext:value-type="float">
            <text:p>3.1</text:p>
          </table:table-cell>
          <table:table-cell table:style-name="ce22"/>
          <table:table-cell table:style-name="ce355" table:formula="of:=HLOOKUP([.N9];[.$AF$25:.$AW$26];2;0)" office:value-type="float" office:value="2.1" calcext:value-type="float">
            <text:p>2.1</text:p>
          </table:table-cell>
          <table:table-cell table:style-name="ce361" table:formula="of:=HLOOKUP([.O9];[.$AF$25:.$AW$26];2;0)" office:value-type="float" office:value="1.2" calcext:value-type="float">
            <text:p>1.2</text:p>
          </table:table-cell>
          <table:table-cell table:style-name="ce365" table:formula="of:=HLOOKUP([.P9];[.$AF$25:.$AW$26];2;0)" office:value-type="float" office:value="1.2" calcext:value-type="float">
            <text:p>1.2</text:p>
          </table:table-cell>
          <table:table-cell table:style-name="ce370" table:formula="of:=HLOOKUP([.Q9];[.$AF$25:.$AW$26];2;0)" office:value-type="float" office:value="1" calcext:value-type="float">
            <text:p>1.0</text:p>
          </table:table-cell>
          <table:table-cell table:style-name="ce370" table:formula="of:=HLOOKUP([.R9];[.$AF$25:.$AW$26];2;0)" office:value-type="float" office:value="3.1" calcext:value-type="float">
            <text:p>3.1</text:p>
          </table:table-cell>
          <table:table-cell table:style-name="ce22"/>
          <table:table-cell table:style-name="ce378" table:formula="of:=HLOOKUP([.T9];[.$AF$25:.$AW$26];2;0)" office:value-type="float" office:value="2.2" calcext:value-type="float">
            <text:p>2.2</text:p>
          </table:table-cell>
          <table:table-cell table:style-name="ce386" table:formula="of:=HLOOKUP([.U9];[.$AF$25:.$AW$26];2;0)" office:value-type="float" office:value="1.3" calcext:value-type="float">
            <text:p>1.3</text:p>
          </table:table-cell>
          <table:table-cell table:style-name="ce391" table:formula="of:=HLOOKUP([.V9];[.$AF$25:.$AW$26];2;0)" office:value-type="float" office:value="1.2" calcext:value-type="float">
            <text:p>1.2</text:p>
          </table:table-cell>
          <table:table-cell table:style-name="ce397" table:formula="of:=HLOOKUP([.W9];[.$AF$25:.$AW$26];2;0)" office:value-type="float" office:value="1.1" calcext:value-type="float">
            <text:p>1.1</text:p>
          </table:table-cell>
          <table:table-cell table:style-name="ce397" table:formula="of:=HLOOKUP([.X9];[.$AF$25:.$AW$26];2;0)" office:value-type="float" office:value="3.2" calcext:value-type="float">
            <text:p>3.2</text:p>
          </table:table-cell>
          <table:table-cell table:style-name="ce22"/>
          <table:table-cell table:style-name="ce404" table:formula="of:=HLOOKUP([.Z9];[.$AF$25:.$AW$26];2;0)" office:value-type="float" office:value="2.3" calcext:value-type="float">
            <text:p>2.3</text:p>
          </table:table-cell>
          <table:table-cell table:style-name="ce409" table:formula="of:=HLOOKUP([.AA9];[.$AF$25:.$AW$26];2;0)" office:value-type="float" office:value="1.3" calcext:value-type="float">
            <text:p>1.3</text:p>
          </table:table-cell>
          <table:table-cell table:style-name="ce413" table:formula="of:=HLOOKUP([.AB9];[.$AF$25:.$AW$26];2;0)" office:value-type="float" office:value="1.2" calcext:value-type="float">
            <text:p>1.2</text:p>
          </table:table-cell>
          <table:table-cell table:style-name="ce416" table:formula="of:=HLOOKUP([.AC9];[.$AF$25:.$AW$26];2;0)" office:value-type="float" office:value="1.1" calcext:value-type="float">
            <text:p>1.1</text:p>
          </table:table-cell>
          <table:table-cell table:style-name="ce416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712" office:value-type="float" office:value="1" calcext:value-type="float">
            <text:p>1.00</text:p>
          </table:table-cell>
          <table:table-cell table:style-name="ce712" office:value-type="float" office:value="1.1" calcext:value-type="float">
            <text:p>1.10</text:p>
          </table:table-cell>
          <table:table-cell table:style-name="ce712" office:value-type="float" office:value="1.2" calcext:value-type="float">
            <text:p>1.20</text:p>
          </table:table-cell>
          <table:table-cell table:style-name="ce712" office:value-type="float" office:value="1.3" calcext:value-type="float">
            <text:p>1.30</text:p>
          </table:table-cell>
          <table:table-cell table:style-name="ce712" office:value-type="float" office:value="2" calcext:value-type="float">
            <text:p>2.00</text:p>
          </table:table-cell>
          <table:table-cell table:style-name="ce712" office:value-type="float" office:value="2.1" calcext:value-type="float">
            <text:p>2.10</text:p>
          </table:table-cell>
          <table:table-cell table:style-name="ce712" office:value-type="float" office:value="2.2" calcext:value-type="float">
            <text:p>2.20</text:p>
          </table:table-cell>
          <table:table-cell table:style-name="ce712" office:value-type="float" office:value="2.3" calcext:value-type="float">
            <text:p>2.30</text:p>
          </table:table-cell>
          <table:table-cell table:style-name="ce712" office:value-type="float" office:value="3" calcext:value-type="float">
            <text:p>3.00</text:p>
          </table:table-cell>
          <table:table-cell table:style-name="ce712" office:value-type="float" office:value="3.1" calcext:value-type="float">
            <text:p>3.10</text:p>
          </table:table-cell>
          <table:table-cell table:style-name="ce712" office:value-type="float" office:value="3.2" calcext:value-type="float">
            <text:p>3.20</text:p>
          </table:table-cell>
          <table:table-cell table:style-name="ce712" office:value-type="float" office:value="4" calcext:value-type="float">
            <text:p>4.00</text:p>
          </table:table-cell>
          <table:table-cell table:style-name="ce712" office:value-type="float" office:value="4.1" calcext:value-type="float">
            <text:p>4.10</text:p>
          </table:table-cell>
          <table:table-cell table:style-name="ce712" office:value-type="float" office:value="4.2" calcext:value-type="float">
            <text:p>4.20</text:p>
          </table:table-cell>
          <table:table-cell table:style-name="ce712" office:value-type="float" office:value="5" calcext:value-type="float">
            <text:p>5.00</text:p>
          </table:table-cell>
          <table:table-cell table:style-name="ce712" office:value-type="float" office:value="5.1" calcext:value-type="float">
            <text:p>5.10</text:p>
          </table:table-cell>
          <table:table-cell table:style-name="ce712" office:value-type="float" office:value="5.2" calcext:value-type="float">
            <text:p>5.20</text:p>
          </table:table-cell>
          <table:table-cell table:style-name="ce712" office:value-type="float" office:value="5.3" calcext:value-type="float">
            <text:p>5.30</text:p>
          </table:table-cell>
          <table:table-cell table:number-columns-repeated="13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10];[.$AF$25:.$AW$26];2;0)" office:value-type="float" office:value="5" calcext:value-type="float">
            <text:p>5.0</text:p>
          </table:table-cell>
          <table:table-cell table:style-name="ce567" table:formula="of:=HLOOKUP([.C10];[.$AF$25:.$AW$26];2;0)" office:value-type="float" office:value="4.2" calcext:value-type="float">
            <text:p>4.2</text:p>
          </table:table-cell>
          <table:table-cell table:style-name="ce576" table:formula="of:=HLOOKUP([.D10];[.$AF$25:.$AW$26];2;0)" office:value-type="float" office:value="4" calcext:value-type="float">
            <text:p>4.0</text:p>
          </table:table-cell>
          <table:table-cell table:style-name="ce586" table:formula="of:=HLOOKUP([.E10];[.$AF$25:.$AW$26];2;0)" office:value-type="float" office:value="2.3" calcext:value-type="float">
            <text:p>2.3</text:p>
          </table:table-cell>
          <table:table-cell table:style-name="ce586" table:formula="of:=HLOOKUP([.F10];[.$AF$25:.$AW$26];2;0)" office:value-type="float" office:value="5" calcext:value-type="float">
            <text:p>5.0</text:p>
          </table:table-cell>
          <table:table-cell table:style-name="ce22"/>
          <table:table-cell table:style-name="ce336" table:formula="of:=HLOOKUP([.H10];[.$AF$25:.$AW$26];2;0)" office:value-type="float" office:value="5.1" calcext:value-type="float">
            <text:p>5.1</text:p>
          </table:table-cell>
          <table:table-cell table:style-name="ce342" table:formula="of:=HLOOKUP([.I10];[.$AF$25:.$AW$26];2;0)" office:value-type="float" office:value="4.1" calcext:value-type="float">
            <text:p>4.1</text:p>
          </table:table-cell>
          <table:table-cell table:style-name="ce347" table:formula="of:=HLOOKUP([.J10];[.$AF$25:.$AW$26];2;0)" office:value-type="float" office:value="4" calcext:value-type="float">
            <text:p>4.0</text:p>
          </table:table-cell>
          <table:table-cell table:style-name="ce350" table:formula="of:=HLOOKUP([.K10];[.$AF$25:.$AW$26];2;0)" office:value-type="float" office:value="2.3" calcext:value-type="float">
            <text:p>2.3</text:p>
          </table:table-cell>
          <table:table-cell table:style-name="ce350" table:formula="of:=HLOOKUP([.L10];[.$AF$25:.$AW$26];2;0)" office:value-type="float" office:value="5" calcext:value-type="float">
            <text:p>5.0</text:p>
          </table:table-cell>
          <table:table-cell table:style-name="ce22"/>
          <table:table-cell table:style-name="ce355" table:formula="of:=HLOOKUP([.N10];[.$AF$25:.$AW$26];2;0)" office:value-type="float" office:value="5.1" calcext:value-type="float">
            <text:p>5.1</text:p>
          </table:table-cell>
          <table:table-cell table:style-name="ce361" table:formula="of:=HLOOKUP([.O10];[.$AF$25:.$AW$26];2;0)" office:value-type="float" office:value="4.2" calcext:value-type="float">
            <text:p>4.2</text:p>
          </table:table-cell>
          <table:table-cell table:style-name="ce365" table:formula="of:=HLOOKUP([.P10];[.$AF$25:.$AW$26];2;0)" office:value-type="float" office:value="3.2" calcext:value-type="float">
            <text:p>3.2</text:p>
          </table:table-cell>
          <table:table-cell table:style-name="ce370" table:formula="of:=HLOOKUP([.Q10];[.$AF$25:.$AW$26];2;0)" office:value-type="float" office:value="2.3" calcext:value-type="float">
            <text:p>2.3</text:p>
          </table:table-cell>
          <table:table-cell table:style-name="ce370" table:formula="of:=HLOOKUP([.R10];[.$AF$25:.$AW$26];2;0)" office:value-type="float" office:value="5" calcext:value-type="float">
            <text:p>5.0</text:p>
          </table:table-cell>
          <table:table-cell table:style-name="ce22"/>
          <table:table-cell table:style-name="ce378" table:formula="of:=HLOOKUP([.T10];[.$AF$25:.$AW$26];2;0)" office:value-type="float" office:value="5.1" calcext:value-type="float">
            <text:p>5.1</text:p>
          </table:table-cell>
          <table:table-cell table:style-name="ce386" table:formula="of:=HLOOKUP([.U10];[.$AF$25:.$AW$26];2;0)" office:value-type="float" office:value="4.2" calcext:value-type="float">
            <text:p>4.2</text:p>
          </table:table-cell>
          <table:table-cell table:style-name="ce391" table:formula="of:=HLOOKUP([.V10];[.$AF$25:.$AW$26];2;0)" office:value-type="float" office:value="4" calcext:value-type="float">
            <text:p>4.0</text:p>
          </table:table-cell>
          <table:table-cell table:style-name="ce397" table:formula="of:=HLOOKUP([.W10];[.$AF$25:.$AW$26];2;0)" office:value-type="float" office:value="2.2" calcext:value-type="float">
            <text:p>2.2</text:p>
          </table:table-cell>
          <table:table-cell table:style-name="ce397" table:formula="of:=HLOOKUP([.X10];[.$AF$25:.$AW$26];2;0)" office:value-type="float" office:value="4.2" calcext:value-type="float">
            <text:p>4.2</text:p>
          </table:table-cell>
          <table:table-cell table:style-name="ce22"/>
          <table:table-cell table:style-name="ce404" table:formula="of:=HLOOKUP([.Z10];[.$AF$25:.$AW$26];2;0)" office:value-type="float" office:value="5.1" calcext:value-type="float">
            <text:p>5.1</text:p>
          </table:table-cell>
          <table:table-cell table:style-name="ce409" table:formula="of:=HLOOKUP([.AA10];[.$AF$25:.$AW$26];2;0)" office:value-type="float" office:value="4.2" calcext:value-type="float">
            <text:p>4.2</text:p>
          </table:table-cell>
          <table:table-cell table:style-name="ce413" table:formula="of:=HLOOKUP([.AB10];[.$AF$25:.$AW$26];2;0)" office:value-type="float" office:value="4" calcext:value-type="float">
            <text:p>4.0</text:p>
          </table:table-cell>
          <table:table-cell table:style-name="ce416" table:formula="of:=HLOOKUP([.AC10];[.$AF$25:.$AW$26];2;0)" office:value-type="float" office:value="2.2" calcext:value-type="float">
            <text:p>2.2</text:p>
          </table:table-cell>
          <table:table-cell table:style-name="ce416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number-columns-repeated="31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22"/>
          <table:table-cell table:style-name="ce22" table:number-columns-repeated="4"/>
          <table:table-cell table:style-name="ce552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22"/>
          <table:table-cell table:style-name="ce22" table:number-columns-repeated="4"/>
          <table:table-cell table:style-name="ce552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22"/>
          <table:table-cell table:style-name="ce22" table:number-columns-repeated="4"/>
          <table:table-cell table:style-name="ce552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22"/>
          <table:table-cell table:style-name="ce22" table:number-columns-repeated="4"/>
          <table:table-cell table:style-name="ce552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22"/>
          <table:table-cell table:style-name="ce22" table:number-columns-repeated="3"/>
          <table:table-cell table:style-name="ce540"/>
          <table:table-cell table:number-columns-repeated="31"/>
          <table:table-cell table:style-name="ce540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95" table:formula="of:=HLOOKUP([.B12];[.$AF$25:.$AW$26];2;0)" office:value-type="float" office:value="5.1" calcext:value-type="float">
            <text:p>5.1</text:p>
          </table:table-cell>
          <table:table-cell table:style-name="ce310" table:formula="of:=HLOOKUP([.C12];[.$AF$25:.$AW$26];2;0)" office:value-type="float" office:value="2.3" calcext:value-type="float">
            <text:p>2.3</text:p>
          </table:table-cell>
          <table:table-cell table:style-name="ce318" table:formula="of:=HLOOKUP([.D12];[.$AF$25:.$AW$26];2;0)" office:value-type="float" office:value="2" calcext:value-type="float">
            <text:p>2.0</text:p>
          </table:table-cell>
          <table:table-cell table:style-name="ce325" table:formula="of:=HLOOKUP([.E12];[.$AF$25:.$AW$26];2;0)" office:value-type="float" office:value="3" calcext:value-type="float">
            <text:p>3.0</text:p>
          </table:table-cell>
          <table:table-cell table:style-name="ce325" table:formula="of:=HLOOKUP([.F12];[.$AF$25:.$AW$26];2;0)" office:value-type="float" office:value="5" calcext:value-type="float">
            <text:p>5.0</text:p>
          </table:table-cell>
          <table:table-cell table:style-name="ce22"/>
          <table:table-cell table:style-name="ce337" table:formula="of:=HLOOKUP([.H12];[.$AF$25:.$AW$26];2;0)" office:value-type="float" office:value="5.2" calcext:value-type="float">
            <text:p>5.2</text:p>
          </table:table-cell>
          <table:table-cell table:style-name="ce343" table:formula="of:=HLOOKUP([.I12];[.$AF$25:.$AW$26];2;0)" office:value-type="float" office:value="2.3" calcext:value-type="float">
            <text:p>2.3</text:p>
          </table:table-cell>
          <table:table-cell table:style-name="ce348" table:formula="of:=HLOOKUP([.J12];[.$AF$25:.$AW$26];2;0)" office:value-type="float" office:value="1.3" calcext:value-type="float">
            <text:p>1.3</text:p>
          </table:table-cell>
          <table:table-cell table:style-name="ce351" table:formula="of:=HLOOKUP([.K12];[.$AF$25:.$AW$26];2;0)" office:value-type="float" office:value="3" calcext:value-type="float">
            <text:p>3.0</text:p>
          </table:table-cell>
          <table:table-cell table:style-name="ce351" table:formula="of:=HLOOKUP([.L12];[.$AF$25:.$AW$26];2;0)" office:value-type="float" office:value="5" calcext:value-type="float">
            <text:p>5.0</text:p>
          </table:table-cell>
          <table:table-cell table:style-name="ce22"/>
          <table:table-cell table:style-name="ce356" table:formula="of:=HLOOKUP([.N12];[.$AF$25:.$AW$26];2;0)" office:value-type="float" office:value="5.2" calcext:value-type="float">
            <text:p>5.2</text:p>
          </table:table-cell>
          <table:table-cell table:style-name="ce362" table:formula="of:=HLOOKUP([.O12];[.$AF$25:.$AW$26];2;0)" office:value-type="float" office:value="3" calcext:value-type="float">
            <text:p>3.0</text:p>
          </table:table-cell>
          <table:table-cell table:style-name="ce366" table:formula="of:=HLOOKUP([.P12];[.$AF$25:.$AW$26];2;0)" office:value-type="float" office:value="2" calcext:value-type="float">
            <text:p>2.0</text:p>
          </table:table-cell>
          <table:table-cell table:style-name="ce371" table:formula="of:=HLOOKUP([.Q12];[.$AF$25:.$AW$26];2;0)" office:value-type="float" office:value="3" calcext:value-type="float">
            <text:p>3.0</text:p>
          </table:table-cell>
          <table:table-cell table:style-name="ce371" table:formula="of:=HLOOKUP([.R12];[.$AF$25:.$AW$26];2;0)" office:value-type="float" office:value="5" calcext:value-type="float">
            <text:p>5.0</text:p>
          </table:table-cell>
          <table:table-cell table:style-name="ce22"/>
          <table:table-cell table:style-name="ce379" table:formula="of:=HLOOKUP([.T12];[.$AF$25:.$AW$26];2;0)" office:value-type="float" office:value="5.1" calcext:value-type="float">
            <text:p>5.1</text:p>
          </table:table-cell>
          <table:table-cell table:style-name="ce387" table:formula="of:=HLOOKUP([.U12];[.$AF$25:.$AW$26];2;0)" office:value-type="float" office:value="2.3" calcext:value-type="float">
            <text:p>2.3</text:p>
          </table:table-cell>
          <table:table-cell table:style-name="ce392" table:formula="of:=HLOOKUP([.V12];[.$AF$25:.$AW$26];2;0)" office:value-type="float" office:value="1.3" calcext:value-type="float">
            <text:p>1.3</text:p>
          </table:table-cell>
          <table:table-cell table:style-name="ce398" table:formula="of:=HLOOKUP([.W12];[.$AF$25:.$AW$26];2;0)" office:value-type="float" office:value="3" calcext:value-type="float">
            <text:p>3.0</text:p>
          </table:table-cell>
          <table:table-cell table:style-name="ce398" table:formula="of:=HLOOKUP([.X12];[.$AF$25:.$AW$26];2;0)" office:value-type="float" office:value="5" calcext:value-type="float">
            <text:p>5.0</text:p>
          </table:table-cell>
          <table:table-cell table:style-name="ce22"/>
          <table:table-cell table:style-name="ce405" table:formula="of:=HLOOKUP([.Z12];[.$AF$25:.$AW$26];2;0)" office:value-type="float" office:value="5.2" calcext:value-type="float">
            <text:p>5.2</text:p>
          </table:table-cell>
          <table:table-cell table:style-name="ce410" table:formula="of:=HLOOKUP([.AA12];[.$AF$25:.$AW$26];2;0)" office:value-type="float" office:value="2.3" calcext:value-type="float">
            <text:p>2.3</text:p>
          </table:table-cell>
          <table:table-cell table:style-name="ce414" table:formula="of:=HLOOKUP([.AB12];[.$AF$25:.$AW$26];2;0)" office:value-type="float" office:value="2" calcext:value-type="float">
            <text:p>2.0</text:p>
          </table:table-cell>
          <table:table-cell table:style-name="ce417" table:formula="of:=HLOOKUP([.AC12];[.$AF$25:.$AW$26];2;0)" office:value-type="float" office:value="3" calcext:value-type="float">
            <text:p>3.0</text:p>
          </table:table-cell>
          <table:table-cell table:style-name="ce417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4" table:formula="of:=HLOOKUP([.B13];[.$AF$25:.$AW$26];2;0)" office:value-type="float" office:value="2.1" calcext:value-type="float">
            <text:p>2.1</text:p>
          </table:table-cell>
          <table:table-cell table:style-name="ce310" table:formula="of:=HLOOKUP([.C13];[.$AF$25:.$AW$26];2;0)" office:value-type="float" office:value="1.2" calcext:value-type="float">
            <text:p>1.2</text:p>
          </table:table-cell>
          <table:table-cell table:style-name="ce318" table:formula="of:=HLOOKUP([.D13];[.$AF$25:.$AW$26];2;0)" office:value-type="float" office:value="1.1" calcext:value-type="float">
            <text:p>1.1</text:p>
          </table:table-cell>
          <table:table-cell table:style-name="ce325" table:formula="of:=HLOOKUP([.E13];[.$AF$25:.$AW$26];2;0)" office:value-type="float" office:value="1" calcext:value-type="float">
            <text:p>1.0</text:p>
          </table:table-cell>
          <table:table-cell table:style-name="ce325" table:formula="of:=HLOOKUP([.F13];[.$AF$25:.$AW$26];2;0)" office:value-type="float" office:value="3.2" calcext:value-type="float">
            <text:p>3.2</text:p>
          </table:table-cell>
          <table:table-cell table:style-name="ce22"/>
          <table:table-cell table:style-name="ce338" table:formula="of:=HLOOKUP([.H13];[.$AF$25:.$AW$26];2;0)" office:value-type="float" office:value="2.1" calcext:value-type="float">
            <text:p>2.1</text:p>
          </table:table-cell>
          <table:table-cell table:style-name="ce617" table:formula="of:=HLOOKUP([.I13];[.$AF$25:.$AW$26];2;0)" office:value-type="float" office:value="1.2" calcext:value-type="float">
            <text:p>1.2</text:p>
          </table:table-cell>
          <table:table-cell table:style-name="ce348" table:formula="of:=HLOOKUP([.J13];[.$AF$25:.$AW$26];2;0)" office:value-type="float" office:value="1.1" calcext:value-type="float">
            <text:p>1.1</text:p>
          </table:table-cell>
          <table:table-cell table:style-name="ce351" table:formula="of:=HLOOKUP([.K13];[.$AF$25:.$AW$26];2;0)" office:value-type="float" office:value="1" calcext:value-type="float">
            <text:p>1.0</text:p>
          </table:table-cell>
          <table:table-cell table:style-name="ce351" table:formula="of:=HLOOKUP([.L13];[.$AF$25:.$AW$26];2;0)" office:value-type="float" office:value="3.1" calcext:value-type="float">
            <text:p>3.1</text:p>
          </table:table-cell>
          <table:table-cell table:style-name="ce22"/>
          <table:table-cell table:style-name="ce357" table:formula="of:=HLOOKUP([.N13];[.$AF$25:.$AW$26];2;0)" office:value-type="float" office:value="2.1" calcext:value-type="float">
            <text:p>2.1</text:p>
          </table:table-cell>
          <table:table-cell table:style-name="ce362" table:formula="of:=HLOOKUP([.O13];[.$AF$25:.$AW$26];2;0)" office:value-type="float" office:value="1.2" calcext:value-type="float">
            <text:p>1.2</text:p>
          </table:table-cell>
          <table:table-cell table:style-name="ce646" table:formula="of:=HLOOKUP([.P13];[.$AF$25:.$AW$26];2;0)" office:value-type="float" office:value="1.1" calcext:value-type="float">
            <text:p>1.1</text:p>
          </table:table-cell>
          <table:table-cell table:style-name="ce371" table:formula="of:=HLOOKUP([.Q13];[.$AF$25:.$AW$26];2;0)" office:value-type="float" office:value="1" calcext:value-type="float">
            <text:p>1.0</text:p>
          </table:table-cell>
          <table:table-cell table:style-name="ce371" table:formula="of:=HLOOKUP([.R13];[.$AF$25:.$AW$26];2;0)" office:value-type="float" office:value="3.1" calcext:value-type="float">
            <text:p>3.1</text:p>
          </table:table-cell>
          <table:table-cell table:style-name="ce22"/>
          <table:table-cell table:style-name="ce380" table:formula="of:=HLOOKUP([.T13];[.$AF$25:.$AW$26];2;0)" office:value-type="float" office:value="2.1" calcext:value-type="float">
            <text:p>2.1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2" table:formula="of:=HLOOKUP([.V13];[.$AF$25:.$AW$26];2;0)" office:value-type="float" office:value="1.1" calcext:value-type="float">
            <text:p>1.1</text:p>
          </table:table-cell>
          <table:table-cell table:style-name="ce678" table:formula="of:=HLOOKUP([.W13];[.$AF$25:.$AW$26];2;0)" office:value-type="float" office:value="1" calcext:value-type="float">
            <text:p>1.0</text:p>
          </table:table-cell>
          <table:table-cell table:style-name="ce398" table:formula="of:=HLOOKUP([.X13];[.$AF$25:.$AW$26];2;0)" office:value-type="float" office:value="3.2" calcext:value-type="float">
            <text:p>3.2</text:p>
          </table:table-cell>
          <table:table-cell table:style-name="ce22"/>
          <table:table-cell table:style-name="ce406" table:formula="of:=HLOOKUP([.Z13];[.$AF$25:.$AW$26];2;0)" office:value-type="float" office:value="2.3" calcext:value-type="float">
            <text:p>2.3</text:p>
          </table:table-cell>
          <table:table-cell table:style-name="ce410" table:formula="of:=HLOOKUP([.AA13];[.$AF$25:.$AW$26];2;0)" office:value-type="float" office:value="1.3" calcext:value-type="float">
            <text:p>1.3</text:p>
          </table:table-cell>
          <table:table-cell table:style-name="ce414" table:formula="of:=HLOOKUP([.AB13];[.$AF$25:.$AW$26];2;0)" office:value-type="float" office:value="1.2" calcext:value-type="float">
            <text:p>1.2</text:p>
          </table:table-cell>
          <table:table-cell table:style-name="ce417" table:formula="of:=HLOOKUP([.AC13];[.$AF$25:.$AW$26];2;0)" office:value-type="float" office:value="1.1" calcext:value-type="float">
            <text:p>1.1</text:p>
          </table:table-cell>
          <table:table-cell table:style-name="ce706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297" table:formula="of:=HLOOKUP([.B14];[.$AF$25:.$AW$26];2;0)" office:value-type="float" office:value="4.2" calcext:value-type="float">
            <text:p>4.2</text:p>
          </table:table-cell>
          <table:table-cell table:style-name="ce310" table:formula="of:=HLOOKUP([.C14];[.$AF$25:.$AW$26];2;0)" office:value-type="float" office:value="4.1" calcext:value-type="float">
            <text:p>4.1</text:p>
          </table:table-cell>
          <table:table-cell table:style-name="ce318" table:formula="of:=HLOOKUP([.D14];[.$AF$25:.$AW$26];2;0)" office:value-type="float" office:value="3.1" calcext:value-type="float">
            <text:p>3.1</text:p>
          </table:table-cell>
          <table:table-cell table:style-name="ce325" table:formula="of:=HLOOKUP([.E14];[.$AF$25:.$AW$26];2;0)" office:value-type="float" office:value="2.1" calcext:value-type="float">
            <text:p>2.1</text:p>
          </table:table-cell>
          <table:table-cell table:style-name="ce325" table:formula="of:=HLOOKUP([.F14];[.$AF$25:.$AW$26];2;0)" office:value-type="float" office:value="4.1" calcext:value-type="float">
            <text:p>4.1</text:p>
          </table:table-cell>
          <table:table-cell table:style-name="ce22"/>
          <table:table-cell table:style-name="ce338" table:formula="of:=HLOOKUP([.H14];[.$AF$25:.$AW$26];2;0)" office:value-type="float" office:value="4.2" calcext:value-type="float">
            <text:p>4.2</text:p>
          </table:table-cell>
          <table:table-cell table:style-name="ce343" table:formula="of:=HLOOKUP([.I14];[.$AF$25:.$AW$26];2;0)" office:value-type="float" office:value="4" calcext:value-type="float">
            <text:p>4.0</text:p>
          </table:table-cell>
          <table:table-cell table:style-name="ce348" table:formula="of:=HLOOKUP([.J14];[.$AF$25:.$AW$26];2;0)" office:value-type="float" office:value="3.1" calcext:value-type="float">
            <text:p>3.1</text:p>
          </table:table-cell>
          <table:table-cell table:style-name="ce351" table:formula="of:=HLOOKUP([.K14];[.$AF$25:.$AW$26];2;0)" office:value-type="float" office:value="2.1" calcext:value-type="float">
            <text:p>2.1</text:p>
          </table:table-cell>
          <table:table-cell table:style-name="ce351" table:formula="of:=HLOOKUP([.L14];[.$AF$25:.$AW$26];2;0)" office:value-type="float" office:value="4.1" calcext:value-type="float">
            <text:p>4.1</text:p>
          </table:table-cell>
          <table:table-cell table:style-name="ce22"/>
          <table:table-cell table:style-name="ce357" table:formula="of:=HLOOKUP([.N14];[.$AF$25:.$AW$26];2;0)" office:value-type="float" office:value="4.2" calcext:value-type="float">
            <text:p>4.2</text:p>
          </table:table-cell>
          <table:table-cell table:style-name="ce362" table:formula="of:=HLOOKUP([.O14];[.$AF$25:.$AW$26];2;0)" office:value-type="float" office:value="4" calcext:value-type="float">
            <text:p>4.0</text:p>
          </table:table-cell>
          <table:table-cell table:style-name="ce366" table:formula="of:=HLOOKUP([.P14];[.$AF$25:.$AW$26];2;0)" office:value-type="float" office:value="3.1" calcext:value-type="float">
            <text:p>3.1</text:p>
          </table:table-cell>
          <table:table-cell table:style-name="ce371" table:formula="of:=HLOOKUP([.Q14];[.$AF$25:.$AW$26];2;0)" office:value-type="float" office:value="2.1" calcext:value-type="float">
            <text:p>2.1</text:p>
          </table:table-cell>
          <table:table-cell table:style-name="ce371" table:formula="of:=HLOOKUP([.R14];[.$AF$25:.$AW$26];2;0)" office:value-type="float" office:value="4.1" calcext:value-type="float">
            <text:p>4.1</text:p>
          </table:table-cell>
          <table:table-cell table:style-name="ce22"/>
          <table:table-cell table:style-name="ce380" table:formula="of:=HLOOKUP([.T14];[.$AF$25:.$AW$26];2;0)" office:value-type="float" office:value="4.2" calcext:value-type="float">
            <text:p>4.2</text:p>
          </table:table-cell>
          <table:table-cell table:style-name="ce387" table:formula="of:=HLOOKUP([.U14];[.$AF$25:.$AW$26];2;0)" office:value-type="float" office:value="4" calcext:value-type="float">
            <text:p>4.0</text:p>
          </table:table-cell>
          <table:table-cell table:style-name="ce392" table:formula="of:=HLOOKUP([.V14];[.$AF$25:.$AW$26];2;0)" office:value-type="float" office:value="3.2" calcext:value-type="float">
            <text:p>3.2</text:p>
          </table:table-cell>
          <table:table-cell table:style-name="ce398" table:formula="of:=HLOOKUP([.W14];[.$AF$25:.$AW$26];2;0)" office:value-type="float" office:value="2.1" calcext:value-type="float">
            <text:p>2.1</text:p>
          </table:table-cell>
          <table:table-cell table:style-name="ce398" table:formula="of:=HLOOKUP([.X14];[.$AF$25:.$AW$26];2;0)" office:value-type="float" office:value="4.1" calcext:value-type="float">
            <text:p>4.1</text:p>
          </table:table-cell>
          <table:table-cell table:style-name="ce22"/>
          <table:table-cell table:style-name="ce406" table:formula="of:=HLOOKUP([.Z14];[.$AF$25:.$AW$26];2;0)" office:value-type="float" office:value="5" calcext:value-type="float">
            <text:p>5.0</text:p>
          </table:table-cell>
          <table:table-cell table:style-name="ce410" table:formula="of:=HLOOKUP([.AA14];[.$AF$25:.$AW$26];2;0)" office:value-type="float" office:value="4" calcext:value-type="float">
            <text:p>4.0</text:p>
          </table:table-cell>
          <table:table-cell table:style-name="ce414" table:formula="of:=HLOOKUP([.AB14];[.$AF$25:.$AW$26];2;0)" office:value-type="float" office:value="3.1" calcext:value-type="float">
            <text:p>3.1</text:p>
          </table:table-cell>
          <table:table-cell table:style-name="ce417" table:formula="of:=HLOOKUP([.AC14];[.$AF$25:.$AW$26];2;0)" office:value-type="float" office:value="2.1" calcext:value-type="float">
            <text:p>2.1</text:p>
          </table:table-cell>
          <table:table-cell table:style-name="ce417" table:formula="of:=HLOOKUP([.AD14];[.$AF$25:.$AW$26];2;0)" office:value-type="float" office:value="4.1" calcext:value-type="float">
            <text:p>4.1</text:p>
          </table:table-cell>
          <table:table-cell/>
          <table:table-cell table:style-name="ce540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22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22"/>
          <table:table-cell table:style-name="ce22" table:number-columns-repeated="4"/>
          <table:table-cell table:style-name="ce552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22"/>
          <table:table-cell table:style-name="ce22" table:number-columns-repeated="4"/>
          <table:table-cell table:style-name="ce552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22"/>
          <table:table-cell table:style-name="ce2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4"/>
          <table:table-cell table:style-name="ce552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22"/>
          <table:table-cell table:style-name="ce22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298" table:formula="of:=HLOOKUP([.B16];[.$AF$25:.$AW$26];2;0)" office:value-type="float" office:value="5.2" calcext:value-type="float">
            <text:p>5.2</text:p>
          </table:table-cell>
          <table:table-cell table:style-name="ce311" table:formula="of:=HLOOKUP([.C16];[.$AF$25:.$AW$26];2;0)" office:value-type="float" office:value="3.1" calcext:value-type="float">
            <text:p>3.1</text:p>
          </table:table-cell>
          <table:table-cell table:style-name="ce319" table:formula="of:=HLOOKUP([.D16];[.$AF$25:.$AW$26];2;0)" office:value-type="float" office:value="2.1" calcext:value-type="float">
            <text:p>2.1</text:p>
          </table:table-cell>
          <table:table-cell table:style-name="ce326" table:formula="of:=HLOOKUP([.E16];[.$AF$25:.$AW$26];2;0)" office:value-type="float" office:value="3.1" calcext:value-type="float">
            <text:p>3.1</text:p>
          </table:table-cell>
          <table:table-cell table:style-name="ce326" table:formula="of:=HLOOKUP([.F16];[.$AF$25:.$AW$26];2;0)" office:value-type="float" office:value="5.2" calcext:value-type="float">
            <text:p>5.2</text:p>
          </table:table-cell>
          <table:table-cell table:style-name="ce22"/>
          <table:table-cell table:style-name="ce610" table:formula="of:=HLOOKUP([.H16];[.$AF$25:.$AW$26];2;0)" office:value-type="float" office:value="5.3" calcext:value-type="float">
            <text:p>5.3</text:p>
          </table:table-cell>
          <table:table-cell table:style-name="ce345" table:formula="of:=HLOOKUP([.I16];[.$AF$25:.$AW$26];2;0)" office:value-type="float" office:value="3" calcext:value-type="float">
            <text:p>3.0</text:p>
          </table:table-cell>
          <table:table-cell table:style-name="ce349" table:formula="of:=HLOOKUP([.J16];[.$AF$25:.$AW$26];2;0)" office:value-type="float" office:value="2.1" calcext:value-type="float">
            <text:p>2.1</text:p>
          </table:table-cell>
          <table:table-cell table:style-name="ce352" table:formula="of:=HLOOKUP([.K16];[.$AF$25:.$AW$26];2;0)" office:value-type="float" office:value="3.1" calcext:value-type="float">
            <text:p>3.1</text:p>
          </table:table-cell>
          <table:table-cell table:style-name="ce352" table:formula="of:=HLOOKUP([.L16];[.$AF$25:.$AW$26];2;0)" office:value-type="float" office:value="5.2" calcext:value-type="float">
            <text:p>5.2</text:p>
          </table:table-cell>
          <table:table-cell table:style-name="ce22"/>
          <table:table-cell table:style-name="ce358" table:formula="of:=HLOOKUP([.N16];[.$AF$25:.$AW$26];2;0)" office:value-type="float" office:value="5.3" calcext:value-type="float">
            <text:p>5.3</text:p>
          </table:table-cell>
          <table:table-cell table:style-name="ce363" table:formula="of:=HLOOKUP([.O16];[.$AF$25:.$AW$26];2;0)" office:value-type="float" office:value="3.1" calcext:value-type="float">
            <text:p>3.1</text:p>
          </table:table-cell>
          <table:table-cell table:style-name="ce368" table:formula="of:=HLOOKUP([.P16];[.$AF$25:.$AW$26];2;0)" office:value-type="float" office:value="2.1" calcext:value-type="float">
            <text:p>2.1</text:p>
          </table:table-cell>
          <table:table-cell table:style-name="ce372" table:formula="of:=HLOOKUP([.Q16];[.$AF$25:.$AW$26];2;0)" office:value-type="float" office:value="3.2" calcext:value-type="float">
            <text:p>3.2</text:p>
          </table:table-cell>
          <table:table-cell table:style-name="ce372" table:formula="of:=HLOOKUP([.R16];[.$AF$25:.$AW$26];2;0)" office:value-type="float" office:value="5.2" calcext:value-type="float">
            <text:p>5.2</text:p>
          </table:table-cell>
          <table:table-cell table:style-name="ce22"/>
          <table:table-cell table:style-name="ce381" table:formula="of:=HLOOKUP([.T16];[.$AF$25:.$AW$26];2;0)" office:value-type="float" office:value="5.3" calcext:value-type="float">
            <text:p>5.3</text:p>
          </table:table-cell>
          <table:table-cell table:style-name="ce388" table:formula="of:=HLOOKUP([.U16];[.$AF$25:.$AW$26];2;0)" office:value-type="float" office:value="3.1" calcext:value-type="float">
            <text:p>3.1</text:p>
          </table:table-cell>
          <table:table-cell table:style-name="ce393" table:formula="of:=HLOOKUP([.V16];[.$AF$25:.$AW$26];2;0)" office:value-type="float" office:value="2.1" calcext:value-type="float">
            <text:p>2.1</text:p>
          </table:table-cell>
          <table:table-cell table:style-name="ce400" table:formula="of:=HLOOKUP([.W16];[.$AF$25:.$AW$26];2;0)" office:value-type="float" office:value="3.1" calcext:value-type="float">
            <text:p>3.1</text:p>
          </table:table-cell>
          <table:table-cell table:style-name="ce400" table:formula="of:=HLOOKUP([.X16];[.$AF$25:.$AW$26];2;0)" office:value-type="float" office:value="5.1" calcext:value-type="float">
            <text:p>5.1</text:p>
          </table:table-cell>
          <table:table-cell table:style-name="ce22"/>
          <table:table-cell table:style-name="ce407" table:formula="of:=HLOOKUP([.Z16];[.$AF$25:.$AW$26];2;0)" office:value-type="float" office:value="5.3" calcext:value-type="float">
            <text:p>5.3</text:p>
          </table:table-cell>
          <table:table-cell table:style-name="ce411" table:formula="of:=HLOOKUP([.AA16];[.$AF$25:.$AW$26];2;0)" office:value-type="float" office:value="3.1" calcext:value-type="float">
            <text:p>3.1</text:p>
          </table:table-cell>
          <table:table-cell table:style-name="ce415" table:formula="of:=HLOOKUP([.AB16];[.$AF$25:.$AW$26];2;0)" office:value-type="float" office:value="2.2" calcext:value-type="float">
            <text:p>2.2</text:p>
          </table:table-cell>
          <table:table-cell table:style-name="ce418" table:formula="of:=HLOOKUP([.AC16];[.$AF$25:.$AW$26];2;0)" office:value-type="float" office:value="3.1" calcext:value-type="float">
            <text:p>3.1</text:p>
          </table:table-cell>
          <table:table-cell table:style-name="ce418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299" table:formula="of:=HLOOKUP([.B17];[.$AF$25:.$AW$26];2;0)" office:value-type="float" office:value="2.2" calcext:value-type="float">
            <text:p>2.2</text:p>
          </table:table-cell>
          <table:table-cell table:style-name="ce311" table:formula="of:=HLOOKUP([.C17];[.$AF$25:.$AW$26];2;0)" office:value-type="float" office:value="1.3" calcext:value-type="float">
            <text:p>1.3</text:p>
          </table:table-cell>
          <table:table-cell table:style-name="ce319" table:formula="of:=HLOOKUP([.D17];[.$AF$25:.$AW$26];2;0)" office:value-type="float" office:value="1.2" calcext:value-type="float">
            <text:p>1.2</text:p>
          </table:table-cell>
          <table:table-cell table:style-name="ce326" table:formula="of:=HLOOKUP([.E17];[.$AF$25:.$AW$26];2;0)" office:value-type="float" office:value="1.1" calcext:value-type="float">
            <text:p>1.1</text:p>
          </table:table-cell>
          <table:table-cell table:style-name="ce326" table:formula="of:=HLOOKUP([.F17];[.$AF$25:.$AW$26];2;0)" office:value-type="float" office:value="4" calcext:value-type="float">
            <text:p>4.0</text:p>
          </table:table-cell>
          <table:table-cell table:style-name="ce22"/>
          <table:table-cell table:style-name="ce340" table:formula="of:=HLOOKUP([.H17];[.$AF$25:.$AW$26];2;0)" office:value-type="float" office:value="2.3" calcext:value-type="float">
            <text:p>2.3</text:p>
          </table:table-cell>
          <table:table-cell table:style-name="ce345" table:formula="of:=HLOOKUP([.I17];[.$AF$25:.$AW$26];2;0)" office:value-type="float" office:value="1.3" calcext:value-type="float">
            <text:p>1.3</text:p>
          </table:table-cell>
          <table:table-cell table:style-name="ce349" table:formula="of:=HLOOKUP([.J17];[.$AF$25:.$AW$26];2;0)" office:value-type="float" office:value="1.1" calcext:value-type="float">
            <text:p>1.1</text:p>
          </table:table-cell>
          <table:table-cell table:style-name="ce352" table:formula="of:=HLOOKUP([.K17];[.$AF$25:.$AW$26];2;0)" office:value-type="float" office:value="1.1" calcext:value-type="float">
            <text:p>1.1</text:p>
          </table:table-cell>
          <table:table-cell table:style-name="ce352" table:formula="of:=HLOOKUP([.L17];[.$AF$25:.$AW$26];2;0)" office:value-type="float" office:value="4" calcext:value-type="float">
            <text:p>4.0</text:p>
          </table:table-cell>
          <table:table-cell table:style-name="ce22"/>
          <table:table-cell table:style-name="ce359" table:formula="of:=HLOOKUP([.N17];[.$AF$25:.$AW$26];2;0)" office:value-type="float" office:value="2.3" calcext:value-type="float">
            <text:p>2.3</text:p>
          </table:table-cell>
          <table:table-cell table:style-name="ce363" table:formula="of:=HLOOKUP([.O17];[.$AF$25:.$AW$26];2;0)" office:value-type="float" office:value="2" calcext:value-type="float">
            <text:p>2.0</text:p>
          </table:table-cell>
          <table:table-cell table:style-name="ce368" table:formula="of:=HLOOKUP([.P17];[.$AF$25:.$AW$26];2;0)" office:value-type="float" office:value="1.2" calcext:value-type="float">
            <text:p>1.2</text:p>
          </table:table-cell>
          <table:table-cell table:style-name="ce372" table:formula="of:=HLOOKUP([.Q17];[.$AF$25:.$AW$26];2;0)" office:value-type="float" office:value="1.2" calcext:value-type="float">
            <text:p>1.2</text:p>
          </table:table-cell>
          <table:table-cell table:style-name="ce372" table:formula="of:=HLOOKUP([.R17];[.$AF$25:.$AW$26];2;0)" office:value-type="float" office:value="4" calcext:value-type="float">
            <text:p>4.0</text:p>
          </table:table-cell>
          <table:table-cell table:style-name="ce22"/>
          <table:table-cell table:style-name="ce382" table:formula="of:=HLOOKUP([.T17];[.$AF$25:.$AW$26];2;0)" office:value-type="float" office:value="2.2" calcext:value-type="float">
            <text:p>2.2</text:p>
          </table:table-cell>
          <table:table-cell table:style-name="ce388" table:formula="of:=HLOOKUP([.U17];[.$AF$25:.$AW$26];2;0)" office:value-type="float" office:value="1.2" calcext:value-type="float">
            <text:p>1.2</text:p>
          </table:table-cell>
          <table:table-cell table:style-name="ce393" table:formula="of:=HLOOKUP([.V17];[.$AF$25:.$AW$26];2;0)" office:value-type="float" office:value="1.1" calcext:value-type="float">
            <text:p>1.1</text:p>
          </table:table-cell>
          <table:table-cell table:style-name="ce400" table:formula="of:=HLOOKUP([.W17];[.$AF$25:.$AW$26];2;0)" office:value-type="float" office:value="1.1" calcext:value-type="float">
            <text:p>1.1</text:p>
          </table:table-cell>
          <table:table-cell table:style-name="ce400" table:formula="of:=HLOOKUP([.X17];[.$AF$25:.$AW$26];2;0)" office:value-type="float" office:value="3.2" calcext:value-type="float">
            <text:p>3.2</text:p>
          </table:table-cell>
          <table:table-cell table:style-name="ce22"/>
          <table:table-cell table:style-name="ce408" table:formula="of:=HLOOKUP([.Z17];[.$AF$25:.$AW$26];2;0)" office:value-type="float" office:value="3" calcext:value-type="float">
            <text:p>3.0</text:p>
          </table:table-cell>
          <table:table-cell table:style-name="ce411" table:formula="of:=HLOOKUP([.AA17];[.$AF$25:.$AW$26];2;0)" office:value-type="float" office:value="2" calcext:value-type="float">
            <text:p>2.0</text:p>
          </table:table-cell>
          <table:table-cell table:style-name="ce415" table:formula="of:=HLOOKUP([.AB17];[.$AF$25:.$AW$26];2;0)" office:value-type="float" office:value="1.3" calcext:value-type="float">
            <text:p>1.3</text:p>
          </table:table-cell>
          <table:table-cell table:style-name="ce418" table:formula="of:=HLOOKUP([.AC17];[.$AF$25:.$AW$26];2;0)" office:value-type="float" office:value="1.1" calcext:value-type="float">
            <text:p>1.1</text:p>
          </table:table-cell>
          <table:table-cell table:style-name="ce418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9" table:formula="of:=HLOOKUP([.B18];[.$AF$25:.$AW$26];2;0)" office:value-type="float" office:value="4.1" calcext:value-type="float">
            <text:p>4.1</text:p>
          </table:table-cell>
          <table:table-cell table:style-name="ce311" table:formula="of:=HLOOKUP([.C18];[.$AF$25:.$AW$26];2;0)" office:value-type="float" office:value="1.2" calcext:value-type="float">
            <text:p>1.2</text:p>
          </table:table-cell>
          <table:table-cell table:style-name="ce319" table:formula="of:=HLOOKUP([.D18];[.$AF$25:.$AW$26];2;0)" office:value-type="float" office:value="1.1" calcext:value-type="float">
            <text:p>1.1</text:p>
          </table:table-cell>
          <table:table-cell table:style-name="ce326" table:formula="of:=HLOOKUP([.E18];[.$AF$25:.$AW$26];2;0)" office:value-type="float" office:value="1" calcext:value-type="float">
            <text:p>1.0</text:p>
          </table:table-cell>
          <table:table-cell table:style-name="ce326" table:formula="of:=HLOOKUP([.F18];[.$AF$25:.$AW$26];2;0)" office:value-type="float" office:value="3.2" calcext:value-type="float">
            <text:p>3.2</text:p>
          </table:table-cell>
          <table:table-cell table:style-name="ce22"/>
          <table:table-cell table:style-name="ce340" table:formula="of:=HLOOKUP([.H18];[.$AF$25:.$AW$26];2;0)" office:value-type="float" office:value="2.1" calcext:value-type="float">
            <text:p>2.1</text:p>
          </table:table-cell>
          <table:table-cell table:style-name="ce619" table:formula="of:=HLOOKUP([.I18];[.$AF$25:.$AW$26];2;0)" office:value-type="float" office:value="3.2" calcext:value-type="float">
            <text:p>3.2</text:p>
          </table:table-cell>
          <table:table-cell table:style-name="ce349" table:formula="of:=HLOOKUP([.J18];[.$AF$25:.$AW$26];2;0)" office:value-type="float" office:value="1.1" calcext:value-type="float">
            <text:p>1.1</text:p>
          </table:table-cell>
          <table:table-cell table:style-name="ce352" table:formula="of:=HLOOKUP([.K18];[.$AF$25:.$AW$26];2;0)" office:value-type="float" office:value="1" calcext:value-type="float">
            <text:p>1.0</text:p>
          </table:table-cell>
          <table:table-cell table:style-name="ce352" table:formula="of:=HLOOKUP([.L18];[.$AF$25:.$AW$26];2;0)" office:value-type="float" office:value="3.1" calcext:value-type="float">
            <text:p>3.1</text:p>
          </table:table-cell>
          <table:table-cell table:style-name="ce22"/>
          <table:table-cell table:style-name="ce359" table:formula="of:=HLOOKUP([.N18];[.$AF$25:.$AW$26];2;0)" office:value-type="float" office:value="2.1" calcext:value-type="float">
            <text:p>2.1</text:p>
          </table:table-cell>
          <table:table-cell table:style-name="ce363" table:formula="of:=HLOOKUP([.O18];[.$AF$25:.$AW$26];2;0)" office:value-type="float" office:value="1.2" calcext:value-type="float">
            <text:p>1.2</text:p>
          </table:table-cell>
          <table:table-cell table:style-name="ce648" table:formula="of:=HLOOKUP([.P18];[.$AF$25:.$AW$26];2;0)" office:value-type="float" office:value="3" calcext:value-type="float">
            <text:p>3.0</text:p>
          </table:table-cell>
          <table:table-cell table:style-name="ce372" table:formula="of:=HLOOKUP([.Q18];[.$AF$25:.$AW$26];2;0)" office:value-type="float" office:value="1" calcext:value-type="float">
            <text:p>1.0</text:p>
          </table:table-cell>
          <table:table-cell table:style-name="ce372" table:formula="of:=HLOOKUP([.R18];[.$AF$25:.$AW$26];2;0)" office:value-type="float" office:value="3.1" calcext:value-type="float">
            <text:p>3.1</text:p>
          </table:table-cell>
          <table:table-cell table:style-name="ce22"/>
          <table:table-cell table:style-name="ce382" table:formula="of:=HLOOKUP([.T18];[.$AF$25:.$AW$26];2;0)" office:value-type="float" office:value="2.1" calcext:value-type="float">
            <text:p>2.1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3" table:formula="of:=HLOOKUP([.V18];[.$AF$25:.$AW$26];2;0)" office:value-type="float" office:value="1.1" calcext:value-type="float">
            <text:p>1.1</text:p>
          </table:table-cell>
          <table:table-cell table:style-name="ce680" table:formula="of:=HLOOKUP([.W18];[.$AF$25:.$AW$26];2;0)" office:value-type="float" office:value="2" calcext:value-type="float">
            <text:p>2.0</text:p>
          </table:table-cell>
          <table:table-cell table:style-name="ce400" table:formula="of:=HLOOKUP([.X18];[.$AF$25:.$AW$26];2;0)" office:value-type="float" office:value="3.2" calcext:value-type="float">
            <text:p>3.2</text:p>
          </table:table-cell>
          <table:table-cell table:style-name="ce22"/>
          <table:table-cell table:style-name="ce408" table:formula="of:=HLOOKUP([.Z18];[.$AF$25:.$AW$26];2;0)" office:value-type="float" office:value="2.3" calcext:value-type="float">
            <text:p>2.3</text:p>
          </table:table-cell>
          <table:table-cell table:style-name="ce411" table:formula="of:=HLOOKUP([.AA18];[.$AF$25:.$AW$26];2;0)" office:value-type="float" office:value="1.3" calcext:value-type="float">
            <text:p>1.3</text:p>
          </table:table-cell>
          <table:table-cell table:style-name="ce415" table:formula="of:=HLOOKUP([.AB18];[.$AF$25:.$AW$26];2;0)" office:value-type="float" office:value="1.2" calcext:value-type="float">
            <text:p>1.2</text:p>
          </table:table-cell>
          <table:table-cell table:style-name="ce418" table:formula="of:=HLOOKUP([.AC18];[.$AF$25:.$AW$26];2;0)" office:value-type="float" office:value="1.1" calcext:value-type="float">
            <text:p>1.1</text:p>
          </table:table-cell>
          <table:table-cell table:style-name="ce421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38" office:value-type="string" calcext:value-type="string" table:number-columns-spanned="1" table:number-rows-spanned="2">
            <text:p>ctrl</text:p>
          </table:table-cell>
          <table:table-cell table:style-name="ce38" office:value-type="string" calcext:value-type="string" table:number-columns-spanned="1" table:number-rows-spanned="2">
            <text:p>spc</text:p>
          </table:table-cell>
          <table:table-cell table:style-name="ce38" office:value-type="string" calcext:value-type="string" table:number-columns-spanned="1" table:number-rows-spanned="2">
            <text:p>shft</text:p>
          </table:table-cell>
          <table:table-cell table:style-name="ce38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38" office:value-type="string" calcext:value-type="string" table:number-columns-spanned="1" table:number-rows-spanned="2">
            <text:p>shft</text:p>
          </table:table-cell>
          <table:table-cell table:style-name="ce38" office:value-type="string" calcext:value-type="string" table:number-columns-spanned="1" table:number-rows-spanned="2">
            <text:p>spc</text:p>
          </table:table-cell>
          <table:table-cell table:style-name="ce68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38"/>
          <table:covered-table-cell table:number-columns-repeated="2" table:style-name="ce590"/>
          <table:covered-table-cell table:style-name="ce68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16:10:30.43155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9T22:23:59.032136600</dc:date>
    <meta:generator>LibreOffice/26.2.0.3$Windows_X86_64 LibreOffice_project/620$Build-3</meta:generator>
    <meta:editing-duration>P2DT13H16M32S</meta:editing-duration>
    <meta:editing-cycles>485</meta:editing-cycles>
    <meta:document-statistic meta:table-count="5" meta:cell-count="3040" meta:object-count="0"/>
    <meta:user-defined meta:name="AppVersion">16.0300</meta:user-defined>
  </office:meta>
</office:document-meta>
</file>
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7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45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12" calcext:value-type="float">
            <text:p>12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4" calcext:value-type="float">
            <text:p>4</text:p>
          </table:table-cell>
          <table:table-cell table:style-name="ce176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4": { "0": 7, "1": 3, "2": 2, "3": 1, "4": 13, "5": 7, "6": 3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38" table:formula="of:=[.$AH$4]+[.$U$3]" office:value-type="float" office:value="10" calcext:value-type="float">
            <text:p>10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3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" calcext:value-type="string">
            <text:p>"8": { "0": 15, "1": 7, "2": 3, "3": 8, "4": 14, "5": 5, "6": 2, "7": 1, "8": 0, "9": 11, "10": 13, "11": 10, "12": 10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_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2" calcext:value-type="float">
            <text:p>2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178"/>
          <table:table-cell table:style-name="ce178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178"/>
          <table:table-cell table:style-name="ce178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178"/>
          <table:table-cell table:style-name="ce178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178"/>
          <table:table-cell table:style-name="ce178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178"/>
          <table:table-cell table:style-name="ce17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98"/>
          <table:table-cell table:style-name="ce98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24:.L26])-[.I26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35" calcext:value-type="float" table:number-columns-spanned="2" table:number-rows-spanned="1">
            <text:p>35</text:p>
          </table:table-cell>
          <table:covered-table-cell table:style-name="ce98"/>
          <table:table-cell table:style-name="ce98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5]+[.$U$4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3" calcext:value-type="float">
            <text:p>3</text:p>
          </table:table-cell>
          <table:table-cell table:style-name="ce98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3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3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2, &quot;9&quot;: 3, &quot;10&quot;: 1, &quot;11&quot;: 0, &quot;12&quot;: 1, &quot;13&quot;: 0, &quot;14&quot;: 1}" calcext:value-type="string">
            <text:p>"12": { "0": 6, "1": 4, "2": 2, "3": 4, "4": 6, "5": 3, "6": 2, "7": 1, "8": 2, "9": 3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3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2, &quot;9&quot;: 3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3, "4": 6, "5": 3, "6": 1, "7": 0, "8": 1, "9": 3, "10": 1, "11": 2, "12": 0, "13": 0, "14": 1}, "12": { "0": 6, "1": 4, "2": 2, "3": 4, "4": 6, "5": 3, "6": 2, "7": 1, "8": 2, "9": 3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3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2, &quot;9&quot;: 3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3, "4": 6, "5": 3, "6": 1, "7": 0, "8": 1, "9": 3, "10": 1, "11": 2, "12": 0, "13": 0, "14": 1}, "12": { "0": 6, "1": 4, "2": 2, "3": 4, "4": 6, "5": 3, "6": 2, "7": 1, "8": 2, "9": 3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0T21:11:36.087030000</dc:date>
    <meta:generator>LibreOffice/26.2.0.3$Windows_X86_64 LibreOffice_project/620$Build-3</meta:generator>
    <meta:editing-duration>P1DT2H31M26S</meta:editing-duration>
    <meta:editing-cycles>353</meta:editing-cycles>
    <meta:document-statistic meta:table-count="2" meta:cell-count="1082" meta:object-count="0"/>
    <meta:user-defined meta:name="AppVersion">16.0300</meta:user-defined>
  </office:meta>
</office:document-meta>
</file>
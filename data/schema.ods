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6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default-cell-style-name="ce78"/>
        <table:table-column table:style-name="co1" table:default-cell-style-name="ce37"/>
        <table:table-column table:style-name="co1" table:default-cell-style-name="Default"/>
        <table:table-column table:style-name="co1" table:default-cell-style-name="ce98"/>
        <table:table-column table:style-name="co1" table:number-columns-repeated="4" table:default-cell-style-name="Default"/>
        <table:table-column table:style-name="co1" table:default-cell-style-name="ce32"/>
        <table:table-column table:style-name="co1" table:default-cell-style-name="ce98"/>
        <table:table-column table:style-name="co1" table:default-cell-style-name="ce9"/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3"/>
          <table:table-cell table:style-name="ce11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/>
          <table:table-cell table:style-name="Default"/>
          <table:table-cell table:style-name="ce52" office:value-type="string" calcext:value-type="string">
            <text:p>penalties: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2"/>
          <table:table-cell table:number-columns-repeated="12"/>
          <table:table-cell office:value-type="string" calcext:value-type="string">
            <text:p>priorities:</text:p>
          </table:table-cell>
          <table:table-cell table:number-columns-repeated="19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/>
          <table:table-cell table:style-name="Default"/>
          <table:table-cell/>
          <table:table-cell table:style-name="ce53" office:value-type="float" office:value="1" calcext:value-type="float">
            <text:p>1</text:p>
          </table:table-cell>
          <table:table-cell table:style-name="ce52" office:value-type="string" calcext:value-type="string">
            <text:p>same finger</text:p>
          </table:table-cell>
          <table:table-cell table:style-name="ce56"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3"/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4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/>
          <table:table-cell table:style-name="Default"/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string" calcext:value-type="string">
            <text:p>diagonal</text:p>
          </table:table-cell>
          <table:table-cell table:style-name="ce57"/>
          <table:table-cell table:style-name="ce56"/>
          <table:table-cell table:style-name="Default" table:number-columns-repeated="2"/>
          <table:table-cell table:style-name="ce59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3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4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/>
          <table:table-cell table:style-name="Default"/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string" calcext:value-type="string">
            <text:p>distance</text:p>
          </table:table-cell>
          <table:table-cell table:style-name="ce57" table:number-columns-repeated="16"/>
          <table:table-cell table:style-name="ce61" table:number-columns-repeated="4"/>
          <table:table-cell table:number-columns-repeated="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14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50" table:number-columns-spanned="1" table:number-rows-spanned="2"/>
          <table:table-cell table:number-columns-repeated="2"/>
          <table:table-cell table:style-name="ce127"/>
          <table:table-cell table:style-name="ce78"/>
          <table:table-cell/>
          <table:table-cell table:style-name="Default"/>
          <table:table-cell table:style-name="ce52"/>
          <table:table-cell table:number-columns-repeated="3"/>
          <table:table-cell table:style-name="ce57" table:number-columns-repeated="15"/>
          <table:table-cell table:style-name="ce61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31"/>
          <table:table-cell/>
          <table:covered-table-cell table:style-name="ce31"/>
          <table:covered-table-cell table:number-columns-repeated="2" table:style-name="ce119"/>
          <table:covered-table-cell table:style-name="ce50"/>
          <table:table-cell table:style-name="ce4" table:number-columns-repeated="4"/>
          <table:table-cell/>
          <table:table-cell table:style-name="Default"/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style-name="ce59"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8" table:formula="of:=[.$AT$2]" office:value-type="float" office:value="14" calcext:value-type="float">
            <text:p>14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32" table:formula="of:=[.$AW$3]+[.$U$4]" office:value-type="float" office:value="1" calcext:value-type="float">
            <text:p>1</text:p>
          </table:table-cell>
          <table:table-cell table:style-name="ce37" table:formula="of:=[.$AX$3]+[.$U$4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8" table:formula="of:=[.$AU$2]" office:value-type="float" office:value="6" calcext:value-type="float">
            <text:p>6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37" table:formula="of:=[.$AW$3]" office:value-type="float" office:value="0" calcext:value-type="float">
            <text:p>0</text:p>
          </table:table-cell>
          <table:table-cell table:style-name="ce37" table:formula="of:=[.$AX$3]+[.$U$4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8" table:formula="of:=[.$AV$2]" office:value-type="float" office:value="3" calcext:value-type="float">
            <text:p>3</text:p>
          </table:table-cell>
          <table:table-cell table:formula="of:=[.$AW$3]" office:value-type="float" office:value="0" calcext:value-type="float">
            <text:p>0</text:p>
          </table:table-cell>
          <table:table-cell table:style-name="ce32" table:formula="of:=[.$AX$3]+[.$U$3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8" table:formula="of:=[.$AW$2]" office:value-type="float" office:value="11" calcext:value-type="float">
            <text:p>11</text:p>
          </table:table-cell>
          <table:table-cell table:formula="of:=[.$AX$3]+[.$U$2]" office:value-type="float" office:value="9" calcext:value-type="float">
            <text:p>9</text:p>
          </table:table-cell>
          <table:table-cell/>
          <table:table-cell table:formula="of:=[.$AT$3]+[.$U$4]+[.$U$3]" office:value-type="float" office:value="7" calcext:value-type="float">
            <text:p>7</text:p>
          </table:table-cell>
          <table:table-cell table:formula="of:=[.$AU$3]+[.$U$4]+[.$U$3]" office:value-type="float" office:value="4" calcext:value-type="float">
            <text:p>4</text:p>
          </table:table-cell>
          <table:table-cell table:formula="of:=[.$AV$3]+[.$U$4]+[.$U$3]" office:value-type="float" office:value="3" calcext:value-type="float">
            <text:p>3</text:p>
          </table:table-cell>
          <table:table-cell table:formula="of:=[.$AW$3]+[.$U$2]" office:value-type="float" office:value="1" calcext:value-type="float">
            <text:p>1</text:p>
          </table:table-cell>
          <table:table-cell table:style-name="ce8" table:formula="of:=[.$AX$2]" office:value-type="float" office:value="13" calcext:value-type="float">
            <text:p>13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1, &quot;4&quot;: 9, &quot;5&quot;: 6, &quot;6&quot;: 3, &quot;7&quot;: 2, &quot;8&quot;: 2, &quot;9&quot;: 10, &quot;10&quot;: , &quot;11&quot;: , &quot;12&quot;: , &quot;13&quot;: , &quot;14&quot;: }" calcext:value-type="string">
            <text:p>"0": { "0": 14, "1": 2, "2": 1, "3": 1, "4": 9, "5": 6, "6": 3, "7": 2, "8": 2, "9": 10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T$3]+[.$U$2]" office:value-type="float" office:value="6" calcext:value-type="float">
            <text:p>6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2" table:formula="of:=[.$AW$3]+[.$U$3]+[.$U$4]" office:value-type="float" office:value="2" calcext:value-type="float">
            <text:p>2</text:p>
          </table:table-cell>
          <table:table-cell table:style-name="ce32" table:formula="of:=[.$AX$3]+[.$U$4]+[.$U$3]" office:value-type="float" office:value="10" calcext:value-type="float">
            <text:p>10</text:p>
          </table:table-cell>
          <table:table-cell table:style-name="ce43"/>
          <table:table-cell table:style-name="ce9" table:formula="of:=[.$AT$3]+[.$U$3]" office:value-type="float" office:value="6" calcext:value-type="float">
            <text:p>6</text:p>
          </table:table-cell>
          <table:table-cell table:style-name="ce21" table:formula="of:=[.$AU$3]+[.$U$2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7" table:formula="of:=[.$AW$3]" office:value-type="float" office:value="0" calcext:value-type="float">
            <text:p>0</text:p>
          </table:table-cell>
          <table:table-cell table:style-name="ce32" table:formula="of:=[.$AX$3]+[.$U$4]+[.$U$3]" office:value-type="float" office:value="10" calcext:value-type="float">
            <text:p>10</text:p>
          </table:table-cell>
          <table:table-cell table:style-name="ce43"/>
          <table:table-cell table:style-name="ce9" table:formula="of:=[.$AT$3]+[.$U$3]" office:value-type="float" office:value="6" calcext:value-type="float">
            <text:p>6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2]" office:value-type="float" office:value="2" calcext:value-type="float">
            <text:p>2</text:p>
          </table:table-cell>
          <table:table-cell table:formula="of:=[.$AW$3]" office:value-type="float" office:value="0" calcext:value-type="float">
            <text:p>0</text:p>
          </table:table-cell>
          <table:table-cell table:style-name="ce32" table:formula="of:=[.$AX$3]+[.$U$3]" office:value-type="float" office:value="9" calcext:value-type="float">
            <text:p>9</text:p>
          </table:table-cell>
          <table:table-cell table:style-name="ce43"/>
          <table:table-cell table:style-name="ce9" table:formula="of:=[.$AT$3]+[.$U$3]+[.$U$4]" office:value-type="float" office:value="7" calcext:value-type="float">
            <text:p>7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2" table:formula="of:=[.$AW$3]+[.$U$2]" office:value-type="float" office:value="1" calcext:value-type="float">
            <text:p>1</text:p>
          </table:table-cell>
          <table:table-cell table:formula="of:=[.$AX$3]+[.$U$2]" office:value-type="float" office:value="9" calcext:value-type="float">
            <text:p>9</text:p>
          </table:table-cell>
          <table:table-cell table:style-name="ce43"/>
          <table:table-cell table:formula="of:=[.$AT$3]+[.$U$3]+[.$U$4]" office:value-type="float" office:value="7" calcext:value-type="float">
            <text:p>7</text:p>
          </table:table-cell>
          <table:table-cell table:formula="of:=[.$AU$3]+[.$U$4]+[.$U$3]" office:value-type="float" office:value="4" calcext:value-type="float">
            <text:p>4</text:p>
          </table:table-cell>
          <table:table-cell table:formula="of:=[.$AV$3]+[.$U$4]+[.$U$3]" office:value-type="float" office:value="3" calcext:value-type="float">
            <text:p>3</text:p>
          </table:table-cell>
          <table:table-cell table:formula="of:=[.$AW$3]+[.$U$2]" office:value-type="float" office:value="1" calcext:value-type="float">
            <text:p>1</text:p>
          </table:table-cell>
          <table:table-cell table:style-name="ce32" table:formula="of:=[.$AX$3]+[.$U$2]" office:value-type="float" office:value="9" calcext:value-type="float">
            <text:p>9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6, &quot;2&quot;: 1, &quot;3&quot;: 0, &quot;4&quot;: 9, &quot;5&quot;: 6, &quot;6&quot;: 3, &quot;7&quot;: 2, &quot;8&quot;: 0, &quot;9&quot;: 10, &quot;10&quot;: , &quot;11&quot;: , &quot;12&quot;: , &quot;13&quot;: , &quot;14&quot;: }" calcext:value-type="string">
            <text:p>"1": { "0": 5, "1": 6, "2": 1, "3": 0, "4": 9, "5": 6, "6": 3, "7": 2, "8": 0, "9": 10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2, &quot;2&quot;: 3, &quot;3&quot;: 0, &quot;4&quot;: 9, &quot;5&quot;: 6, &quot;6&quot;: 3, &quot;7&quot;: 2, &quot;8&quot;: 0, &quot;9&quot;: 9, &quot;10&quot;: , &quot;11&quot;: , &quot;12&quot;: , &quot;13&quot;: , &quot;14&quot;: }" calcext:value-type="string">
            <text:p>"2": { "0": 5, "1": 2, "2": 3, "3": 0, "4": 9, "5": 6, "6": 3, "7": 2, "8": 0, "9": 9, "10": , "11": , "12": , "13": , "14": }</text:p>
          </table:table-cell>
          <table:table-cell table:number-columns-repeated="32"/>
          <table:table-cell table:style-name="ce5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11, &quot;4&quot;: 9, &quot;5&quot;: 7, &quot;6&quot;: 3, &quot;7&quot;: 2, &quot;8&quot;: 1, &quot;9&quot;: 9, &quot;10&quot;: , &quot;11&quot;: , &quot;12&quot;: , &quot;13&quot;: , &quot;14&quot;: }" calcext:value-type="string">
            <text:p>"3": { "0": 5, "1": 2, "2": 1, "3": 11, "4": 9, "5": 7, "6": 3, "7": 2, "8": 1, "9": 9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11" calcext:value-type="string">
            <text:p>"3": 11</text:p>
          </table:table-cell>
          <table:table-cell table:style-name="ce95" table:formula="of:=COM.MICROSOFT.CONCAT(&quot;&quot;&quot;&quot;;[.$F$2]; &quot;&quot;&quot;: &quot;; [.X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4" calcext:value-type="string">
            <text:p>"1": 4</text:p>
          </table:table-cell>
          <table:table-cell table:style-name="ce95" table:formula="of:=COM.MICROSOFT.CONCAT(&quot;&quot;&quot;&quot;;[.$D$2]; &quot;&quot;&quot;: &quot;; [.AB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5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4, &quot;2&quot;: 3, &quot;3&quot;: 1, &quot;4&quot;: 13, &quot;5&quot;: 7, &quot;6&quot;: 4, &quot;7&quot;: 3, &quot;8&quot;: 1, &quot;9&quot;: 9, &quot;10&quot;: , &quot;11&quot;: , &quot;12&quot;: , &quot;13&quot;: , &quot;14&quot;: }" calcext:value-type="string">
            <text:p>"4": { "0": 7, "1": 4, "2": 3, "3": 1, "4": 13, "5": 7, "6": 4, "7": 3, "8": 1, "9": 9, "10": , "11": , "12": , "13": , "14": }</text:p>
          </table:table-cell>
          <table:table-cell table:style-name="ce5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O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9" calcext:value-type="string">
            <text:p>"9": 9</text:p>
          </table:table-cell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" calcext:value-type="string">
            <text:p>"10": </text:p>
          </table:table-cell>
          <table:table-cell table:style-name="ce95" table:formula="of:=COM.MICROSOFT.CONCAT(&quot;&quot;&quot;&quot;;[.$C$4]; &quot;&quot;&quot;: &quot;; [.C10])" office:value-type="string" office:string-value="&quot;11&quot;: " calcext:value-type="string">
            <text:p>"11": </text:p>
          </table:table-cell>
          <table:table-cell table:style-name="ce95" table:formula="of:=COM.MICROSOFT.CONCAT(&quot;&quot;&quot;&quot;;[.$D$4]; &quot;&quot;&quot;: &quot;; [.D10])" office:value-type="string" office:string-value="&quot;12&quot;: " calcext:value-type="string">
            <text:p>"12": </text:p>
          </table:table-cell>
          <table:table-cell table:style-name="ce95" table:formula="of:=COM.MICROSOFT.CONCAT(&quot;&quot;&quot;&quot;;[.$E$4]; &quot;&quot;&quot;: &quot;; [.E10])" office:value-type="string" office:string-value="&quot;13&quot;: " calcext:value-type="string">
            <text:p>"13": </text:p>
          </table:table-cell>
          <table:table-cell table:style-name="ce95" table:formula="of:=COM.MICROSOFT.CONCAT(&quot;&quot;&quot;&quot;;[.$F$4]; &quot;&quot;&quot;: &quot;; [.F10])" office:value-type="string" office:string-value="&quot;14&quot;: " calcext:value-type="string">
            <text:p>"14": 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" calcext:value-type="string">
            <text:p>"10": </text:p>
          </table:table-cell>
          <table:table-cell table:style-name="ce95" table:formula="of:=COM.MICROSOFT.CONCAT(&quot;&quot;&quot;&quot;;[.$C$4]; &quot;&quot;&quot;: &quot;; [.I10])" office:value-type="string" office:string-value="&quot;11&quot;: " calcext:value-type="string">
            <text:p>"11": </text:p>
          </table:table-cell>
          <table:table-cell table:style-name="ce95" table:formula="of:=COM.MICROSOFT.CONCAT(&quot;&quot;&quot;&quot;;[.$D$4]; &quot;&quot;&quot;: &quot;; [.J10])" office:value-type="string" office:string-value="&quot;12&quot;: " calcext:value-type="string">
            <text:p>"12": </text:p>
          </table:table-cell>
          <table:table-cell table:style-name="ce95" table:formula="of:=COM.MICROSOFT.CONCAT(&quot;&quot;&quot;&quot;;[.$E$4]; &quot;&quot;&quot;: &quot;; [.K10])" office:value-type="string" office:string-value="&quot;13&quot;: " calcext:value-type="string">
            <text:p>"13": </text:p>
          </table:table-cell>
          <table:table-cell table:style-name="ce95" table:formula="of:=COM.MICROSOFT.CONCAT(&quot;&quot;&quot;&quot;;[.$F$4]; &quot;&quot;&quot;: &quot;; [.L10])" office:value-type="string" office:string-value="&quot;14&quot;: " calcext:value-type="string">
            <text:p>"14": 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" calcext:value-type="string">
            <text:p>"10": </text:p>
          </table:table-cell>
          <table:table-cell table:style-name="ce95" table:formula="of:=COM.MICROSOFT.CONCAT(&quot;&quot;&quot;&quot;;[.$C$4]; &quot;&quot;&quot;: &quot;; [.O10])" office:value-type="string" office:string-value="&quot;11&quot;: " calcext:value-type="string">
            <text:p>"11": </text:p>
          </table:table-cell>
          <table:table-cell table:style-name="ce95" table:formula="of:=COM.MICROSOFT.CONCAT(&quot;&quot;&quot;&quot;;[.$D$4]; &quot;&quot;&quot;: &quot;; [.P10])" office:value-type="string" office:string-value="&quot;12&quot;: " calcext:value-type="string">
            <text:p>"12": </text:p>
          </table:table-cell>
          <table:table-cell table:style-name="ce95" table:formula="of:=COM.MICROSOFT.CONCAT(&quot;&quot;&quot;&quot;;[.$E$4]; &quot;&quot;&quot;: &quot;; [.Q10])" office:value-type="string" office:string-value="&quot;13&quot;: " calcext:value-type="string">
            <text:p>"13": </text:p>
          </table:table-cell>
          <table:table-cell table:style-name="ce95" table:formula="of:=COM.MICROSOFT.CONCAT(&quot;&quot;&quot;&quot;;[.$F$4]; &quot;&quot;&quot;: &quot;; [.R10])" office:value-type="string" office:string-value="&quot;14&quot;: " calcext:value-type="string">
            <text:p>"14": 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" calcext:value-type="string">
            <text:p>"10": </text:p>
          </table:table-cell>
          <table:table-cell table:style-name="ce95" table:formula="of:=COM.MICROSOFT.CONCAT(&quot;&quot;&quot;&quot;;[.$C$4]; &quot;&quot;&quot;: &quot;; [.U10])" office:value-type="string" office:string-value="&quot;11&quot;: " calcext:value-type="string">
            <text:p>"11": </text:p>
          </table:table-cell>
          <table:table-cell table:style-name="ce95" table:formula="of:=COM.MICROSOFT.CONCAT(&quot;&quot;&quot;&quot;;[.$D$4]; &quot;&quot;&quot;: &quot;; [.V10])" office:value-type="string" office:string-value="&quot;12&quot;: " calcext:value-type="string">
            <text:p>"12": </text:p>
          </table:table-cell>
          <table:table-cell table:style-name="ce95" table:formula="of:=COM.MICROSOFT.CONCAT(&quot;&quot;&quot;&quot;;[.$E$4]; &quot;&quot;&quot;: &quot;; [.W10])" office:value-type="string" office:string-value="&quot;13&quot;: " calcext:value-type="string">
            <text:p>"13": </text:p>
          </table:table-cell>
          <table:table-cell table:style-name="ce95" table:formula="of:=COM.MICROSOFT.CONCAT(&quot;&quot;&quot;&quot;;[.$F$4]; &quot;&quot;&quot;: &quot;; [.X10])" office:value-type="string" office:string-value="&quot;14&quot;: " calcext:value-type="string">
            <text:p>"14": 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" calcext:value-type="string">
            <text:p>"10": </text:p>
          </table:table-cell>
          <table:table-cell table:style-name="ce95" table:formula="of:=COM.MICROSOFT.CONCAT(&quot;&quot;&quot;&quot;;[.$C$4]; &quot;&quot;&quot;: &quot;; [.AA10])" office:value-type="string" office:string-value="&quot;11&quot;: " calcext:value-type="string">
            <text:p>"11": </text:p>
          </table:table-cell>
          <table:table-cell table:style-name="ce95" table:formula="of:=COM.MICROSOFT.CONCAT(&quot;&quot;&quot;&quot;;[.$D$4]; &quot;&quot;&quot;: &quot;; [.AB10])" office:value-type="string" office:string-value="&quot;12&quot;: " calcext:value-type="string">
            <text:p>"12": </text:p>
          </table:table-cell>
          <table:table-cell table:style-name="ce95" table:formula="of:=COM.MICROSOFT.CONCAT(&quot;&quot;&quot;&quot;;[.$E$4]; &quot;&quot;&quot;: &quot;; [.AC10])" office:value-type="string" office:string-value="&quot;13&quot;: " calcext:value-type="string">
            <text:p>"13": </text:p>
          </table:table-cell>
          <table:table-cell table:style-name="ce95" table:formula="of:=COM.MICROSOFT.CONCAT(&quot;&quot;&quot;&quot;;[.$F$4]; &quot;&quot;&quot;: &quot;; [.AD10])" office:value-type="string" office:string-value="&quot;14&quot;: " calcext:value-type="string">
            <text:p>"14": 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14, &quot;1&quot;: 2, &quot;2&quot;: 1, &quot;3&quot;: 1, &quot;4&quot;: 9, &quot;5&quot;: 6, &quot;6&quot;: 3, &quot;7&quot;: 2, &quot;8&quot;: 2, &quot;9&quot;: 10, &quot;10&quot;: , &quot;11&quot;: , &quot;12&quot;: , &quot;13&quot;: , &quot;14&quot;: }, &quot;1&quot;: { &quot;0&quot;: 5, &quot;1&quot;: 6, &quot;2&quot;: 1, &quot;3&quot;: 0, &quot;4&quot;: 9, &quot;5&quot;: 6, &quot;6&quot;: 3, &quot;7&quot;: 2, &quot;8&quot;: 0, &quot;9&quot;: 10, &quot;10&quot;: , &quot;11&quot;: , &quot;12&quot;: , &quot;13&quot;: , &quot;14&quot;: }, &quot;2&quot;: { &quot;0&quot;: 5, &quot;1&quot;: 2, &quot;2&quot;: 3, &quot;3&quot;: 0, &quot;4&quot;: 9, &quot;5&quot;: 6, &quot;6&quot;: 3, &quot;7&quot;: 2, &quot;8&quot;: 0, &quot;9&quot;: 9, &quot;10&quot;: , &quot;11&quot;: , &quot;12&quot;: , &quot;13&quot;: , &quot;14&quot;: }, &quot;3&quot;: { &quot;0&quot;: 5, &quot;1&quot;: 2, &quot;2&quot;: 1, &quot;3&quot;: 11, &quot;4&quot;: 9, &quot;5&quot;: 7, &quot;6&quot;: 3, &quot;7&quot;: 2, &quot;8&quot;: 1, &quot;9&quot;: 9, &quot;10&quot;: , &quot;11&quot;: , &quot;12&quot;: , &quot;13&quot;: , &quot;14&quot;: }, &quot;4&quot;: { &quot;0&quot;: 7, &quot;1&quot;: 4, &quot;2&quot;: 3, &quot;3&quot;: 1, &quot;4&quot;: 13, &quot;5&quot;: 7, &quot;6&quot;: 4, &quot;7&quot;: 3, &quot;8&quot;: 1, &quot;9&quot;: 9, &quot;10&quot;: , &quot;11&quot;: , &quot;12&quot;: , &quot;13&quot;: , &quot;14&quot;: }" calcext:value-type="string">
            <text:p>"0": { "0": 14, "1": 2, "2": 1, "3": 1, "4": 9, "5": 6, "6": 3, "7": 2, "8": 2, "9": 10, "10": , "11": , "12": , "13": , "14": }, "1": { "0": 5, "1": 6, "2": 1, "3": 0, "4": 9, "5": 6, "6": 3, "7": 2, "8": 0, "9": 10, "10": , "11": , "12": , "13": , "14": }, "2": { "0": 5, "1": 2, "2": 3, "3": 0, "4": 9, "5": 6, "6": 3, "7": 2, "8": 0, "9": 9, "10": , "11": , "12": , "13": , "14": }, "3": { "0": 5, "1": 2, "2": 1, "3": 11, "4": 9, "5": 7, "6": 3, "7": 2, "8": 1, "9": 9, "10": , "11": , "12": , "13": , "14": }, "4": { "0": 7, "1": 4, "2": 3, "3": 1, "4": 13, "5": 7, "6": 4, "7": 3, "8": 1, "9": 9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T$2]+[.$U$2]" office:value-type="float" office:value="15" calcext:value-type="float">
            <text:p>15</text:p>
          </table:table-cell>
          <table:table-cell table:style-name="ce23" table:formula="of:=[.$AU$2]+[.$U$3]" office:value-type="float" office:value="7" calcext:value-type="float">
            <text:p>7</text:p>
          </table:table-cell>
          <table:table-cell table:style-name="ce28" table:formula="of:=[.$AV$2]+[.$U$3]" office:value-type="float" office:value="4" calcext:value-type="float">
            <text:p>4</text:p>
          </table:table-cell>
          <table:table-cell table:style-name="ce34" table:formula="of:=[.$AW$2]+[.$U$3]" office:value-type="float" office:value="12" calcext:value-type="float">
            <text:p>12</text:p>
          </table:table-cell>
          <table:table-cell table:style-name="ce34" table:formula="of:=[.$AX$2]+[.$U$4]+[.$U$3]" office:value-type="float" office:value="15" calcext:value-type="float">
            <text:p>15</text:p>
          </table:table-cell>
          <table:table-cell table:style-name="ce44"/>
          <table:table-cell table:style-name="ce14" table:formula="of:=[.$AT$2]+[.$U$3]" office:value-type="float" office:value="15" calcext:value-type="float">
            <text:p>15</text:p>
          </table:table-cell>
          <table:table-cell table:style-name="ce23" table:formula="of:=[.$AU$2]+[.$U$2]" office:value-type="float" office:value="7" calcext:value-type="float">
            <text:p>7</text:p>
          </table:table-cell>
          <table:table-cell table:style-name="ce48" table:formula="of:=[.$AV$2]" office:value-type="float" office:value="3" calcext:value-type="float">
            <text:p>3</text:p>
          </table:table-cell>
          <table:table-cell table:style-name="ce34" table:formula="of:=[.$AW$2]+[.$U$3]" office:value-type="float" office:value="12" calcext:value-type="float">
            <text:p>12</text:p>
          </table:table-cell>
          <table:table-cell table:style-name="ce34" table:formula="of:=[.$AX$2]+[.$U$4]+[.$U$3]" office:value-type="float" office:value="15" calcext:value-type="float">
            <text:p>15</text:p>
          </table:table-cell>
          <table:table-cell table:style-name="ce44"/>
          <table:table-cell table:style-name="ce14" table:formula="of:=[.$AT$2]+[.$U$3]" office:value-type="float" office:value="15" calcext:value-type="float">
            <text:p>15</text:p>
          </table:table-cell>
          <table:table-cell table:style-name="ce23" table:formula="of:=[.$AU$2]+[.$U$3]" office:value-type="float" office:value="7" calcext:value-type="float">
            <text:p>7</text:p>
          </table:table-cell>
          <table:table-cell table:style-name="ce28" table:formula="of:=[.$AV$2]+[.$U$2]" office:value-type="float" office:value="4" calcext:value-type="float">
            <text:p>4</text:p>
          </table:table-cell>
          <table:table-cell table:style-name="ce34" table:formula="of:=[.$AW$2]+[.$U$3]" office:value-type="float" office:value="12" calcext:value-type="float">
            <text:p>12</text:p>
          </table:table-cell>
          <table:table-cell table:style-name="ce34" table:formula="of:=[.$AX$2]+[.$U$3]" office:value-type="float" office:value="14" calcext:value-type="float">
            <text:p>14</text:p>
          </table:table-cell>
          <table:table-cell table:style-name="ce44"/>
          <table:table-cell table:style-name="ce14" table:formula="of:=[.$AT$2]+[.$U$4]" office:value-type="float" office:value="15" calcext:value-type="float">
            <text:p>15</text:p>
          </table:table-cell>
          <table:table-cell table:style-name="ce55" table:formula="of:=[.$AU$2]" office:value-type="float" office:value="6" calcext:value-type="float">
            <text:p>6</text:p>
          </table:table-cell>
          <table:table-cell table:style-name="ce48" table:formula="of:=[.$AV$2]" office:value-type="float" office:value="3" calcext:value-type="float">
            <text:p>3</text:p>
          </table:table-cell>
          <table:table-cell table:style-name="ce34" table:formula="of:=[.$AW$2]+[.$U$2]" office:value-type="float" office:value="12" calcext:value-type="float">
            <text:p>12</text:p>
          </table:table-cell>
          <table:table-cell table:style-name="ce34" table:formula="of:=[.$AX$2]+[.$U$2]" office:value-type="float" office:value="14" calcext:value-type="float">
            <text:p>14</text:p>
          </table:table-cell>
          <table:table-cell table:style-name="ce44"/>
          <table:table-cell table:style-name="ce14" table:formula="of:=[.$AT$2]+[.$U$4]" office:value-type="float" office:value="15" calcext:value-type="float">
            <text:p>15</text:p>
          </table:table-cell>
          <table:table-cell table:style-name="ce23" table:formula="of:=[.$AU$2]+[.$U$3]+[.$U$4]" office:value-type="float" office:value="8" calcext:value-type="float">
            <text:p>8</text:p>
          </table:table-cell>
          <table:table-cell table:style-name="ce28" table:formula="of:=[.$AV$2]+[.$U$3]" office:value-type="float" office:value="4" calcext:value-type="float">
            <text:p>4</text:p>
          </table:table-cell>
          <table:table-cell table:style-name="ce34" table:formula="of:=[.$AW$2]+[.$U$2]" office:value-type="float" office:value="12" calcext:value-type="float">
            <text:p>12</text:p>
          </table:table-cell>
          <table:table-cell table:style-name="ce34" table:formula="of:=[.$AX$2]+[.$U$2]" office:value-type="float" office:value="14" calcext:value-type="float">
            <text:p>14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12, &quot;4&quot;: 15, &quot;5&quot;: 5, &quot;6&quot;: 2, &quot;7&quot;: 1, &quot;8&quot;: 0, &quot;9&quot;: 9, &quot;10&quot;: , &quot;11&quot;: , &quot;12&quot;: , &quot;13&quot;: , &quot;14&quot;: }" calcext:value-type="string">
            <text:p>"5": { "0": 15, "1": 7, "2": 4, "3": 12, "4": 15, "5": 5, "6": 2, "7": 1, "8": 0, "9": 9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5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37" table:formula="of:=[.$AW$3]" office:value-type="float" office:value="0" calcext:value-type="float">
            <text:p>0</text:p>
          </table:table-cell>
          <table:table-cell table:style-name="ce32" table:formula="of:=[.$AX$3]+[.$U$4]" office:value-type="float" office:value="9" calcext:value-type="float">
            <text:p>9</text:p>
          </table:table-cell>
          <table:table-cell table:style-name="ce43"/>
          <table:table-cell table:style-name="ce46" table:formula="of:=[.$AT$3]" office:value-type="float" office:value="5" calcext:value-type="float">
            <text:p>5</text:p>
          </table:table-cell>
          <table:table-cell table:style-name="ce15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37" table:formula="of:=[.$AW$3]" office:value-type="float" office:value="0" calcext:value-type="float">
            <text:p>0</text:p>
          </table:table-cell>
          <table:table-cell table:style-name="ce32" table:formula="of:=[.$AX$3]+[.$U$4]" office:value-type="float" office:value="9" calcext:value-type="float">
            <text:p>9</text:p>
          </table:table-cell>
          <table:table-cell table:style-name="ce43"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15" table:formula="of:=[.$AV$3]" office:value-type="float" office:value="1" calcext:value-type="float">
            <text:p>1</text:p>
          </table:table-cell>
          <table:table-cell table:formula="of:=[.$AW$3]" office:value-type="float" office:value="0" calcext:value-type="float">
            <text:p>0</text:p>
          </table:table-cell>
          <table:table-cell table:style-name="ce37" table:formula="of:=[.$AX$3]" office:value-type="float" office:value="8" calcext:value-type="float">
            <text:p>8</text:p>
          </table:table-cell>
          <table:table-cell table:style-name="ce43"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15" table:formula="of:=[.$AW$3]" office:value-type="float" office:value="0" calcext:value-type="float">
            <text:p>0</text:p>
          </table:table-cell>
          <table:table-cell table:formula="of:=[.$AX$3]+[.$U$2]" office:value-type="float" office:value="9" calcext:value-type="float">
            <text:p>9</text:p>
          </table:table-cell>
          <table:table-cell table:style-name="ce43"/>
          <table:table-cell table:formula="of:=[.$AT$3]+[.$U$4]" office:value-type="float" office:value="6" calcext:value-type="float">
            <text:p>6</text:p>
          </table:table-cell>
          <table:table-cell table:formula="of:=[.$AU$3]+[.$U$4]" office:value-type="float" office:value="3" calcext:value-type="float">
            <text:p>3</text:p>
          </table:table-cell>
          <table:table-cell table:formula="of:=[.$AV$3]+[.$U$4]" office:value-type="float" office:value="2" calcext:value-type="float">
            <text:p>2</text:p>
          </table:table-cell>
          <table:table-cell table:formula="of:=[.$AW$3]+[.$U$2]" office:value-type="float" office:value="1" calcext:value-type="float">
            <text:p>1</text:p>
          </table:table-cell>
          <table:table-cell table:style-name="ce15" table:formula="of:=[.$AX$3]" office:value-type="float" office:value="8" calcext:value-type="float">
            <text:p>8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15, &quot;1&quot;: 7, &quot;2&quot;: 3, &quot;3&quot;: 12, &quot;4&quot;: 15, &quot;5&quot;: 5, &quot;6&quot;: 2, &quot;7&quot;: 1, &quot;8&quot;: 0, &quot;9&quot;: 9, &quot;10&quot;: , &quot;11&quot;: , &quot;12&quot;: , &quot;13&quot;: , &quot;14&quot;: }" calcext:value-type="string">
            <text:p>"6": { "0": 15, "1": 7, "2": 3, "3": 12, "4": 15, "5": 5, "6": 2, "7": 1, "8": 0, "9": 9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style-name="ce90"/>
          <table:table-cell table:style-name="ce105"/>
          <table:table-cell table:style-name="ce109"/>
          <table:table-cell table:style-name="ce114" table:number-columns-repeated="2"/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15, &quot;1&quot;: 7, &quot;2&quot;: 4, &quot;3&quot;: 12, &quot;4&quot;: 14, &quot;5&quot;: 5, &quot;6&quot;: 2, &quot;7&quot;: 1, &quot;8&quot;: 0, &quot;9&quot;: 8, &quot;10&quot;: , &quot;11&quot;: , &quot;12&quot;: , &quot;13&quot;: , &quot;14&quot;: }" calcext:value-type="string">
            <text:p>"7": { "0": 15, "1": 7, "2": 4, "3": 12, "4": 14, "5": 5, "6": 2, "7": 1, "8": 0, "9": 8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6, &quot;2&quot;: 3, &quot;3&quot;: 12, &quot;4&quot;: 14, &quot;5&quot;: 5, &quot;6&quot;: 2, &quot;7&quot;: 1, &quot;8&quot;: 0, &quot;9&quot;: 9, &quot;10&quot;: , &quot;11&quot;: , &quot;12&quot;: , &quot;13&quot;: , &quot;14&quot;: }" calcext:value-type="string">
            <text:p>"8": { "0": 15, "1": 6, "2": 3, "3": 12, "4": 14, "5": 5, "6": 2, "7": 1, "8": 0, "9": 9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F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L16])" office:value-type="string" office:string-value="&quot;4&quot;: 15" calcext:value-type="string">
            <text:p>"4": 15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O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6" calcext:value-type="string">
            <text:p>"1": 6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AA16])" office:value-type="string" office:string-value="&quot;1&quot;: 8" calcext:value-type="string">
            <text:p>"1": 8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15, &quot;1&quot;: 8, &quot;2&quot;: 4, &quot;3&quot;: 12, &quot;4&quot;: 14, &quot;5&quot;: 6, &quot;6&quot;: 3, &quot;7&quot;: 2, &quot;8&quot;: 1, &quot;9&quot;: 8, &quot;10&quot;: , &quot;11&quot;: , &quot;12&quot;: , &quot;13&quot;: , &quot;14&quot;: }" calcext:value-type="string">
            <text:p>"9": { "0": 15, "1": 8, "2": 4, "3": 12, "4": 14, "5": 6, "6": 3, "7": 2, "8": 1, "9": 8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8" calcext:value-type="string">
            <text:p>"9": 8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" calcext:value-type="string">
            <text:p>"10": </text:p>
          </table:table-cell>
          <table:table-cell table:style-name="ce100" table:formula="of:=COM.MICROSOFT.CONCAT(&quot;&quot;&quot;&quot;;[.$C$4]; &quot;&quot;&quot;: &quot;; [.C18])" office:value-type="string" office:string-value="&quot;11&quot;: " calcext:value-type="string">
            <text:p>"11": </text:p>
          </table:table-cell>
          <table:table-cell table:style-name="ce100" table:formula="of:=COM.MICROSOFT.CONCAT(&quot;&quot;&quot;&quot;;[.$D$4]; &quot;&quot;&quot;: &quot;; [.D18])" office:value-type="string" office:string-value="&quot;12&quot;: " calcext:value-type="string">
            <text:p>"12": </text:p>
          </table:table-cell>
          <table:table-cell table:style-name="ce100" table:formula="of:=COM.MICROSOFT.CONCAT(&quot;&quot;&quot;&quot;;[.$E$4]; &quot;&quot;&quot;: &quot;; [.E18])" office:value-type="string" office:string-value="&quot;13&quot;: " calcext:value-type="string">
            <text:p>"13": </text:p>
          </table:table-cell>
          <table:table-cell table:style-name="ce100" table:formula="of:=COM.MICROSOFT.CONCAT(&quot;&quot;&quot;&quot;;[.$F$4]; &quot;&quot;&quot;: &quot;; [.F18])" office:value-type="string" office:string-value="&quot;14&quot;: " calcext:value-type="string">
            <text:p>"14": 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" calcext:value-type="string">
            <text:p>"10": </text:p>
          </table:table-cell>
          <table:table-cell table:style-name="ce100" table:formula="of:=COM.MICROSOFT.CONCAT(&quot;&quot;&quot;&quot;;[.$C$4]; &quot;&quot;&quot;: &quot;; [.I18])" office:value-type="string" office:string-value="&quot;11&quot;: " calcext:value-type="string">
            <text:p>"11": </text:p>
          </table:table-cell>
          <table:table-cell table:style-name="ce100" table:formula="of:=COM.MICROSOFT.CONCAT(&quot;&quot;&quot;&quot;;[.$D$4]; &quot;&quot;&quot;: &quot;; [.J18])" office:value-type="string" office:string-value="&quot;12&quot;: " calcext:value-type="string">
            <text:p>"12": </text:p>
          </table:table-cell>
          <table:table-cell table:style-name="ce100" table:formula="of:=COM.MICROSOFT.CONCAT(&quot;&quot;&quot;&quot;;[.$E$4]; &quot;&quot;&quot;: &quot;; [.K18])" office:value-type="string" office:string-value="&quot;13&quot;: " calcext:value-type="string">
            <text:p>"13": </text:p>
          </table:table-cell>
          <table:table-cell table:style-name="ce100" table:formula="of:=COM.MICROSOFT.CONCAT(&quot;&quot;&quot;&quot;;[.$F$4]; &quot;&quot;&quot;: &quot;; [.L18])" office:value-type="string" office:string-value="&quot;14&quot;: " calcext:value-type="string">
            <text:p>"14": 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" calcext:value-type="string">
            <text:p>"10": </text:p>
          </table:table-cell>
          <table:table-cell table:style-name="ce100" table:formula="of:=COM.MICROSOFT.CONCAT(&quot;&quot;&quot;&quot;;[.$C$4]; &quot;&quot;&quot;: &quot;; [.O18])" office:value-type="string" office:string-value="&quot;11&quot;: " calcext:value-type="string">
            <text:p>"11": </text:p>
          </table:table-cell>
          <table:table-cell table:style-name="ce100" table:formula="of:=COM.MICROSOFT.CONCAT(&quot;&quot;&quot;&quot;;[.$D$4]; &quot;&quot;&quot;: &quot;; [.P18])" office:value-type="string" office:string-value="&quot;12&quot;: " calcext:value-type="string">
            <text:p>"12": </text:p>
          </table:table-cell>
          <table:table-cell table:style-name="ce100" table:formula="of:=COM.MICROSOFT.CONCAT(&quot;&quot;&quot;&quot;;[.$E$4]; &quot;&quot;&quot;: &quot;; [.Q18])" office:value-type="string" office:string-value="&quot;13&quot;: " calcext:value-type="string">
            <text:p>"13": </text:p>
          </table:table-cell>
          <table:table-cell table:style-name="ce100" table:formula="of:=COM.MICROSOFT.CONCAT(&quot;&quot;&quot;&quot;;[.$F$4]; &quot;&quot;&quot;: &quot;; [.R18])" office:value-type="string" office:string-value="&quot;14&quot;: " calcext:value-type="string">
            <text:p>"14": 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" calcext:value-type="string">
            <text:p>"10": </text:p>
          </table:table-cell>
          <table:table-cell table:style-name="ce100" table:formula="of:=COM.MICROSOFT.CONCAT(&quot;&quot;&quot;&quot;;[.$C$4]; &quot;&quot;&quot;: &quot;; [.U18])" office:value-type="string" office:string-value="&quot;11&quot;: " calcext:value-type="string">
            <text:p>"11": </text:p>
          </table:table-cell>
          <table:table-cell table:style-name="ce100" table:formula="of:=COM.MICROSOFT.CONCAT(&quot;&quot;&quot;&quot;;[.$D$4]; &quot;&quot;&quot;: &quot;; [.V18])" office:value-type="string" office:string-value="&quot;12&quot;: " calcext:value-type="string">
            <text:p>"12": </text:p>
          </table:table-cell>
          <table:table-cell table:style-name="ce100" table:formula="of:=COM.MICROSOFT.CONCAT(&quot;&quot;&quot;&quot;;[.$E$4]; &quot;&quot;&quot;: &quot;; [.W18])" office:value-type="string" office:string-value="&quot;13&quot;: " calcext:value-type="string">
            <text:p>"13": </text:p>
          </table:table-cell>
          <table:table-cell table:style-name="ce100" table:formula="of:=COM.MICROSOFT.CONCAT(&quot;&quot;&quot;&quot;;[.$F$4]; &quot;&quot;&quot;: &quot;; [.X18])" office:value-type="string" office:string-value="&quot;14&quot;: " calcext:value-type="string">
            <text:p>"14": 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" calcext:value-type="string">
            <text:p>"10": </text:p>
          </table:table-cell>
          <table:table-cell table:style-name="ce100" table:formula="of:=COM.MICROSOFT.CONCAT(&quot;&quot;&quot;&quot;;[.$C$4]; &quot;&quot;&quot;: &quot;; [.AA18])" office:value-type="string" office:string-value="&quot;11&quot;: " calcext:value-type="string">
            <text:p>"11": </text:p>
          </table:table-cell>
          <table:table-cell table:style-name="ce100" table:formula="of:=COM.MICROSOFT.CONCAT(&quot;&quot;&quot;&quot;;[.$D$4]; &quot;&quot;&quot;: &quot;; [.AB18])" office:value-type="string" office:string-value="&quot;12&quot;: " calcext:value-type="string">
            <text:p>"12": </text:p>
          </table:table-cell>
          <table:table-cell table:style-name="ce100" table:formula="of:=COM.MICROSOFT.CONCAT(&quot;&quot;&quot;&quot;;[.$E$4]; &quot;&quot;&quot;: &quot;; [.AC18])" office:value-type="string" office:string-value="&quot;13&quot;: " calcext:value-type="string">
            <text:p>"13": </text:p>
          </table:table-cell>
          <table:table-cell table:style-name="ce100" table:formula="of:=COM.MICROSOFT.CONCAT(&quot;&quot;&quot;&quot;;[.$F$4]; &quot;&quot;&quot;: &quot;; [.AD18])" office:value-type="string" office:string-value="&quot;14&quot;: " calcext:value-type="string">
            <text:p>"14": </text:p>
          </table:table-cell>
          <table:table-cell/>
          <table:table-cell table:formula="of:=COM.MICROSOFT.TEXTJOIN(&quot;, &quot;;TRUE();[.AF16:.AF20])" office:value-type="string" office:string-value="&quot;5&quot;: { &quot;0&quot;: 15, &quot;1&quot;: 7, &quot;2&quot;: 4, &quot;3&quot;: 12, &quot;4&quot;: 15, &quot;5&quot;: 5, &quot;6&quot;: 2, &quot;7&quot;: 1, &quot;8&quot;: 0, &quot;9&quot;: 9, &quot;10&quot;: , &quot;11&quot;: , &quot;12&quot;: , &quot;13&quot;: , &quot;14&quot;: }, &quot;6&quot;: { &quot;0&quot;: 15, &quot;1&quot;: 7, &quot;2&quot;: 3, &quot;3&quot;: 12, &quot;4&quot;: 15, &quot;5&quot;: 5, &quot;6&quot;: 2, &quot;7&quot;: 1, &quot;8&quot;: 0, &quot;9&quot;: 9, &quot;10&quot;: , &quot;11&quot;: , &quot;12&quot;: , &quot;13&quot;: , &quot;14&quot;: }, &quot;7&quot;: { &quot;0&quot;: 15, &quot;1&quot;: 7, &quot;2&quot;: 4, &quot;3&quot;: 12, &quot;4&quot;: 14, &quot;5&quot;: 5, &quot;6&quot;: 2, &quot;7&quot;: 1, &quot;8&quot;: 0, &quot;9&quot;: 8, &quot;10&quot;: , &quot;11&quot;: , &quot;12&quot;: , &quot;13&quot;: , &quot;14&quot;: }, &quot;8&quot;: { &quot;0&quot;: 15, &quot;1&quot;: 6, &quot;2&quot;: 3, &quot;3&quot;: 12, &quot;4&quot;: 14, &quot;5&quot;: 5, &quot;6&quot;: 2, &quot;7&quot;: 1, &quot;8&quot;: 0, &quot;9&quot;: 9, &quot;10&quot;: , &quot;11&quot;: , &quot;12&quot;: , &quot;13&quot;: , &quot;14&quot;: }, &quot;9&quot;: { &quot;0&quot;: 15, &quot;1&quot;: 8, &quot;2&quot;: 4, &quot;3&quot;: 12, &quot;4&quot;: 14, &quot;5&quot;: 6, &quot;6&quot;: 3, &quot;7&quot;: 2, &quot;8&quot;: 1, &quot;9&quot;: 8, &quot;10&quot;: , &quot;11&quot;: , &quot;12&quot;: , &quot;13&quot;: , &quot;14&quot;: }" calcext:value-type="string">
            <text:p>"5": { "0": 15, "1": 7, "2": 4, "3": 12, "4": 15, "5": 5, "6": 2, "7": 1, "8": 0, "9": 9, "10": , "11": , "12": , "13": , "14": }, "6": { "0": 15, "1": 7, "2": 3, "3": 12, "4": 15, "5": 5, "6": 2, "7": 1, "8": 0, "9": 9, "10": , "11": , "12": , "13": , "14": }, "7": { "0": 15, "1": 7, "2": 4, "3": 12, "4": 14, "5": 5, "6": 2, "7": 1, "8": 0, "9": 8, "10": , "11": , "12": , "13": , "14": }, "8": { "0": 15, "1": 6, "2": 3, "3": 12, "4": 14, "5": 5, "6": 2, "7": 1, "8": 0, "9": 9, "10": , "11": , "12": , "13": , "14": }, "9": { "0": 15, "1": 8, "2": 4, "3": 12, "4": 14, "5": 6, "6": 3, "7": 2, "8": 1, "9": 8, "10": , "11": , "12": , "13": , "14": 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7" table:formula="of:=[.$AT$2]+[.$U$2]+[.$U$4]" office:value-type="float" office:value="16" calcext:value-type="float">
            <text:p>16</text:p>
          </table:table-cell>
          <table:table-cell table:style-name="ce24" table:formula="of:=[.$AU$2]+[.$U$3]+[.$U$4]" office:value-type="float" office:value="8" calcext:value-type="float">
            <text:p>8</text:p>
          </table:table-cell>
          <table:table-cell table:style-name="ce29" table:formula="of:=[.$AV$2]+[.$U$3]+[.$U$4]" office:value-type="float" office:value="5" calcext:value-type="float">
            <text:p>5</text:p>
          </table:table-cell>
          <table:table-cell table:style-name="ce39" table:formula="of:=[.$AW$2]+[.$U$3]+[.$U$4]" office:value-type="float" office:value="13" calcext:value-type="float">
            <text:p>13</text:p>
          </table:table-cell>
          <table:table-cell table:style-name="ce39" table:formula="of:=[.$AX$2]+[.$U$4]+[.$U$3]" office:value-type="float" office:value="15" calcext:value-type="float">
            <text:p>15</text:p>
          </table:table-cell>
          <table:table-cell table:style-name="ce45"/>
          <table:table-cell table:style-name="ce17" table:formula="of:=[.$AT$2]+[.$U$3]+[.$U$4]" office:value-type="float" office:value="16" calcext:value-type="float">
            <text:p>16</text:p>
          </table:table-cell>
          <table:table-cell table:style-name="ce24" table:formula="of:=[.$AU$2]+[.$U$2]+[.$U$4]" office:value-type="float" office:value="8" calcext:value-type="float">
            <text:p>8</text:p>
          </table:table-cell>
          <table:table-cell table:style-name="ce29" table:formula="of:=[.$AV$2]+[.$U$3]+[.$U$4]" office:value-type="float" office:value="5" calcext:value-type="float">
            <text:p>5</text:p>
          </table:table-cell>
          <table:table-cell table:style-name="ce39" table:formula="of:=[.$AW$2]+[.$U$3]+[.$U$4]" office:value-type="float" office:value="13" calcext:value-type="float">
            <text:p>13</text:p>
          </table:table-cell>
          <table:table-cell table:style-name="ce39" table:formula="of:=[.$AX$2]+[.$U$4]+[.$U$3]" office:value-type="float" office:value="15" calcext:value-type="float">
            <text:p>15</text:p>
          </table:table-cell>
          <table:table-cell table:style-name="ce45"/>
          <table:table-cell table:style-name="ce17" table:formula="of:=[.$AT$2]+[.$U$3]+[.$U$4]" office:value-type="float" office:value="16" calcext:value-type="float">
            <text:p>16</text:p>
          </table:table-cell>
          <table:table-cell table:style-name="ce24" table:formula="of:=[.$AU$2]+[.$U$3]+[.$U$4]" office:value-type="float" office:value="8" calcext:value-type="float">
            <text:p>8</text:p>
          </table:table-cell>
          <table:table-cell table:style-name="ce29" table:formula="of:=[.$AV$2]+[.$U$2]+[.$U$4]" office:value-type="float" office:value="5" calcext:value-type="float">
            <text:p>5</text:p>
          </table:table-cell>
          <table:table-cell table:style-name="ce39" table:formula="of:=[.$AW$2]+[.$U$3]+[.$U$4]" office:value-type="float" office:value="13" calcext:value-type="float">
            <text:p>13</text:p>
          </table:table-cell>
          <table:table-cell table:style-name="ce39" table:formula="of:=[.$AX$2]+[.$U$4]+[.$U$3]" office:value-type="float" office:value="15" calcext:value-type="float">
            <text:p>15</text:p>
          </table:table-cell>
          <table:table-cell table:style-name="ce45"/>
          <table:table-cell table:style-name="ce17" table:formula="of:=[.$AT$2]+[.$U$3]+[.$U$4]" office:value-type="float" office:value="16" calcext:value-type="float">
            <text:p>16</text:p>
          </table:table-cell>
          <table:table-cell table:style-name="ce24" table:formula="of:=[.$AU$2]+[.$U$3]+[.$U$4]" office:value-type="float" office:value="8" calcext:value-type="float">
            <text:p>8</text:p>
          </table:table-cell>
          <table:table-cell table:style-name="ce29" table:formula="of:=[.$AV$2]+[.$U$3]+[.$U$4]" office:value-type="float" office:value="5" calcext:value-type="float">
            <text:p>5</text:p>
          </table:table-cell>
          <table:table-cell table:style-name="ce39" table:formula="of:=[.$AW$2]+[.$U$2]+[.$U$4]" office:value-type="float" office:value="13" calcext:value-type="float">
            <text:p>13</text:p>
          </table:table-cell>
          <table:table-cell table:style-name="ce39" table:formula="of:=[.$AX$2]+[.$U$4]+[.$U$2]" office:value-type="float" office:value="15" calcext:value-type="float">
            <text:p>15</text:p>
          </table:table-cell>
          <table:table-cell table:style-name="ce45"/>
          <table:table-cell table:style-name="ce17" table:formula="of:=[.$AT$2]+[.$U$3]+[.$U$4]" office:value-type="float" office:value="16" calcext:value-type="float">
            <text:p>16</text:p>
          </table:table-cell>
          <table:table-cell table:style-name="ce24" table:formula="of:=[.$AU$2]+[.$U$3]+[.$U$4]" office:value-type="float" office:value="8" calcext:value-type="float">
            <text:p>8</text:p>
          </table:table-cell>
          <table:table-cell table:style-name="ce29" table:formula="of:=[.$AV$2]+[.$U$3]+[.$U$4]" office:value-type="float" office:value="5" calcext:value-type="float">
            <text:p>5</text:p>
          </table:table-cell>
          <table:table-cell table:style-name="ce39" table:formula="of:=[.$AW$2]+[.$U$2]+[.$U$4]" office:value-type="float" office:value="13" calcext:value-type="float">
            <text:p>13</text:p>
          </table:table-cell>
          <table:table-cell table:style-name="ce39" table:formula="of:=[.$AX$2]+[.$U$2]+[.$U$4]" office:value-type="float" office:value="15" calcext:value-type="float">
            <text:p>1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8, &quot;2&quot;: 5, &quot;3&quot;: 13, &quot;4&quot;: 15, &quot;5&quot;: 6, &quot;6&quot;: 3, &quot;7&quot;: 2, &quot;8&quot;: 2, &quot;9&quot;: 10, &quot;10&quot;: 12, &quot;11&quot;: 2, &quot;12&quot;: 1, &quot;13&quot;: 1, &quot;14&quot;: 9}" calcext:value-type="string">
            <text:p>"10": { "0": 16, "1": 8, "2": 5, "3": 13, "4": 15, "5": 6, "6": 3, "7": 2, "8": 2, "9": 10, "10": 12, "11": 2, "12": 1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9" table:formula="of:=[.$AT$3]+[.$U$2]" office:value-type="float" office:value="6" calcext:value-type="float">
            <text:p>6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2" table:formula="of:=[.$AW$3]+[.$U$3]+[.$U$4]" office:value-type="float" office:value="2" calcext:value-type="float">
            <text:p>2</text:p>
          </table:table-cell>
          <table:table-cell table:style-name="ce32" table:formula="of:=[.$AX$3]+[.$U$4]+[.$U$3]" office:value-type="float" office:value="10" calcext:value-type="float">
            <text:p>10</text:p>
          </table:table-cell>
          <table:table-cell/>
          <table:table-cell table:style-name="ce9" table:formula="of:=[.$AT$3]+[.$U$3]+[.$U$4]" office:value-type="float" office:value="7" calcext:value-type="float">
            <text:p>7</text:p>
          </table:table-cell>
          <table:table-cell table:style-name="ce21" table:formula="of:=[.$AU$3]+[.$U$2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2" table:formula="of:=[.$AW$3]+[.$U$3]" office:value-type="float" office:value="1" calcext:value-type="float">
            <text:p>1</text:p>
          </table:table-cell>
          <table:table-cell table:style-name="ce32" table:formula="of:=[.$AX$3]+[.$U$4]+[.$U$3]" office:value-type="float" office:value="10" calcext:value-type="float">
            <text:p>10</text:p>
          </table:table-cell>
          <table:table-cell/>
          <table:table-cell table:style-name="ce9" table:formula="of:=[.$AT$3]+[.$U$3]+[.$U$4]" office:value-type="float" office:value="7" calcext:value-type="float">
            <text:p>7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2]" office:value-type="float" office:value="2" calcext:value-type="float">
            <text:p>2</text:p>
          </table:table-cell>
          <table:table-cell table:style-name="ce32" table:formula="of:=[.$AW$3]+[.$U$3]" office:value-type="float" office:value="1" calcext:value-type="float">
            <text:p>1</text:p>
          </table:table-cell>
          <table:table-cell table:style-name="ce32" table:formula="of:=[.$AX$3]+[.$U$4]+[.$U$3]" office:value-type="float" office:value="10" calcext:value-type="float">
            <text:p>10</text:p>
          </table:table-cell>
          <table:table-cell/>
          <table:table-cell table:style-name="ce9" table:formula="of:=[.$AT$3]+[.$U$3]" office:value-type="float" office:value="6" calcext:value-type="float">
            <text:p>6</text:p>
          </table:table-cell>
          <table:table-cell table:style-name="ce21" table:formula="of:=[.$AU$3]+[.$U$3]" office:value-type="float" office:value="3" calcext:value-type="float">
            <text:p>3</text:p>
          </table:table-cell>
          <table:table-cell table:style-name="ce26" table:formula="of:=[.$AV$3]+[.$U$3]" office:value-type="float" office:value="2" calcext:value-type="float">
            <text:p>2</text:p>
          </table:table-cell>
          <table:table-cell table:style-name="ce32" table:formula="of:=[.$AW$3]+[.$U$2]" office:value-type="float" office:value="1" calcext:value-type="float">
            <text:p>1</text:p>
          </table:table-cell>
          <table:table-cell table:formula="of:=[.$AX$3]+[.$U$2]" office:value-type="float" office:value="9" calcext:value-type="float">
            <text:p>9</text:p>
          </table:table-cell>
          <table:table-cell/>
          <table:table-cell table:formula="of:=[.$AT$3]+[.$U$3]+[.$U$4]" office:value-type="float" office:value="7" calcext:value-type="float">
            <text:p>7</text:p>
          </table:table-cell>
          <table:table-cell table:formula="of:=[.$AU$3]+[.$U$4]+[.$U$3]" office:value-type="float" office:value="4" calcext:value-type="float">
            <text:p>4</text:p>
          </table:table-cell>
          <table:table-cell table:formula="of:=[.$AV$3]+[.$U$4]+[.$U$3]" office:value-type="float" office:value="3" calcext:value-type="float">
            <text:p>3</text:p>
          </table:table-cell>
          <table:table-cell table:formula="of:=[.$AW$3]+[.$U$2]" office:value-type="float" office:value="1" calcext:value-type="float">
            <text:p>1</text:p>
          </table:table-cell>
          <table:table-cell table:style-name="ce32" table:formula="of:=[.$AX$3]+[.$U$2]" office:value-type="float" office:value="9" calcext:value-type="float">
            <text:p>9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16, &quot;1&quot;: 8, &quot;2&quot;: 5, &quot;3&quot;: 13, &quot;4&quot;: 15, &quot;5&quot;: 7, &quot;6&quot;: 3, &quot;7&quot;: 2, &quot;8&quot;: 1, &quot;9&quot;: 10, &quot;10&quot;: 5, &quot;11&quot;: 10, &quot;12&quot;: 1, &quot;13&quot;: 0, &quot;14&quot;: 9}" calcext:value-type="string">
            <text:p>"11": { "0": 16, "1": 8, "2": 5, "3": 13, "4": 15, "5": 7, "6": 3, "7": 2, "8": 1, "9": 10, "10": 5, "11": 10, "12": 1, "13": 0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8" table:formula="of:=[.$AT$4]" office:value-type="float" office:value="12" calcext:value-type="float">
            <text:p>12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6" table:formula="of:=[.$AV$3]" office:value-type="float" office:value="1" calcext:value-type="float">
            <text:p>1</text:p>
          </table:table-cell>
          <table:table-cell table:style-name="ce32" table:formula="of:=[.$AW$3]+[.$U$4]" office:value-type="float" office:value="1" calcext:value-type="float">
            <text:p>1</text:p>
          </table:table-cell>
          <table:table-cell table:style-name="ce37" table:formula="of:=[.$AX$3]+[.$U$4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8" table:formula="of:=[.$AU$4]" office:value-type="float" office:value="10" calcext:value-type="float">
            <text:p>10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37" table:formula="of:=[.$AW$3]" office:value-type="float" office:value="0" calcext:value-type="float">
            <text:p>0</text:p>
          </table:table-cell>
          <table:table-cell table:style-name="ce32" table:formula="of:=[.$AX$3]+[.$U$4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8" table:formula="of:=[.$AV$4]" office:value-type="float" office:value="7" calcext:value-type="float">
            <text:p>7</text:p>
          </table:table-cell>
          <table:table-cell table:formula="of:=[.$AW$3]" office:value-type="float" office:value="0" calcext:value-type="float">
            <text:p>0</text:p>
          </table:table-cell>
          <table:table-cell table:style-name="ce32" table:formula="of:=[.$AX$3]+[.$U$3]" office:value-type="float" office:value="9" calcext:value-type="float">
            <text:p>9</text:p>
          </table:table-cell>
          <table:table-cell/>
          <table:table-cell table:style-name="ce46" table:formula="of:=[.$AT$3]" office:value-type="float" office:value="5" calcext:value-type="float">
            <text:p>5</text:p>
          </table:table-cell>
          <table:table-cell table:style-name="ce20" table:formula="of:=[.$AU$3]" office:value-type="float" office:value="2" calcext:value-type="float">
            <text:p>2</text:p>
          </table:table-cell>
          <table:table-cell table:style-name="ce25" table:formula="of:=[.$AV$3]" office:value-type="float" office:value="1" calcext:value-type="float">
            <text:p>1</text:p>
          </table:table-cell>
          <table:table-cell table:style-name="ce8" table:formula="of:=[.$AW$4]" office:value-type="float" office:value="4" calcext:value-type="float">
            <text:p>4</text:p>
          </table:table-cell>
          <table:table-cell table:formula="of:=[.$AX$3]+[.$U$2]" office:value-type="float" office:value="9" calcext:value-type="float">
            <text:p>9</text:p>
          </table:table-cell>
          <table:table-cell/>
          <table:table-cell table:formula="of:=[.$AT$3]+[.$U$4]+[.$U$3]" office:value-type="float" office:value="7" calcext:value-type="float">
            <text:p>7</text:p>
          </table:table-cell>
          <table:table-cell table:formula="of:=[.$AU$3]+[.$U$4]+[.$U$3]" office:value-type="float" office:value="4" calcext:value-type="float">
            <text:p>4</text:p>
          </table:table-cell>
          <table:table-cell table:formula="of:=[.$AV$3]+[.$U$4]+[.$U$3]" office:value-type="float" office:value="3" calcext:value-type="float">
            <text:p>3</text:p>
          </table:table-cell>
          <table:table-cell table:formula="of:=[.$AW$3]+[.$U$2]" office:value-type="float" office:value="1" calcext:value-type="float">
            <text:p>1</text:p>
          </table:table-cell>
          <table:table-cell table:style-name="ce8" table:formula="of:=[.$AX$4]" office:value-type="float" office:value="9" calcext:value-type="float">
            <text:p>9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16, &quot;1&quot;: 8, &quot;2&quot;: 5, &quot;3&quot;: 13, &quot;4&quot;: 15, &quot;5&quot;: 7, &quot;6&quot;: 3, &quot;7&quot;: 2, &quot;8&quot;: 1, &quot;9&quot;: 10, &quot;10&quot;: 5, &quot;11&quot;: 2, &quot;12&quot;: 7, &quot;13&quot;: 0, &quot;14&quot;: 9}" calcext:value-type="string">
            <text:p>"12": { "0": 16, "1": 8, "2": 5, "3": 13, "4": 15, "5": 7, "6": 3, "7": 2, "8": 1, "9": 10, "10": 5, "11": 2, "12": 7, "13": 0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16, &quot;1&quot;: 8, &quot;2&quot;: 5, &quot;3&quot;: 13, &quot;4&quot;: 15, &quot;5&quot;: 6, &quot;6&quot;: 3, &quot;7&quot;: 2, &quot;8&quot;: 1, &quot;9&quot;: 9, &quot;10&quot;: 5, &quot;11&quot;: 2, &quot;12&quot;: 1, &quot;13&quot;: 4, &quot;14&quot;: 9}" calcext:value-type="string">
            <text:p>"13": { "0": 16, "1": 8, "2": 5, "3": 13, "4": 15, "5": 6, "6": 3, "7": 2, "8": 1, "9": 9, "10": 5, "11": 2, "12": 1, "13": 4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F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L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O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R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U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AA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AB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AC24])" office:value-type="string" office:string-value="&quot;3&quot;: 13" calcext:value-type="string">
            <text:p>"3": 13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16, &quot;1&quot;: 8, &quot;2&quot;: 5, &quot;3&quot;: 13, &quot;4&quot;: 15, &quot;5&quot;: 7, &quot;6&quot;: 4, &quot;7&quot;: 3, &quot;8&quot;: 1, &quot;9&quot;: 9, &quot;10&quot;: 7, &quot;11&quot;: 4, &quot;12&quot;: 3, &quot;13&quot;: 1, &quot;14&quot;: 9}" calcext:value-type="string">
            <text:p>"14": { "0": 16, "1": 8, "2": 5, "3": 13, "4": 15, "5": 7, "6": 4, "7": 3, "8": 1, "9": 9, "10": 7, "11": 4, "12": 3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F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V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9" calcext:value-type="string">
            <text:p>"9": 9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9" calcext:value-type="string">
            <text:p>"9": 9</text:p>
          </table:table-cell>
          <table:table-cell table:number-columns-repeated="34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7" calcext:value-type="string">
            <text:p>"12": 7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4" calcext:value-type="string">
            <text:p>"11": 4</text:p>
          </table:table-cell>
          <table:table-cell table:style-name="ce103" table:formula="of:=COM.MICROSOFT.CONCAT(&quot;&quot;&quot;&quot;;[.$D$4]; &quot;&quot;&quot;: &quot;; [.AB26])" office:value-type="string" office:string-value="&quot;12&quot;: 3" calcext:value-type="string">
            <text:p>"12": 3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9" calcext:value-type="string">
            <text:p>"14": 9</text:p>
          </table:table-cell>
          <table:table-cell/>
          <table:table-cell table:formula="of:=COM.MICROSOFT.TEXTJOIN(&quot;, &quot;;TRUE();[.AF24:.AF28])" office:value-type="string" office:string-value="&quot;10&quot;: { &quot;0&quot;: 16, &quot;1&quot;: 8, &quot;2&quot;: 5, &quot;3&quot;: 13, &quot;4&quot;: 15, &quot;5&quot;: 6, &quot;6&quot;: 3, &quot;7&quot;: 2, &quot;8&quot;: 2, &quot;9&quot;: 10, &quot;10&quot;: 12, &quot;11&quot;: 2, &quot;12&quot;: 1, &quot;13&quot;: 1, &quot;14&quot;: 9}, &quot;11&quot;: { &quot;0&quot;: 16, &quot;1&quot;: 8, &quot;2&quot;: 5, &quot;3&quot;: 13, &quot;4&quot;: 15, &quot;5&quot;: 7, &quot;6&quot;: 3, &quot;7&quot;: 2, &quot;8&quot;: 1, &quot;9&quot;: 10, &quot;10&quot;: 5, &quot;11&quot;: 10, &quot;12&quot;: 1, &quot;13&quot;: 0, &quot;14&quot;: 9}, &quot;12&quot;: { &quot;0&quot;: 16, &quot;1&quot;: 8, &quot;2&quot;: 5, &quot;3&quot;: 13, &quot;4&quot;: 15, &quot;5&quot;: 7, &quot;6&quot;: 3, &quot;7&quot;: 2, &quot;8&quot;: 1, &quot;9&quot;: 10, &quot;10&quot;: 5, &quot;11&quot;: 2, &quot;12&quot;: 7, &quot;13&quot;: 0, &quot;14&quot;: 9}, &quot;13&quot;: { &quot;0&quot;: 16, &quot;1&quot;: 8, &quot;2&quot;: 5, &quot;3&quot;: 13, &quot;4&quot;: 15, &quot;5&quot;: 6, &quot;6&quot;: 3, &quot;7&quot;: 2, &quot;8&quot;: 1, &quot;9&quot;: 9, &quot;10&quot;: 5, &quot;11&quot;: 2, &quot;12&quot;: 1, &quot;13&quot;: 4, &quot;14&quot;: 9}, &quot;14&quot;: { &quot;0&quot;: 16, &quot;1&quot;: 8, &quot;2&quot;: 5, &quot;3&quot;: 13, &quot;4&quot;: 15, &quot;5&quot;: 7, &quot;6&quot;: 4, &quot;7&quot;: 3, &quot;8&quot;: 1, &quot;9&quot;: 9, &quot;10&quot;: 7, &quot;11&quot;: 4, &quot;12&quot;: 3, &quot;13&quot;: 1, &quot;14&quot;: 9}" calcext:value-type="string">
            <text:p>"10": { "0": 16, "1": 8, "2": 5, "3": 13, "4": 15, "5": 6, "6": 3, "7": 2, "8": 2, "9": 10, "10": 12, "11": 2, "12": 1, "13": 1, "14": 9}, "11": { "0": 16, "1": 8, "2": 5, "3": 13, "4": 15, "5": 7, "6": 3, "7": 2, "8": 1, "9": 10, "10": 5, "11": 10, "12": 1, "13": 0, "14": 9}, "12": { "0": 16, "1": 8, "2": 5, "3": 13, "4": 15, "5": 7, "6": 3, "7": 2, "8": 1, "9": 10, "10": 5, "11": 2, "12": 7, "13": 0, "14": 9}, "13": { "0": 16, "1": 8, "2": 5, "3": 13, "4": 15, "5": 6, "6": 3, "7": 2, "8": 1, "9": 9, "10": 5, "11": 2, "12": 1, "13": 4, "14": 9}, "14": { "0": 16, "1": 8, "2": 5, "3": 13, "4": 15, "5": 7, "6": 4, "7": 3, "8": 1, "9": 9, "10": 7, "11": 4, "12": 3, "13": 1, "14": 9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1, &quot;4&quot;: 9, &quot;5&quot;: 6, &quot;6&quot;: 3, &quot;7&quot;: 2, &quot;8&quot;: 2, &quot;9&quot;: 10, &quot;10&quot;: , &quot;11&quot;: , &quot;12&quot;: , &quot;13&quot;: , &quot;14&quot;: }, &quot;1&quot;: { &quot;0&quot;: 5, &quot;1&quot;: 6, &quot;2&quot;: 1, &quot;3&quot;: 0, &quot;4&quot;: 9, &quot;5&quot;: 6, &quot;6&quot;: 3, &quot;7&quot;: 2, &quot;8&quot;: 0, &quot;9&quot;: 10, &quot;10&quot;: , &quot;11&quot;: , &quot;12&quot;: , &quot;13&quot;: , &quot;14&quot;: }, &quot;2&quot;: { &quot;0&quot;: 5, &quot;1&quot;: 2, &quot;2&quot;: 3, &quot;3&quot;: 0, &quot;4&quot;: 9, &quot;5&quot;: 6, &quot;6&quot;: 3, &quot;7&quot;: 2, &quot;8&quot;: 0, &quot;9&quot;: 9, &quot;10&quot;: , &quot;11&quot;: , &quot;12&quot;: , &quot;13&quot;: , &quot;14&quot;: }, &quot;3&quot;: { &quot;0&quot;: 5, &quot;1&quot;: 2, &quot;2&quot;: 1, &quot;3&quot;: 11, &quot;4&quot;: 9, &quot;5&quot;: 7, &quot;6&quot;: 3, &quot;7&quot;: 2, &quot;8&quot;: 1, &quot;9&quot;: 9, &quot;10&quot;: , &quot;11&quot;: , &quot;12&quot;: , &quot;13&quot;: , &quot;14&quot;: }, &quot;4&quot;: { &quot;0&quot;: 7, &quot;1&quot;: 4, &quot;2&quot;: 3, &quot;3&quot;: 1, &quot;4&quot;: 13, &quot;5&quot;: 7, &quot;6&quot;: 4, &quot;7&quot;: 3, &quot;8&quot;: 1, &quot;9&quot;: 9, &quot;10&quot;: , &quot;11&quot;: , &quot;12&quot;: , &quot;13&quot;: , &quot;14&quot;: }, &quot;5&quot;: { &quot;0&quot;: 15, &quot;1&quot;: 7, &quot;2&quot;: 4, &quot;3&quot;: 12, &quot;4&quot;: 15, &quot;5&quot;: 5, &quot;6&quot;: 2, &quot;7&quot;: 1, &quot;8&quot;: 0, &quot;9&quot;: 9, &quot;10&quot;: , &quot;11&quot;: , &quot;12&quot;: , &quot;13&quot;: , &quot;14&quot;: }, &quot;6&quot;: { &quot;0&quot;: 15, &quot;1&quot;: 7, &quot;2&quot;: 3, &quot;3&quot;: 12, &quot;4&quot;: 15, &quot;5&quot;: 5, &quot;6&quot;: 2, &quot;7&quot;: 1, &quot;8&quot;: 0, &quot;9&quot;: 9, &quot;10&quot;: , &quot;11&quot;: , &quot;12&quot;: , &quot;13&quot;: , &quot;14&quot;: }, &quot;7&quot;: { &quot;0&quot;: 15, &quot;1&quot;: 7, &quot;2&quot;: 4, &quot;3&quot;: 12, &quot;4&quot;: 14, &quot;5&quot;: 5, &quot;6&quot;: 2, &quot;7&quot;: 1, &quot;8&quot;: 0, &quot;9&quot;: 8, &quot;10&quot;: , &quot;11&quot;: , &quot;12&quot;: , &quot;13&quot;: , &quot;14&quot;: }, &quot;8&quot;: { &quot;0&quot;: 15, &quot;1&quot;: 6, &quot;2&quot;: 3, &quot;3&quot;: 12, &quot;4&quot;: 14, &quot;5&quot;: 5, &quot;6&quot;: 2, &quot;7&quot;: 1, &quot;8&quot;: 0, &quot;9&quot;: 9, &quot;10&quot;: , &quot;11&quot;: , &quot;12&quot;: , &quot;13&quot;: , &quot;14&quot;: }, &quot;9&quot;: { &quot;0&quot;: 15, &quot;1&quot;: 8, &quot;2&quot;: 4, &quot;3&quot;: 12, &quot;4&quot;: 14, &quot;5&quot;: 6, &quot;6&quot;: 3, &quot;7&quot;: 2, &quot;8&quot;: 1, &quot;9&quot;: 8, &quot;10&quot;: , &quot;11&quot;: , &quot;12&quot;: , &quot;13&quot;: , &quot;14&quot;: }, &quot;10&quot;: { &quot;0&quot;: 16, &quot;1&quot;: 8, &quot;2&quot;: 5, &quot;3&quot;: 13, &quot;4&quot;: 15, &quot;5&quot;: 6, &quot;6&quot;: 3, &quot;7&quot;: 2, &quot;8&quot;: 2, &quot;9&quot;: 10, &quot;10&quot;: 12, &quot;11&quot;: 2, &quot;12&quot;: 1, &quot;13&quot;: 1, &quot;14&quot;: 9}, &quot;11&quot;: { &quot;0&quot;: 16, &quot;1&quot;: 8, &quot;2&quot;: 5, &quot;3&quot;: 13, &quot;4&quot;: 15, &quot;5&quot;: 7, &quot;6&quot;: 3, &quot;7&quot;: 2, &quot;8&quot;: 1, &quot;9&quot;: 10, &quot;10&quot;: 5, &quot;11&quot;: 10, &quot;12&quot;: 1, &quot;13&quot;: 0, &quot;14&quot;: 9}, &quot;12&quot;: { &quot;0&quot;: 16, &quot;1&quot;: 8, &quot;2&quot;: 5, &quot;3&quot;: 13, &quot;4&quot;: 15, &quot;5&quot;: 7, &quot;6&quot;: 3, &quot;7&quot;: 2, &quot;8&quot;: 1, &quot;9&quot;: 10, &quot;10&quot;: 5, &quot;11&quot;: 2, &quot;12&quot;: 7, &quot;13&quot;: 0, &quot;14&quot;: 9}, &quot;13&quot;: { &quot;0&quot;: 16, &quot;1&quot;: 8, &quot;2&quot;: 5, &quot;3&quot;: 13, &quot;4&quot;: 15, &quot;5&quot;: 6, &quot;6&quot;: 3, &quot;7&quot;: 2, &quot;8&quot;: 1, &quot;9&quot;: 9, &quot;10&quot;: 5, &quot;11&quot;: 2, &quot;12&quot;: 1, &quot;13&quot;: 4, &quot;14&quot;: 9}, &quot;14&quot;: { &quot;0&quot;: 16, &quot;1&quot;: 8, &quot;2&quot;: 5, &quot;3&quot;: 13, &quot;4&quot;: 15, &quot;5&quot;: 7, &quot;6&quot;: 4, &quot;7&quot;: 3, &quot;8&quot;: 1, &quot;9&quot;: 9, &quot;10&quot;: 7, &quot;11&quot;: 4, &quot;12&quot;: 3, &quot;13&quot;: 1, &quot;14&quot;: 9}}" calcext:value-type="string">
            <text:p>{"0": { "0": 14, "1": 2, "2": 1, "3": 1, "4": 9, "5": 6, "6": 3, "7": 2, "8": 2, "9": 10, "10": , "11": , "12": , "13": , "14": }, "1": { "0": 5, "1": 6, "2": 1, "3": 0, "4": 9, "5": 6, "6": 3, "7": 2, "8": 0, "9": 10, "10": , "11": , "12": , "13": , "14": }, "2": { "0": 5, "1": 2, "2": 3, "3": 0, "4": 9, "5": 6, "6": 3, "7": 2, "8": 0, "9": 9, "10": , "11": , "12": , "13": , "14": }, "3": { "0": 5, "1": 2, "2": 1, "3": 11, "4": 9, "5": 7, "6": 3, "7": 2, "8": 1, "9": 9, "10": , "11": , "12": , "13": , "14": }, "4": { "0": 7, "1": 4, "2": 3, "3": 1, "4": 13, "5": 7, "6": 4, "7": 3, "8": 1, "9": 9, "10": , "11": , "12": , "13": , "14": }, "5": { "0": 15, "1": 7, "2": 4, "3": 12, "4": 15, "5": 5, "6": 2, "7": 1, "8": 0, "9": 9, "10": , "11": , "12": , "13": , "14": }, "6": { "0": 15, "1": 7, "2": 3, "3": 12, "4": 15, "5": 5, "6": 2, "7": 1, "8": 0, "9": 9, "10": , "11": , "12": , "13": , "14": }, "7": { "0": 15, "1": 7, "2": 4, "3": 12, "4": 14, "5": 5, "6": 2, "7": 1, "8": 0, "9": 8, "10": , "11": , "12": , "13": , "14": }, "8": { "0": 15, "1": 6, "2": 3, "3": 12, "4": 14, "5": 5, "6": 2, "7": 1, "8": 0, "9": 9, "10": , "11": , "12": , "13": , "14": }, "9": { "0": 15, "1": 8, "2": 4, "3": 12, "4": 14, "5": 6, "6": 3, "7": 2, "8": 1, "9": 8, "10": , "11": , "12": , "13": , "14": }, "10": { "0": 16, "1": 8, "2": 5, "3": 13, "4": 15, "5": 6, "6": 3, "7": 2, "8": 2, "9": 10, "10": 12, "11": 2, "12": 1, "13": 1, "14": 9}, "11": { "0": 16, "1": 8, "2": 5, "3": 13, "4": 15, "5": 7, "6": 3, "7": 2, "8": 1, "9": 10, "10": 5, "11": 10, "12": 1, "13": 0, "14": 9}, "12": { "0": 16, "1": 8, "2": 5, "3": 13, "4": 15, "5": 7, "6": 3, "7": 2, "8": 1, "9": 10, "10": 5, "11": 2, "12": 7, "13": 0, "14": 9}, "13": { "0": 16, "1": 8, "2": 5, "3": 13, "4": 15, "5": 6, "6": 3, "7": 2, "8": 1, "9": 9, "10": 5, "11": 2, "12": 1, "13": 4, "14": 9}, "14": { "0": 16, "1": 8, "2": 5, "3": 13, "4": 15, "5": 7, "6": 4, "7": 3, "8": 1, "9": 9, "10": 7, "11": 4, "12": 3, "13": 1, "14": 9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7:54:30.78546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6T20:58:11.455994500</dc:date>
    <meta:generator>LibreOffice/26.2.0.3$Windows_X86_64 LibreOffice_project/620$Build-3</meta:generator>
    <meta:editing-duration>PT10H7M54S</meta:editing-duration>
    <meta:editing-cycles>143</meta:editing-cycles>
    <meta:document-statistic meta:table-count="1" meta:cell-count="474" meta:object-count="0"/>
    <meta:user-defined meta:name="AppVersion">16.0300</meta:user-defined>
  </office:meta>
</office:document-meta>
</file>
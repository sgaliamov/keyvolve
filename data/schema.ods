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4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keys">
      <style:table-properties table:display="true" style:writing-mode="lr-tb"/>
    </style:style>
    <number:text-style style:name="N100">
      <number:text-content/>
    </number:text-style>
    <style:style style:name="ce15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57" style:family="table-cell" style:parent-style-name="Default">
      <style:table-cell-properties fo:wrap-option="no-wrap"/>
    </style:style>
    <style:style style:name="ce160" style:family="table-cell" style:parent-style-name="Default">
      <style:text-properties fo:color="#b2b2b2">
        <loext:char-complex-color loext:theme-type="dark1" loext:color-type="theme"/>
      </style:text-properties>
    </style:style>
    <style:style style:name="ce164" style:family="table-cell" style:parent-style-name="Default">
      <style:table-cell-properties fo:wrap-option="no-wrap"/>
      <style:text-properties fo:color="#b2b2b2">
        <loext:char-complex-color loext:theme-type="dark1" loext:color-type="theme"/>
      </style:text-properties>
    </style:style>
    <style:style style:name="ce17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7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8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8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Default">
      <style:table-cell-properties style:text-align-source="fix" style:repeat-content="false" fo:wrap-option="no-wrap"/>
      <style:paragraph-properties fo:text-align="start" fo:margin-left="0cm"/>
    </style:style>
    <style:style style:name="ce19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0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0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0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0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2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2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3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3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4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5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52" style:family="table-cell" style:parent-style-name="Excel_20_Built-in_20_Neutral" style:data-style-name="N148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6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7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71" style:family="table-cell" style:parent-style-name="Default"/>
    <style:style style:name="ce272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fo:color="#000000"/>
    </style:style>
    <style:style style:name="ce273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fo:color="#000000"/>
    </style:style>
    <style:style style:name="ce30" style:family="table-cell" style:parent-style-name="Default" style:data-style-name="N148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" style:family="table-cell" style:parent-style-name="Excel_20_Built-in_20_Accent6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41" style:family="table-cell" style:parent-style-name="Default" style:data-style-name="N148">
      <style:table-cell-properties style:shrink-to-fit="true"/>
      <style:text-properties fo:font-weight="normal" style:font-weight-asian="normal" style:font-weight-complex="normal"/>
    </style:style>
    <style:style style:name="ce547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49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0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6" style:family="table-cell" style:parent-style-name="Default">
      <style:table-cell-properties style:rotation-align="none"/>
    </style:style>
    <style:style style:name="ce559" style:family="table-cell" style:parent-style-name="Default">
      <style:table-cell-properties style:rotation-align="none" style:vertical-align="middle"/>
    </style:style>
    <style:style style:name="ce560" style:family="table-cell" style:parent-style-name="Excel_20_Built-in_20_Good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61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62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64" style:family="table-cell" style:parent-style-name="Defaul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>
        <loext:char-complex-color loext:theme-type="dark1" loext:color-type="theme"/>
      </style:text-properties>
    </style:style>
    <style:style style:name="ce566" style:family="table-cell" style:parent-style-name="Default">
      <style:table-cell-properties fo:background-color="#ffffff" style:vertical-align="top"/>
      <style:text-properties style:use-window-font-color="true"/>
    </style:style>
    <style:style style:name="ce570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style:text-underline-style="none" fo:font-weight="normal" style:font-weight-asian="normal" style:font-weight-complex="normal"/>
    </style:style>
    <style:style style:name="ce573" style:family="table-cell" style:parent-style-name="Default" style:data-style-name="N148">
      <style:table-cell-properties style:rotation-align="none" style:shrink-to-fit="tru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74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>
        <loext:char-complex-color loext:theme-type="dark1" loext:color-type="theme"/>
      </style:text-properties>
    </style:style>
    <style:style style:name="ce585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97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3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10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19" style:family="table-cell" style:parent-style-name="Excel_20_Built-in_20_60_25__20_-_20_Accent6" style:data-style-name="N0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2" style:family="table-cell" style:parent-style-name="Excel_20_Built-in_20_Accent6" style:data-style-name="N0">
      <style:table-cell-properties fo:border-bottom="0.74pt solid #000000" fo:background-color="#70ad47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621" style:family="table-cell" style:parent-style-name="Excel_20_Built-in_20_Accent6" style:data-style-name="N0">
      <style:table-cell-properties fo:border-bottom="0.74pt solid #000000" fo:background-color="#70ad47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6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37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6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689" style:family="table-cell" style:parent-style-name="Excel_20_Built-in_20_60_25__20_-_20_Accent6" style:data-style-name="N0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18" style:family="table-cell" style:parent-style-name="Excel_20_Built-in_20_Good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733" style:family="table-cell" style:parent-style-name="Default">
      <style:text-properties fo:font-weight="bold" style:font-weight-asian="bold" style:font-weight-complex="bold"/>
    </style:style>
    <style:style style:name="ce73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73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6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766" style:family="table-cell" style:parent-style-name="Excel_20_Built-in_20_Neutral" style:data-style-name="N148">
      <style:table-cell-properties style:text-align-source="fix" style:repeat-content="false" style:shrink-to-fit="true" style:vertical-align="middle"/>
      <style:paragraph-properties fo:text-align="center" fo:margin-left="0cm"/>
    </style:style>
    <style:style style:name="ce7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dotted" style:text-underline-width="auto" style:text-underline-color="font-color"/>
    </style:style>
    <style:style style:name="ce794" style:family="table-cell" style:parent-style-name="Default">
      <style:table-cell-properties style:vertical-align="middle"/>
    </style:style>
    <style:style style:name="ce796" style:family="table-cell" style:parent-style-name="Default">
      <style:table-cell-properties fo:wrap-option="wrap" style:rotation-align="none" style:shrink-to-fit="false" style:vertical-align="top"/>
      <style:text-properties fo:font-size="6pt" style:font-size-asian="11pt" style:font-size-complex="11pt" fo:hyphenate="false"/>
    </style:style>
    <style:style style:name="ce797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b2b2b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9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b2b2b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00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b2b2b2">
        <loext:char-complex-color loext:theme-type="dark1" loext:color-type="theme"/>
      </style:text-properties>
    </style:style>
    <style:style style:name="ce801" style:family="table-cell" style:parent-style-name="Default">
      <style:table-cell-properties fo:wrap-option="wrap" style:shrink-to-fit="true" style:vertical-align="top"/>
      <style:text-properties fo:color="#b2b2b2" fo:font-size="6pt">
        <loext:char-complex-color loext:theme-type="dark1" loext:color-type="theme"/>
      </style:text-properties>
    </style:style>
    <style:style style:name="ce806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b2b2b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07" style:family="table-cell" style:parent-style-name="Default">
      <style:table-cell-properties style:vertical-align="middle"/>
      <style:text-properties fo:color="#b2b2b2">
        <loext:char-complex-color loext:theme-type="dark1" loext:color-type="theme"/>
      </style:text-properties>
    </style:style>
    <style:style style:name="ce808" style:family="table-cell" style:parent-style-name="Default">
      <style:table-cell-properties fo:wrap-option="no-wrap" style:rotation-align="none"/>
    </style:style>
    <style:style style:name="ce810" style:family="table-cell" style:parent-style-name="Default">
      <style:text-properties fo:color="#808080">
        <loext:char-complex-color loext:theme-type="dark1" loext:color-type="theme"/>
      </style:text-properties>
    </style:style>
    <style:style style:name="ce816" style:family="table-cell" style:parent-style-name="Default">
      <style:table-cell-properties style:vertical-align="middle"/>
      <style:text-properties fo:color="#808080">
        <loext:char-complex-color loext:theme-type="dark1" loext:color-type="theme"/>
      </style:text-properties>
    </style:style>
    <style:style style:name="ce817" style:family="table-cell" style:parent-style-name="Default">
      <style:table-cell-properties style:rotation-align="none"/>
      <style:text-properties fo:color="#b2b2b2">
        <loext:char-complex-color loext:theme-type="dark1" loext:color-type="theme"/>
      </style:text-properties>
    </style:style>
    <style:style style:name="ce818" style:family="table-cell" style:parent-style-name="Default">
      <style:table-cell-properties style:rotation-align="none" style:vertical-align="middle"/>
      <style:text-properties fo:color="#b2b2b2">
        <loext:char-complex-color loext:theme-type="dark1" loext:color-type="theme"/>
      </style:text-properties>
    </style:style>
    <style:style style:name="ce27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7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7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9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8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9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0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0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9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1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1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1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1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1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1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1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1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1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1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2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2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2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2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2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2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2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29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4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4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4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6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6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884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885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04" style:family="table-cell" style:parent-style-name="Excel_20_Built-in_20_Neutral" style:data-style-name="N148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23" style:family="table-cell" style:parent-style-name="Default"/>
    <style:style style:name="ce924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fo:color="#000000"/>
    </style:style>
    <style:style style:name="ce925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fo:color="#000000"/>
    </style:style>
    <style:style style:name="ce926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fo:color="#000000"/>
    </style:style>
    <style:style style:name="ce1001" style:family="table-cell" style:parent-style-name="Excel_20_Built-in_20_Neutral" style:data-style-name="N148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0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0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0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0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1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1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1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01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0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2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808080">
        <loext:char-complex-color loext:theme-type="dark1" loext:color-type="theme"/>
      </style:text-properties>
    </style:style>
    <style:style style:name="ce1023" style:family="table-cell" style:parent-style-name="Default">
      <style:table-cell-properties fo:wrap-option="wrap" style:vertical-align="top"/>
      <style:text-properties fo:color="#808080" fo:font-size="6pt">
        <loext:char-complex-color loext:theme-type="dark1" loext:color-type="theme"/>
      </style:text-properties>
    </style:style>
    <style:style style:name="ce1025" style:family="table-cell" style:parent-style-name="Default">
      <style:table-cell-properties fo:background-color="#77bc65" style:text-align-source="fix" style:repeat-content="false" style:vertical-align="bottom"/>
      <style:paragraph-properties fo:text-align="center" fo:margin-left="0cm"/>
    </style:style>
    <style:style style:name="ce1026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</style:style>
    <style:style style:name="ce1027" style:family="table-cell" style:parent-style-name="Default">
      <style:table-cell-properties fo:background-color="#ffde59" style:text-align-source="fix" style:repeat-content="false" style:vertical-align="bottom"/>
      <style:paragraph-properties fo:text-align="center" fo:margin-left="0cm"/>
    </style:style>
    <style:style style:name="ce1028" style:family="table-cell" style:parent-style-name="Default">
      <style:table-cell-properties fo:background-color="#ff972f" style:text-align-source="fix" style:repeat-content="false" style:vertical-align="bottom"/>
      <style:paragraph-properties fo:text-align="center" fo:margin-left="0cm"/>
    </style:style>
    <style:style style:name="ce1029" style:family="table-cell" style:parent-style-name="Default">
      <style:table-cell-properties fo:background-color="#ff6d6d" style:text-align-source="fix" style:repeat-content="false" style:vertical-align="bottom"/>
      <style:paragraph-properties fo:text-align="center" fo:margin-left="0cm"/>
    </style:style>
    <style:style style:name="ce1030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31" style:family="table-cell" style:parent-style-name="Default">
      <style:table-cell-properties style:rotation-align="none"/>
      <style:text-properties fo:color="#808080">
        <loext:char-complex-color loext:theme-type="dark1" loext:color-type="theme"/>
      </style:text-properties>
    </style:style>
    <style:style style:name="ce1032" style:family="table-cell" style:parent-style-name="Default">
      <style:table-cell-properties style:rotation-align="none" style:vertical-align="middle"/>
      <style:text-properties fo:color="#808080">
        <loext:char-complex-color loext:theme-type="dark1" loext:color-type="theme"/>
      </style:text-properties>
    </style:style>
    <style:style style:name="ce37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7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4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25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3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4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4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4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4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4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5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5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5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5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5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5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6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6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68" style:family="table-cell" style:parent-style-name="Default">
      <style:table-cell-properties fo:wrap-option="no-wrap"/>
      <style:text-properties fo:color="#808080">
        <loext:char-complex-color loext:theme-type="dark1" loext:color-type="theme"/>
      </style:text-properties>
    </style:style>
    <style:style style:name="ce927" style:family="table-cell" style:parent-style-name="Default">
      <style:table-cell-properties style:vertical-align="top"/>
    </style:style>
    <style:style style:name="ce92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93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95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95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95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97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97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97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99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1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2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</style:style>
    <style:style style:name="ce1129" style:family="table-cell" style:parent-style-name="Default">
      <style:table-cell-properties fo:wrap-option="wrap" style:vertical-align="top"/>
      <style:text-properties fo:font-size="6pt"/>
    </style:style>
    <style:style style:name="ce1135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46" style:family="table-cell" style:parent-style-name="Default">
      <style:table-cell-properties fo:background-color="#ffffff"/>
      <style:text-properties style:use-window-font-color="true"/>
    </style:style>
    <style:style style:name="ce47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7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8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8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9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9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9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9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9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9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9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9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9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99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0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0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0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0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0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0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0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0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0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0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2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2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2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2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2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2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2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2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2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2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3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31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32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3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3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3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3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3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3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3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4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4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4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4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4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4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4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4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5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54" style:family="table-cell" style:parent-style-name="Excel_20_Built-in_20_Neutral" style:data-style-name="N148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6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6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6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6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6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7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7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7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8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8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8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8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9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9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9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05" style:family="table-cell" style:parent-style-name="Default">
      <style:table-cell-properties fo:background-color="#77bc65" style:text-align-source="fix" style:repeat-content="false" style:vertical-align="bottom"/>
      <style:paragraph-properties fo:text-align="center" fo:margin-left="0cm"/>
    </style:style>
    <style:style style:name="ce606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de59" style:text-align-source="fix" style:repeat-content="false" style:vertical-align="bottom"/>
      <style:paragraph-properties fo:text-align="center" fo:margin-left="0cm"/>
    </style:style>
    <style:style style:name="ce608" style:family="table-cell" style:parent-style-name="Default">
      <style:table-cell-properties fo:background-color="#ff972f" style:text-align-source="fix" style:repeat-content="false" style:vertical-align="bottom"/>
      <style:paragraph-properties fo:text-align="center" fo:margin-left="0cm"/>
    </style:style>
    <style:style style:name="ce609" style:family="table-cell" style:parent-style-name="Default">
      <style:table-cell-properties fo:background-color="#ff6d6d" style:text-align-source="fix" style:repeat-content="false" style:vertical-align="bottom"/>
      <style:paragraph-properties fo:text-align="center" fo:margin-left="0cm"/>
    </style:style>
    <style:style style:name="ce612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620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623" style:family="table-cell" style:parent-style-name="Default">
      <style:table-cell-properties style:rotation-align="none"/>
    </style:style>
    <style:style style:name="ce624" style:family="table-cell" style:parent-style-name="Default">
      <style:table-cell-properties style:rotation-align="none" style:vertical-align="middl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2b2b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2b2b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2b2b2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0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99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33" style:family="table-cell" style:parent-style-name="Default">
      <style:table-cell-properties fo:background-color="#ffffff" style:vertical-align="top"/>
      <style:text-properties style:use-window-font-color="true"/>
    </style:style>
    <style:style style:name="ce634" style:family="table-cell" style:parent-style-name="Default">
      <style:table-cell-properties style:text-align-source="fix" style:repeat-content="false" fo:wrap-option="no-wrap"/>
      <style:paragraph-properties fo:text-align="start" fo:margin-left="0cm"/>
    </style:style>
    <style:style style:name="ce635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style:text-underline-style="none" fo:font-weight="normal" style:font-weight-asian="normal" style:font-weight-complex="normal"/>
    </style:style>
    <style:style style:name="ce57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7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39" style:family="table-cell" style:parent-style-name="Default" style:data-style-name="N148">
      <style:table-cell-properties style:rotation-align="none" style:shrink-to-fit="tru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40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>
        <loext:char-complex-color loext:theme-type="dark1" loext:color-type="theme"/>
      </style:text-properties>
    </style:style>
    <style:style style:name="ce57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7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8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47" style:family="table-cell" style:parent-style-name="Default" style:data-style-name="N148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8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8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8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56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b2b2b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59" style:family="table-cell" style:parent-style-name="Default" style:data-style-name="N148">
      <style:table-cell-properties style:shrink-to-fit="true"/>
      <style:text-properties fo:font-weight="normal" style:font-weight-asian="normal" style:font-weight-complex="normal"/>
    </style:style>
    <style:style style:name="ce59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9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9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66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b2b2b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0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77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79" style:family="table-cell" style:parent-style-name="Excel_20_Built-in_20_Accent6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44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b2b2b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6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1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1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1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87" style:family="table-cell" style:parent-style-name="Excel_20_Built-in_20_60_25__20_-_20_Accent6" style:data-style-name="N0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4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b2b2b2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9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1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64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4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4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4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5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6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6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6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6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0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67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7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7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7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8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8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31" style:family="table-cell" style:parent-style-name="Excel_20_Built-in_20_60_25__20_-_20_Accent6" style:data-style-name="N0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32" style:family="table-cell" style:parent-style-name="Excel_20_Built-in_20_Accent6" style:data-style-name="N0">
      <style:table-cell-properties fo:border-bottom="0.74pt solid #000000" fo:background-color="#70ad47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69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0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0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0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1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1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1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1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1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2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2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2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2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2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2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2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2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2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802" style:family="table-cell" style:parent-style-name="Default">
      <style:text-properties fo:font-weight="bold" style:font-weight-asian="bold" style:font-weight-complex="bold"/>
    </style:style>
    <style:style style:name="ce809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736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1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39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4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4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4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4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4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4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4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5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5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75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5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5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5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5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5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5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5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6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62" style:family="table-cell" style:parent-style-name="Excel_20_Built-in_20_Neutral" style:data-style-name="N148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36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837" style:family="table-cell" style:parent-style-name="Excel_20_Built-in_20_Neutral" style:data-style-name="N148">
      <style:table-cell-properties style:text-align-source="fix" style:repeat-content="false" style:shrink-to-fit="true" style:vertical-align="middle"/>
      <style:paragraph-properties fo:text-align="center" fo:margin-left="0cm"/>
    </style:style>
    <style:style style:name="ce76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6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7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7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7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7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dotted" style:text-underline-width="auto" style:text-underline-color="font-color"/>
    </style:style>
    <style:style style:name="ce845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7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7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7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7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7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8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52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8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8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8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5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8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9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9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860" style:family="table-cell" style:parent-style-name="Default">
      <style:table-cell-properties style:vertical-align="middle"/>
    </style:style>
    <style:style style:name="ce861" style:family="table-cell" style:parent-style-name="Default">
      <style:table-cell-properties fo:wrap-option="no-wrap"/>
    </style:style>
    <style:style style:name="ce862" style:family="table-cell" style:parent-style-name="Default">
      <style:table-cell-properties fo:wrap-option="wrap" style:rotation-align="none" style:shrink-to-fit="false" style:vertical-align="top"/>
      <style:text-properties fo:font-size="6pt" style:font-size-asian="11pt" style:font-size-complex="11pt" fo:hyphenate="false"/>
    </style:style>
    <style:style style:name="ce8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b2b2b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64" style:family="table-cell" style:parent-style-name="Default">
      <style:text-properties fo:color="#b2b2b2">
        <loext:char-complex-color loext:theme-type="dark1" loext:color-type="theme"/>
      </style:text-properties>
    </style:style>
    <style:style style:name="ce86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b2b2b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66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b2b2b2">
        <loext:char-complex-color loext:theme-type="dark1" loext:color-type="theme"/>
      </style:text-properties>
    </style:style>
    <style:style style:name="ce867" style:family="table-cell" style:parent-style-name="Default">
      <style:table-cell-properties fo:wrap-option="wrap" style:shrink-to-fit="true" style:vertical-align="top"/>
      <style:text-properties fo:color="#b2b2b2" fo:font-size="6pt">
        <loext:char-complex-color loext:theme-type="dark1" loext:color-type="theme"/>
      </style:text-properties>
    </style:style>
    <style:style style:name="ce868" style:family="table-cell" style:parent-style-name="Default">
      <style:table-cell-properties fo:wrap-option="no-wrap"/>
      <style:text-properties fo:color="#b2b2b2">
        <loext:char-complex-color loext:theme-type="dark1" loext:color-type="theme"/>
      </style:text-properties>
    </style:style>
    <style:style style:name="ce803" style:family="table-cell" style:parent-style-name="Default"/>
    <style:style style:name="ce804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fo:color="#000000"/>
    </style:style>
    <style:style style:name="ce805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fo:color="#000000"/>
    </style:style>
    <style:style style:name="ce872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b2b2b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73" style:family="table-cell" style:parent-style-name="Default">
      <style:table-cell-properties style:vertical-align="middle"/>
      <style:text-properties fo:color="#b2b2b2">
        <loext:char-complex-color loext:theme-type="dark1" loext:color-type="theme"/>
      </style:text-properties>
    </style:style>
    <style:style style:name="ce874" style:family="table-cell" style:parent-style-name="Default">
      <style:table-cell-properties fo:wrap-option="no-wrap" style:rotation-align="none"/>
    </style:style>
    <style:style style:name="ce875" style:family="table-cell" style:parent-style-name="Default">
      <style:text-properties fo:color="#808080">
        <loext:char-complex-color loext:theme-type="dark1" loext:color-type="theme"/>
      </style:text-properties>
    </style:style>
    <style:style style:name="ce876" style:family="table-cell" style:parent-style-name="Default">
      <style:table-cell-properties style:vertical-align="middle"/>
      <style:text-properties fo:color="#808080">
        <loext:char-complex-color loext:theme-type="dark1" loext:color-type="theme"/>
      </style:text-properties>
    </style:style>
    <style:style style:name="ce877" style:family="table-cell" style:parent-style-name="Default">
      <style:table-cell-properties style:rotation-align="none"/>
      <style:text-properties fo:color="#b2b2b2">
        <loext:char-complex-color loext:theme-type="dark1" loext:color-type="theme"/>
      </style:text-properties>
    </style:style>
    <style:style style:name="ce878" style:family="table-cell" style:parent-style-name="Default">
      <style:table-cell-properties style:rotation-align="none" style:vertical-align="middle"/>
      <style:text-properties fo:color="#b2b2b2">
        <loext:char-complex-color loext:theme-type="dark1" loext:color-type="theme"/>
      </style:text-properties>
    </style:style>
    <style:style style:name="ce879" style:family="table-cell" style:parent-style-name="Excel_20_Built-in_20_Good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80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81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82" style:family="table-cell" style:parent-style-name="Defaul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>
        <loext:char-complex-color loext:theme-type="dark1" loext:color-type="theme"/>
      </style:text-properties>
    </style:style>
    <style:style style:name="ce88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88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8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8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88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9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9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9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89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9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9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96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9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9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9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0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0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0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03" style:family="table-cell" style:parent-style-name="Excel_20_Built-in_20_Accent6" style:data-style-name="N0">
      <style:table-cell-properties fo:border-bottom="0.74pt solid #000000" fo:background-color="#70ad47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90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0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0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0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09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1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1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91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1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1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91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1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91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1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1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2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2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2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29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3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3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3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3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3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3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3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3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39" style:family="table-cell" style:parent-style-name="Excel_20_Built-in_20_Good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4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94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4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4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94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4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94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4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4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49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5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5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5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5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5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5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5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6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6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6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6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6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6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96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6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6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96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7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971" style:family="table-cell" style:parent-style-name="Excel_20_Built-in_20_Neutral" style:data-style-name="N148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7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7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7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7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79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8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8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8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8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8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8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8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8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8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8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9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99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99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993" style:family="table-cell" style:parent-style-name="Default"/>
    <style:style style:name="ce994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fo:color="#000000"/>
    </style:style>
    <style:style style:name="ce995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fo:color="#000000"/>
    </style:style>
    <style:style style:name="ce99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99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99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0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00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0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0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0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01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1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1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1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1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1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2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3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3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3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3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3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3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39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4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4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04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4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4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04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4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04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4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4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5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5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5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5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5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5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5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5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5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5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6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6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6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06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6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6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06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6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06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6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7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71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072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7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7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7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7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7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7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7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8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8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8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8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8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8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08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8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8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08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9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091" style:family="table-cell" style:parent-style-name="Excel_20_Built-in_20_Neutral" style:data-style-name="N148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9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9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9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9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9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9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9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9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0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0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0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0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0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0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0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0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10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10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110" style:family="table-cell" style:parent-style-name="Default"/>
    <style:style style:name="ce1111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fo:color="#000000"/>
    </style:style>
    <style:style style:name="ce1112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fo:color="#000000"/>
    </style:style>
    <style:style style:name="ce1113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fo:color="#000000"/>
    </style:style>
    <style:style style:name="ce1114" style:family="table-cell" style:parent-style-name="Default">
      <style:table-cell-properties style:vertical-align="top"/>
    </style:style>
    <style:style style:name="ce111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11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1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1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11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2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2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2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12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2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2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3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3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3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3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3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3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3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3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39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4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4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4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4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14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4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4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14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4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14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5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5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5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5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5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5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5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5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5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59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6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6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6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6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6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16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6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6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16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6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17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7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7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73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174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7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7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7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7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79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8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8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8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8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8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8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8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8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18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8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9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19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9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193" style:family="table-cell" style:parent-style-name="Excel_20_Built-in_20_Neutral" style:data-style-name="N148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9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9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9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9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9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9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0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0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0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0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0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0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0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0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0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0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21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21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2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1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808080">
        <loext:char-complex-color loext:theme-type="dark1" loext:color-type="theme"/>
      </style:text-properties>
    </style:style>
    <style:style style:name="ce1215" style:family="table-cell" style:parent-style-name="Default">
      <style:table-cell-properties fo:wrap-option="wrap" style:vertical-align="top"/>
      <style:text-properties fo:color="#808080" fo:font-size="6pt">
        <loext:char-complex-color loext:theme-type="dark1" loext:color-type="theme"/>
      </style:text-properties>
    </style:style>
    <style:style style:name="ce1216" style:family="table-cell" style:parent-style-name="Default">
      <style:table-cell-properties fo:wrap-option="no-wrap"/>
      <style:text-properties fo:color="#808080">
        <loext:char-complex-color loext:theme-type="dark1" loext:color-type="theme"/>
      </style:text-properties>
    </style:style>
    <style:style style:name="ce1217" style:family="table-cell" style:parent-style-name="Default">
      <style:table-cell-properties fo:background-color="#77bc65" style:text-align-source="fix" style:repeat-content="false" style:vertical-align="bottom"/>
      <style:paragraph-properties fo:text-align="center" fo:margin-left="0cm"/>
    </style:style>
    <style:style style:name="ce1218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</style:style>
    <style:style style:name="ce1219" style:family="table-cell" style:parent-style-name="Default">
      <style:table-cell-properties fo:background-color="#ffde59" style:text-align-source="fix" style:repeat-content="false" style:vertical-align="bottom"/>
      <style:paragraph-properties fo:text-align="center" fo:margin-left="0cm"/>
    </style:style>
    <style:style style:name="ce1220" style:family="table-cell" style:parent-style-name="Default">
      <style:table-cell-properties fo:background-color="#ff972f" style:text-align-source="fix" style:repeat-content="false" style:vertical-align="bottom"/>
      <style:paragraph-properties fo:text-align="center" fo:margin-left="0cm"/>
    </style:style>
    <style:style style:name="ce1221" style:family="table-cell" style:parent-style-name="Default">
      <style:table-cell-properties fo:background-color="#ff6d6d" style:text-align-source="fix" style:repeat-content="false" style:vertical-align="bottom"/>
      <style:paragraph-properties fo:text-align="center" fo:margin-left="0cm"/>
    </style:style>
    <style:style style:name="ce1222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23" style:family="table-cell" style:parent-style-name="Default">
      <style:table-cell-properties style:rotation-align="none"/>
      <style:text-properties fo:color="#808080">
        <loext:char-complex-color loext:theme-type="dark1" loext:color-type="theme"/>
      </style:text-properties>
    </style:style>
    <style:style style:name="ce1224" style:family="table-cell" style:parent-style-name="Default">
      <style:table-cell-properties style:rotation-align="none" style:vertical-align="middle"/>
      <style:text-properties fo:color="#808080">
        <loext:char-complex-color loext:theme-type="dark1" loext:color-type="theme"/>
      </style:text-properties>
    </style:style>
    <style:style style:name="ce1225" style:family="table-cell" style:parent-style-name="Default">
      <style:table-cell-properties fo:background-color="#ffffff"/>
      <style:text-properties style:use-window-font-color="true"/>
    </style:style>
    <style:style style:name="ce122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22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2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2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23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3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3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3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23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3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3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3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3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3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4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4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4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4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4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4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4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4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4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4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25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5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5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25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5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25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5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5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5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5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6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6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6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6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6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6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6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6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6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6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7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27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7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7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27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7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27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7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7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79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280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8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8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8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8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8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8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8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8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8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9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9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9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9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29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9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9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29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9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299" style:family="table-cell" style:parent-style-name="Excel_20_Built-in_20_Neutral" style:data-style-name="N148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30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30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30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30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30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30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30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30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30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30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31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31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31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31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31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315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131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31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31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3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32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3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</style:style>
    <style:style style:name="ce1322" style:family="table-cell" style:parent-style-name="Default">
      <style:table-cell-properties fo:wrap-option="wrap" style:vertical-align="top"/>
      <style:text-properties fo:font-size="6pt"/>
    </style:style>
    <style:style style:name="ce1323" style:family="table-cell" style:parent-style-name="Default">
      <style:table-cell-properties fo:background-color="#77bc65" style:text-align-source="fix" style:repeat-content="false" style:vertical-align="bottom"/>
      <style:paragraph-properties fo:text-align="center" fo:margin-left="0cm"/>
    </style:style>
    <style:style style:name="ce1324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</style:style>
    <style:style style:name="ce1325" style:family="table-cell" style:parent-style-name="Default">
      <style:table-cell-properties fo:background-color="#ffde59" style:text-align-source="fix" style:repeat-content="false" style:vertical-align="bottom"/>
      <style:paragraph-properties fo:text-align="center" fo:margin-left="0cm"/>
    </style:style>
    <style:style style:name="ce1326" style:family="table-cell" style:parent-style-name="Default">
      <style:table-cell-properties fo:background-color="#ff972f" style:text-align-source="fix" style:repeat-content="false" style:vertical-align="bottom"/>
      <style:paragraph-properties fo:text-align="center" fo:margin-left="0cm"/>
    </style:style>
    <style:style style:name="ce1327" style:family="table-cell" style:parent-style-name="Default">
      <style:table-cell-properties fo:background-color="#ff6d6d" style:text-align-source="fix" style:repeat-content="false" style:vertical-align="bottom"/>
      <style:paragraph-properties fo:text-align="center" fo:margin-left="0cm"/>
    </style:style>
    <style:style style:name="ce1328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keys 7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620"/>
        <table:table-column table:style-name="co1" table:default-cell-style-name="ce29"/>
        <table:table-column table:style-name="co1" table:default-cell-style-name="ce38"/>
        <table:table-column table:style-name="co1" table:number-columns-repeated="2" table:default-cell-style-name="ce46"/>
        <table:table-column table:style-name="co1" table:default-cell-style-name="ce647"/>
        <table:table-column table:style-name="co1" table:default-cell-style-name="ce99"/>
        <table:table-column table:style-name="co1" table:default-cell-style-name="Default"/>
        <table:table-column table:style-name="co1" table:default-cell-style-name="ce38"/>
        <table:table-column table:style-name="co1" table:number-columns-repeated="2" table:default-cell-style-name="ce46"/>
        <table:table-column table:style-name="co1" table:default-cell-style-name="ce647"/>
        <table:table-column table:style-name="co1" table:default-cell-style-name="ce99"/>
        <table:table-column table:style-name="co1" table:default-cell-style-name="ce29"/>
        <table:table-column table:style-name="co1" table:default-cell-style-name="ce38"/>
        <table:table-column table:style-name="co1" table:default-cell-style-name="ce46"/>
        <table:table-column table:style-name="co1" table:default-cell-style-name="Default"/>
        <table:table-column table:style-name="co1" table:default-cell-style-name="ce647"/>
        <table:table-column table:style-name="co1" table:default-cell-style-name="ce99"/>
        <table:table-column table:style-name="co1" table:default-cell-style-name="ce29"/>
        <table:table-column table:style-name="co1" table:default-cell-style-name="ce38"/>
        <table:table-column table:style-name="co1" table:number-columns-repeated="2" table:default-cell-style-name="ce46"/>
        <table:table-column table:style-name="co1" table:default-cell-style-name="ce647"/>
        <table:table-column table:style-name="co1" table:default-cell-style-name="ce99"/>
        <table:table-column table:style-name="co1" table:number-columns-repeated="36" table:default-cell-style-name="Default"/>
        <table:table-column table:style-name="co1" table:default-cell-style-name="ce877"/>
        <table:table-column table:style-name="co1" table:number-columns-repeated="36" table:default-cell-style-name="Default"/>
        <table:table-row table:style-name="ro1">
          <table:table-cell table:style-name="ce620"/>
          <table:table-cell/>
          <table:table-cell table:style-name="ce656"/>
          <table:table-cell table:style-name="ce666"/>
          <table:table-cell table:style-name="ce677" table:number-columns-repeated="2"/>
          <table:table-cell table:style-name="ce622" table:number-columns-repeated="2"/>
          <table:table-cell/>
          <table:table-cell table:style-name="Default"/>
          <table:table-cell table:style-name="ce622"/>
          <table:table-cell table:style-name="ce677"/>
          <table:table-cell table:style-name="ce731"/>
          <table:table-cell table:style-name="ce666"/>
          <table:table-cell table:style-name="ce656"/>
          <table:table-cell table:style-name="ce620" table:number-columns-repeated="2"/>
          <table:table-cell/>
          <table:table-cell table:style-name="Default"/>
          <table:table-cell table:style-name="ce809" office:value-type="string" calcext:value-type="string">
            <text:p>start priorities</text:p>
          </table:table-cell>
          <table:table-cell table:style-name="Default" table:number-columns-repeated="5"/>
          <table:table-cell table:style-name="ce809" office:value-type="string" calcext:value-type="string">
            <text:p>averages</text:p>
          </table:table-cell>
          <table:table-cell table:number-columns-repeated="5"/>
          <table:table-cell table:style-name="ce809" office:value-type="string" calcext:value-type="string">
            <text:p>json</text:p>
          </table:table-cell>
          <table:table-cell table:number-columns-repeated="30"/>
          <table:table-cell table:style-name="Default"/>
          <table:table-cell table:number-columns-repeated="36"/>
        </table:table-row>
        <table:table-row table:style-name="ro1">
          <table:table-cell table:style-name="ce620"/>
          <table:table-cell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666" office:value-type="float" office:value="2" calcext:value-type="float">
            <text:p>2</text:p>
          </table:table-cell>
          <table:table-cell table:style-name="ce677" office:value-type="float" office:value="3" calcext:value-type="float">
            <text:p>3</text:p>
          </table:table-cell>
          <table:table-cell table:style-name="ce677" office:value-type="float" office:value="4" calcext:value-type="float">
            <text:p>4</text:p>
          </table:table-cell>
          <table:table-cell table:style-name="ce677"/>
          <table:table-cell table:style-name="ce622"/>
          <table:table-cell/>
          <table:table-cell table:style-name="ce622"/>
          <table:table-cell table:style-name="ce677"/>
          <table:table-cell table:style-name="ce677" office:value-type="float" office:value="15" calcext:value-type="float">
            <text:p>15</text:p>
          </table:table-cell>
          <table:table-cell table:style-name="ce731" office:value-type="float" office:value="16" calcext:value-type="float">
            <text:p>16</text:p>
          </table:table-cell>
          <table:table-cell table:style-name="ce666" office:value-type="float" office:value="17" calcext:value-type="float">
            <text:p>17</text:p>
          </table:table-cell>
          <table:table-cell table:style-name="ce656" office:value-type="float" office:value="18" calcext:value-type="float">
            <text:p>18</text:p>
          </table:table-cell>
          <table:table-cell table:style-name="ce620" office:value-type="float" office:value="19" calcext:value-type="float">
            <text:p>19</text:p>
          </table:table-cell>
          <table:table-cell table:style-name="ce620"/>
          <table:table-cell/>
          <table:table-cell table:style-name="ce798" office:value-type="float" office:value="1" calcext:value-type="float">
            <text:p>1</text:p>
          </table:table-cell>
          <table:table-cell table:style-name="ce736" office:value-type="float" office:value="14" calcext:value-type="float">
            <text:p>14</text:p>
          </table:table-cell>
          <table:table-cell table:style-name="ce736" office:value-type="float" office:value="6" calcext:value-type="float">
            <text:p>6</text:p>
          </table:table-cell>
          <table:table-cell table:style-name="ce736" office:value-type="float" office:value="3" calcext:value-type="float">
            <text:p>3</text:p>
          </table:table-cell>
          <table:table-cell table:style-name="ce736" office:value-type="float" office:value="7" calcext:value-type="float">
            <text:p>7</text:p>
          </table:table-cell>
          <table:table-cell table:style-name="ce736" office:value-type="float" office:value="13" calcext:value-type="float">
            <text:p>13</text:p>
          </table:table-cell>
          <table:table-cell table:style-name="Default"/>
          <table:table-cell table:style-name="ce762" table:formula="of:=SUM([.H25];[.N25];[.T25];[.Z25];[.Z30];[.T30];[.N30];[.H30];[.B30];[.B35];[.H35];[.N35];[.T35];[.Z35])/[.$Z$6]" office:value-type="float" office:value="71.4" calcext:value-type="float">
            <text:p>71.4</text:p>
          </table:table-cell>
          <table:table-cell table:style-name="ce762" table:formula="of:=SUM([.C25];[.O25];[.U25];[.AA25];[.AA30];[.U30];[.O30];[.I30];[.C30];[.C35];[.I35];[.O35];[.U35];[.AA35])/[.$Z$6]" office:value-type="float" office:value="39" calcext:value-type="float">
            <text:p>39.0</text:p>
          </table:table-cell>
          <table:table-cell table:style-name="ce762" table:formula="of:=SUM([.D25];[.J25];[.V25];[.AB25];[.AB30];[.V30];[.P30];[.J30];[.D30];[.D35];[.J35];[.P35];[.V35];[.AB35])/[.$Z$6]" office:value-type="float" office:value="28.9" calcext:value-type="float">
            <text:p>28.9</text:p>
          </table:table-cell>
          <table:table-cell table:style-name="ce762" table:formula="of:=SUM([.E25];[.K25];[.Q25];[.AC25];[.AC30];[.W30];[.Q30];[.K30];[.E30];[.E35];[.K35];[.Q35];[.W35];[.AC35])/[.$Z$6]" office:value-type="float" office:value="37.9" calcext:value-type="float">
            <text:p>37.9</text:p>
          </table:table-cell>
          <table:table-cell table:style-name="ce762" table:formula="of:=SUM([.F25];[.L25];[.R25];[.X25];[.AD30];[.X30];[.R30];[.L30];[.F30];[.F35];[.L35];[.R35];[.X35];[.AD35])/[.$Z$6]" office:value-type="float" office:value="52.9" calcext:value-type="float">
            <text:p>52.9</text:p>
          </table:table-cell>
          <table:table-cell/>
          <table:table-cell table:style-name="ce862" table:formula="of:=COM.MICROSOFT.TEXTJOIN(&quot;&quot;; TRUE(); &quot;{ &quot;&quot;efforts&quot;&quot;: [&quot;; [.AF28]; &quot;], &quot;&quot;pairs&quot;&quot;: &quot;;[.AF20]; &quot;}&quot;)" office:value-type="string" office:string-value="{ &quot;efforts&quot;: [1, 1, 1.1, 1.2, 2, 2.1, 2.2, 3, 3.1, 3.2, 4, 4.1, 4.2, 5, 5.1], &quot;pairs&quot;: {&quot;0&quot;: { &quot;0&quot;: 14, &quot;1&quot;: 1, &quot;2&quot;: 2, &quot;3&quot;: 3, &quot;4&quot;: 5, &quot;5&quot;: 9, &quot;6&quot;: 8, &quot;7&quot;: 7, &quot;8&quot;: 4, &quot;9&quot;: 6, &quot;10&quot;: 14, &quot;11&quot;: 13, &quot;12&quot;: 11, &quot;13&quot;: 10, &quot;14&quot;: 12}, &quot;1&quot;: { &quot;0&quot;: 14, &quot;1&quot;: 6, &quot;2&quot;: 1, &quot;3&quot;: 2, &quot;4&quot;: 8, &quot;5&quot;: 7, &quot;6&quot;: 5, &quot;7&quot;: 4, &quot;8&quot;: 3, &quot;9&quot;: 6, &quot;10&quot;: 11, &quot;11&quot;: 12, &quot;12&quot;: 10, &quot;13&quot;: 9, &quot;14&quot;: 13}, &quot;2&quot;: { &quot;0&quot;: 14, &quot;1&quot;: 2, &quot;2&quot;: 3, &quot;3&quot;: 1, &quot;4&quot;: 8, &quot;5&quot;: 7, &quot;6&quot;: 4, &quot;7&quot;: 5, &quot;8&quot;: 3, &quot;9&quot;: 6, &quot;10&quot;: 12, &quot;11&quot;: 10, &quot;12&quot;: 11, &quot;13&quot;: 9, &quot;14&quot;: 13}, &quot;3&quot;: { &quot;0&quot;: 14, &quot;1&quot;: 2, &quot;2&quot;: 1, &quot;3&quot;: 7, &quot;4&quot;: 8, &quot;5&quot;: 6, &quot;6&quot;: 3, &quot;7&quot;: 4, &quot;8&quot;: 5, &quot;9&quot;: 7, &quot;10&quot;: 12, &quot;11&quot;: 10, &quot;12&quot;: 9, &quot;13&quot;: 11, &quot;14&quot;: 13}, &quot;4&quot;: { &quot;0&quot;: 14, &quot;1&quot;: 2, &quot;2&quot;: 1, &quot;3&quot;: 5, &quot;4&quot;: 13, &quot;5&quot;: 6, &quot;6&quot;: 3, &quot;7&quot;: 4, &quot;8&quot;: 7, &quot;9&quot;: 8, &quot;10&quot;: 12, &quot;11&quot;: 10, &quot;12&quot;: 9, &quot;13&quot;: 11, &quot;14&quot;: 13}, &quot;5&quot;: { &quot;0&quot;: 14, &quot;1&quot;: 9, &quot;2&quot;: 4, &quot;3&quot;: 7, &quot;4&quot;: 11, &quot;5&quot;: 5, &quot;6&quot;: 3, &quot;7&quot;: 2, &quot;8&quot;: 1, &quot;9&quot;: 6, &quot;10&quot;: 12, &quot;11&quot;: 10, &quot;12&quot;: 8, &quot;13&quot;: 5, &quot;14&quot;: 13}, &quot;6&quot;: { &quot;0&quot;: 14, &quot;1&quot;: 10, &quot;2&quot;: 5, &quot;3&quot;: 11, &quot;4&quot;: 12, &quot;5&quot;: 7, &quot;6&quot;: 2, &quot;7&quot;: 1, &quot;8&quot;: 2, &quot;9&quot;: 6, &quot;10&quot;: 8, &quot;11&quot;: 9, &quot;12&quot;: 4, &quot;13&quot;: 3, &quot;14&quot;: 13}, &quot;7&quot;: { &quot;0&quot;: 14, &quot;1&quot;: 6, &quot;2&quot;: 4, &quot;3&quot;: 5, &quot;4&quot;: 11, &quot;5&quot;: 7, &quot;6&quot;: 2, &quot;7&quot;: 0, &quot;8&quot;: 1, &quot;9&quot;: 8, &quot;10&quot;: 12, &quot;11&quot;: 9, &quot;12&quot;: 10, &quot;13&quot;: 3, &quot;14&quot;: 13}, &quot;8&quot;: { &quot;0&quot;: 14, &quot;1&quot;: 4, &quot;2&quot;: 3, &quot;3&quot;: 6, &quot;4&quot;: 11, &quot;5&quot;: 7, &quot;6&quot;: 2, &quot;7&quot;: 1, &quot;8&quot;: 1, &quot;9&quot;: 8, &quot;10&quot;: 12, &quot;11&quot;: 9, &quot;12&quot;: 10, &quot;13&quot;: 5, &quot;14&quot;: 13}, &quot;9&quot;: { &quot;0&quot;: 14, &quot;1&quot;: 5, &quot;2&quot;: 3, &quot;3&quot;: 9, &quot;4&quot;: 11, &quot;5&quot;: 7, &quot;6&quot;: 2, &quot;7&quot;: 1, &quot;8&quot;: 4, &quot;9&quot;: 8, &quot;10&quot;: 12, &quot;11&quot;: 8, &quot;12&quot;: 6, &quot;13&quot;: 10, &quot;14&quot;: 13}, &quot;10&quot;: { &quot;0&quot;: 14, &quot;1&quot;: 11, &quot;2&quot;: 7, &quot;3&quot;: 9, &quot;4&quot;: 12, &quot;5&quot;: 10, &quot;6&quot;: 6, &quot;7&quot;: 4, &quot;8&quot;: 5, &quot;9&quot;: 8, &quot;10&quot;: 11, &quot;11&quot;: 3, &quot;12&quot;: 2, &quot;13&quot;: 1, &quot;14&quot;: 13}, &quot;11&quot;: { &quot;0&quot;: 14, &quot;1&quot;: 10, &quot;2&quot;: 6, &quot;3&quot;: 9, &quot;4&quot;: 12, &quot;5&quot;: 11, &quot;6&quot;: 5, &quot;7&quot;: 3, &quot;8&quot;: 4, &quot;9&quot;: 8, &quot;10&quot;: 7, &quot;11&quot;: 10, &quot;12&quot;: 1, &quot;13&quot;: 2, &quot;14&quot;: 13}, &quot;12&quot;: { &quot;0&quot;: 14, &quot;1&quot;: 11, &quot;2&quot;: 10, &quot;3&quot;: 9, &quot;4&quot;: 12, &quot;5&quot;: 8, &quot;6&quot;: 4, &quot;7&quot;: 5, &quot;8&quot;: 3, &quot;9&quot;: 6, &quot;10&quot;: 7, &quot;11&quot;: 2, &quot;12&quot;: 9, &quot;13&quot;: 1, &quot;14&quot;: 13}, &quot;13&quot;: { &quot;0&quot;: 14, &quot;1&quot;: 10, &quot;2&quot;: 8, &quot;3&quot;: 11, &quot;4&quot;: 12, &quot;5&quot;: 7, &quot;6&quot;: 4, &quot;7&quot;: 3, &quot;8&quot;: 5, &quot;9&quot;: 9, &quot;10&quot;: 6, &quot;11&quot;: 2, &quot;12&quot;: 1, &quot;13&quot;: 4, &quot;14&quot;: 13}, &quot;14&quot;: { &quot;0&quot;: 14, &quot;1&quot;: 13, &quot;2&quot;: 10, &quot;3&quot;: 12, &quot;4&quot;: 11, &quot;5&quot;: 6, &quot;6&quot;: 4, &quot;7&quot;: 3, &quot;8&quot;: 8, &quot;9&quot;: 9, &quot;10&quot;: 5, &quot;11&quot;: 2, &quot;12&quot;: 1, &quot;13&quot;: 7, &quot;14&quot;: 12}}}" calcext:value-type="string" table:number-columns-spanned="29" table:number-rows-spanned="5">
            <text:p>{ "efforts": [1, 1, 1.1, 1.2, 2, 2.1, 2.2, 3, 3.1, 3.2, 4, 4.1, 4.2, 5, 5.1], "pairs": {"0": { "0": 14, "1": 1, "2": 2, "3": 3, "4": 5, "5": 9, "6": 8, "7": 7, "8": 4, "9": 6, "10": 14, "11": 13, "12": 11, "13": 10, "14": 12}, "1": { "0": 14, "1": 6, "2": 1, "3": 2, "4": 8, "5": 7, "6": 5, "7": 4, "8": 3, "9": 6, "10": 11, "11": 12, "12": 10, "13": 9, "14": 13}, "2": { "0": 14, "1": 2, "2": 3, "3": 1, "4": 8, "5": 7, "6": 4, "7": 5, "8": 3, "9": 6, "10": 12, "11": 10, "12": 11, "13": 9, "14": 13}, "3": { "0": 14, "1": 2, "2": 1, "3": 7, "4": 8, "5": 6, "6": 3, "7": 4, "8": 5, "9": 7, "10": 12, "11": 10, "12": 9, "13": 11, "14": 13}, "4": { "0": 14, "1": 2, "2": 1, "3": 5, "4": 13, "5": 6, "6": 3, "7": 4, "8": 7, "9": 8, "10": 12, "11": 10, "12": 9, "13": 11, "14": 13}, "5": { "0": 14, "1": 9, "2": 4, "3": 7, "4": 11, "5": 5, "6": 3, "7": 2, "8": 1, "9": 6, "10": 12, "11": 10, "12": 8, "13": 5, "14": 13}, "6": { "0": 14, "1": 10, "2": 5, "3": 11, "4": 12, "5": 7, "6": 2, "7": 1, "8": 2, "9": 6, "10": 8, "11": 9, "12": 4, "13": 3, "14": 13}, "7": { "0": 14, "1": 6, "2": 4, "3": 5, "4": 11, "5": 7, "6": 2, "7": 0, "8": 1, "9": 8, "10": 12, "11": 9, "12": 10, "13": 3, "14": 13}, "8": { "0": 14, "1": 4, "2": 3, "3": 6, "4": 11, "5": 7, "6": 2, "7": 1, "8": 1, "9": 8, "10": 12, "11": 9, "12": 10, "13": 5, "14": 13}, "9": { "0": 14, "1": 5, "2": 3, "3": 9, "4": 11, "5": 7, "6": 2, "7": 1, "8": 4, "9": 8, "10": 12, "11": 8, "12": 6, "13": 10, "14": 13}, "10": { "0": 14, "1": 11, "2": 7, "3": 9, "4": 12, "5": 10, "6": 6, "7": 4, "8": 5, "9": 8, "10": 11, "11": 3, "12": 2, "13": 1, "14": 13}, "11": { "0": 14, "1": 10, "2": 6, "3": 9, "4": 12, "5": 11, "6": 5, "7": 3, "8": 4, "9": 8, "10": 7, "11": 10, "12": 1, "13": 2, "14": 13}, "12": { "0": 14, "1": 11, "2": 10, "3": 9, "4": 12, "5": 8, "6": 4, "7": 5, "8": 3, "9": 6, "10": 7, "11": 2, "12": 9, "13": 1, "14": 13}, "13": { "0": 14, "1": 10, "2": 8, "3": 11, "4": 12, "5": 7, "6": 4, "7": 3, "8": 5, "9": 9, "10": 6, "11": 2, "12": 1, "13": 4, "14": 13}, "14": { "0": 14, "1": 13, "2": 10, "3": 12, "4": 11, "5": 6, "6": 4, "7": 3, "8": 8, "9": 9, "10": 5, "11": 2, "12": 1, "13": 7, "14": 12}}}</text:p>
          </table:table-cell>
          <table:covered-table-cell table:number-columns-repeated="28" table:style-name="ce861"/>
          <table:table-cell table:style-name="ce874"/>
          <table:table-cell table:style-name="ce861"/>
          <table:table-cell table:style-name="Default"/>
          <table:table-cell table:number-columns-repeated="36"/>
        </table:table-row>
        <table:table-row table:style-name="ro1">
          <table:table-cell table:style-name="ce620"/>
          <table:table-cell office:value-type="float" office:value="5" calcext:value-type="float">
            <text:p>5</text:p>
          </table:table-cell>
          <table:table-cell table:style-name="ce656" office:value-type="float" office:value="6" calcext:value-type="float">
            <text:p>6</text:p>
          </table:table-cell>
          <table:table-cell table:style-name="ce666" office:value-type="float" office:value="7" calcext:value-type="float">
            <text:p>7</text:p>
          </table:table-cell>
          <table:table-cell table:style-name="ce677" office:value-type="float" office:value="8" calcext:value-type="float">
            <text:p>8</text:p>
          </table:table-cell>
          <table:table-cell table:style-name="ce677" office:value-type="float" office:value="9" calcext:value-type="float">
            <text:p>9</text:p>
          </table:table-cell>
          <table:table-cell table:style-name="ce677"/>
          <table:table-cell table:style-name="ce622"/>
          <table:table-cell/>
          <table:table-cell table:style-name="ce708"/>
          <table:table-cell table:style-name="ce677"/>
          <table:table-cell table:style-name="ce677" office:value-type="float" office:value="20" calcext:value-type="float">
            <text:p>20</text:p>
          </table:table-cell>
          <table:table-cell table:style-name="ce731" office:value-type="float" office:value="21" calcext:value-type="float">
            <text:p>21</text:p>
          </table:table-cell>
          <table:table-cell table:style-name="ce666" office:value-type="float" office:value="22" calcext:value-type="float">
            <text:p>22</text:p>
          </table:table-cell>
          <table:table-cell table:style-name="ce656" office:value-type="float" office:value="23" calcext:value-type="float">
            <text:p>23</text:p>
          </table:table-cell>
          <table:table-cell table:style-name="ce620" office:value-type="float" office:value="24" calcext:value-type="float">
            <text:p>24</text:p>
          </table:table-cell>
          <table:table-cell table:style-name="ce620"/>
          <table:table-cell/>
          <table:table-cell table:style-name="ce798" office:value-type="float" office:value="2" calcext:value-type="float">
            <text:p>2</text:p>
          </table:table-cell>
          <table:table-cell table:style-name="ce736" office:value-type="float" office:value="5" calcext:value-type="float">
            <text:p>5</text:p>
          </table:table-cell>
          <table:table-cell table:style-name="ce736" office:value-type="float" office:value="2" calcext:value-type="float">
            <text:p>2</text:p>
          </table:table-cell>
          <table:table-cell table:style-name="ce736" office:value-type="float" office:value="0" calcext:value-type="float">
            <text:p>0</text:p>
          </table:table-cell>
          <table:table-cell table:style-name="ce736" office:value-type="float" office:value="1" calcext:value-type="float">
            <text:p>1</text:p>
          </table:table-cell>
          <table:table-cell table:style-name="ce95" office:value-type="float" office:value="8" calcext:value-type="float">
            <text:p>8</text:p>
          </table:table-cell>
          <table:table-cell table:style-name="Default"/>
          <table:table-cell table:style-name="ce762" table:formula="of:=SUM([.B26];[.H26];[.N26];[.T26];[.Z26];[.Z31];[.T31];[.N31];[.H31];[.B36];[.H36];[.N36];[.T36];[.Z36])/[.$Z$6]" office:value-type="float" office:value="42" calcext:value-type="float">
            <text:p>42.0</text:p>
          </table:table-cell>
          <table:table-cell table:style-name="ce762" table:formula="of:=SUM([.C26];[.I26];[.O26];[.U26];[.AA26];[.AA31];[.U31];[.O31];[.C31];[.C36];[.I36];[.O36];[.U36];[.AA36])/[.$Z$6]" office:value-type="float" office:value="24.4" calcext:value-type="float">
            <text:p>24.4</text:p>
          </table:table-cell>
          <table:table-cell table:style-name="ce762" table:formula="of:=SUM([.D26];[.J26];[.P26];[.V26];[.AB26];[.AB31];[.V31];[.J31];[.D31];[.D36];[.J36];[.P36];[.V36];[.AB36])/[.$Z$6]" office:value-type="float" office:value="22.9" calcext:value-type="float">
            <text:p>22.9</text:p>
          </table:table-cell>
          <table:table-cell table:style-name="ce762" table:formula="of:=SUM([.E26];[.K26];[.Q26];[.W26];[.AC26];[.AC31];[.Q31];[.K31];[.E31];[.E36];[.K36];[.Q36];[.W36];[.AC36])/[.$Z$6]" office:value-type="float" office:value="25.1" calcext:value-type="float">
            <text:p>25.1</text:p>
          </table:table-cell>
          <table:table-cell table:style-name="ce762" table:formula="of:=SUM([.F26];[.L26];[.R26];[.X26];[.AD26];[.X31];[.R31];[.L31];[.F31];[.F36];[.L36];[.R36];[.X36];[.AD36])/[.$Z$6]" office:value-type="float" office:value="38.1" calcext:value-type="float">
            <text:p>38.1</text:p>
          </table:table-cell>
          <table:table-cell/>
          <table:covered-table-cell table:number-columns-repeated="29" table:style-name="ce861"/>
          <table:table-cell table:style-name="ce861" table:number-columns-repeated="3"/>
          <table:table-cell table:number-columns-repeated="36"/>
        </table:table-row>
        <table:table-row table:style-name="ro1">
          <table:table-cell table:style-name="ce620"/>
          <table:table-cell office:value-type="float" office:value="10" calcext:value-type="float">
            <text:p>10</text:p>
          </table:table-cell>
          <table:table-cell table:style-name="ce656" office:value-type="float" office:value="11" calcext:value-type="float">
            <text:p>11</text:p>
          </table:table-cell>
          <table:table-cell table:style-name="ce666" office:value-type="float" office:value="12" calcext:value-type="float">
            <text:p>12</text:p>
          </table:table-cell>
          <table:table-cell table:style-name="ce677" office:value-type="float" office:value="13" calcext:value-type="float">
            <text:p>13</text:p>
          </table:table-cell>
          <table:table-cell table:style-name="ce687" office:value-type="float" office:value="14" calcext:value-type="float">
            <text:p>14</text:p>
          </table:table-cell>
          <table:table-cell table:style-name="ce677" table:number-columns-repeated="2"/>
          <table:table-cell/>
          <table:table-cell table:style-name="ce677" table:number-columns-repeated="2"/>
          <table:table-cell table:style-name="ce677" office:value-type="float" office:value="25" calcext:value-type="float">
            <text:p>25</text:p>
          </table:table-cell>
          <table:table-cell table:style-name="ce731" office:value-type="float" office:value="26" calcext:value-type="float">
            <text:p>26</text:p>
          </table:table-cell>
          <table:table-cell table:style-name="ce666" office:value-type="float" office:value="27" calcext:value-type="float">
            <text:p>27</text:p>
          </table:table-cell>
          <table:table-cell table:style-name="ce656" office:value-type="float" office:value="28" calcext:value-type="float">
            <text:p>28</text:p>
          </table:table-cell>
          <table:table-cell table:style-name="ce620" office:value-type="float" office:value="29" calcext:value-type="float">
            <text:p>29</text:p>
          </table:table-cell>
          <table:table-cell table:style-name="ce620"/>
          <table:table-cell/>
          <table:table-cell table:style-name="ce798" office:value-type="float" office:value="3" calcext:value-type="float">
            <text:p>3</text:p>
          </table:table-cell>
          <table:table-cell table:style-name="ce736" office:value-type="float" office:value="11" calcext:value-type="float">
            <text:p>11</text:p>
          </table:table-cell>
          <table:table-cell table:style-name="ce736" office:value-type="float" office:value="10" calcext:value-type="float">
            <text:p>10</text:p>
          </table:table-cell>
          <table:table-cell table:style-name="ce95" office:value-type="float" office:value="9" calcext:value-type="float">
            <text:p>9</text:p>
          </table:table-cell>
          <table:table-cell table:style-name="ce736" office:value-type="float" office:value="4" calcext:value-type="float">
            <text:p>4</text:p>
          </table:table-cell>
          <table:table-cell table:style-name="ce736" office:value-type="float" office:value="12" calcext:value-type="float">
            <text:p>12</text:p>
          </table:table-cell>
          <table:table-cell table:style-name="Default"/>
          <table:table-cell table:style-name="ce762" table:formula="of:=SUM([.B27];[.H27];[.N27];[.T27];[.Z27];[.Z32];[.T32];[.N32];[.H32];[.B32];[.H37];[.N37];[.T37];[.Z37])/[.$Z$6]" office:value-type="float" office:value="52" calcext:value-type="float">
            <text:p>52.0</text:p>
          </table:table-cell>
          <table:table-cell table:style-name="ce762" table:formula="of:=SUM([.C27];[.I27];[.O27];[.U27];[.AA27];[.AA32];[.U32];[.O32];[.I32];[.C32];[.C37];[.O37];[.U37];[.AA37])/[.$Z$6]" office:value-type="float" office:value="42.4" calcext:value-type="float">
            <text:p>42.4</text:p>
          </table:table-cell>
          <table:table-cell table:style-name="ce762" table:formula="of:=SUM([.D27];[.J27];[.P27];[.V27];[.AB27];[.AB32];[.V32];[.P32];[.J32];[.D32];[.D37];[.J37];[.V37];[.AB37])/[.$Z$6]" office:value-type="float" office:value="38" calcext:value-type="float">
            <text:p>38.0</text:p>
          </table:table-cell>
          <table:table-cell table:style-name="ce762" table:formula="of:=SUM([.E27];[.K27];[.Q27];[.W27];[.AC27];[.AC32];[.W32];[.Q32];[.K32];[.E32];[.E37];[.K37];[.Q37];[.AC37])/[.$Z$6]" office:value-type="float" office:value="35.3" calcext:value-type="float">
            <text:p>35.3</text:p>
          </table:table-cell>
          <table:table-cell table:style-name="ce762" table:formula="of:=SUM([.F27];[.L27];[.R27];[.X27];[.AD27];[.AD32];[.X32];[.R32];[.L32];[.F32];[.F37];[.L37];[.R37];[.X37])/[.$Z$6]" office:value-type="float" office:value="69.2" calcext:value-type="float">
            <text:p>69.2</text:p>
          </table:table-cell>
          <table:table-cell table:style-name="ce856"/>
          <table:covered-table-cell table:number-columns-repeated="29" table:style-name="ce861"/>
          <table:table-cell table:style-name="ce874"/>
          <table:table-cell table:style-name="ce861" table:number-columns-repeated="2"/>
          <table:table-cell table:number-columns-repeated="36"/>
        </table:table-row>
        <table:table-row table:style-name="ro1">
          <table:table-cell table:style-name="ce620"/>
          <table:table-cell/>
          <table:table-cell table:style-name="ce656"/>
          <table:table-cell table:style-name="ce666"/>
          <table:table-cell table:style-name="ce679" table:number-columns-repeated="4"/>
          <table:table-cell/>
          <table:table-cell table:style-name="ce679" table:number-columns-repeated="3"/>
          <table:table-cell table:style-name="ce732"/>
          <table:table-cell table:style-name="ce666"/>
          <table:table-cell table:style-name="ce656"/>
          <table:table-cell table:style-name="ce620" table:number-columns-repeated="2"/>
          <table:table-cell/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798" office:value-type="float" office:value="2" calcext:value-type="float">
            <text:p>2</text:p>
          </table:table-cell>
          <table:table-cell table:style-name="ce798" office:value-type="float" office:value="3" calcext:value-type="float">
            <text:p>3</text:p>
          </table:table-cell>
          <table:table-cell table:style-name="ce798" office:value-type="float" office:value="4" calcext:value-type="float">
            <text:p>4</text:p>
          </table:table-cell>
          <table:table-cell table:style-name="ce798" office:value-type="float" office:value="5" calcext:value-type="float">
            <text:p>5</text:p>
          </table:table-cell>
          <table:table-cell table:style-name="Default"/>
          <table:table-cell table:style-name="ce836"/>
          <table:table-cell table:style-name="ce844"/>
          <table:table-cell table:style-name="ce836"/>
          <table:table-cell/>
          <table:table-cell table:style-name="ce856" table:number-columns-repeated="2"/>
          <table:covered-table-cell table:style-name="ce856"/>
          <table:covered-table-cell table:number-columns-repeated="28"/>
          <table:table-cell table:number-columns-repeated="2"/>
          <table:table-cell table:style-name="Default"/>
          <table:table-cell table:number-columns-repeated="36"/>
        </table:table-row>
        <table:table-row table:style-name="ro1">
          <table:table-cell table:style-name="ce622" table:number-columns-repeated="17"/>
          <table:table-cell/>
          <table:table-cell table:style-name="Default"/>
          <table:table-cell table:style-name="ce812" office:value-type="string" calcext:value-type="string">
            <text:p>p</text:p>
          </table:table-cell>
          <table:table-cell table:style-name="ce812" office:value-type="string" calcext:value-type="string">
            <text:p>r</text:p>
          </table:table-cell>
          <table:table-cell table:style-name="ce812" office:value-type="string" calcext:value-type="string">
            <text:p>m</text:p>
          </table:table-cell>
          <table:table-cell table:number-columns-repeated="2" table:style-name="ce812" office:value-type="string" calcext:value-type="string">
            <text:p>i</text:p>
          </table:table-cell>
          <table:table-cell table:style-name="Default"/>
          <table:table-cell table:style-name="ce837" office:value-type="float" office:value="1" calcext:value-type="float">
            <text:p>1.0</text:p>
          </table:table-cell>
          <table:table-cell table:number-columns-repeated="5"/>
          <table:covered-table-cell table:number-columns-repeated="13"/>
          <table:covered-table-cell table:number-columns-repeated="3" table:style-name="ce856"/>
          <table:covered-table-cell table:number-columns-repeated="13"/>
          <table:table-cell table:number-columns-repeated="2"/>
          <table:table-cell table:style-name="Default"/>
          <table:table-cell table:number-columns-repeated="36"/>
        </table:table-row>
        <table:table-row table:style-name="ro2">
          <table:table-cell/>
          <table:table-cell table:style-name="ce6" table:number-columns-repeated="29"/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 table:style-name="ce623"/>
          <table:table-cell table:style-name="ce7" table:formula="of:=[.$T$2]" office:value-type="float" office:value="14" calcext:value-type="float">
            <text:p>14</text:p>
          </table:table-cell>
          <table:table-cell table:style-name="ce27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5" calcext:value-type="float">
            <text:p>5</text:p>
          </table:table-cell>
          <table:table-cell table:style-name="ce690"/>
          <table:table-cell table:style-name="ce17" office:value-type="float" office:value="14" calcext:value-type="float">
            <text:p>14</text:p>
          </table:table-cell>
          <table:table-cell table:style-name="ce10" table:formula="of:=[.$U$2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690"/>
          <table:table-cell table:style-name="ce17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10" table:formula="of:=[.$V$2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46" office:value-type="float" office:value="8" calcext:value-type="float">
            <text:p>8</text:p>
          </table:table-cell>
          <table:table-cell table:style-name="ce690"/>
          <table:table-cell table:style-name="ce17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table:formula="of:=[.$W$2]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690"/>
          <table:table-cell table:style-name="ce17" office:value-type="float" office:value="14" calcext:value-type="float">
            <text:p>14</text:p>
          </table:table-cell>
          <table:table-cell table:style-name="ce38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5" calcext:value-type="float">
            <text:p>5</text:p>
          </table:table-cell>
          <table:table-cell table:style-name="ce10" table:formula="of:=[.$X$2]" office:value-type="float" office:value="13" calcext:value-type="float">
            <text:p>13</text:p>
          </table:table-cell>
          <table:table-cell/>
          <table:table-cell table:style-name="ce863" table:formula="of:=COM.MICROSOFT.CONCAT(&quot;&quot;&quot;&quot;;[.$B$2]; &quot;&quot;&quot;: &quot;; [.B8])" office:value-type="string" office:string-value="&quot;0&quot;: 14" calcext:value-type="string">
            <text:p>"0": 14</text:p>
          </table:table-cell>
          <table:table-cell table:style-name="ce863" table:formula="of:=COM.MICROSOFT.CONCAT(&quot;&quot;&quot;&quot;;[.$C$2]; &quot;&quot;&quot;: &quot;; [.C8])" office:value-type="string" office:string-value="&quot;1&quot;: 1" calcext:value-type="string">
            <text:p>"1": 1</text:p>
          </table:table-cell>
          <table:table-cell table:style-name="ce863" table:formula="of:=COM.MICROSOFT.CONCAT(&quot;&quot;&quot;&quot;;[.$D$2]; &quot;&quot;&quot;: &quot;; [.D8])" office:value-type="string" office:string-value="&quot;2&quot;: 2" calcext:value-type="string">
            <text:p>"2": 2</text:p>
          </table:table-cell>
          <table:table-cell table:style-name="ce863" table:formula="of:=COM.MICROSOFT.CONCAT(&quot;&quot;&quot;&quot;;[.$E$2]; &quot;&quot;&quot;: &quot;; [.E8])" office:value-type="string" office:string-value="&quot;3&quot;: 3" calcext:value-type="string">
            <text:p>"3": 3</text:p>
          </table:table-cell>
          <table:table-cell table:style-name="ce863" table:formula="of:=COM.MICROSOFT.CONCAT(&quot;&quot;&quot;&quot;;[.$F$2]; &quot;&quot;&quot;: &quot;; [.F8])" office:value-type="string" office:string-value="&quot;4&quot;: 5" calcext:value-type="string">
            <text:p>"4": 5</text:p>
          </table:table-cell>
          <table:table-cell table:style-name="ce863"/>
          <table:table-cell table:style-name="ce863" table:formula="of:=COM.MICROSOFT.CONCAT(&quot;&quot;&quot;&quot;;[.$B$2]; &quot;&quot;&quot;: &quot;; [.H8])" office:value-type="string" office:string-value="&quot;0&quot;: 14" calcext:value-type="string">
            <text:p>"0": 14</text:p>
          </table:table-cell>
          <table:table-cell table:style-name="ce863" table:formula="of:=COM.MICROSOFT.CONCAT(&quot;&quot;&quot;&quot;;[.$C$2]; &quot;&quot;&quot;: &quot;; [.I8])" office:value-type="string" office:string-value="&quot;1&quot;: 6" calcext:value-type="string">
            <text:p>"1": 6</text:p>
          </table:table-cell>
          <table:table-cell table:style-name="ce863" table:formula="of:=COM.MICROSOFT.CONCAT(&quot;&quot;&quot;&quot;;[.$D$2]; &quot;&quot;&quot;: &quot;; [.J8])" office:value-type="string" office:string-value="&quot;2&quot;: 1" calcext:value-type="string">
            <text:p>"2": 1</text:p>
          </table:table-cell>
          <table:table-cell table:style-name="ce863" table:formula="of:=COM.MICROSOFT.CONCAT(&quot;&quot;&quot;&quot;;[.$E$2]; &quot;&quot;&quot;: &quot;; [.K8])" office:value-type="string" office:string-value="&quot;3&quot;: 2" calcext:value-type="string">
            <text:p>"3": 2</text:p>
          </table:table-cell>
          <table:table-cell table:style-name="ce863" table:formula="of:=COM.MICROSOFT.CONCAT(&quot;&quot;&quot;&quot;;[.$F$2]; &quot;&quot;&quot;: &quot;; [.L8])" office:value-type="string" office:string-value="&quot;4&quot;: 8" calcext:value-type="string">
            <text:p>"4": 8</text:p>
          </table:table-cell>
          <table:table-cell table:style-name="ce863"/>
          <table:table-cell table:style-name="ce863" table:formula="of:=COM.MICROSOFT.CONCAT(&quot;&quot;&quot;&quot;;[.$B$2]; &quot;&quot;&quot;: &quot;; [.N8])" office:value-type="string" office:string-value="&quot;0&quot;: 14" calcext:value-type="string">
            <text:p>"0": 14</text:p>
          </table:table-cell>
          <table:table-cell table:style-name="ce863" table:formula="of:=COM.MICROSOFT.CONCAT(&quot;&quot;&quot;&quot;;[.$C$2]; &quot;&quot;&quot;: &quot;; [.O8])" office:value-type="string" office:string-value="&quot;1&quot;: 2" calcext:value-type="string">
            <text:p>"1": 2</text:p>
          </table:table-cell>
          <table:table-cell table:style-name="ce863" table:formula="of:=COM.MICROSOFT.CONCAT(&quot;&quot;&quot;&quot;;[.$D$2]; &quot;&quot;&quot;: &quot;; [.P8])" office:value-type="string" office:string-value="&quot;2&quot;: 3" calcext:value-type="string">
            <text:p>"2": 3</text:p>
          </table:table-cell>
          <table:table-cell table:style-name="ce863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863" table:formula="of:=COM.MICROSOFT.CONCAT(&quot;&quot;&quot;&quot;;[.$F$2]; &quot;&quot;&quot;: &quot;; [.R8])" office:value-type="string" office:string-value="&quot;4&quot;: 8" calcext:value-type="string">
            <text:p>"4": 8</text:p>
          </table:table-cell>
          <table:table-cell table:style-name="ce863"/>
          <table:table-cell table:style-name="ce863" table:formula="of:=COM.MICROSOFT.CONCAT(&quot;&quot;&quot;&quot;;[.$B$2]; &quot;&quot;&quot;: &quot;; [.T8])" office:value-type="string" office:string-value="&quot;0&quot;: 14" calcext:value-type="string">
            <text:p>"0": 14</text:p>
          </table:table-cell>
          <table:table-cell table:style-name="ce863" table:formula="of:=COM.MICROSOFT.CONCAT(&quot;&quot;&quot;&quot;;[.$C$2]; &quot;&quot;&quot;: &quot;; [.U8])" office:value-type="string" office:string-value="&quot;1&quot;: 2" calcext:value-type="string">
            <text:p>"1": 2</text:p>
          </table:table-cell>
          <table:table-cell table:style-name="ce863" table:formula="of:=COM.MICROSOFT.CONCAT(&quot;&quot;&quot;&quot;;[.$D$2]; &quot;&quot;&quot;: &quot;; [.V8])" office:value-type="string" office:string-value="&quot;2&quot;: 1" calcext:value-type="string">
            <text:p>"2": 1</text:p>
          </table:table-cell>
          <table:table-cell table:style-name="ce863" table:formula="of:=COM.MICROSOFT.CONCAT(&quot;&quot;&quot;&quot;;[.$E$2]; &quot;&quot;&quot;: &quot;; [.W8])" office:value-type="string" office:string-value="&quot;3&quot;: 7" calcext:value-type="string">
            <text:p>"3": 7</text:p>
          </table:table-cell>
          <table:table-cell table:style-name="ce863" table:formula="of:=COM.MICROSOFT.CONCAT(&quot;&quot;&quot;&quot;;[.$F$2]; &quot;&quot;&quot;: &quot;; [.X8])" office:value-type="string" office:string-value="&quot;4&quot;: 8" calcext:value-type="string">
            <text:p>"4": 8</text:p>
          </table:table-cell>
          <table:table-cell table:style-name="ce863"/>
          <table:table-cell table:style-name="ce863" table:formula="of:=COM.MICROSOFT.CONCAT(&quot;&quot;&quot;&quot;;[.$B$2]; &quot;&quot;&quot;: &quot;; [.Z8])" office:value-type="string" office:string-value="&quot;0&quot;: 14" calcext:value-type="string">
            <text:p>"0": 14</text:p>
          </table:table-cell>
          <table:table-cell table:style-name="ce863" table:formula="of:=COM.MICROSOFT.CONCAT(&quot;&quot;&quot;&quot;;[.$C$2]; &quot;&quot;&quot;: &quot;; [.AA8])" office:value-type="string" office:string-value="&quot;1&quot;: 2" calcext:value-type="string">
            <text:p>"1": 2</text:p>
          </table:table-cell>
          <table:table-cell table:style-name="ce863" table:formula="of:=COM.MICROSOFT.CONCAT(&quot;&quot;&quot;&quot;;[.$D$2]; &quot;&quot;&quot;: &quot;; [.AB8])" office:value-type="string" office:string-value="&quot;2&quot;: 1" calcext:value-type="string">
            <text:p>"2": 1</text:p>
          </table:table-cell>
          <table:table-cell table:style-name="ce863" table:formula="of:=COM.MICROSOFT.CONCAT(&quot;&quot;&quot;&quot;;[.$E$2]; &quot;&quot;&quot;: &quot;; [.AC8])" office:value-type="string" office:string-value="&quot;3&quot;: 5" calcext:value-type="string">
            <text:p>"3": 5</text:p>
          </table:table-cell>
          <table:table-cell table:style-name="ce863" table:formula="of:=COM.MICROSOFT.CONCAT(&quot;&quot;&quot;&quot;;[.$F$2]; &quot;&quot;&quot;: &quot;; [.AD8])" office:value-type="string" office:string-value="&quot;4&quot;: 13" calcext:value-type="string">
            <text:p>"4": 13</text:p>
          </table:table-cell>
          <table:table-cell table:style-name="ce875" table:number-columns-repeated="2"/>
          <table:table-cell table:style-name="ce864" table:formula="of:=COM.MICROSOFT.CONCAT(&quot;&quot;&quot;0&quot;&quot;: { &quot;;COM.MICROSOFT.TEXTJOIN(&quot;, &quot;;TRUE();[.AF8:.AJ10]);&quot;}&quot;)" office:value-type="string" office:string-value="&quot;0&quot;: { &quot;0&quot;: 14, &quot;1&quot;: 1, &quot;2&quot;: 2, &quot;3&quot;: 3, &quot;4&quot;: 5, &quot;5&quot;: 9, &quot;6&quot;: 8, &quot;7&quot;: 7, &quot;8&quot;: 4, &quot;9&quot;: 6, &quot;10&quot;: 14, &quot;11&quot;: 13, &quot;12&quot;: 11, &quot;13&quot;: 10, &quot;14&quot;: 12}" calcext:value-type="string">
            <text:p>"0": { "0": 14, "1": 1, "2": 2, "3": 3, "4": 5, "5": 9, "6": 8, "7": 7, "8": 4, "9": 6, "10": 14, "11": 13, "12": 11, "13": 10, "14": 12}</text:p>
          </table:table-cell>
          <table:table-cell table:number-columns-repeated="36"/>
        </table:table-row>
        <table:table-row table:style-name="ro1">
          <table:table-cell/>
          <table:table-cell table:style-name="ce8" office:value-type="float" office:value="9" calcext:value-type="float">
            <text:p>9</text:p>
          </table:table-cell>
          <table:table-cell table:style-name="ce27" office:value-type="float" office:value="8" calcext:value-type="float">
            <text:p>8</text:p>
          </table:table-cell>
          <table:table-cell table:style-name="ce36" office:value-type="float" office:value="7" calcext:value-type="float">
            <text:p>7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style-name="ce690"/>
          <table:table-cell office:value-type="float" office:value="7" calcext:value-type="float">
            <text:p>7</text:p>
          </table:table-cell>
          <table:table-cell table:style-name="ce29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690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46" office:value-type="float" office:value="6" calcext:value-type="float">
            <text:p>6</text:p>
          </table:table-cell>
          <table:table-cell table:style-name="ce690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690"/>
          <table:table-cell office:value-type="float" office:value="6" calcext:value-type="float">
            <text:p>6</text:p>
          </table:table-cell>
          <table:table-cell table:style-name="ce29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8" calcext:value-type="float">
            <text:p>8</text:p>
          </table:table-cell>
          <table:table-cell/>
          <table:table-cell table:style-name="ce863" table:formula="of:=COM.MICROSOFT.CONCAT(&quot;&quot;&quot;&quot;;[.$B$3]; &quot;&quot;&quot;: &quot;; [.B9])" office:value-type="string" office:string-value="&quot;5&quot;: 9" calcext:value-type="string">
            <text:p>"5": 9</text:p>
          </table:table-cell>
          <table:table-cell table:style-name="ce863" table:formula="of:=COM.MICROSOFT.CONCAT(&quot;&quot;&quot;&quot;;[.$C$3]; &quot;&quot;&quot;: &quot;; [.C9])" office:value-type="string" office:string-value="&quot;6&quot;: 8" calcext:value-type="string">
            <text:p>"6": 8</text:p>
          </table:table-cell>
          <table:table-cell table:style-name="ce863" table:formula="of:=COM.MICROSOFT.CONCAT(&quot;&quot;&quot;&quot;;[.$D$3]; &quot;&quot;&quot;: &quot;; [.D9])" office:value-type="string" office:string-value="&quot;7&quot;: 7" calcext:value-type="string">
            <text:p>"7": 7</text:p>
          </table:table-cell>
          <table:table-cell table:style-name="ce863" table:formula="of:=COM.MICROSOFT.CONCAT(&quot;&quot;&quot;&quot;;[.$E$3]; &quot;&quot;&quot;: &quot;; [.E9])" office:value-type="string" office:string-value="&quot;8&quot;: 4" calcext:value-type="string">
            <text:p>"8": 4</text:p>
          </table:table-cell>
          <table:table-cell table:style-name="ce863" table:formula="of:=COM.MICROSOFT.CONCAT(&quot;&quot;&quot;&quot;;[.$F$3]; &quot;&quot;&quot;: &quot;; [.F9])" office:value-type="string" office:string-value="&quot;9&quot;: 6" calcext:value-type="string">
            <text:p>"9": 6</text:p>
          </table:table-cell>
          <table:table-cell table:style-name="ce863"/>
          <table:table-cell table:style-name="ce863" table:formula="of:=COM.MICROSOFT.CONCAT(&quot;&quot;&quot;&quot;;[.$B$3]; &quot;&quot;&quot;: &quot;; [.H9])" office:value-type="string" office:string-value="&quot;5&quot;: 7" calcext:value-type="string">
            <text:p>"5": 7</text:p>
          </table:table-cell>
          <table:table-cell table:style-name="ce863" table:formula="of:=COM.MICROSOFT.CONCAT(&quot;&quot;&quot;&quot;;[.$C$3]; &quot;&quot;&quot;: &quot;; [.I9])" office:value-type="string" office:string-value="&quot;6&quot;: 5" calcext:value-type="string">
            <text:p>"6": 5</text:p>
          </table:table-cell>
          <table:table-cell table:style-name="ce863" table:formula="of:=COM.MICROSOFT.CONCAT(&quot;&quot;&quot;&quot;;[.$D$3]; &quot;&quot;&quot;: &quot;; [.J9])" office:value-type="string" office:string-value="&quot;7&quot;: 4" calcext:value-type="string">
            <text:p>"7": 4</text:p>
          </table:table-cell>
          <table:table-cell table:style-name="ce863" table:formula="of:=COM.MICROSOFT.CONCAT(&quot;&quot;&quot;&quot;;[.$E$3]; &quot;&quot;&quot;: &quot;; [.K9])" office:value-type="string" office:string-value="&quot;8&quot;: 3" calcext:value-type="string">
            <text:p>"8": 3</text:p>
          </table:table-cell>
          <table:table-cell table:style-name="ce863" table:formula="of:=COM.MICROSOFT.CONCAT(&quot;&quot;&quot;&quot;;[.$F$3]; &quot;&quot;&quot;: &quot;; [.L9])" office:value-type="string" office:string-value="&quot;9&quot;: 6" calcext:value-type="string">
            <text:p>"9": 6</text:p>
          </table:table-cell>
          <table:table-cell table:style-name="ce863"/>
          <table:table-cell table:style-name="ce863" table:formula="of:=COM.MICROSOFT.CONCAT(&quot;&quot;&quot;&quot;;[.$B$3]; &quot;&quot;&quot;: &quot;; [.N9])" office:value-type="string" office:string-value="&quot;5&quot;: 7" calcext:value-type="string">
            <text:p>"5": 7</text:p>
          </table:table-cell>
          <table:table-cell table:style-name="ce863" table:formula="of:=COM.MICROSOFT.CONCAT(&quot;&quot;&quot;&quot;;[.$C$3]; &quot;&quot;&quot;: &quot;; [.O9])" office:value-type="string" office:string-value="&quot;6&quot;: 4" calcext:value-type="string">
            <text:p>"6": 4</text:p>
          </table:table-cell>
          <table:table-cell table:style-name="ce863" table:formula="of:=COM.MICROSOFT.CONCAT(&quot;&quot;&quot;&quot;;[.$D$3]; &quot;&quot;&quot;: &quot;; [.P9])" office:value-type="string" office:string-value="&quot;7&quot;: 5" calcext:value-type="string">
            <text:p>"7": 5</text:p>
          </table:table-cell>
          <table:table-cell table:style-name="ce863" table:formula="of:=COM.MICROSOFT.CONCAT(&quot;&quot;&quot;&quot;;[.$E$3]; &quot;&quot;&quot;: &quot;; [.Q9])" office:value-type="string" office:string-value="&quot;8&quot;: 3" calcext:value-type="string">
            <text:p>"8": 3</text:p>
          </table:table-cell>
          <table:table-cell table:style-name="ce863" table:formula="of:=COM.MICROSOFT.CONCAT(&quot;&quot;&quot;&quot;;[.$F$3]; &quot;&quot;&quot;: &quot;; [.R9])" office:value-type="string" office:string-value="&quot;9&quot;: 6" calcext:value-type="string">
            <text:p>"9": 6</text:p>
          </table:table-cell>
          <table:table-cell table:style-name="ce863"/>
          <table:table-cell table:style-name="ce863" table:formula="of:=COM.MICROSOFT.CONCAT(&quot;&quot;&quot;&quot;;[.$B$3]; &quot;&quot;&quot;: &quot;; [.T9])" office:value-type="string" office:string-value="&quot;5&quot;: 6" calcext:value-type="string">
            <text:p>"5": 6</text:p>
          </table:table-cell>
          <table:table-cell table:style-name="ce863" table:formula="of:=COM.MICROSOFT.CONCAT(&quot;&quot;&quot;&quot;;[.$C$3]; &quot;&quot;&quot;: &quot;; [.U9])" office:value-type="string" office:string-value="&quot;6&quot;: 3" calcext:value-type="string">
            <text:p>"6": 3</text:p>
          </table:table-cell>
          <table:table-cell table:style-name="ce863" table:formula="of:=COM.MICROSOFT.CONCAT(&quot;&quot;&quot;&quot;;[.$D$3]; &quot;&quot;&quot;: &quot;; [.V9])" office:value-type="string" office:string-value="&quot;7&quot;: 4" calcext:value-type="string">
            <text:p>"7": 4</text:p>
          </table:table-cell>
          <table:table-cell table:style-name="ce863" table:formula="of:=COM.MICROSOFT.CONCAT(&quot;&quot;&quot;&quot;;[.$E$3]; &quot;&quot;&quot;: &quot;; [.W9])" office:value-type="string" office:string-value="&quot;8&quot;: 5" calcext:value-type="string">
            <text:p>"8": 5</text:p>
          </table:table-cell>
          <table:table-cell table:style-name="ce863" table:formula="of:=COM.MICROSOFT.CONCAT(&quot;&quot;&quot;&quot;;[.$F$3]; &quot;&quot;&quot;: &quot;; [.X9])" office:value-type="string" office:string-value="&quot;9&quot;: 7" calcext:value-type="string">
            <text:p>"9": 7</text:p>
          </table:table-cell>
          <table:table-cell table:style-name="ce863"/>
          <table:table-cell table:style-name="ce863" table:formula="of:=COM.MICROSOFT.CONCAT(&quot;&quot;&quot;&quot;;[.$B$3]; &quot;&quot;&quot;: &quot;; [.Z9])" office:value-type="string" office:string-value="&quot;5&quot;: 6" calcext:value-type="string">
            <text:p>"5": 6</text:p>
          </table:table-cell>
          <table:table-cell table:style-name="ce863" table:formula="of:=COM.MICROSOFT.CONCAT(&quot;&quot;&quot;&quot;;[.$C$3]; &quot;&quot;&quot;: &quot;; [.AA9])" office:value-type="string" office:string-value="&quot;6&quot;: 3" calcext:value-type="string">
            <text:p>"6": 3</text:p>
          </table:table-cell>
          <table:table-cell table:style-name="ce863" table:formula="of:=COM.MICROSOFT.CONCAT(&quot;&quot;&quot;&quot;;[.$D$3]; &quot;&quot;&quot;: &quot;; [.AB9])" office:value-type="string" office:string-value="&quot;7&quot;: 4" calcext:value-type="string">
            <text:p>"7": 4</text:p>
          </table:table-cell>
          <table:table-cell table:style-name="ce863" table:formula="of:=COM.MICROSOFT.CONCAT(&quot;&quot;&quot;&quot;;[.$E$3]; &quot;&quot;&quot;: &quot;; [.AC9])" office:value-type="string" office:string-value="&quot;8&quot;: 7" calcext:value-type="string">
            <text:p>"8": 7</text:p>
          </table:table-cell>
          <table:table-cell table:style-name="ce863" table:formula="of:=COM.MICROSOFT.CONCAT(&quot;&quot;&quot;&quot;;[.$F$3]; &quot;&quot;&quot;: &quot;; [.AD9])" office:value-type="string" office:string-value="&quot;9&quot;: 8" calcext:value-type="string">
            <text:p>"9": 8</text:p>
          </table:table-cell>
          <table:table-cell table:style-name="ce875" table:number-columns-repeated="2"/>
          <table:table-cell table:formula="of:=COM.MICROSOFT.CONCAT(&quot;&quot;&quot;1&quot;&quot;: { &quot;;COM.MICROSOFT.TEXTJOIN(&quot;, &quot;;TRUE();[.AL8:.AP10]);&quot;}&quot;)" office:value-type="string" office:string-value="&quot;1&quot;: { &quot;0&quot;: 14, &quot;1&quot;: 6, &quot;2&quot;: 1, &quot;3&quot;: 2, &quot;4&quot;: 8, &quot;5&quot;: 7, &quot;6&quot;: 5, &quot;7&quot;: 4, &quot;8&quot;: 3, &quot;9&quot;: 6, &quot;10&quot;: 11, &quot;11&quot;: 12, &quot;12&quot;: 10, &quot;13&quot;: 9, &quot;14&quot;: 13}" calcext:value-type="string">
            <text:p>"1": { "0": 14, "1": 6, "2": 1, "3": 2, "4": 8, "5": 7, "6": 5, "7": 4, "8": 3, "9": 6, "10": 11, "11": 12, "12": 10, "13": 9, "14": 13}</text:p>
          </table:table-cell>
          <table:table-cell table:number-columns-repeated="36"/>
        </table:table-row>
        <table:table-row table:style-name="ro1">
          <table:table-cell/>
          <table:table-cell table:style-name="ce8" office:value-type="float" office:value="14" calcext:value-type="float">
            <text:p>14</text:p>
          </table:table-cell>
          <table:table-cell table:style-name="ce27" office:value-type="float" office:value="13" calcext:value-type="float">
            <text:p>13</text:p>
          </table:table-cell>
          <table:table-cell table:style-name="ce36" office:value-type="float" office:value="11" calcext:value-type="float">
            <text:p>11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12" calcext:value-type="float">
            <text:p>12</text:p>
          </table:table-cell>
          <table:table-cell table:style-name="ce690"/>
          <table:table-cell office:value-type="float" office:value="11" calcext:value-type="float">
            <text:p>11</text:p>
          </table:table-cell>
          <table:table-cell table:style-name="ce29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64" office:value-type="float" office:value="13" calcext:value-type="float">
            <text:p>13</text:p>
          </table:table-cell>
          <table:table-cell table:style-name="ce690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style-name="ce64" office:value-type="float" office:value="13" calcext:value-type="float">
            <text:p>13</text:p>
          </table:table-cell>
          <table:table-cell table:style-name="ce690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style-name="ce64" office:value-type="float" office:value="13" calcext:value-type="float">
            <text:p>13</text:p>
          </table:table-cell>
          <table:table-cell table:style-name="ce690"/>
          <table:table-cell office:value-type="float" office:value="12" calcext:value-type="float">
            <text:p>12</text:p>
          </table:table-cell>
          <table:table-cell table:style-name="ce29" office:value-type="float" office:value="10" calcext:value-type="float">
            <text:p>10</text:p>
          </table:table-cell>
          <table:table-cell table:style-name="ce38" office:value-type="float" office:value="9" calcext:value-type="float">
            <text:p>9</text:p>
          </table:table-cell>
          <table:table-cell table:style-name="ce46" office:value-type="float" office:value="11" calcext:value-type="float">
            <text:p>11</text:p>
          </table:table-cell>
          <table:table-cell table:style-name="ce64" office:value-type="float" office:value="13" calcext:value-type="float">
            <text:p>13</text:p>
          </table:table-cell>
          <table:table-cell/>
          <table:table-cell table:style-name="ce863" table:formula="of:=COM.MICROSOFT.CONCAT(&quot;&quot;&quot;&quot;;[.$B$4]; &quot;&quot;&quot;: &quot;; [.B10])" office:value-type="string" office:string-value="&quot;10&quot;: 14" calcext:value-type="string">
            <text:p>"10": 14</text:p>
          </table:table-cell>
          <table:table-cell table:style-name="ce863" table:formula="of:=COM.MICROSOFT.CONCAT(&quot;&quot;&quot;&quot;;[.$C$4]; &quot;&quot;&quot;: &quot;; [.C10])" office:value-type="string" office:string-value="&quot;11&quot;: 13" calcext:value-type="string">
            <text:p>"11": 13</text:p>
          </table:table-cell>
          <table:table-cell table:style-name="ce863" table:formula="of:=COM.MICROSOFT.CONCAT(&quot;&quot;&quot;&quot;;[.$D$4]; &quot;&quot;&quot;: &quot;; [.D10])" office:value-type="string" office:string-value="&quot;12&quot;: 11" calcext:value-type="string">
            <text:p>"12": 11</text:p>
          </table:table-cell>
          <table:table-cell table:style-name="ce863" table:formula="of:=COM.MICROSOFT.CONCAT(&quot;&quot;&quot;&quot;;[.$E$4]; &quot;&quot;&quot;: &quot;; [.E10])" office:value-type="string" office:string-value="&quot;13&quot;: 10" calcext:value-type="string">
            <text:p>"13": 10</text:p>
          </table:table-cell>
          <table:table-cell table:style-name="ce863" table:formula="of:=COM.MICROSOFT.CONCAT(&quot;&quot;&quot;&quot;;[.$F$4]; &quot;&quot;&quot;: &quot;; [.F10])" office:value-type="string" office:string-value="&quot;14&quot;: 12" calcext:value-type="string">
            <text:p>"14": 12</text:p>
          </table:table-cell>
          <table:table-cell table:style-name="ce863"/>
          <table:table-cell table:style-name="ce863" table:formula="of:=COM.MICROSOFT.CONCAT(&quot;&quot;&quot;&quot;;[.$B$4]; &quot;&quot;&quot;: &quot;; [.H10])" office:value-type="string" office:string-value="&quot;10&quot;: 11" calcext:value-type="string">
            <text:p>"10": 11</text:p>
          </table:table-cell>
          <table:table-cell table:style-name="ce863" table:formula="of:=COM.MICROSOFT.CONCAT(&quot;&quot;&quot;&quot;;[.$C$4]; &quot;&quot;&quot;: &quot;; [.I10])" office:value-type="string" office:string-value="&quot;11&quot;: 12" calcext:value-type="string">
            <text:p>"11": 12</text:p>
          </table:table-cell>
          <table:table-cell table:style-name="ce863" table:formula="of:=COM.MICROSOFT.CONCAT(&quot;&quot;&quot;&quot;;[.$D$4]; &quot;&quot;&quot;: &quot;; [.J10])" office:value-type="string" office:string-value="&quot;12&quot;: 10" calcext:value-type="string">
            <text:p>"12": 10</text:p>
          </table:table-cell>
          <table:table-cell table:style-name="ce863" table:formula="of:=COM.MICROSOFT.CONCAT(&quot;&quot;&quot;&quot;;[.$E$4]; &quot;&quot;&quot;: &quot;; [.K10])" office:value-type="string" office:string-value="&quot;13&quot;: 9" calcext:value-type="string">
            <text:p>"13": 9</text:p>
          </table:table-cell>
          <table:table-cell table:style-name="ce863" table:formula="of:=COM.MICROSOFT.CONCAT(&quot;&quot;&quot;&quot;;[.$F$4]; &quot;&quot;&quot;: &quot;; [.L10])" office:value-type="string" office:string-value="&quot;14&quot;: 13" calcext:value-type="string">
            <text:p>"14": 13</text:p>
          </table:table-cell>
          <table:table-cell table:style-name="ce863"/>
          <table:table-cell table:style-name="ce863" table:formula="of:=COM.MICROSOFT.CONCAT(&quot;&quot;&quot;&quot;;[.$B$4]; &quot;&quot;&quot;: &quot;; [.N10])" office:value-type="string" office:string-value="&quot;10&quot;: 12" calcext:value-type="string">
            <text:p>"10": 12</text:p>
          </table:table-cell>
          <table:table-cell table:style-name="ce863" table:formula="of:=COM.MICROSOFT.CONCAT(&quot;&quot;&quot;&quot;;[.$C$4]; &quot;&quot;&quot;: &quot;; [.O10])" office:value-type="string" office:string-value="&quot;11&quot;: 10" calcext:value-type="string">
            <text:p>"11": 10</text:p>
          </table:table-cell>
          <table:table-cell table:style-name="ce863" table:formula="of:=COM.MICROSOFT.CONCAT(&quot;&quot;&quot;&quot;;[.$D$4]; &quot;&quot;&quot;: &quot;; [.P10])" office:value-type="string" office:string-value="&quot;12&quot;: 11" calcext:value-type="string">
            <text:p>"12": 11</text:p>
          </table:table-cell>
          <table:table-cell table:style-name="ce863" table:formula="of:=COM.MICROSOFT.CONCAT(&quot;&quot;&quot;&quot;;[.$E$4]; &quot;&quot;&quot;: &quot;; [.Q10])" office:value-type="string" office:string-value="&quot;13&quot;: 9" calcext:value-type="string">
            <text:p>"13": 9</text:p>
          </table:table-cell>
          <table:table-cell table:style-name="ce863" table:formula="of:=COM.MICROSOFT.CONCAT(&quot;&quot;&quot;&quot;;[.$F$4]; &quot;&quot;&quot;: &quot;; [.R10])" office:value-type="string" office:string-value="&quot;14&quot;: 13" calcext:value-type="string">
            <text:p>"14": 13</text:p>
          </table:table-cell>
          <table:table-cell table:style-name="ce863"/>
          <table:table-cell table:style-name="ce863" table:formula="of:=COM.MICROSOFT.CONCAT(&quot;&quot;&quot;&quot;;[.$B$4]; &quot;&quot;&quot;: &quot;; [.T10])" office:value-type="string" office:string-value="&quot;10&quot;: 12" calcext:value-type="string">
            <text:p>"10": 12</text:p>
          </table:table-cell>
          <table:table-cell table:style-name="ce863" table:formula="of:=COM.MICROSOFT.CONCAT(&quot;&quot;&quot;&quot;;[.$C$4]; &quot;&quot;&quot;: &quot;; [.U10])" office:value-type="string" office:string-value="&quot;11&quot;: 10" calcext:value-type="string">
            <text:p>"11": 10</text:p>
          </table:table-cell>
          <table:table-cell table:style-name="ce863" table:formula="of:=COM.MICROSOFT.CONCAT(&quot;&quot;&quot;&quot;;[.$D$4]; &quot;&quot;&quot;: &quot;; [.V10])" office:value-type="string" office:string-value="&quot;12&quot;: 9" calcext:value-type="string">
            <text:p>"12": 9</text:p>
          </table:table-cell>
          <table:table-cell table:style-name="ce863" table:formula="of:=COM.MICROSOFT.CONCAT(&quot;&quot;&quot;&quot;;[.$E$4]; &quot;&quot;&quot;: &quot;; [.W10])" office:value-type="string" office:string-value="&quot;13&quot;: 11" calcext:value-type="string">
            <text:p>"13": 11</text:p>
          </table:table-cell>
          <table:table-cell table:style-name="ce863" table:formula="of:=COM.MICROSOFT.CONCAT(&quot;&quot;&quot;&quot;;[.$F$4]; &quot;&quot;&quot;: &quot;; [.X10])" office:value-type="string" office:string-value="&quot;14&quot;: 13" calcext:value-type="string">
            <text:p>"14": 13</text:p>
          </table:table-cell>
          <table:table-cell table:style-name="ce863"/>
          <table:table-cell table:style-name="ce863" table:formula="of:=COM.MICROSOFT.CONCAT(&quot;&quot;&quot;&quot;;[.$B$4]; &quot;&quot;&quot;: &quot;; [.Z10])" office:value-type="string" office:string-value="&quot;10&quot;: 12" calcext:value-type="string">
            <text:p>"10": 12</text:p>
          </table:table-cell>
          <table:table-cell table:style-name="ce863" table:formula="of:=COM.MICROSOFT.CONCAT(&quot;&quot;&quot;&quot;;[.$C$4]; &quot;&quot;&quot;: &quot;; [.AA10])" office:value-type="string" office:string-value="&quot;11&quot;: 10" calcext:value-type="string">
            <text:p>"11": 10</text:p>
          </table:table-cell>
          <table:table-cell table:style-name="ce863" table:formula="of:=COM.MICROSOFT.CONCAT(&quot;&quot;&quot;&quot;;[.$D$4]; &quot;&quot;&quot;: &quot;; [.AB10])" office:value-type="string" office:string-value="&quot;12&quot;: 9" calcext:value-type="string">
            <text:p>"12": 9</text:p>
          </table:table-cell>
          <table:table-cell table:style-name="ce863" table:formula="of:=COM.MICROSOFT.CONCAT(&quot;&quot;&quot;&quot;;[.$E$4]; &quot;&quot;&quot;: &quot;; [.AC10])" office:value-type="string" office:string-value="&quot;13&quot;: 11" calcext:value-type="string">
            <text:p>"13": 11</text:p>
          </table:table-cell>
          <table:table-cell table:style-name="ce863" table:formula="of:=COM.MICROSOFT.CONCAT(&quot;&quot;&quot;&quot;;[.$F$4]; &quot;&quot;&quot;: &quot;; [.AD10])" office:value-type="string" office:string-value="&quot;14&quot;: 13" calcext:value-type="string">
            <text:p>"14": 13</text:p>
          </table:table-cell>
          <table:table-cell table:style-name="ce875" table:number-columns-repeated="2"/>
          <table:table-cell table:formula="of:=COM.MICROSOFT.CONCAT(&quot;&quot;&quot;2&quot;&quot;: { &quot;;COM.MICROSOFT.TEXTJOIN(&quot;, &quot;;TRUE();[.AR8:.AV10]);&quot;}&quot;)" office:value-type="string" office:string-value="&quot;2&quot;: { &quot;0&quot;: 14, &quot;1&quot;: 2, &quot;2&quot;: 3, &quot;3&quot;: 1, &quot;4&quot;: 8, &quot;5&quot;: 7, &quot;6&quot;: 4, &quot;7&quot;: 5, &quot;8&quot;: 3, &quot;9&quot;: 6, &quot;10&quot;: 12, &quot;11&quot;: 10, &quot;12&quot;: 11, &quot;13&quot;: 9, &quot;14&quot;: 13}" calcext:value-type="string">
            <text:p>"2": { "0": 14, "1": 2, "2": 3, "3": 1, "4": 8, "5": 7, "6": 4, "7": 5, "8": 3, "9": 6, "10": 12, "11": 10, "12": 11, "13": 9, "14": 13}</text:p>
          </table:table-cell>
          <table:table-cell table:number-columns-repeated="36"/>
        </table:table-row>
        <table:table-row table:style-name="ro2">
          <table:table-cell table:style-name="ce623"/>
          <table:table-cell table:style-name="ce9" table:number-columns-repeated="24"/>
          <table:table-cell table:style-name="ce9" office:value-type="string" calcext:value-type="string">
            <text:p>?</text:p>
          </table:table-cell>
          <table:table-cell table:style-name="ce9" table:number-columns-repeated="4"/>
          <table:table-cell table:style-name="ce860"/>
          <table:table-cell table:style-name="ce864" table:number-columns-repeated="27"/>
          <table:table-cell table:style-name="ce873" table:number-columns-repeated="2"/>
          <table:table-cell table:style-name="ce875" table:number-columns-repeated="2"/>
          <table:table-cell table:formula="of:=COM.MICROSOFT.CONCAT(&quot;&quot;&quot;3&quot;&quot;: { &quot;;COM.MICROSOFT.TEXTJOIN(&quot;, &quot;;TRUE();[.AX8:.BB10]);&quot;}&quot;)" office:value-type="string" office:string-value="&quot;3&quot;: { &quot;0&quot;: 14, &quot;1&quot;: 2, &quot;2&quot;: 1, &quot;3&quot;: 7, &quot;4&quot;: 8, &quot;5&quot;: 6, &quot;6&quot;: 3, &quot;7&quot;: 4, &quot;8&quot;: 5, &quot;9&quot;: 7, &quot;10&quot;: 12, &quot;11&quot;: 10, &quot;12&quot;: 9, &quot;13&quot;: 11, &quot;14&quot;: 13}" calcext:value-type="string">
            <text:p>"3": { "0": 14, "1": 2, "2": 1, "3": 7, "4": 8, "5": 6, "6": 3, "7": 4, "8": 5, "9": 7, "10": 12, "11": 10, "12": 9, "13": 11, "14": 13}</text:p>
          </table:table-cell>
          <table:table-cell table:number-columns-repeated="36"/>
        </table:table-row>
        <table:table-row table:style-name="ro1">
          <table:table-cell table:style-name="ce624"/>
          <table:table-cell table:style-name="ce17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style-name="ce690"/>
          <table:table-cell table:style-name="ce17" office:value-type="float" office:value="14" calcext:value-type="float">
            <text:p>14</text:p>
          </table:table-cell>
          <table:table-cell table:style-name="ce29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690"/>
          <table:table-cell table:style-name="ce17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46" office:value-type="float" office:value="11" calcext:value-type="float">
            <text:p>11</text:p>
          </table:table-cell>
          <table:table-cell table:style-name="ce690"/>
          <table:table-cell table:style-name="ce17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style-name="ce690"/>
          <table:table-cell table:style-name="ce8" office:value-type="float" office:value="14" calcext:value-type="float">
            <text:p>14</text:p>
          </table:table-cell>
          <table:table-cell table:style-name="ce29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 table:style-name="ce852" office:value-type="float" office:value="9" calcext:value-type="float">
            <text:p>9</text:p>
          </table:table-cell>
          <table:table-cell table:style-name="ce852" office:value-type="float" office:value="11" calcext:value-type="float">
            <text:p>11</text:p>
          </table:table-cell>
          <table:table-cell/>
          <table:table-cell table:style-name="ce865" table:formula="of:=COM.MICROSOFT.CONCAT(&quot;&quot;&quot;&quot;;[.$B$2]; &quot;&quot;&quot;: &quot;; [.B12])" office:value-type="string" office:string-value="&quot;0&quot;: 14" calcext:value-type="string">
            <text:p>"0": 14</text:p>
          </table:table-cell>
          <table:table-cell table:style-name="ce865" table:formula="of:=COM.MICROSOFT.CONCAT(&quot;&quot;&quot;&quot;;[.$C$2]; &quot;&quot;&quot;: &quot;; [.C12])" office:value-type="string" office:string-value="&quot;1&quot;: 9" calcext:value-type="string">
            <text:p>"1": 9</text:p>
          </table:table-cell>
          <table:table-cell table:style-name="ce865" table:formula="of:=COM.MICROSOFT.CONCAT(&quot;&quot;&quot;&quot;;[.$D$2]; &quot;&quot;&quot;: &quot;; [.D12])" office:value-type="string" office:string-value="&quot;2&quot;: 4" calcext:value-type="string">
            <text:p>"2": 4</text:p>
          </table:table-cell>
          <table:table-cell table:style-name="ce865" table:formula="of:=COM.MICROSOFT.CONCAT(&quot;&quot;&quot;&quot;;[.$E$2]; &quot;&quot;&quot;: &quot;; [.E12])" office:value-type="string" office:string-value="&quot;3&quot;: 7" calcext:value-type="string">
            <text:p>"3": 7</text:p>
          </table:table-cell>
          <table:table-cell table:style-name="ce865" table:formula="of:=COM.MICROSOFT.CONCAT(&quot;&quot;&quot;&quot;;[.$F$2]; &quot;&quot;&quot;: &quot;; [.F12])" office:value-type="string" office:string-value="&quot;4&quot;: 11" calcext:value-type="string">
            <text:p>"4": 11</text:p>
          </table:table-cell>
          <table:table-cell table:style-name="ce865"/>
          <table:table-cell table:style-name="ce865" table:formula="of:=COM.MICROSOFT.CONCAT(&quot;&quot;&quot;&quot;;[.$B$2]; &quot;&quot;&quot;: &quot;; [.H12])" office:value-type="string" office:string-value="&quot;0&quot;: 14" calcext:value-type="string">
            <text:p>"0": 14</text:p>
          </table:table-cell>
          <table:table-cell table:style-name="ce865" table:formula="of:=COM.MICROSOFT.CONCAT(&quot;&quot;&quot;&quot;;[.$C$2]; &quot;&quot;&quot;: &quot;; [.I12])" office:value-type="string" office:string-value="&quot;1&quot;: 10" calcext:value-type="string">
            <text:p>"1": 10</text:p>
          </table:table-cell>
          <table:table-cell table:style-name="ce865" table:formula="of:=COM.MICROSOFT.CONCAT(&quot;&quot;&quot;&quot;;[.$D$2]; &quot;&quot;&quot;: &quot;; [.J12])" office:value-type="string" office:string-value="&quot;2&quot;: 5" calcext:value-type="string">
            <text:p>"2": 5</text:p>
          </table:table-cell>
          <table:table-cell table:style-name="ce865" table:formula="of:=COM.MICROSOFT.CONCAT(&quot;&quot;&quot;&quot;;[.$E$2]; &quot;&quot;&quot;: &quot;; [.K12])" office:value-type="string" office:string-value="&quot;3&quot;: 11" calcext:value-type="string">
            <text:p>"3": 11</text:p>
          </table:table-cell>
          <table:table-cell table:style-name="ce865" table:formula="of:=COM.MICROSOFT.CONCAT(&quot;&quot;&quot;&quot;;[.$F$2]; &quot;&quot;&quot;: &quot;; [.L12])" office:value-type="string" office:string-value="&quot;4&quot;: 12" calcext:value-type="string">
            <text:p>"4": 12</text:p>
          </table:table-cell>
          <table:table-cell table:style-name="ce865"/>
          <table:table-cell table:style-name="ce865" table:formula="of:=COM.MICROSOFT.CONCAT(&quot;&quot;&quot;&quot;;[.$B$2]; &quot;&quot;&quot;: &quot;; [.N12])" office:value-type="string" office:string-value="&quot;0&quot;: 14" calcext:value-type="string">
            <text:p>"0": 14</text:p>
          </table:table-cell>
          <table:table-cell table:style-name="ce865" table:formula="of:=COM.MICROSOFT.CONCAT(&quot;&quot;&quot;&quot;;[.$C$2]; &quot;&quot;&quot;: &quot;; [.O12])" office:value-type="string" office:string-value="&quot;1&quot;: 6" calcext:value-type="string">
            <text:p>"1": 6</text:p>
          </table:table-cell>
          <table:table-cell table:style-name="ce865" table:formula="of:=COM.MICROSOFT.CONCAT(&quot;&quot;&quot;&quot;;[.$D$2]; &quot;&quot;&quot;: &quot;; [.P12])" office:value-type="string" office:string-value="&quot;2&quot;: 4" calcext:value-type="string">
            <text:p>"2": 4</text:p>
          </table:table-cell>
          <table:table-cell table:style-name="ce865" table:formula="of:=COM.MICROSOFT.CONCAT(&quot;&quot;&quot;&quot;;[.$E$2]; &quot;&quot;&quot;: &quot;; [.Q12])" office:value-type="string" office:string-value="&quot;3&quot;: 5" calcext:value-type="string">
            <text:p>"3": 5</text:p>
          </table:table-cell>
          <table:table-cell table:style-name="ce865" table:formula="of:=COM.MICROSOFT.CONCAT(&quot;&quot;&quot;&quot;;[.$F$2]; &quot;&quot;&quot;: &quot;; [.R12])" office:value-type="string" office:string-value="&quot;4&quot;: 11" calcext:value-type="string">
            <text:p>"4": 11</text:p>
          </table:table-cell>
          <table:table-cell table:style-name="ce865"/>
          <table:table-cell table:style-name="ce865" table:formula="of:=COM.MICROSOFT.CONCAT(&quot;&quot;&quot;&quot;;[.$B$2]; &quot;&quot;&quot;: &quot;; [.T12])" office:value-type="string" office:string-value="&quot;0&quot;: 14" calcext:value-type="string">
            <text:p>"0": 14</text:p>
          </table:table-cell>
          <table:table-cell table:style-name="ce865" table:formula="of:=COM.MICROSOFT.CONCAT(&quot;&quot;&quot;&quot;;[.$C$2]; &quot;&quot;&quot;: &quot;; [.U12])" office:value-type="string" office:string-value="&quot;1&quot;: 4" calcext:value-type="string">
            <text:p>"1": 4</text:p>
          </table:table-cell>
          <table:table-cell table:style-name="ce865" table:formula="of:=COM.MICROSOFT.CONCAT(&quot;&quot;&quot;&quot;;[.$D$2]; &quot;&quot;&quot;: &quot;; [.V12])" office:value-type="string" office:string-value="&quot;2&quot;: 3" calcext:value-type="string">
            <text:p>"2": 3</text:p>
          </table:table-cell>
          <table:table-cell table:style-name="ce865" table:formula="of:=COM.MICROSOFT.CONCAT(&quot;&quot;&quot;&quot;;[.$E$2]; &quot;&quot;&quot;: &quot;; [.W12])" office:value-type="string" office:string-value="&quot;3&quot;: 6" calcext:value-type="string">
            <text:p>"3": 6</text:p>
          </table:table-cell>
          <table:table-cell table:style-name="ce865" table:formula="of:=COM.MICROSOFT.CONCAT(&quot;&quot;&quot;&quot;;[.$F$2]; &quot;&quot;&quot;: &quot;; [.X12])" office:value-type="string" office:string-value="&quot;4&quot;: 11" calcext:value-type="string">
            <text:p>"4": 11</text:p>
          </table:table-cell>
          <table:table-cell table:style-name="ce865"/>
          <table:table-cell table:style-name="ce865" table:formula="of:=COM.MICROSOFT.CONCAT(&quot;&quot;&quot;&quot;;[.$B$2]; &quot;&quot;&quot;: &quot;; [.Z12])" office:value-type="string" office:string-value="&quot;0&quot;: 14" calcext:value-type="string">
            <text:p>"0": 14</text:p>
          </table:table-cell>
          <table:table-cell table:style-name="ce865" table:formula="of:=COM.MICROSOFT.CONCAT(&quot;&quot;&quot;&quot;;[.$C$2]; &quot;&quot;&quot;: &quot;; [.AA12])" office:value-type="string" office:string-value="&quot;1&quot;: 5" calcext:value-type="string">
            <text:p>"1": 5</text:p>
          </table:table-cell>
          <table:table-cell table:style-name="ce872" table:formula="of:=COM.MICROSOFT.CONCAT(&quot;&quot;&quot;&quot;;[.$D$2]; &quot;&quot;&quot;: &quot;; [.AB12])" office:value-type="string" office:string-value="&quot;2&quot;: 3" calcext:value-type="string">
            <text:p>"2": 3</text:p>
          </table:table-cell>
          <table:table-cell table:style-name="ce865" table:formula="of:=COM.MICROSOFT.CONCAT(&quot;&quot;&quot;&quot;;[.$E$2]; &quot;&quot;&quot;: &quot;; [.AC12])" office:value-type="string" office:string-value="&quot;3&quot;: 9" calcext:value-type="string">
            <text:p>"3": 9</text:p>
          </table:table-cell>
          <table:table-cell table:style-name="ce865" table:formula="of:=COM.MICROSOFT.CONCAT(&quot;&quot;&quot;&quot;;[.$F$2]; &quot;&quot;&quot;: &quot;; [.AD12])" office:value-type="string" office:string-value="&quot;4&quot;: 11" calcext:value-type="string">
            <text:p>"4": 11</text:p>
          </table:table-cell>
          <table:table-cell table:style-name="ce876" table:number-columns-repeated="2"/>
          <table:table-cell table:style-name="ce878" table:formula="of:=COM.MICROSOFT.CONCAT(&quot;&quot;&quot;4&quot;&quot;: { &quot;;COM.MICROSOFT.TEXTJOIN(&quot;, &quot;;TRUE();[.BD8:.BH10]);&quot;}&quot;)" office:value-type="string" office:string-value="&quot;4&quot;: { &quot;0&quot;: 14, &quot;1&quot;: 2, &quot;2&quot;: 1, &quot;3&quot;: 5, &quot;4&quot;: 13, &quot;5&quot;: 6, &quot;6&quot;: 3, &quot;7&quot;: 4, &quot;8&quot;: 7, &quot;9&quot;: 8, &quot;10&quot;: 12, &quot;11&quot;: 10, &quot;12&quot;: 9, &quot;13&quot;: 11, &quot;14&quot;: 13}" calcext:value-type="string">
            <text:p>"4": { "0": 14, "1": 2, "2": 1, "3": 5, "4": 13, "5": 6, "6": 3, "7": 4, "8": 7, "9": 8, "10": 12, "11": 10, "12": 9, "13": 11, "14": 13}</text:p>
          </table:table-cell>
          <table:table-cell table:number-columns-repeated="36"/>
        </table:table-row>
        <table:table-row table:style-name="ro1">
          <table:table-cell table:style-name="ce623"/>
          <table:table-cell table:style-name="ce10" table:formula="of:=[.$T$3]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690"/>
          <table:table-cell office:value-type="float" office:value="7" calcext:value-type="float">
            <text:p>7</text:p>
          </table:table-cell>
          <table:table-cell table:style-name="ce10" table:formula="of:=[.$U$3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690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0" table:formula="of:=[.$V$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6" office:value-type="float" office:value="8" calcext:value-type="float">
            <text:p>8</text:p>
          </table:table-cell>
          <table:table-cell table:style-name="ce690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table:formula="of:=[.$W$3]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690"/>
          <table:table-cell office:value-type="float" office:value="7" calcext:value-type="float">
            <text:p>7</text:p>
          </table:table-cell>
          <table:table-cell table:style-name="ce38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4" calcext:value-type="float">
            <text:p>4</text:p>
          </table:table-cell>
          <table:table-cell table:style-name="ce10" table:formula="of:=[.$X$3]" office:value-type="float" office:value="8" calcext:value-type="float">
            <text:p>8</text:p>
          </table:table-cell>
          <table:table-cell/>
          <table:table-cell table:style-name="ce865" table:formula="of:=COM.MICROSOFT.CONCAT(&quot;&quot;&quot;&quot;;[.$B$3]; &quot;&quot;&quot;: &quot;; [.B13])" office:value-type="string" office:string-value="&quot;5&quot;: 5" calcext:value-type="string">
            <text:p>"5": 5</text:p>
          </table:table-cell>
          <table:table-cell table:style-name="ce865" table:formula="of:=COM.MICROSOFT.CONCAT(&quot;&quot;&quot;&quot;;[.$C$3]; &quot;&quot;&quot;: &quot;; [.C13])" office:value-type="string" office:string-value="&quot;6&quot;: 3" calcext:value-type="string">
            <text:p>"6": 3</text:p>
          </table:table-cell>
          <table:table-cell table:style-name="ce865" table:formula="of:=COM.MICROSOFT.CONCAT(&quot;&quot;&quot;&quot;;[.$D$3]; &quot;&quot;&quot;: &quot;; [.D13])" office:value-type="string" office:string-value="&quot;7&quot;: 2" calcext:value-type="string">
            <text:p>"7": 2</text:p>
          </table:table-cell>
          <table:table-cell table:style-name="ce865" table:formula="of:=COM.MICROSOFT.CONCAT(&quot;&quot;&quot;&quot;;[.$E$3]; &quot;&quot;&quot;: &quot;; [.E13])" office:value-type="string" office:string-value="&quot;8&quot;: 1" calcext:value-type="string">
            <text:p>"8": 1</text:p>
          </table:table-cell>
          <table:table-cell table:style-name="ce865" table:formula="of:=COM.MICROSOFT.CONCAT(&quot;&quot;&quot;&quot;;[.$F$3]; &quot;&quot;&quot;: &quot;; [.F13])" office:value-type="string" office:string-value="&quot;9&quot;: 6" calcext:value-type="string">
            <text:p>"9": 6</text:p>
          </table:table-cell>
          <table:table-cell table:style-name="ce865"/>
          <table:table-cell table:style-name="ce865" table:formula="of:=COM.MICROSOFT.CONCAT(&quot;&quot;&quot;&quot;;[.$B$3]; &quot;&quot;&quot;: &quot;; [.H13])" office:value-type="string" office:string-value="&quot;5&quot;: 7" calcext:value-type="string">
            <text:p>"5": 7</text:p>
          </table:table-cell>
          <table:table-cell table:style-name="ce865" table:formula="of:=COM.MICROSOFT.CONCAT(&quot;&quot;&quot;&quot;;[.$C$3]; &quot;&quot;&quot;: &quot;; [.I13])" office:value-type="string" office:string-value="&quot;6&quot;: 2" calcext:value-type="string">
            <text:p>"6": 2</text:p>
          </table:table-cell>
          <table:table-cell table:style-name="ce865" table:formula="of:=COM.MICROSOFT.CONCAT(&quot;&quot;&quot;&quot;;[.$D$3]; &quot;&quot;&quot;: &quot;; [.J13])" office:value-type="string" office:string-value="&quot;7&quot;: 1" calcext:value-type="string">
            <text:p>"7": 1</text:p>
          </table:table-cell>
          <table:table-cell table:style-name="ce865" table:formula="of:=COM.MICROSOFT.CONCAT(&quot;&quot;&quot;&quot;;[.$E$3]; &quot;&quot;&quot;: &quot;; [.K13])" office:value-type="string" office:string-value="&quot;8&quot;: 2" calcext:value-type="string">
            <text:p>"8": 2</text:p>
          </table:table-cell>
          <table:table-cell table:style-name="ce865" table:formula="of:=COM.MICROSOFT.CONCAT(&quot;&quot;&quot;&quot;;[.$F$3]; &quot;&quot;&quot;: &quot;; [.L13])" office:value-type="string" office:string-value="&quot;9&quot;: 6" calcext:value-type="string">
            <text:p>"9": 6</text:p>
          </table:table-cell>
          <table:table-cell table:style-name="ce865"/>
          <table:table-cell table:style-name="ce865" table:formula="of:=COM.MICROSOFT.CONCAT(&quot;&quot;&quot;&quot;;[.$B$3]; &quot;&quot;&quot;: &quot;; [.N13])" office:value-type="string" office:string-value="&quot;5&quot;: 7" calcext:value-type="string">
            <text:p>"5": 7</text:p>
          </table:table-cell>
          <table:table-cell table:style-name="ce865" table:formula="of:=COM.MICROSOFT.CONCAT(&quot;&quot;&quot;&quot;;[.$C$3]; &quot;&quot;&quot;: &quot;; [.O13])" office:value-type="string" office:string-value="&quot;6&quot;: 2" calcext:value-type="string">
            <text:p>"6": 2</text:p>
          </table:table-cell>
          <table:table-cell table:style-name="ce865" table:formula="of:=COM.MICROSOFT.CONCAT(&quot;&quot;&quot;&quot;;[.$D$3]; &quot;&quot;&quot;: &quot;; [.P13])" office:value-type="string" office:string-value="&quot;7&quot;: 0" calcext:value-type="string">
            <text:p>"7": 0</text:p>
          </table:table-cell>
          <table:table-cell table:style-name="ce865" table:formula="of:=COM.MICROSOFT.CONCAT(&quot;&quot;&quot;&quot;;[.$E$3]; &quot;&quot;&quot;: &quot;; [.Q13])" office:value-type="string" office:string-value="&quot;8&quot;: 1" calcext:value-type="string">
            <text:p>"8": 1</text:p>
          </table:table-cell>
          <table:table-cell table:style-name="ce865" table:formula="of:=COM.MICROSOFT.CONCAT(&quot;&quot;&quot;&quot;;[.$F$3]; &quot;&quot;&quot;: &quot;; [.R13])" office:value-type="string" office:string-value="&quot;9&quot;: 8" calcext:value-type="string">
            <text:p>"9": 8</text:p>
          </table:table-cell>
          <table:table-cell table:style-name="ce865"/>
          <table:table-cell table:style-name="ce865" table:formula="of:=COM.MICROSOFT.CONCAT(&quot;&quot;&quot;&quot;;[.$B$3]; &quot;&quot;&quot;: &quot;; [.T13])" office:value-type="string" office:string-value="&quot;5&quot;: 7" calcext:value-type="string">
            <text:p>"5": 7</text:p>
          </table:table-cell>
          <table:table-cell table:style-name="ce865" table:formula="of:=COM.MICROSOFT.CONCAT(&quot;&quot;&quot;&quot;;[.$C$3]; &quot;&quot;&quot;: &quot;; [.U13])" office:value-type="string" office:string-value="&quot;6&quot;: 2" calcext:value-type="string">
            <text:p>"6": 2</text:p>
          </table:table-cell>
          <table:table-cell table:style-name="ce865" table:formula="of:=COM.MICROSOFT.CONCAT(&quot;&quot;&quot;&quot;;[.$D$3]; &quot;&quot;&quot;: &quot;; [.V13])" office:value-type="string" office:string-value="&quot;7&quot;: 1" calcext:value-type="string">
            <text:p>"7": 1</text:p>
          </table:table-cell>
          <table:table-cell table:style-name="ce865" table:formula="of:=COM.MICROSOFT.CONCAT(&quot;&quot;&quot;&quot;;[.$E$3]; &quot;&quot;&quot;: &quot;; [.W13])" office:value-type="string" office:string-value="&quot;8&quot;: 1" calcext:value-type="string">
            <text:p>"8": 1</text:p>
          </table:table-cell>
          <table:table-cell table:style-name="ce865" table:formula="of:=COM.MICROSOFT.CONCAT(&quot;&quot;&quot;&quot;;[.$F$3]; &quot;&quot;&quot;: &quot;; [.X13])" office:value-type="string" office:string-value="&quot;9&quot;: 8" calcext:value-type="string">
            <text:p>"9": 8</text:p>
          </table:table-cell>
          <table:table-cell table:style-name="ce865"/>
          <table:table-cell table:style-name="ce865" table:formula="of:=COM.MICROSOFT.CONCAT(&quot;&quot;&quot;&quot;;[.$B$3]; &quot;&quot;&quot;: &quot;; [.Z13])" office:value-type="string" office:string-value="&quot;5&quot;: 7" calcext:value-type="string">
            <text:p>"5": 7</text:p>
          </table:table-cell>
          <table:table-cell table:style-name="ce865" table:formula="of:=COM.MICROSOFT.CONCAT(&quot;&quot;&quot;&quot;;[.$C$3]; &quot;&quot;&quot;: &quot;; [.AA13])" office:value-type="string" office:string-value="&quot;6&quot;: 2" calcext:value-type="string">
            <text:p>"6": 2</text:p>
          </table:table-cell>
          <table:table-cell table:style-name="ce865" table:formula="of:=COM.MICROSOFT.CONCAT(&quot;&quot;&quot;&quot;;[.$D$3]; &quot;&quot;&quot;: &quot;; [.AB13])" office:value-type="string" office:string-value="&quot;7&quot;: 1" calcext:value-type="string">
            <text:p>"7": 1</text:p>
          </table:table-cell>
          <table:table-cell table:style-name="ce865" table:formula="of:=COM.MICROSOFT.CONCAT(&quot;&quot;&quot;&quot;;[.$E$3]; &quot;&quot;&quot;: &quot;; [.AC13])" office:value-type="string" office:string-value="&quot;8&quot;: 4" calcext:value-type="string">
            <text:p>"8": 4</text:p>
          </table:table-cell>
          <table:table-cell table:style-name="ce865" table:formula="of:=COM.MICROSOFT.CONCAT(&quot;&quot;&quot;&quot;;[.$F$3]; &quot;&quot;&quot;: &quot;; [.AD13])" office:value-type="string" office:string-value="&quot;9&quot;: 8" calcext:value-type="string">
            <text:p>"9": 8</text:p>
          </table:table-cell>
          <table:table-cell table:style-name="ce875" table:number-columns-repeated="2"/>
          <table:table-cell table:style-name="ce864"/>
          <table:table-cell table:number-columns-repeated="36"/>
        </table:table-row>
        <table:table-row table:style-name="ro1">
          <table:table-cell table:style-name="ce623"/>
          <table:table-cell table:style-name="ce99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64" office:value-type="float" office:value="13" calcext:value-type="float">
            <text:p>13</text:p>
          </table:table-cell>
          <table:table-cell table:style-name="ce690"/>
          <table:table-cell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64" office:value-type="float" office:value="13" calcext:value-type="float">
            <text:p>13</text:p>
          </table:table-cell>
          <table:table-cell table:style-name="ce690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64" office:value-type="float" office:value="13" calcext:value-type="float">
            <text:p>13</text:p>
          </table:table-cell>
          <table:table-cell table:style-name="ce690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64" office:value-type="float" office:value="13" calcext:value-type="float">
            <text:p>13</text:p>
          </table:table-cell>
          <table:table-cell table:style-name="ce690"/>
          <table:table-cell office:value-type="float" office:value="12" calcext:value-type="float">
            <text:p>12</text:p>
          </table:table-cell>
          <table:table-cell table:style-name="ce845" office:value-type="float" office:value="8" calcext:value-type="float">
            <text:p>8</text:p>
          </table:table-cell>
          <table:table-cell table:style-name="ce38" office:value-type="float" office:value="6" calcext:value-type="float">
            <text:p>6</text:p>
          </table:table-cell>
          <table:table-cell table:style-name="ce852" office:value-type="float" office:value="10" calcext:value-type="float">
            <text:p>10</text:p>
          </table:table-cell>
          <table:table-cell table:style-name="ce44" office:value-type="float" office:value="13" calcext:value-type="float">
            <text:p>13</text:p>
          </table:table-cell>
          <table:table-cell/>
          <table:table-cell table:style-name="ce865" table:formula="of:=COM.MICROSOFT.CONCAT(&quot;&quot;&quot;&quot;;[.$B$4]; &quot;&quot;&quot;: &quot;; [.B14])" office:value-type="string" office:string-value="&quot;10&quot;: 12" calcext:value-type="string">
            <text:p>"10": 12</text:p>
          </table:table-cell>
          <table:table-cell table:style-name="ce865" table:formula="of:=COM.MICROSOFT.CONCAT(&quot;&quot;&quot;&quot;;[.$C$4]; &quot;&quot;&quot;: &quot;; [.C14])" office:value-type="string" office:string-value="&quot;11&quot;: 10" calcext:value-type="string">
            <text:p>"11": 10</text:p>
          </table:table-cell>
          <table:table-cell table:style-name="ce865" table:formula="of:=COM.MICROSOFT.CONCAT(&quot;&quot;&quot;&quot;;[.$D$4]; &quot;&quot;&quot;: &quot;; [.D14])" office:value-type="string" office:string-value="&quot;12&quot;: 8" calcext:value-type="string">
            <text:p>"12": 8</text:p>
          </table:table-cell>
          <table:table-cell table:style-name="ce865" table:formula="of:=COM.MICROSOFT.CONCAT(&quot;&quot;&quot;&quot;;[.$E$4]; &quot;&quot;&quot;: &quot;; [.E14])" office:value-type="string" office:string-value="&quot;13&quot;: 5" calcext:value-type="string">
            <text:p>"13": 5</text:p>
          </table:table-cell>
          <table:table-cell table:style-name="ce865" table:formula="of:=COM.MICROSOFT.CONCAT(&quot;&quot;&quot;&quot;;[.$F$4]; &quot;&quot;&quot;: &quot;; [.F14])" office:value-type="string" office:string-value="&quot;14&quot;: 13" calcext:value-type="string">
            <text:p>"14": 13</text:p>
          </table:table-cell>
          <table:table-cell table:style-name="ce865"/>
          <table:table-cell table:style-name="ce865" table:formula="of:=COM.MICROSOFT.CONCAT(&quot;&quot;&quot;&quot;;[.$B$4]; &quot;&quot;&quot;: &quot;; [.H14])" office:value-type="string" office:string-value="&quot;10&quot;: 8" calcext:value-type="string">
            <text:p>"10": 8</text:p>
          </table:table-cell>
          <table:table-cell table:style-name="ce865" table:formula="of:=COM.MICROSOFT.CONCAT(&quot;&quot;&quot;&quot;;[.$C$4]; &quot;&quot;&quot;: &quot;; [.I14])" office:value-type="string" office:string-value="&quot;11&quot;: 9" calcext:value-type="string">
            <text:p>"11": 9</text:p>
          </table:table-cell>
          <table:table-cell table:style-name="ce865" table:formula="of:=COM.MICROSOFT.CONCAT(&quot;&quot;&quot;&quot;;[.$D$4]; &quot;&quot;&quot;: &quot;; [.J14])" office:value-type="string" office:string-value="&quot;12&quot;: 4" calcext:value-type="string">
            <text:p>"12": 4</text:p>
          </table:table-cell>
          <table:table-cell table:style-name="ce865" table:formula="of:=COM.MICROSOFT.CONCAT(&quot;&quot;&quot;&quot;;[.$E$4]; &quot;&quot;&quot;: &quot;; [.K14])" office:value-type="string" office:string-value="&quot;13&quot;: 3" calcext:value-type="string">
            <text:p>"13": 3</text:p>
          </table:table-cell>
          <table:table-cell table:style-name="ce865" table:formula="of:=COM.MICROSOFT.CONCAT(&quot;&quot;&quot;&quot;;[.$F$4]; &quot;&quot;&quot;: &quot;; [.L14])" office:value-type="string" office:string-value="&quot;14&quot;: 13" calcext:value-type="string">
            <text:p>"14": 13</text:p>
          </table:table-cell>
          <table:table-cell table:style-name="ce865"/>
          <table:table-cell table:style-name="ce865" table:formula="of:=COM.MICROSOFT.CONCAT(&quot;&quot;&quot;&quot;;[.$B$4]; &quot;&quot;&quot;: &quot;; [.N14])" office:value-type="string" office:string-value="&quot;10&quot;: 12" calcext:value-type="string">
            <text:p>"10": 12</text:p>
          </table:table-cell>
          <table:table-cell table:style-name="ce865" table:formula="of:=COM.MICROSOFT.CONCAT(&quot;&quot;&quot;&quot;;[.$C$4]; &quot;&quot;&quot;: &quot;; [.O14])" office:value-type="string" office:string-value="&quot;11&quot;: 9" calcext:value-type="string">
            <text:p>"11": 9</text:p>
          </table:table-cell>
          <table:table-cell table:style-name="ce865" table:formula="of:=COM.MICROSOFT.CONCAT(&quot;&quot;&quot;&quot;;[.$D$4]; &quot;&quot;&quot;: &quot;; [.P14])" office:value-type="string" office:string-value="&quot;12&quot;: 10" calcext:value-type="string">
            <text:p>"12": 10</text:p>
          </table:table-cell>
          <table:table-cell table:style-name="ce865" table:formula="of:=COM.MICROSOFT.CONCAT(&quot;&quot;&quot;&quot;;[.$E$4]; &quot;&quot;&quot;: &quot;; [.Q14])" office:value-type="string" office:string-value="&quot;13&quot;: 3" calcext:value-type="string">
            <text:p>"13": 3</text:p>
          </table:table-cell>
          <table:table-cell table:style-name="ce865" table:formula="of:=COM.MICROSOFT.CONCAT(&quot;&quot;&quot;&quot;;[.$F$4]; &quot;&quot;&quot;: &quot;; [.R14])" office:value-type="string" office:string-value="&quot;14&quot;: 13" calcext:value-type="string">
            <text:p>"14": 13</text:p>
          </table:table-cell>
          <table:table-cell table:style-name="ce865"/>
          <table:table-cell table:style-name="ce865" table:formula="of:=COM.MICROSOFT.CONCAT(&quot;&quot;&quot;&quot;;[.$B$4]; &quot;&quot;&quot;: &quot;; [.T14])" office:value-type="string" office:string-value="&quot;10&quot;: 12" calcext:value-type="string">
            <text:p>"10": 12</text:p>
          </table:table-cell>
          <table:table-cell table:style-name="ce865" table:formula="of:=COM.MICROSOFT.CONCAT(&quot;&quot;&quot;&quot;;[.$C$4]; &quot;&quot;&quot;: &quot;; [.U14])" office:value-type="string" office:string-value="&quot;11&quot;: 9" calcext:value-type="string">
            <text:p>"11": 9</text:p>
          </table:table-cell>
          <table:table-cell table:style-name="ce865" table:formula="of:=COM.MICROSOFT.CONCAT(&quot;&quot;&quot;&quot;;[.$D$4]; &quot;&quot;&quot;: &quot;; [.V14])" office:value-type="string" office:string-value="&quot;12&quot;: 10" calcext:value-type="string">
            <text:p>"12": 10</text:p>
          </table:table-cell>
          <table:table-cell table:style-name="ce865" table:formula="of:=COM.MICROSOFT.CONCAT(&quot;&quot;&quot;&quot;;[.$E$4]; &quot;&quot;&quot;: &quot;; [.W14])" office:value-type="string" office:string-value="&quot;13&quot;: 5" calcext:value-type="string">
            <text:p>"13": 5</text:p>
          </table:table-cell>
          <table:table-cell table:style-name="ce865" table:formula="of:=COM.MICROSOFT.CONCAT(&quot;&quot;&quot;&quot;;[.$F$4]; &quot;&quot;&quot;: &quot;; [.X14])" office:value-type="string" office:string-value="&quot;14&quot;: 13" calcext:value-type="string">
            <text:p>"14": 13</text:p>
          </table:table-cell>
          <table:table-cell table:style-name="ce865"/>
          <table:table-cell table:style-name="ce865" table:formula="of:=COM.MICROSOFT.CONCAT(&quot;&quot;&quot;&quot;;[.$B$4]; &quot;&quot;&quot;: &quot;; [.Z14])" office:value-type="string" office:string-value="&quot;10&quot;: 12" calcext:value-type="string">
            <text:p>"10": 12</text:p>
          </table:table-cell>
          <table:table-cell table:style-name="ce865" table:formula="of:=COM.MICROSOFT.CONCAT(&quot;&quot;&quot;&quot;;[.$C$4]; &quot;&quot;&quot;: &quot;; [.AA14])" office:value-type="string" office:string-value="&quot;11&quot;: 8" calcext:value-type="string">
            <text:p>"11": 8</text:p>
          </table:table-cell>
          <table:table-cell table:style-name="ce865" table:formula="of:=COM.MICROSOFT.CONCAT(&quot;&quot;&quot;&quot;;[.$D$4]; &quot;&quot;&quot;: &quot;; [.AB14])" office:value-type="string" office:string-value="&quot;12&quot;: 6" calcext:value-type="string">
            <text:p>"12": 6</text:p>
          </table:table-cell>
          <table:table-cell table:style-name="ce865" table:formula="of:=COM.MICROSOFT.CONCAT(&quot;&quot;&quot;&quot;;[.$E$4]; &quot;&quot;&quot;: &quot;; [.AC14])" office:value-type="string" office:string-value="&quot;13&quot;: 10" calcext:value-type="string">
            <text:p>"13": 10</text:p>
          </table:table-cell>
          <table:table-cell table:style-name="ce865" table:formula="of:=COM.MICROSOFT.CONCAT(&quot;&quot;&quot;&quot;;[.$F$4]; &quot;&quot;&quot;: &quot;; [.AD14])" office:value-type="string" office:string-value="&quot;14&quot;: 13" calcext:value-type="string">
            <text:p>"14": 13</text:p>
          </table:table-cell>
          <table:table-cell table:style-name="ce875" table:number-columns-repeated="2"/>
          <table:table-cell table:style-name="ce864" table:formula="of:=COM.MICROSOFT.TEXTJOIN(&quot;, &quot;;TRUE();[.BK8:.BK12])" office:value-type="string" office:string-value="&quot;0&quot;: { &quot;0&quot;: 14, &quot;1&quot;: 1, &quot;2&quot;: 2, &quot;3&quot;: 3, &quot;4&quot;: 5, &quot;5&quot;: 9, &quot;6&quot;: 8, &quot;7&quot;: 7, &quot;8&quot;: 4, &quot;9&quot;: 6, &quot;10&quot;: 14, &quot;11&quot;: 13, &quot;12&quot;: 11, &quot;13&quot;: 10, &quot;14&quot;: 12}, &quot;1&quot;: { &quot;0&quot;: 14, &quot;1&quot;: 6, &quot;2&quot;: 1, &quot;3&quot;: 2, &quot;4&quot;: 8, &quot;5&quot;: 7, &quot;6&quot;: 5, &quot;7&quot;: 4, &quot;8&quot;: 3, &quot;9&quot;: 6, &quot;10&quot;: 11, &quot;11&quot;: 12, &quot;12&quot;: 10, &quot;13&quot;: 9, &quot;14&quot;: 13}, &quot;2&quot;: { &quot;0&quot;: 14, &quot;1&quot;: 2, &quot;2&quot;: 3, &quot;3&quot;: 1, &quot;4&quot;: 8, &quot;5&quot;: 7, &quot;6&quot;: 4, &quot;7&quot;: 5, &quot;8&quot;: 3, &quot;9&quot;: 6, &quot;10&quot;: 12, &quot;11&quot;: 10, &quot;12&quot;: 11, &quot;13&quot;: 9, &quot;14&quot;: 13}, &quot;3&quot;: { &quot;0&quot;: 14, &quot;1&quot;: 2, &quot;2&quot;: 1, &quot;3&quot;: 7, &quot;4&quot;: 8, &quot;5&quot;: 6, &quot;6&quot;: 3, &quot;7&quot;: 4, &quot;8&quot;: 5, &quot;9&quot;: 7, &quot;10&quot;: 12, &quot;11&quot;: 10, &quot;12&quot;: 9, &quot;13&quot;: 11, &quot;14&quot;: 13}, &quot;4&quot;: { &quot;0&quot;: 14, &quot;1&quot;: 2, &quot;2&quot;: 1, &quot;3&quot;: 5, &quot;4&quot;: 13, &quot;5&quot;: 6, &quot;6&quot;: 3, &quot;7&quot;: 4, &quot;8&quot;: 7, &quot;9&quot;: 8, &quot;10&quot;: 12, &quot;11&quot;: 10, &quot;12&quot;: 9, &quot;13&quot;: 11, &quot;14&quot;: 13}" calcext:value-type="string">
            <text:p>"0": { "0": 14, "1": 1, "2": 2, "3": 3, "4": 5, "5": 9, "6": 8, "7": 7, "8": 4, "9": 6, "10": 14, "11": 13, "12": 11, "13": 10, "14": 12}, "1": { "0": 14, "1": 6, "2": 1, "3": 2, "4": 8, "5": 7, "6": 5, "7": 4, "8": 3, "9": 6, "10": 11, "11": 12, "12": 10, "13": 9, "14": 13}, "2": { "0": 14, "1": 2, "2": 3, "3": 1, "4": 8, "5": 7, "6": 4, "7": 5, "8": 3, "9": 6, "10": 12, "11": 10, "12": 11, "13": 9, "14": 13}, "3": { "0": 14, "1": 2, "2": 1, "3": 7, "4": 8, "5": 6, "6": 3, "7": 4, "8": 5, "9": 7, "10": 12, "11": 10, "12": 9, "13": 11, "14": 13}, "4": { "0": 14, "1": 2, "2": 1, "3": 5, "4": 13, "5": 6, "6": 3, "7": 4, "8": 7, "9": 8, "10": 12, "11": 10, "12": 9, "13": 11, "14": 13}</text:p>
          </table:table-cell>
          <table:table-cell table:number-columns-repeated="36"/>
        </table:table-row>
        <table:table-row table:style-name="ro2">
          <table:table-cell table:style-name="ce623"/>
          <table:table-cell table:style-name="ce9" table:number-columns-repeated="29"/>
          <table:table-cell/>
          <table:table-cell table:style-name="ce864" table:number-columns-repeated="29"/>
          <table:table-cell table:style-name="ce875" table:number-columns-repeated="2"/>
          <table:table-cell table:style-name="ce864"/>
          <table:table-cell table:number-columns-repeated="36"/>
        </table:table-row>
        <table:table-row table:style-name="ro1">
          <table:table-cell table:style-name="ce623"/>
          <table:table-cell table:style-name="ce17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690"/>
          <table:table-cell table:style-name="ce17" office:value-type="float" office:value="14" calcext:value-type="float">
            <text:p>14</text:p>
          </table:table-cell>
          <table:table-cell table:style-name="ce29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690"/>
          <table:table-cell table:style-name="ce17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46" office:value-type="float" office:value="12" calcext:value-type="float">
            <text:p>12</text:p>
          </table:table-cell>
          <table:table-cell table:style-name="ce690"/>
          <table:table-cell table:style-name="ce17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690"/>
          <table:table-cell table:style-name="ce8" office:value-type="float" office:value="14" calcext:value-type="float">
            <text:p>14</text:p>
          </table:table-cell>
          <table:table-cell table:style-name="ce27" office:value-type="float" office:value="13" calcext:value-type="float">
            <text:p>13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11" calcext:value-type="float">
            <text:p>11</text:p>
          </table:table-cell>
          <table:table-cell table:style-name="ce623"/>
          <table:table-cell table:style-name="ce866" table:formula="of:=COM.MICROSOFT.CONCAT(&quot;&quot;&quot;&quot;;[.$B$2]; &quot;&quot;&quot;: &quot;; [.B16])" office:value-type="string" office:string-value="&quot;0&quot;: 14" calcext:value-type="string">
            <text:p>"0": 14</text:p>
          </table:table-cell>
          <table:table-cell table:style-name="ce866" table:formula="of:=COM.MICROSOFT.CONCAT(&quot;&quot;&quot;&quot;;[.$C$2]; &quot;&quot;&quot;: &quot;; [.C16])" office:value-type="string" office:string-value="&quot;1&quot;: 11" calcext:value-type="string">
            <text:p>"1": 11</text:p>
          </table:table-cell>
          <table:table-cell table:style-name="ce866" table:formula="of:=COM.MICROSOFT.CONCAT(&quot;&quot;&quot;&quot;;[.$D$2]; &quot;&quot;&quot;: &quot;; [.D16])" office:value-type="string" office:string-value="&quot;2&quot;: 7" calcext:value-type="string">
            <text:p>"2": 7</text:p>
          </table:table-cell>
          <table:table-cell table:style-name="ce866" table:formula="of:=COM.MICROSOFT.CONCAT(&quot;&quot;&quot;&quot;;[.$E$2]; &quot;&quot;&quot;: &quot;; [.E16])" office:value-type="string" office:string-value="&quot;3&quot;: 9" calcext:value-type="string">
            <text:p>"3": 9</text:p>
          </table:table-cell>
          <table:table-cell table:style-name="ce866" table:formula="of:=COM.MICROSOFT.CONCAT(&quot;&quot;&quot;&quot;;[.$F$2]; &quot;&quot;&quot;: &quot;; [.F16])" office:value-type="string" office:string-value="&quot;4&quot;: 12" calcext:value-type="string">
            <text:p>"4": 12</text:p>
          </table:table-cell>
          <table:table-cell table:style-name="ce866"/>
          <table:table-cell table:style-name="ce866" table:formula="of:=COM.MICROSOFT.CONCAT(&quot;&quot;&quot;&quot;;[.$B$2]; &quot;&quot;&quot;: &quot;; [.H16])" office:value-type="string" office:string-value="&quot;0&quot;: 14" calcext:value-type="string">
            <text:p>"0": 14</text:p>
          </table:table-cell>
          <table:table-cell table:style-name="ce866" table:formula="of:=COM.MICROSOFT.CONCAT(&quot;&quot;&quot;&quot;;[.$C$2]; &quot;&quot;&quot;: &quot;; [.I16])" office:value-type="string" office:string-value="&quot;1&quot;: 10" calcext:value-type="string">
            <text:p>"1": 10</text:p>
          </table:table-cell>
          <table:table-cell table:style-name="ce866" table:formula="of:=COM.MICROSOFT.CONCAT(&quot;&quot;&quot;&quot;;[.$D$2]; &quot;&quot;&quot;: &quot;; [.J16])" office:value-type="string" office:string-value="&quot;2&quot;: 6" calcext:value-type="string">
            <text:p>"2": 6</text:p>
          </table:table-cell>
          <table:table-cell table:style-name="ce866" table:formula="of:=COM.MICROSOFT.CONCAT(&quot;&quot;&quot;&quot;;[.$E$2]; &quot;&quot;&quot;: &quot;; [.K16])" office:value-type="string" office:string-value="&quot;3&quot;: 9" calcext:value-type="string">
            <text:p>"3": 9</text:p>
          </table:table-cell>
          <table:table-cell table:style-name="ce866" table:formula="of:=COM.MICROSOFT.CONCAT(&quot;&quot;&quot;&quot;;[.$F$2]; &quot;&quot;&quot;: &quot;; [.L16])" office:value-type="string" office:string-value="&quot;4&quot;: 12" calcext:value-type="string">
            <text:p>"4": 12</text:p>
          </table:table-cell>
          <table:table-cell table:style-name="ce866"/>
          <table:table-cell table:style-name="ce866" table:formula="of:=COM.MICROSOFT.CONCAT(&quot;&quot;&quot;&quot;;[.$B$2]; &quot;&quot;&quot;: &quot;; [.N16])" office:value-type="string" office:string-value="&quot;0&quot;: 14" calcext:value-type="string">
            <text:p>"0": 14</text:p>
          </table:table-cell>
          <table:table-cell table:style-name="ce866" table:formula="of:=COM.MICROSOFT.CONCAT(&quot;&quot;&quot;&quot;;[.$C$2]; &quot;&quot;&quot;: &quot;; [.O16])" office:value-type="string" office:string-value="&quot;1&quot;: 11" calcext:value-type="string">
            <text:p>"1": 11</text:p>
          </table:table-cell>
          <table:table-cell table:style-name="ce866" table:formula="of:=COM.MICROSOFT.CONCAT(&quot;&quot;&quot;&quot;;[.$D$2]; &quot;&quot;&quot;: &quot;; [.P16])" office:value-type="string" office:string-value="&quot;2&quot;: 10" calcext:value-type="string">
            <text:p>"2": 10</text:p>
          </table:table-cell>
          <table:table-cell table:style-name="ce866" table:formula="of:=COM.MICROSOFT.CONCAT(&quot;&quot;&quot;&quot;;[.$E$2]; &quot;&quot;&quot;: &quot;; [.Q16])" office:value-type="string" office:string-value="&quot;3&quot;: 9" calcext:value-type="string">
            <text:p>"3": 9</text:p>
          </table:table-cell>
          <table:table-cell table:style-name="ce866" table:formula="of:=COM.MICROSOFT.CONCAT(&quot;&quot;&quot;&quot;;[.$F$2]; &quot;&quot;&quot;: &quot;; [.R16])" office:value-type="string" office:string-value="&quot;4&quot;: 12" calcext:value-type="string">
            <text:p>"4": 12</text:p>
          </table:table-cell>
          <table:table-cell table:style-name="ce866"/>
          <table:table-cell table:style-name="ce866" table:formula="of:=COM.MICROSOFT.CONCAT(&quot;&quot;&quot;&quot;;[.$B$2]; &quot;&quot;&quot;: &quot;; [.T16])" office:value-type="string" office:string-value="&quot;0&quot;: 14" calcext:value-type="string">
            <text:p>"0": 14</text:p>
          </table:table-cell>
          <table:table-cell table:style-name="ce866" table:formula="of:=COM.MICROSOFT.CONCAT(&quot;&quot;&quot;&quot;;[.$C$2]; &quot;&quot;&quot;: &quot;; [.U16])" office:value-type="string" office:string-value="&quot;1&quot;: 10" calcext:value-type="string">
            <text:p>"1": 10</text:p>
          </table:table-cell>
          <table:table-cell table:style-name="ce866" table:formula="of:=COM.MICROSOFT.CONCAT(&quot;&quot;&quot;&quot;;[.$D$2]; &quot;&quot;&quot;: &quot;; [.V16])" office:value-type="string" office:string-value="&quot;2&quot;: 8" calcext:value-type="string">
            <text:p>"2": 8</text:p>
          </table:table-cell>
          <table:table-cell table:style-name="ce866" table:formula="of:=COM.MICROSOFT.CONCAT(&quot;&quot;&quot;&quot;;[.$E$2]; &quot;&quot;&quot;: &quot;; [.W16])" office:value-type="string" office:string-value="&quot;3&quot;: 11" calcext:value-type="string">
            <text:p>"3": 11</text:p>
          </table:table-cell>
          <table:table-cell table:style-name="ce866" table:formula="of:=COM.MICROSOFT.CONCAT(&quot;&quot;&quot;&quot;;[.$F$2]; &quot;&quot;&quot;: &quot;; [.X16])" office:value-type="string" office:string-value="&quot;4&quot;: 12" calcext:value-type="string">
            <text:p>"4": 12</text:p>
          </table:table-cell>
          <table:table-cell table:style-name="ce866"/>
          <table:table-cell table:style-name="ce866" table:formula="of:=COM.MICROSOFT.CONCAT(&quot;&quot;&quot;&quot;;[.$B$2]; &quot;&quot;&quot;: &quot;; [.Z16])" office:value-type="string" office:string-value="&quot;0&quot;: 14" calcext:value-type="string">
            <text:p>"0": 14</text:p>
          </table:table-cell>
          <table:table-cell table:style-name="ce866" table:formula="of:=COM.MICROSOFT.CONCAT(&quot;&quot;&quot;&quot;;[.$C$2]; &quot;&quot;&quot;: &quot;; [.AA16])" office:value-type="string" office:string-value="&quot;1&quot;: 13" calcext:value-type="string">
            <text:p>"1": 13</text:p>
          </table:table-cell>
          <table:table-cell table:style-name="ce866" table:formula="of:=COM.MICROSOFT.CONCAT(&quot;&quot;&quot;&quot;;[.$D$2]; &quot;&quot;&quot;: &quot;; [.AB16])" office:value-type="string" office:string-value="&quot;2&quot;: 10" calcext:value-type="string">
            <text:p>"2": 10</text:p>
          </table:table-cell>
          <table:table-cell table:style-name="ce866" table:formula="of:=COM.MICROSOFT.CONCAT(&quot;&quot;&quot;&quot;;[.$E$2]; &quot;&quot;&quot;: &quot;; [.AC16])" office:value-type="string" office:string-value="&quot;3&quot;: 12" calcext:value-type="string">
            <text:p>"3": 12</text:p>
          </table:table-cell>
          <table:table-cell table:style-name="ce866" table:formula="of:=COM.MICROSOFT.CONCAT(&quot;&quot;&quot;&quot;;[.$F$2]; &quot;&quot;&quot;: &quot;; [.AD16])" office:value-type="string" office:string-value="&quot;4&quot;: 11" calcext:value-type="string">
            <text:p>"4": 11</text:p>
          </table:table-cell>
          <table:table-cell table:style-name="ce875" table:number-columns-repeated="2"/>
          <table:table-cell table:formula="of:=COM.MICROSOFT.CONCAT(&quot;&quot;&quot;5&quot;&quot;: { &quot;;COM.MICROSOFT.TEXTJOIN(&quot;, &quot;;TRUE();[.AF12:.AJ14]);&quot;}&quot;)" office:value-type="string" office:string-value="&quot;5&quot;: { &quot;0&quot;: 14, &quot;1&quot;: 9, &quot;2&quot;: 4, &quot;3&quot;: 7, &quot;4&quot;: 11, &quot;5&quot;: 5, &quot;6&quot;: 3, &quot;7&quot;: 2, &quot;8&quot;: 1, &quot;9&quot;: 6, &quot;10&quot;: 12, &quot;11&quot;: 10, &quot;12&quot;: 8, &quot;13&quot;: 5, &quot;14&quot;: 13}" calcext:value-type="string">
            <text:p>"5": { "0": 14, "1": 9, "2": 4, "3": 7, "4": 11, "5": 5, "6": 3, "7": 2, "8": 1, "9": 6, "10": 12, "11": 10, "12": 8, "13": 5, "14": 13}</text:p>
          </table:table-cell>
          <table:table-cell table:number-columns-repeated="36"/>
        </table:table-row>
        <table:table-row table:style-name="ro1">
          <table:table-cell table:style-name="ce623"/>
          <table:table-cell table:style-name="ce99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690"/>
          <table:table-cell office:value-type="float" office:value="11" calcext:value-type="float">
            <text:p>11</text:p>
          </table:table-cell>
          <table:table-cell table:style-name="ce29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690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46" office:value-type="float" office:value="6" calcext:value-type="float">
            <text:p>6</text:p>
          </table:table-cell>
          <table:table-cell table:style-name="ce690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690"/>
          <table:table-cell table:style-name="ce8" office:value-type="float" office:value="6" calcext:value-type="float">
            <text:p>6</text:p>
          </table:table-cell>
          <table:table-cell table:style-name="ce27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9" calcext:value-type="float">
            <text:p>9</text:p>
          </table:table-cell>
          <table:table-cell table:style-name="ce623"/>
          <table:table-cell table:style-name="ce866" table:formula="of:=COM.MICROSOFT.CONCAT(&quot;&quot;&quot;&quot;;[.$B$3]; &quot;&quot;&quot;: &quot;; [.B17])" office:value-type="string" office:string-value="&quot;5&quot;: 10" calcext:value-type="string">
            <text:p>"5": 10</text:p>
          </table:table-cell>
          <table:table-cell table:style-name="ce866" table:formula="of:=COM.MICROSOFT.CONCAT(&quot;&quot;&quot;&quot;;[.$C$3]; &quot;&quot;&quot;: &quot;; [.C17])" office:value-type="string" office:string-value="&quot;6&quot;: 6" calcext:value-type="string">
            <text:p>"6": 6</text:p>
          </table:table-cell>
          <table:table-cell table:style-name="ce866" table:formula="of:=COM.MICROSOFT.CONCAT(&quot;&quot;&quot;&quot;;[.$D$3]; &quot;&quot;&quot;: &quot;; [.D17])" office:value-type="string" office:string-value="&quot;7&quot;: 4" calcext:value-type="string">
            <text:p>"7": 4</text:p>
          </table:table-cell>
          <table:table-cell table:style-name="ce866" table:formula="of:=COM.MICROSOFT.CONCAT(&quot;&quot;&quot;&quot;;[.$E$3]; &quot;&quot;&quot;: &quot;; [.E17])" office:value-type="string" office:string-value="&quot;8&quot;: 5" calcext:value-type="string">
            <text:p>"8": 5</text:p>
          </table:table-cell>
          <table:table-cell table:style-name="ce866" table:formula="of:=COM.MICROSOFT.CONCAT(&quot;&quot;&quot;&quot;;[.$F$3]; &quot;&quot;&quot;: &quot;; [.F17])" office:value-type="string" office:string-value="&quot;9&quot;: 8" calcext:value-type="string">
            <text:p>"9": 8</text:p>
          </table:table-cell>
          <table:table-cell table:style-name="ce866"/>
          <table:table-cell table:style-name="ce866" table:formula="of:=COM.MICROSOFT.CONCAT(&quot;&quot;&quot;&quot;;[.$B$3]; &quot;&quot;&quot;: &quot;; [.H17])" office:value-type="string" office:string-value="&quot;5&quot;: 11" calcext:value-type="string">
            <text:p>"5": 11</text:p>
          </table:table-cell>
          <table:table-cell table:style-name="ce866" table:formula="of:=COM.MICROSOFT.CONCAT(&quot;&quot;&quot;&quot;;[.$C$3]; &quot;&quot;&quot;: &quot;; [.I17])" office:value-type="string" office:string-value="&quot;6&quot;: 5" calcext:value-type="string">
            <text:p>"6": 5</text:p>
          </table:table-cell>
          <table:table-cell table:style-name="ce866" table:formula="of:=COM.MICROSOFT.CONCAT(&quot;&quot;&quot;&quot;;[.$D$3]; &quot;&quot;&quot;: &quot;; [.J17])" office:value-type="string" office:string-value="&quot;7&quot;: 3" calcext:value-type="string">
            <text:p>"7": 3</text:p>
          </table:table-cell>
          <table:table-cell table:style-name="ce866" table:formula="of:=COM.MICROSOFT.CONCAT(&quot;&quot;&quot;&quot;;[.$E$3]; &quot;&quot;&quot;: &quot;; [.K17])" office:value-type="string" office:string-value="&quot;8&quot;: 4" calcext:value-type="string">
            <text:p>"8": 4</text:p>
          </table:table-cell>
          <table:table-cell table:style-name="ce866" table:formula="of:=COM.MICROSOFT.CONCAT(&quot;&quot;&quot;&quot;;[.$F$3]; &quot;&quot;&quot;: &quot;; [.L17])" office:value-type="string" office:string-value="&quot;9&quot;: 8" calcext:value-type="string">
            <text:p>"9": 8</text:p>
          </table:table-cell>
          <table:table-cell table:style-name="ce866"/>
          <table:table-cell table:style-name="ce866" table:formula="of:=COM.MICROSOFT.CONCAT(&quot;&quot;&quot;&quot;;[.$B$3]; &quot;&quot;&quot;: &quot;; [.N17])" office:value-type="string" office:string-value="&quot;5&quot;: 8" calcext:value-type="string">
            <text:p>"5": 8</text:p>
          </table:table-cell>
          <table:table-cell table:style-name="ce866" table:formula="of:=COM.MICROSOFT.CONCAT(&quot;&quot;&quot;&quot;;[.$C$3]; &quot;&quot;&quot;: &quot;; [.O17])" office:value-type="string" office:string-value="&quot;6&quot;: 4" calcext:value-type="string">
            <text:p>"6": 4</text:p>
          </table:table-cell>
          <table:table-cell table:style-name="ce866" table:formula="of:=COM.MICROSOFT.CONCAT(&quot;&quot;&quot;&quot;;[.$D$3]; &quot;&quot;&quot;: &quot;; [.P17])" office:value-type="string" office:string-value="&quot;7&quot;: 5" calcext:value-type="string">
            <text:p>"7": 5</text:p>
          </table:table-cell>
          <table:table-cell table:style-name="ce866" table:formula="of:=COM.MICROSOFT.CONCAT(&quot;&quot;&quot;&quot;;[.$E$3]; &quot;&quot;&quot;: &quot;; [.Q17])" office:value-type="string" office:string-value="&quot;8&quot;: 3" calcext:value-type="string">
            <text:p>"8": 3</text:p>
          </table:table-cell>
          <table:table-cell table:style-name="ce866" table:formula="of:=COM.MICROSOFT.CONCAT(&quot;&quot;&quot;&quot;;[.$F$3]; &quot;&quot;&quot;: &quot;; [.R17])" office:value-type="string" office:string-value="&quot;9&quot;: 6" calcext:value-type="string">
            <text:p>"9": 6</text:p>
          </table:table-cell>
          <table:table-cell table:style-name="ce866"/>
          <table:table-cell table:style-name="ce866" table:formula="of:=COM.MICROSOFT.CONCAT(&quot;&quot;&quot;&quot;;[.$B$3]; &quot;&quot;&quot;: &quot;; [.T17])" office:value-type="string" office:string-value="&quot;5&quot;: 7" calcext:value-type="string">
            <text:p>"5": 7</text:p>
          </table:table-cell>
          <table:table-cell table:style-name="ce866" table:formula="of:=COM.MICROSOFT.CONCAT(&quot;&quot;&quot;&quot;;[.$C$3]; &quot;&quot;&quot;: &quot;; [.U17])" office:value-type="string" office:string-value="&quot;6&quot;: 4" calcext:value-type="string">
            <text:p>"6": 4</text:p>
          </table:table-cell>
          <table:table-cell table:style-name="ce866" table:formula="of:=COM.MICROSOFT.CONCAT(&quot;&quot;&quot;&quot;;[.$D$3]; &quot;&quot;&quot;: &quot;; [.V17])" office:value-type="string" office:string-value="&quot;7&quot;: 3" calcext:value-type="string">
            <text:p>"7": 3</text:p>
          </table:table-cell>
          <table:table-cell table:style-name="ce866" table:formula="of:=COM.MICROSOFT.CONCAT(&quot;&quot;&quot;&quot;;[.$E$3]; &quot;&quot;&quot;: &quot;; [.W17])" office:value-type="string" office:string-value="&quot;8&quot;: 5" calcext:value-type="string">
            <text:p>"8": 5</text:p>
          </table:table-cell>
          <table:table-cell table:style-name="ce866" table:formula="of:=COM.MICROSOFT.CONCAT(&quot;&quot;&quot;&quot;;[.$F$3]; &quot;&quot;&quot;: &quot;; [.X17])" office:value-type="string" office:string-value="&quot;9&quot;: 9" calcext:value-type="string">
            <text:p>"9": 9</text:p>
          </table:table-cell>
          <table:table-cell table:style-name="ce866"/>
          <table:table-cell table:style-name="ce866" table:formula="of:=COM.MICROSOFT.CONCAT(&quot;&quot;&quot;&quot;;[.$B$3]; &quot;&quot;&quot;: &quot;; [.Z17])" office:value-type="string" office:string-value="&quot;5&quot;: 6" calcext:value-type="string">
            <text:p>"5": 6</text:p>
          </table:table-cell>
          <table:table-cell table:style-name="ce866" table:formula="of:=COM.MICROSOFT.CONCAT(&quot;&quot;&quot;&quot;;[.$C$3]; &quot;&quot;&quot;: &quot;; [.AA17])" office:value-type="string" office:string-value="&quot;6&quot;: 4" calcext:value-type="string">
            <text:p>"6": 4</text:p>
          </table:table-cell>
          <table:table-cell table:style-name="ce866" table:formula="of:=COM.MICROSOFT.CONCAT(&quot;&quot;&quot;&quot;;[.$D$3]; &quot;&quot;&quot;: &quot;; [.AB17])" office:value-type="string" office:string-value="&quot;7&quot;: 3" calcext:value-type="string">
            <text:p>"7": 3</text:p>
          </table:table-cell>
          <table:table-cell table:style-name="ce866" table:formula="of:=COM.MICROSOFT.CONCAT(&quot;&quot;&quot;&quot;;[.$E$3]; &quot;&quot;&quot;: &quot;; [.AC17])" office:value-type="string" office:string-value="&quot;8&quot;: 8" calcext:value-type="string">
            <text:p>"8": 8</text:p>
          </table:table-cell>
          <table:table-cell table:style-name="ce866" table:formula="of:=COM.MICROSOFT.CONCAT(&quot;&quot;&quot;&quot;;[.$F$3]; &quot;&quot;&quot;: &quot;; [.AD17])" office:value-type="string" office:string-value="&quot;9&quot;: 9" calcext:value-type="string">
            <text:p>"9": 9</text:p>
          </table:table-cell>
          <table:table-cell table:style-name="ce875" table:number-columns-repeated="2"/>
          <table:table-cell table:formula="of:=COM.MICROSOFT.CONCAT(&quot;&quot;&quot;6&quot;&quot;: { &quot;;COM.MICROSOFT.TEXTJOIN(&quot;, &quot;;TRUE();[.AL12:.AP14]);&quot;}&quot;)" office:value-type="string" office:string-value="&quot;6&quot;: { &quot;0&quot;: 14, &quot;1&quot;: 10, &quot;2&quot;: 5, &quot;3&quot;: 11, &quot;4&quot;: 12, &quot;5&quot;: 7, &quot;6&quot;: 2, &quot;7&quot;: 1, &quot;8&quot;: 2, &quot;9&quot;: 6, &quot;10&quot;: 8, &quot;11&quot;: 9, &quot;12&quot;: 4, &quot;13&quot;: 3, &quot;14&quot;: 13}" calcext:value-type="string">
            <text:p>"6": { "0": 14, "1": 10, "2": 5, "3": 11, "4": 12, "5": 7, "6": 2, "7": 1, "8": 2, "9": 6, "10": 8, "11": 9, "12": 4, "13": 3, "14": 13}</text:p>
          </table:table-cell>
          <table:table-cell table:number-columns-repeated="36"/>
        </table:table-row>
        <table:table-row table:style-name="ro1">
          <table:table-cell table:style-name="ce623"/>
          <table:table-cell table:style-name="ce10" table:formula="of:=[.$T$4]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4" office:value-type="float" office:value="13" calcext:value-type="float">
            <text:p>13</text:p>
          </table:table-cell>
          <table:table-cell table:style-name="ce690"/>
          <table:table-cell office:value-type="float" office:value="7" calcext:value-type="float">
            <text:p>7</text:p>
          </table:table-cell>
          <table:table-cell table:style-name="ce10" table:formula="of:=[.$U$4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64" office:value-type="float" office:value="13" calcext:value-type="float">
            <text:p>13</text:p>
          </table:table-cell>
          <table:table-cell table:style-name="ce690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0" table:formula="of:=[.$V$4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64" office:value-type="float" office:value="13" calcext:value-type="float">
            <text:p>13</text:p>
          </table:table-cell>
          <table:table-cell table:style-name="ce690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table:formula="of:=[.$W$4]" office:value-type="float" office:value="4" calcext:value-type="float">
            <text:p>4</text:p>
          </table:table-cell>
          <table:table-cell table:style-name="ce64" office:value-type="float" office:value="13" calcext:value-type="float">
            <text:p>13</text:p>
          </table:table-cell>
          <table:table-cell table:style-name="ce690"/>
          <table:table-cell table:style-name="ce8" office:value-type="float" office:value="5" calcext:value-type="float">
            <text:p>5</text:p>
          </table:table-cell>
          <table:table-cell table:style-name="ce27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7" calcext:value-type="float">
            <text:p>7</text:p>
          </table:table-cell>
          <table:table-cell table:style-name="ce7" table:formula="of:=[.$X$4]" office:value-type="float" office:value="12" calcext:value-type="float">
            <text:p>12</text:p>
          </table:table-cell>
          <table:table-cell table:style-name="ce623"/>
          <table:table-cell table:style-name="ce866" table:formula="of:=COM.MICROSOFT.CONCAT(&quot;&quot;&quot;&quot;;[.$B$4]; &quot;&quot;&quot;: &quot;; [.B18])" office:value-type="string" office:string-value="&quot;10&quot;: 11" calcext:value-type="string">
            <text:p>"10": 11</text:p>
          </table:table-cell>
          <table:table-cell table:style-name="ce866" table:formula="of:=COM.MICROSOFT.CONCAT(&quot;&quot;&quot;&quot;;[.$C$4]; &quot;&quot;&quot;: &quot;; [.C18])" office:value-type="string" office:string-value="&quot;11&quot;: 3" calcext:value-type="string">
            <text:p>"11": 3</text:p>
          </table:table-cell>
          <table:table-cell table:style-name="ce866" table:formula="of:=COM.MICROSOFT.CONCAT(&quot;&quot;&quot;&quot;;[.$D$4]; &quot;&quot;&quot;: &quot;; [.D18])" office:value-type="string" office:string-value="&quot;12&quot;: 2" calcext:value-type="string">
            <text:p>"12": 2</text:p>
          </table:table-cell>
          <table:table-cell table:style-name="ce866" table:formula="of:=COM.MICROSOFT.CONCAT(&quot;&quot;&quot;&quot;;[.$E$4]; &quot;&quot;&quot;: &quot;; [.E18])" office:value-type="string" office:string-value="&quot;13&quot;: 1" calcext:value-type="string">
            <text:p>"13": 1</text:p>
          </table:table-cell>
          <table:table-cell table:style-name="ce866" table:formula="of:=COM.MICROSOFT.CONCAT(&quot;&quot;&quot;&quot;;[.$F$4]; &quot;&quot;&quot;: &quot;; [.F18])" office:value-type="string" office:string-value="&quot;14&quot;: 13" calcext:value-type="string">
            <text:p>"14": 13</text:p>
          </table:table-cell>
          <table:table-cell table:style-name="ce866"/>
          <table:table-cell table:style-name="ce866" table:formula="of:=COM.MICROSOFT.CONCAT(&quot;&quot;&quot;&quot;;[.$B$4]; &quot;&quot;&quot;: &quot;; [.H18])" office:value-type="string" office:string-value="&quot;10&quot;: 7" calcext:value-type="string">
            <text:p>"10": 7</text:p>
          </table:table-cell>
          <table:table-cell table:style-name="ce866" table:formula="of:=COM.MICROSOFT.CONCAT(&quot;&quot;&quot;&quot;;[.$C$4]; &quot;&quot;&quot;: &quot;; [.I18])" office:value-type="string" office:string-value="&quot;11&quot;: 10" calcext:value-type="string">
            <text:p>"11": 10</text:p>
          </table:table-cell>
          <table:table-cell table:style-name="ce866" table:formula="of:=COM.MICROSOFT.CONCAT(&quot;&quot;&quot;&quot;;[.$D$4]; &quot;&quot;&quot;: &quot;; [.J18])" office:value-type="string" office:string-value="&quot;12&quot;: 1" calcext:value-type="string">
            <text:p>"12": 1</text:p>
          </table:table-cell>
          <table:table-cell table:style-name="ce866" table:formula="of:=COM.MICROSOFT.CONCAT(&quot;&quot;&quot;&quot;;[.$E$4]; &quot;&quot;&quot;: &quot;; [.K18])" office:value-type="string" office:string-value="&quot;13&quot;: 2" calcext:value-type="string">
            <text:p>"13": 2</text:p>
          </table:table-cell>
          <table:table-cell table:style-name="ce866" table:formula="of:=COM.MICROSOFT.CONCAT(&quot;&quot;&quot;&quot;;[.$F$4]; &quot;&quot;&quot;: &quot;; [.L18])" office:value-type="string" office:string-value="&quot;14&quot;: 13" calcext:value-type="string">
            <text:p>"14": 13</text:p>
          </table:table-cell>
          <table:table-cell table:style-name="ce866"/>
          <table:table-cell table:style-name="ce866" table:formula="of:=COM.MICROSOFT.CONCAT(&quot;&quot;&quot;&quot;;[.$B$4]; &quot;&quot;&quot;: &quot;; [.N18])" office:value-type="string" office:string-value="&quot;10&quot;: 7" calcext:value-type="string">
            <text:p>"10": 7</text:p>
          </table:table-cell>
          <table:table-cell table:style-name="ce866" table:formula="of:=COM.MICROSOFT.CONCAT(&quot;&quot;&quot;&quot;;[.$C$4]; &quot;&quot;&quot;: &quot;; [.O18])" office:value-type="string" office:string-value="&quot;11&quot;: 2" calcext:value-type="string">
            <text:p>"11": 2</text:p>
          </table:table-cell>
          <table:table-cell table:style-name="ce866" table:formula="of:=COM.MICROSOFT.CONCAT(&quot;&quot;&quot;&quot;;[.$D$4]; &quot;&quot;&quot;: &quot;; [.P18])" office:value-type="string" office:string-value="&quot;12&quot;: 9" calcext:value-type="string">
            <text:p>"12": 9</text:p>
          </table:table-cell>
          <table:table-cell table:style-name="ce866" table:formula="of:=COM.MICROSOFT.CONCAT(&quot;&quot;&quot;&quot;;[.$E$4]; &quot;&quot;&quot;: &quot;; [.Q18])" office:value-type="string" office:string-value="&quot;13&quot;: 1" calcext:value-type="string">
            <text:p>"13": 1</text:p>
          </table:table-cell>
          <table:table-cell table:style-name="ce866" table:formula="of:=COM.MICROSOFT.CONCAT(&quot;&quot;&quot;&quot;;[.$F$4]; &quot;&quot;&quot;: &quot;; [.R18])" office:value-type="string" office:string-value="&quot;14&quot;: 13" calcext:value-type="string">
            <text:p>"14": 13</text:p>
          </table:table-cell>
          <table:table-cell table:style-name="ce866"/>
          <table:table-cell table:style-name="ce866" table:formula="of:=COM.MICROSOFT.CONCAT(&quot;&quot;&quot;&quot;;[.$B$4]; &quot;&quot;&quot;: &quot;; [.T18])" office:value-type="string" office:string-value="&quot;10&quot;: 6" calcext:value-type="string">
            <text:p>"10": 6</text:p>
          </table:table-cell>
          <table:table-cell table:style-name="ce866" table:formula="of:=COM.MICROSOFT.CONCAT(&quot;&quot;&quot;&quot;;[.$C$4]; &quot;&quot;&quot;: &quot;; [.U18])" office:value-type="string" office:string-value="&quot;11&quot;: 2" calcext:value-type="string">
            <text:p>"11": 2</text:p>
          </table:table-cell>
          <table:table-cell table:style-name="ce866" table:formula="of:=COM.MICROSOFT.CONCAT(&quot;&quot;&quot;&quot;;[.$D$4]; &quot;&quot;&quot;: &quot;; [.V18])" office:value-type="string" office:string-value="&quot;12&quot;: 1" calcext:value-type="string">
            <text:p>"12": 1</text:p>
          </table:table-cell>
          <table:table-cell table:style-name="ce866" table:formula="of:=COM.MICROSOFT.CONCAT(&quot;&quot;&quot;&quot;;[.$E$4]; &quot;&quot;&quot;: &quot;; [.W18])" office:value-type="string" office:string-value="&quot;13&quot;: 4" calcext:value-type="string">
            <text:p>"13": 4</text:p>
          </table:table-cell>
          <table:table-cell table:style-name="ce866" table:formula="of:=COM.MICROSOFT.CONCAT(&quot;&quot;&quot;&quot;;[.$F$4]; &quot;&quot;&quot;: &quot;; [.X18])" office:value-type="string" office:string-value="&quot;14&quot;: 13" calcext:value-type="string">
            <text:p>"14": 13</text:p>
          </table:table-cell>
          <table:table-cell table:style-name="ce866"/>
          <table:table-cell table:style-name="ce866" table:formula="of:=COM.MICROSOFT.CONCAT(&quot;&quot;&quot;&quot;;[.$B$4]; &quot;&quot;&quot;: &quot;; [.Z18])" office:value-type="string" office:string-value="&quot;10&quot;: 5" calcext:value-type="string">
            <text:p>"10": 5</text:p>
          </table:table-cell>
          <table:table-cell table:style-name="ce866" table:formula="of:=COM.MICROSOFT.CONCAT(&quot;&quot;&quot;&quot;;[.$C$4]; &quot;&quot;&quot;: &quot;; [.AA18])" office:value-type="string" office:string-value="&quot;11&quot;: 2" calcext:value-type="string">
            <text:p>"11": 2</text:p>
          </table:table-cell>
          <table:table-cell table:style-name="ce866" table:formula="of:=COM.MICROSOFT.CONCAT(&quot;&quot;&quot;&quot;;[.$D$4]; &quot;&quot;&quot;: &quot;; [.AB18])" office:value-type="string" office:string-value="&quot;12&quot;: 1" calcext:value-type="string">
            <text:p>"12": 1</text:p>
          </table:table-cell>
          <table:table-cell table:style-name="ce866" table:formula="of:=COM.MICROSOFT.CONCAT(&quot;&quot;&quot;&quot;;[.$E$4]; &quot;&quot;&quot;: &quot;; [.AC18])" office:value-type="string" office:string-value="&quot;13&quot;: 7" calcext:value-type="string">
            <text:p>"13": 7</text:p>
          </table:table-cell>
          <table:table-cell table:style-name="ce866" table:formula="of:=COM.MICROSOFT.CONCAT(&quot;&quot;&quot;&quot;;[.$F$4]; &quot;&quot;&quot;: &quot;; [.AD18])" office:value-type="string" office:string-value="&quot;14&quot;: 12" calcext:value-type="string">
            <text:p>"14": 12</text:p>
          </table:table-cell>
          <table:table-cell table:style-name="ce875" table:number-columns-repeated="2"/>
          <table:table-cell table:formula="of:=COM.MICROSOFT.CONCAT(&quot;&quot;&quot;7&quot;&quot;: { &quot;;COM.MICROSOFT.TEXTJOIN(&quot;, &quot;;TRUE();[.AR12:.AV14]);&quot;}&quot;)" office:value-type="string" office:string-value="&quot;7&quot;: { &quot;0&quot;: 14, &quot;1&quot;: 6, &quot;2&quot;: 4, &quot;3&quot;: 5, &quot;4&quot;: 11, &quot;5&quot;: 7, &quot;6&quot;: 2, &quot;7&quot;: 0, &quot;8&quot;: 1, &quot;9&quot;: 8, &quot;10&quot;: 12, &quot;11&quot;: 9, &quot;12&quot;: 10, &quot;13&quot;: 3, &quot;14&quot;: 13}" calcext:value-type="string">
            <text:p>"7": { "0": 14, "1": 6, "2": 4, "3": 5, "4": 11, "5": 7, "6": 2, "7": 0, "8": 1, "9": 8, "10": 12, "11": 9, "12": 10, "13": 3, "14": 13}</text:p>
          </table:table-cell>
          <table:table-cell table:number-columns-repeated="36"/>
        </table:table-row>
        <table:table-row table:style-name="ro2">
          <table:table-cell table:style-name="ce623"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ce802" office:value-type="string" calcext:value-type="string">
            <text:p><text:s text:c="43"/></text:p>
          </table:table-cell>
          <table:table-cell table:style-name="Default" table:number-columns-repeated="7"/>
          <table:table-cell table:number-columns-repeated="5"/>
          <table:table-cell table:style-name="ce864" table:number-columns-repeated="29"/>
          <table:table-cell table:style-name="ce875" table:number-columns-repeated="2"/>
          <table:table-cell table:formula="of:=COM.MICROSOFT.CONCAT(&quot;&quot;&quot;8&quot;&quot;: { &quot;;COM.MICROSOFT.TEXTJOIN(&quot;, &quot;;TRUE();[.AX12:.BB14]);&quot;}&quot;)" office:value-type="string" office:string-value="&quot;8&quot;: { &quot;0&quot;: 14, &quot;1&quot;: 4, &quot;2&quot;: 3, &quot;3&quot;: 6, &quot;4&quot;: 11, &quot;5&quot;: 7, &quot;6&quot;: 2, &quot;7&quot;: 1, &quot;8&quot;: 1, &quot;9&quot;: 8, &quot;10&quot;: 12, &quot;11&quot;: 9, &quot;12&quot;: 10, &quot;13&quot;: 5, &quot;14&quot;: 13}" calcext:value-type="string">
            <text:p>"8": { "0": 14, "1": 4, "2": 3, "3": 6, "4": 11, "5": 7, "6": 2, "7": 1, "8": 1, "9": 8, "10": 12, "11": 9, "12": 10, "13": 5, "14": 13}</text:p>
          </table:table-cell>
          <table:table-cell table:number-columns-repeated="36"/>
        </table:table-row>
        <table:table-row table:style-name="ro2">
          <table:table-cell table:style-name="ce623"/>
          <table:table-cell table:style-name="ce633" office:value-type="string" calcext:value-type="string" table:number-columns-spanned="29" table:number-rows-spanned="3">
            <text:p>uwuwuyuyuyuwuyuwyuwy</text:p>
          </table:table-cell>
          <table:covered-table-cell table:number-columns-repeated="28" table:style-name="ce634"/>
          <table:table-cell table:style-name="ce861"/>
          <table:table-cell table:style-name="ce867" table:formula="of:=COM.MICROSOFT.CONCAT(&quot;{&quot;; COM.MICROSOFT.TEXTJOIN(&quot;, &quot;;TRUE();[.BK14]; [.BK22]; [.BK30]);&quot;}&quot;)" office:value-type="string" office:string-value="{&quot;0&quot;: { &quot;0&quot;: 14, &quot;1&quot;: 1, &quot;2&quot;: 2, &quot;3&quot;: 3, &quot;4&quot;: 5, &quot;5&quot;: 9, &quot;6&quot;: 8, &quot;7&quot;: 7, &quot;8&quot;: 4, &quot;9&quot;: 6, &quot;10&quot;: 14, &quot;11&quot;: 13, &quot;12&quot;: 11, &quot;13&quot;: 10, &quot;14&quot;: 12}, &quot;1&quot;: { &quot;0&quot;: 14, &quot;1&quot;: 6, &quot;2&quot;: 1, &quot;3&quot;: 2, &quot;4&quot;: 8, &quot;5&quot;: 7, &quot;6&quot;: 5, &quot;7&quot;: 4, &quot;8&quot;: 3, &quot;9&quot;: 6, &quot;10&quot;: 11, &quot;11&quot;: 12, &quot;12&quot;: 10, &quot;13&quot;: 9, &quot;14&quot;: 13}, &quot;2&quot;: { &quot;0&quot;: 14, &quot;1&quot;: 2, &quot;2&quot;: 3, &quot;3&quot;: 1, &quot;4&quot;: 8, &quot;5&quot;: 7, &quot;6&quot;: 4, &quot;7&quot;: 5, &quot;8&quot;: 3, &quot;9&quot;: 6, &quot;10&quot;: 12, &quot;11&quot;: 10, &quot;12&quot;: 11, &quot;13&quot;: 9, &quot;14&quot;: 13}, &quot;3&quot;: { &quot;0&quot;: 14, &quot;1&quot;: 2, &quot;2&quot;: 1, &quot;3&quot;: 7, &quot;4&quot;: 8, &quot;5&quot;: 6, &quot;6&quot;: 3, &quot;7&quot;: 4, &quot;8&quot;: 5, &quot;9&quot;: 7, &quot;10&quot;: 12, &quot;11&quot;: 10, &quot;12&quot;: 9, &quot;13&quot;: 11, &quot;14&quot;: 13}, &quot;4&quot;: { &quot;0&quot;: 14, &quot;1&quot;: 2, &quot;2&quot;: 1, &quot;3&quot;: 5, &quot;4&quot;: 13, &quot;5&quot;: 6, &quot;6&quot;: 3, &quot;7&quot;: 4, &quot;8&quot;: 7, &quot;9&quot;: 8, &quot;10&quot;: 12, &quot;11&quot;: 10, &quot;12&quot;: 9, &quot;13&quot;: 11, &quot;14&quot;: 13}, &quot;5&quot;: { &quot;0&quot;: 14, &quot;1&quot;: 9, &quot;2&quot;: 4, &quot;3&quot;: 7, &quot;4&quot;: 11, &quot;5&quot;: 5, &quot;6&quot;: 3, &quot;7&quot;: 2, &quot;8&quot;: 1, &quot;9&quot;: 6, &quot;10&quot;: 12, &quot;11&quot;: 10, &quot;12&quot;: 8, &quot;13&quot;: 5, &quot;14&quot;: 13}, &quot;6&quot;: { &quot;0&quot;: 14, &quot;1&quot;: 10, &quot;2&quot;: 5, &quot;3&quot;: 11, &quot;4&quot;: 12, &quot;5&quot;: 7, &quot;6&quot;: 2, &quot;7&quot;: 1, &quot;8&quot;: 2, &quot;9&quot;: 6, &quot;10&quot;: 8, &quot;11&quot;: 9, &quot;12&quot;: 4, &quot;13&quot;: 3, &quot;14&quot;: 13}, &quot;7&quot;: { &quot;0&quot;: 14, &quot;1&quot;: 6, &quot;2&quot;: 4, &quot;3&quot;: 5, &quot;4&quot;: 11, &quot;5&quot;: 7, &quot;6&quot;: 2, &quot;7&quot;: 0, &quot;8&quot;: 1, &quot;9&quot;: 8, &quot;10&quot;: 12, &quot;11&quot;: 9, &quot;12&quot;: 10, &quot;13&quot;: 3, &quot;14&quot;: 13}, &quot;8&quot;: { &quot;0&quot;: 14, &quot;1&quot;: 4, &quot;2&quot;: 3, &quot;3&quot;: 6, &quot;4&quot;: 11, &quot;5&quot;: 7, &quot;6&quot;: 2, &quot;7&quot;: 1, &quot;8&quot;: 1, &quot;9&quot;: 8, &quot;10&quot;: 12, &quot;11&quot;: 9, &quot;12&quot;: 10, &quot;13&quot;: 5, &quot;14&quot;: 13}, &quot;9&quot;: { &quot;0&quot;: 14, &quot;1&quot;: 5, &quot;2&quot;: 3, &quot;3&quot;: 9, &quot;4&quot;: 11, &quot;5&quot;: 7, &quot;6&quot;: 2, &quot;7&quot;: 1, &quot;8&quot;: 4, &quot;9&quot;: 8, &quot;10&quot;: 12, &quot;11&quot;: 8, &quot;12&quot;: 6, &quot;13&quot;: 10, &quot;14&quot;: 13}, &quot;10&quot;: { &quot;0&quot;: 14, &quot;1&quot;: 11, &quot;2&quot;: 7, &quot;3&quot;: 9, &quot;4&quot;: 12, &quot;5&quot;: 10, &quot;6&quot;: 6, &quot;7&quot;: 4, &quot;8&quot;: 5, &quot;9&quot;: 8, &quot;10&quot;: 11, &quot;11&quot;: 3, &quot;12&quot;: 2, &quot;13&quot;: 1, &quot;14&quot;: 13}, &quot;11&quot;: { &quot;0&quot;: 14, &quot;1&quot;: 10, &quot;2&quot;: 6, &quot;3&quot;: 9, &quot;4&quot;: 12, &quot;5&quot;: 11, &quot;6&quot;: 5, &quot;7&quot;: 3, &quot;8&quot;: 4, &quot;9&quot;: 8, &quot;10&quot;: 7, &quot;11&quot;: 10, &quot;12&quot;: 1, &quot;13&quot;: 2, &quot;14&quot;: 13}, &quot;12&quot;: { &quot;0&quot;: 14, &quot;1&quot;: 11, &quot;2&quot;: 10, &quot;3&quot;: 9, &quot;4&quot;: 12, &quot;5&quot;: 8, &quot;6&quot;: 4, &quot;7&quot;: 5, &quot;8&quot;: 3, &quot;9&quot;: 6, &quot;10&quot;: 7, &quot;11&quot;: 2, &quot;12&quot;: 9, &quot;13&quot;: 1, &quot;14&quot;: 13}, &quot;13&quot;: { &quot;0&quot;: 14, &quot;1&quot;: 10, &quot;2&quot;: 8, &quot;3&quot;: 11, &quot;4&quot;: 12, &quot;5&quot;: 7, &quot;6&quot;: 4, &quot;7&quot;: 3, &quot;8&quot;: 5, &quot;9&quot;: 9, &quot;10&quot;: 6, &quot;11&quot;: 2, &quot;12&quot;: 1, &quot;13&quot;: 4, &quot;14&quot;: 13}, &quot;14&quot;: { &quot;0&quot;: 14, &quot;1&quot;: 13, &quot;2&quot;: 10, &quot;3&quot;: 12, &quot;4&quot;: 11, &quot;5&quot;: 6, &quot;6&quot;: 4, &quot;7&quot;: 3, &quot;8&quot;: 8, &quot;9&quot;: 9, &quot;10&quot;: 5, &quot;11&quot;: 2, &quot;12&quot;: 1, &quot;13&quot;: 7, &quot;14&quot;: 12}}" calcext:value-type="string" table:number-columns-spanned="29" table:number-rows-spanned="4">
            <text:p>{"0": { "0": 14, "1": 1, "2": 2, "3": 3, "4": 5, "5": 9, "6": 8, "7": 7, "8": 4, "9": 6, "10": 14, "11": 13, "12": 11, "13": 10, "14": 12}, "1": { "0": 14, "1": 6, "2": 1, "3": 2, "4": 8, "5": 7, "6": 5, "7": 4, "8": 3, "9": 6, "10": 11, "11": 12, "12": 10, "13": 9, "14": 13}, "2": { "0": 14, "1": 2, "2": 3, "3": 1, "4": 8, "5": 7, "6": 4, "7": 5, "8": 3, "9": 6, "10": 12, "11": 10, "12": 11, "13": 9, "14": 13}, "3": { "0": 14, "1": 2, "2": 1, "3": 7, "4": 8, "5": 6, "6": 3, "7": 4, "8": 5, "9": 7, "10": 12, "11": 10, "12": 9, "13": 11, "14": 13}, "4": { "0": 14, "1": 2, "2": 1, "3": 5, "4": 13, "5": 6, "6": 3, "7": 4, "8": 7, "9": 8, "10": 12, "11": 10, "12": 9, "13": 11, "14": 13}, "5": { "0": 14, "1": 9, "2": 4, "3": 7, "4": 11, "5": 5, "6": 3, "7": 2, "8": 1, "9": 6, "10": 12, "11": 10, "12": 8, "13": 5, "14": 13}, "6": { "0": 14, "1": 10, "2": 5, "3": 11, "4": 12, "5": 7, "6": 2, "7": 1, "8": 2, "9": 6, "10": 8, "11": 9, "12": 4, "13": 3, "14": 13}, "7": { "0": 14, "1": 6, "2": 4, "3": 5, "4": 11, "5": 7, "6": 2, "7": 0, "8": 1, "9": 8, "10": 12, "11": 9, "12": 10, "13": 3, "14": 13}, "8": { "0": 14, "1": 4, "2": 3, "3": 6, "4": 11, "5": 7, "6": 2, "7": 1, "8": 1, "9": 8, "10": 12, "11": 9, "12": 10, "13": 5, "14": 13}, "9": { "0": 14, "1": 5, "2": 3, "3": 9, "4": 11, "5": 7, "6": 2, "7": 1, "8": 4, "9": 8, "10": 12, "11": 8, "12": 6, "13": 10, "14": 13}, "10": { "0": 14, "1": 11, "2": 7, "3": 9, "4": 12, "5": 10, "6": 6, "7": 4, "8": 5, "9": 8, "10": 11, "11": 3, "12": 2, "13": 1, "14": 13}, "11": { "0": 14, "1": 10, "2": 6, "3": 9, "4": 12, "5": 11, "6": 5, "7": 3, "8": 4, "9": 8, "10": 7, "11": 10, "12": 1, "13": 2, "14": 13}, "12": { "0": 14, "1": 11, "2": 10, "3": 9, "4": 12, "5": 8, "6": 4, "7": 5, "8": 3, "9": 6, "10": 7, "11": 2, "12": 9, "13": 1, "14": 13}, "13": { "0": 14, "1": 10, "2": 8, "3": 11, "4": 12, "5": 7, "6": 4, "7": 3, "8": 5, "9": 9, "10": 6, "11": 2, "12": 1, "13": 4, "14": 13}, "14": { "0": 14, "1": 13, "2": 10, "3": 12, "4": 11, "5": 6, "6": 4, "7": 3, "8": 8, "9": 9, "10": 5, "11": 2, "12": 1, "13": 7, "14": 12}}</text:p>
          </table:table-cell>
          <table:covered-table-cell table:number-columns-repeated="28" table:style-name="ce868"/>
          <table:table-cell table:style-name="ce875" table:number-columns-repeated="2"/>
          <table:table-cell table:formula="of:=COM.MICROSOFT.CONCAT(&quot;&quot;&quot;9&quot;&quot;: { &quot;;COM.MICROSOFT.TEXTJOIN(&quot;, &quot;;TRUE();[.BD12:.BH14]);&quot;}&quot;)" office:value-type="string" office:string-value="&quot;9&quot;: { &quot;0&quot;: 14, &quot;1&quot;: 5, &quot;2&quot;: 3, &quot;3&quot;: 9, &quot;4&quot;: 11, &quot;5&quot;: 7, &quot;6&quot;: 2, &quot;7&quot;: 1, &quot;8&quot;: 4, &quot;9&quot;: 8, &quot;10&quot;: 12, &quot;11&quot;: 8, &quot;12&quot;: 6, &quot;13&quot;: 10, &quot;14&quot;: 13}" calcext:value-type="string">
            <text:p>"9": { "0": 14, "1": 5, "2": 3, "3": 9, "4": 11, "5": 7, "6": 2, "7": 1, "8": 4, "9": 8, "10": 12, "11": 8, "12": 6, "13": 10, "14": 13}</text:p>
          </table:table-cell>
          <table:table-cell table:number-columns-repeated="36"/>
        </table:table-row>
        <table:table-row table:style-name="ro2">
          <table:table-cell table:style-name="ce623"/>
          <table:covered-table-cell table:number-columns-repeated="29" table:style-name="ce634"/>
          <table:table-cell table:style-name="ce861"/>
          <table:covered-table-cell table:number-columns-repeated="29" table:style-name="ce868"/>
          <table:table-cell table:style-name="ce875" table:number-columns-repeated="2"/>
          <table:table-cell table:style-name="ce864"/>
          <table:table-cell table:number-columns-repeated="36"/>
        </table:table-row>
        <table:table-row table:style-name="ro2">
          <table:table-cell table:style-name="ce623"/>
          <table:covered-table-cell table:number-columns-repeated="29" table:style-name="ce634"/>
          <table:table-cell table:style-name="ce861"/>
          <table:covered-table-cell table:number-columns-repeated="29" table:style-name="ce868"/>
          <table:table-cell table:style-name="ce875" table:number-columns-repeated="2"/>
          <table:table-cell table:formula="of:=COM.MICROSOFT.TEXTJOIN(&quot;, &quot;;TRUE();[.BK16:.BK20])" office:value-type="string" office:string-value="&quot;5&quot;: { &quot;0&quot;: 14, &quot;1&quot;: 9, &quot;2&quot;: 4, &quot;3&quot;: 7, &quot;4&quot;: 11, &quot;5&quot;: 5, &quot;6&quot;: 3, &quot;7&quot;: 2, &quot;8&quot;: 1, &quot;9&quot;: 6, &quot;10&quot;: 12, &quot;11&quot;: 10, &quot;12&quot;: 8, &quot;13&quot;: 5, &quot;14&quot;: 13}, &quot;6&quot;: { &quot;0&quot;: 14, &quot;1&quot;: 10, &quot;2&quot;: 5, &quot;3&quot;: 11, &quot;4&quot;: 12, &quot;5&quot;: 7, &quot;6&quot;: 2, &quot;7&quot;: 1, &quot;8&quot;: 2, &quot;9&quot;: 6, &quot;10&quot;: 8, &quot;11&quot;: 9, &quot;12&quot;: 4, &quot;13&quot;: 3, &quot;14&quot;: 13}, &quot;7&quot;: { &quot;0&quot;: 14, &quot;1&quot;: 6, &quot;2&quot;: 4, &quot;3&quot;: 5, &quot;4&quot;: 11, &quot;5&quot;: 7, &quot;6&quot;: 2, &quot;7&quot;: 0, &quot;8&quot;: 1, &quot;9&quot;: 8, &quot;10&quot;: 12, &quot;11&quot;: 9, &quot;12&quot;: 10, &quot;13&quot;: 3, &quot;14&quot;: 13}, &quot;8&quot;: { &quot;0&quot;: 14, &quot;1&quot;: 4, &quot;2&quot;: 3, &quot;3&quot;: 6, &quot;4&quot;: 11, &quot;5&quot;: 7, &quot;6&quot;: 2, &quot;7&quot;: 1, &quot;8&quot;: 1, &quot;9&quot;: 8, &quot;10&quot;: 12, &quot;11&quot;: 9, &quot;12&quot;: 10, &quot;13&quot;: 5, &quot;14&quot;: 13}, &quot;9&quot;: { &quot;0&quot;: 14, &quot;1&quot;: 5, &quot;2&quot;: 3, &quot;3&quot;: 9, &quot;4&quot;: 11, &quot;5&quot;: 7, &quot;6&quot;: 2, &quot;7&quot;: 1, &quot;8&quot;: 4, &quot;9&quot;: 8, &quot;10&quot;: 12, &quot;11&quot;: 8, &quot;12&quot;: 6, &quot;13&quot;: 10, &quot;14&quot;: 13}" calcext:value-type="string">
            <text:p>"5": { "0": 14, "1": 9, "2": 4, "3": 7, "4": 11, "5": 5, "6": 3, "7": 2, "8": 1, "9": 6, "10": 12, "11": 10, "12": 8, "13": 5, "14": 13}, "6": { "0": 14, "1": 10, "2": 5, "3": 11, "4": 12, "5": 7, "6": 2, "7": 1, "8": 2, "9": 6, "10": 8, "11": 9, "12": 4, "13": 3, "14": 13}, "7": { "0": 14, "1": 6, "2": 4, "3": 5, "4": 11, "5": 7, "6": 2, "7": 0, "8": 1, "9": 8, "10": 12, "11": 9, "12": 10, "13": 3, "14": 13}, "8": { "0": 14, "1": 4, "2": 3, "3": 6, "4": 11, "5": 7, "6": 2, "7": 1, "8": 1, "9": 8, "10": 12, "11": 9, "12": 10, "13": 5, "14": 13}, "9": { "0": 14, "1": 5, "2": 3, "3": 9, "4": 11, "5": 7, "6": 2, "7": 1, "8": 4, "9": 8, "10": 12, "11": 8, "12": 6, "13": 10, "14": 13}</text:p>
          </table:table-cell>
          <table:table-cell table:number-columns-repeated="36"/>
        </table:table-row>
        <table:table-row table:style-name="ro2">
          <table:table-cell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Default" table:number-columns-repeated="8"/>
          <table:table-cell table:number-columns-repeated="5"/>
          <table:covered-table-cell table:number-columns-repeated="29" table:style-name="ce864"/>
          <table:table-cell table:style-name="ce875" table:number-columns-repeated="2"/>
          <table:table-cell table:style-name="ce864"/>
          <table:table-cell table:number-columns-repeated="36"/>
        </table:table-row>
        <table:table-row table:style-name="ro2">
          <table:table-cell/>
          <table:table-cell table:style-name="ce635" table:formula="of:=SUM([.B25:.F27])-[.B25]" office:value-type="float" office:value="41.3" calcext:value-type="float" table:number-columns-spanned="2" table:number-rows-spanned="1">
            <text:p>41.3</text:p>
          </table:table-cell>
          <table:covered-table-cell table:style-name="ce659"/>
          <table:table-cell table:style-name="ce659" table:number-columns-repeated="4"/>
          <table:table-cell table:style-name="ce691" table:formula="of:=SUM([.H25:.L27])-[.I25]" office:value-type="float" office:value="41.3" calcext:value-type="float" table:number-columns-spanned="2" table:number-rows-spanned="1">
            <text:p>41.3</text:p>
          </table:table-cell>
          <table:covered-table-cell table:style-name="ce659"/>
          <table:table-cell table:style-name="ce659" table:number-columns-repeated="4"/>
          <table:table-cell table:style-name="ce635" table:formula="of:=SUM([.N25:.R27])-[.P25]" office:value-type="float" office:value="41.3" calcext:value-type="float" table:number-columns-spanned="2" table:number-rows-spanned="1">
            <text:p>41.3</text:p>
          </table:table-cell>
          <table:covered-table-cell table:style-name="ce659"/>
          <table:table-cell table:style-name="ce659" table:number-columns-repeated="4"/>
          <table:table-cell table:style-name="ce691" table:formula="of:=SUM([.T25:.X27])-[.W25]" office:value-type="float" office:value="41.3" calcext:value-type="float" table:number-columns-spanned="2" table:number-rows-spanned="1">
            <text:p>41.3</text:p>
          </table:table-cell>
          <table:covered-table-cell table:style-name="ce659"/>
          <table:table-cell table:style-name="ce659" table:number-columns-repeated="4"/>
          <table:table-cell table:style-name="ce635" table:formula="of:=SUM([.Z25:.AD27])-[.AD25]" office:value-type="float" office:value="41.3" calcext:value-type="float" table:number-columns-spanned="2" table:number-rows-spanned="1">
            <text:p>41.3</text:p>
          </table:table-cell>
          <table:covered-table-cell table:style-name="ce659"/>
          <table:table-cell table:style-name="ce659" table:number-columns-repeated="3"/>
          <table:table-cell table:style-name="ce623"/>
          <table:table-cell table:number-columns-repeated="31"/>
          <table:table-cell table:formula="of:=COM.MICROSOFT.CONCAT(&quot;&quot;&quot;10&quot;&quot;: { &quot;;COM.MICROSOFT.TEXTJOIN(&quot;, &quot;;TRUE();[.AF16:.AJ18]);&quot;}&quot;)" office:value-type="string" office:string-value="&quot;10&quot;: { &quot;0&quot;: 14, &quot;1&quot;: 11, &quot;2&quot;: 7, &quot;3&quot;: 9, &quot;4&quot;: 12, &quot;5&quot;: 10, &quot;6&quot;: 6, &quot;7&quot;: 4, &quot;8&quot;: 5, &quot;9&quot;: 8, &quot;10&quot;: 11, &quot;11&quot;: 3, &quot;12&quot;: 2, &quot;13&quot;: 1, &quot;14&quot;: 13}" calcext:value-type="string">
            <text:p>"10": { "0": 14, "1": 11, "2": 7, "3": 9, "4": 12, "5": 10, "6": 6, "7": 4, "8": 5, "9": 8, "10": 11, "11": 3, "12": 2, "13": 1, "14": 13}</text:p>
          </table:table-cell>
          <table:table-cell table:number-columns-repeated="36"/>
        </table:table-row>
        <table:table-row table:style-name="ro1">
          <table:table-cell/>
          <table:table-cell table:style-name="ce571" table:formula="of:=HLOOKUP([.B8];[.$AF$25:.$AW$26];2;0)" office:value-type="float" office:value="5.1" calcext:value-type="float">
            <text:p>5.1</text:p>
          </table:table-cell>
          <table:table-cell table:style-name="ce593" table:formula="of:=HLOOKUP([.C8];[.$AF$25:.$AW$26];2;0)" office:value-type="float" office:value="1" calcext:value-type="float">
            <text:p>1.0</text:p>
          </table:table-cell>
          <table:table-cell table:style-name="ce600" table:formula="of:=HLOOKUP([.D8];[.$AF$25:.$AW$26];2;0)" office:value-type="float" office:value="1.1" calcext:value-type="float">
            <text:p>1.1</text:p>
          </table:table-cell>
          <table:table-cell table:style-name="ce613" table:formula="of:=HLOOKUP([.E8];[.$AF$25:.$AW$26];2;0)" office:value-type="float" office:value="1.2" calcext:value-type="float">
            <text:p>1.2</text:p>
          </table:table-cell>
          <table:table-cell table:style-name="ce613" table:formula="of:=HLOOKUP([.F8];[.$AF$25:.$AW$26];2;0)" office:value-type="float" office:value="2.1" calcext:value-type="float">
            <text:p>2.1</text:p>
          </table:table-cell>
          <table:table-cell/>
          <table:table-cell table:style-name="ce642" table:formula="of:=HLOOKUP([.H8];[.$AF$25:.$AW$26];2;0)" office:value-type="float" office:value="5.1" calcext:value-type="float">
            <text:p>5.1</text:p>
          </table:table-cell>
          <table:table-cell table:style-name="ce654" table:formula="of:=HLOOKUP([.I8];[.$AF$25:.$AW$26];2;0)" office:value-type="float" office:value="2.2" calcext:value-type="float">
            <text:p>2.2</text:p>
          </table:table-cell>
          <table:table-cell table:style-name="ce673" table:formula="of:=HLOOKUP([.J8];[.$AF$25:.$AW$26];2;0)" office:value-type="float" office:value="1" calcext:value-type="float">
            <text:p>1.0</text:p>
          </table:table-cell>
          <table:table-cell table:style-name="ce678" table:formula="of:=HLOOKUP([.K8];[.$AF$25:.$AW$26];2;0)" office:value-type="float" office:value="1.1" calcext:value-type="float">
            <text:p>1.1</text:p>
          </table:table-cell>
          <table:table-cell table:style-name="ce678" table:formula="of:=HLOOKUP([.L8];[.$AF$25:.$AW$26];2;0)" office:value-type="float" office:value="3.1" calcext:value-type="float">
            <text:p>3.1</text:p>
          </table:table-cell>
          <table:table-cell/>
          <table:table-cell table:style-name="ce696" table:formula="of:=HLOOKUP([.N8];[.$AF$25:.$AW$26];2;0)" office:value-type="float" office:value="5.1" calcext:value-type="float">
            <text:p>5.1</text:p>
          </table:table-cell>
          <table:table-cell table:style-name="ce715" table:formula="of:=HLOOKUP([.O8];[.$AF$25:.$AW$26];2;0)" office:value-type="float" office:value="1.1" calcext:value-type="float">
            <text:p>1.1</text:p>
          </table:table-cell>
          <table:table-cell table:style-name="ce720" table:formula="of:=HLOOKUP([.P8];[.$AF$25:.$AW$26];2;0)" office:value-type="float" office:value="1.2" calcext:value-type="float">
            <text:p>1.2</text:p>
          </table:table-cell>
          <table:table-cell table:style-name="ce726" table:formula="of:=HLOOKUP([.Q8];[.$AF$25:.$AW$26];2;0)" office:value-type="float" office:value="1" calcext:value-type="float">
            <text:p>1.0</text:p>
          </table:table-cell>
          <table:table-cell table:style-name="ce726" table:formula="of:=HLOOKUP([.R8];[.$AF$25:.$AW$26];2;0)" office:value-type="float" office:value="3.1" calcext:value-type="float">
            <text:p>3.1</text:p>
          </table:table-cell>
          <table:table-cell/>
          <table:table-cell table:style-name="ce739" table:formula="of:=HLOOKUP([.T8];[.$AF$25:.$AW$26];2;0)" office:value-type="float" office:value="5.1" calcext:value-type="float">
            <text:p>5.1</text:p>
          </table:table-cell>
          <table:table-cell table:style-name="ce748" table:formula="of:=HLOOKUP([.U8];[.$AF$25:.$AW$26];2;0)" office:value-type="float" office:value="1.1" calcext:value-type="float">
            <text:p>1.1</text:p>
          </table:table-cell>
          <table:table-cell table:style-name="ce752" table:formula="of:=HLOOKUP([.V8];[.$AF$25:.$AW$26];2;0)" office:value-type="float" office:value="1" calcext:value-type="float">
            <text:p>1.0</text:p>
          </table:table-cell>
          <table:table-cell table:style-name="ce755" table:formula="of:=HLOOKUP([.W8];[.$AF$25:.$AW$26];2;0)" office:value-type="float" office:value="3" calcext:value-type="float">
            <text:p>3.0</text:p>
          </table:table-cell>
          <table:table-cell table:style-name="ce756" table:formula="of:=HLOOKUP([.X8];[.$AF$25:.$AW$26];2;0)" office:value-type="float" office:value="3.1" calcext:value-type="float">
            <text:p>3.1</text:p>
          </table:table-cell>
          <table:table-cell/>
          <table:table-cell table:style-name="ce768" table:formula="of:=HLOOKUP([.Z8];[.$AF$25:.$AW$26];2;0)" office:value-type="float" office:value="5.1" calcext:value-type="float">
            <text:p>5.1</text:p>
          </table:table-cell>
          <table:table-cell table:style-name="ce775" table:formula="of:=HLOOKUP([.AA8];[.$AF$25:.$AW$26];2;0)" office:value-type="float" office:value="1.1" calcext:value-type="float">
            <text:p>1.1</text:p>
          </table:table-cell>
          <table:table-cell table:style-name="ce778" table:formula="of:=HLOOKUP([.AB8];[.$AF$25:.$AW$26];2;0)" office:value-type="float" office:value="1" calcext:value-type="float">
            <text:p>1.0</text:p>
          </table:table-cell>
          <table:table-cell table:style-name="ce783" table:formula="of:=HLOOKUP([.AC8];[.$AF$25:.$AW$26];2;0)" office:value-type="float" office:value="2.1" calcext:value-type="float">
            <text:p>2.1</text:p>
          </table:table-cell>
          <table:table-cell table:style-name="ce789" table:formula="of:=HLOOKUP([.AD8];[.$AF$25:.$AW$26];2;0)" office:value-type="float" office:value="5" calcext:value-type="float">
            <text:p>5.0</text:p>
          </table:table-cell>
          <table:table-cell table:style-name="ce623"/>
          <table:table-cell table:style-name="ce803" office:value-type="float" office:value="0" calcext:value-type="float">
            <text:p>0</text:p>
          </table:table-cell>
          <table:table-cell table:style-name="ce803" office:value-type="float" office:value="1" calcext:value-type="float">
            <text:p>1</text:p>
          </table:table-cell>
          <table:table-cell table:style-name="ce803" office:value-type="float" office:value="2" calcext:value-type="float">
            <text:p>2</text:p>
          </table:table-cell>
          <table:table-cell table:style-name="ce803" office:value-type="float" office:value="3" calcext:value-type="float">
            <text:p>3</text:p>
          </table:table-cell>
          <table:table-cell table:style-name="ce803" office:value-type="float" office:value="4" calcext:value-type="float">
            <text:p>4</text:p>
          </table:table-cell>
          <table:table-cell table:style-name="ce803" office:value-type="float" office:value="5" calcext:value-type="float">
            <text:p>5</text:p>
          </table:table-cell>
          <table:table-cell table:style-name="ce803" office:value-type="float" office:value="6" calcext:value-type="float">
            <text:p>6</text:p>
          </table:table-cell>
          <table:table-cell table:style-name="ce803" office:value-type="float" office:value="7" calcext:value-type="float">
            <text:p>7</text:p>
          </table:table-cell>
          <table:table-cell table:style-name="ce803" office:value-type="float" office:value="8" calcext:value-type="float">
            <text:p>8</text:p>
          </table:table-cell>
          <table:table-cell table:style-name="ce803" office:value-type="float" office:value="9" calcext:value-type="float">
            <text:p>9</text:p>
          </table:table-cell>
          <table:table-cell table:style-name="ce803" office:value-type="float" office:value="10" calcext:value-type="float">
            <text:p>10</text:p>
          </table:table-cell>
          <table:table-cell table:style-name="ce803" office:value-type="float" office:value="11" calcext:value-type="float">
            <text:p>11</text:p>
          </table:table-cell>
          <table:table-cell table:style-name="ce803" office:value-type="float" office:value="12" calcext:value-type="float">
            <text:p>12</text:p>
          </table:table-cell>
          <table:table-cell table:style-name="ce803" office:value-type="float" office:value="13" calcext:value-type="float">
            <text:p>13</text:p>
          </table:table-cell>
          <table:table-cell table:style-name="ce803" office:value-type="float" office:value="14" calcext:value-type="float">
            <text:p>14</text:p>
          </table:table-cell>
          <table:table-cell table:number-columns-repeated="16"/>
          <table:table-cell table:formula="of:=COM.MICROSOFT.CONCAT(&quot;&quot;&quot;11&quot;&quot;: { &quot;;COM.MICROSOFT.TEXTJOIN(&quot;, &quot;;TRUE();[.AL16:.AP18]);&quot;}&quot;)" office:value-type="string" office:string-value="&quot;11&quot;: { &quot;0&quot;: 14, &quot;1&quot;: 10, &quot;2&quot;: 6, &quot;3&quot;: 9, &quot;4&quot;: 12, &quot;5&quot;: 11, &quot;6&quot;: 5, &quot;7&quot;: 3, &quot;8&quot;: 4, &quot;9&quot;: 8, &quot;10&quot;: 7, &quot;11&quot;: 10, &quot;12&quot;: 1, &quot;13&quot;: 2, &quot;14&quot;: 13}" calcext:value-type="string">
            <text:p>"11": { "0": 14, "1": 10, "2": 6, "3": 9, "4": 12, "5": 11, "6": 5, "7": 3, "8": 4, "9": 8, "10": 7, "11": 10, "12": 1, "13": 2, "14": 13}</text:p>
          </table:table-cell>
          <table:table-cell table:number-columns-repeated="36"/>
        </table:table-row>
        <table:table-row table:style-name="ro1">
          <table:table-cell/>
          <table:table-cell table:style-name="ce572" table:formula="of:=HLOOKUP([.B9];[.$AF$25:.$AW$26];2;0)" office:value-type="float" office:value="3.2" calcext:value-type="float">
            <text:p>3.2</text:p>
          </table:table-cell>
          <table:table-cell table:style-name="ce593" table:formula="of:=HLOOKUP([.C9];[.$AF$25:.$AW$26];2;0)" office:value-type="float" office:value="3.1" calcext:value-type="float">
            <text:p>3.1</text:p>
          </table:table-cell>
          <table:table-cell table:style-name="ce600" table:formula="of:=HLOOKUP([.D9];[.$AF$25:.$AW$26];2;0)" office:value-type="float" office:value="3" calcext:value-type="float">
            <text:p>3.0</text:p>
          </table:table-cell>
          <table:table-cell table:style-name="ce613" table:formula="of:=HLOOKUP([.E9];[.$AF$25:.$AW$26];2;0)" office:value-type="float" office:value="2" calcext:value-type="float">
            <text:p>2.0</text:p>
          </table:table-cell>
          <table:table-cell table:style-name="ce613" table:formula="of:=HLOOKUP([.F9];[.$AF$25:.$AW$26];2;0)" office:value-type="float" office:value="2.2" calcext:value-type="float">
            <text:p>2.2</text:p>
          </table:table-cell>
          <table:table-cell/>
          <table:table-cell table:style-name="ce643" table:formula="of:=HLOOKUP([.H9];[.$AF$25:.$AW$26];2;0)" office:value-type="float" office:value="3" calcext:value-type="float">
            <text:p>3.0</text:p>
          </table:table-cell>
          <table:table-cell table:style-name="ce655" table:formula="of:=HLOOKUP([.I9];[.$AF$25:.$AW$26];2;0)" office:value-type="float" office:value="2.1" calcext:value-type="float">
            <text:p>2.1</text:p>
          </table:table-cell>
          <table:table-cell table:style-name="ce673" table:formula="of:=HLOOKUP([.J9];[.$AF$25:.$AW$26];2;0)" office:value-type="float" office:value="2" calcext:value-type="float">
            <text:p>2.0</text:p>
          </table:table-cell>
          <table:table-cell table:style-name="ce678" table:formula="of:=HLOOKUP([.K9];[.$AF$25:.$AW$26];2;0)" office:value-type="float" office:value="1.2" calcext:value-type="float">
            <text:p>1.2</text:p>
          </table:table-cell>
          <table:table-cell table:style-name="ce678" table:formula="of:=HLOOKUP([.L9];[.$AF$25:.$AW$26];2;0)" office:value-type="float" office:value="2.2" calcext:value-type="float">
            <text:p>2.2</text:p>
          </table:table-cell>
          <table:table-cell/>
          <table:table-cell table:style-name="ce701" table:formula="of:=HLOOKUP([.N9];[.$AF$25:.$AW$26];2;0)" office:value-type="float" office:value="3" calcext:value-type="float">
            <text:p>3.0</text:p>
          </table:table-cell>
          <table:table-cell table:style-name="ce715" table:formula="of:=HLOOKUP([.O9];[.$AF$25:.$AW$26];2;0)" office:value-type="float" office:value="2" calcext:value-type="float">
            <text:p>2.0</text:p>
          </table:table-cell>
          <table:table-cell table:style-name="ce721" table:formula="of:=HLOOKUP([.P9];[.$AF$25:.$AW$26];2;0)" office:value-type="float" office:value="2.1" calcext:value-type="float">
            <text:p>2.1</text:p>
          </table:table-cell>
          <table:table-cell table:style-name="ce726" table:formula="of:=HLOOKUP([.Q9];[.$AF$25:.$AW$26];2;0)" office:value-type="float" office:value="1.2" calcext:value-type="float">
            <text:p>1.2</text:p>
          </table:table-cell>
          <table:table-cell table:style-name="ce726" table:formula="of:=HLOOKUP([.R9];[.$AF$25:.$AW$26];2;0)" office:value-type="float" office:value="2.2" calcext:value-type="float">
            <text:p>2.2</text:p>
          </table:table-cell>
          <table:table-cell/>
          <table:table-cell table:style-name="ce740" table:formula="of:=HLOOKUP([.T9];[.$AF$25:.$AW$26];2;0)" office:value-type="float" office:value="2.2" calcext:value-type="float">
            <text:p>2.2</text:p>
          </table:table-cell>
          <table:table-cell table:style-name="ce748" table:formula="of:=HLOOKUP([.U9];[.$AF$25:.$AW$26];2;0)" office:value-type="float" office:value="1.2" calcext:value-type="float">
            <text:p>1.2</text:p>
          </table:table-cell>
          <table:table-cell table:style-name="ce752" table:formula="of:=HLOOKUP([.V9];[.$AF$25:.$AW$26];2;0)" office:value-type="float" office:value="2" calcext:value-type="float">
            <text:p>2.0</text:p>
          </table:table-cell>
          <table:table-cell table:style-name="ce756" table:formula="of:=HLOOKUP([.W9];[.$AF$25:.$AW$26];2;0)" office:value-type="float" office:value="2.1" calcext:value-type="float">
            <text:p>2.1</text:p>
          </table:table-cell>
          <table:table-cell table:style-name="ce756" table:formula="of:=HLOOKUP([.X9];[.$AF$25:.$AW$26];2;0)" office:value-type="float" office:value="3" calcext:value-type="float">
            <text:p>3.0</text:p>
          </table:table-cell>
          <table:table-cell/>
          <table:table-cell table:style-name="ce769" table:formula="of:=HLOOKUP([.Z9];[.$AF$25:.$AW$26];2;0)" office:value-type="float" office:value="2.2" calcext:value-type="float">
            <text:p>2.2</text:p>
          </table:table-cell>
          <table:table-cell table:style-name="ce775" table:formula="of:=HLOOKUP([.AA9];[.$AF$25:.$AW$26];2;0)" office:value-type="float" office:value="1.2" calcext:value-type="float">
            <text:p>1.2</text:p>
          </table:table-cell>
          <table:table-cell table:style-name="ce778" table:formula="of:=HLOOKUP([.AB9];[.$AF$25:.$AW$26];2;0)" office:value-type="float" office:value="2" calcext:value-type="float">
            <text:p>2.0</text:p>
          </table:table-cell>
          <table:table-cell table:style-name="ce783" table:formula="of:=HLOOKUP([.AC9];[.$AF$25:.$AW$26];2;0)" office:value-type="float" office:value="3" calcext:value-type="float">
            <text:p>3.0</text:p>
          </table:table-cell>
          <table:table-cell table:style-name="ce783" table:formula="of:=HLOOKUP([.AD9];[.$AF$25:.$AW$26];2;0)" office:value-type="float" office:value="3.1" calcext:value-type="float">
            <text:p>3.1</text:p>
          </table:table-cell>
          <table:table-cell table:style-name="ce623"/>
          <table:table-cell table:number-columns-repeated="2" table:style-name="ce804" office:value-type="float" office:value="1" calcext:value-type="float">
            <text:p>1.0</text:p>
          </table:table-cell>
          <table:table-cell table:style-name="ce804" office:value-type="float" office:value="1.1" calcext:value-type="float">
            <text:p>1.1</text:p>
          </table:table-cell>
          <table:table-cell table:style-name="ce804" office:value-type="float" office:value="1.2" calcext:value-type="float">
            <text:p>1.2</text:p>
          </table:table-cell>
          <table:table-cell table:style-name="ce804" office:value-type="float" office:value="2" calcext:value-type="float">
            <text:p>2.0</text:p>
          </table:table-cell>
          <table:table-cell table:style-name="ce804" office:value-type="float" office:value="2.1" calcext:value-type="float">
            <text:p>2.1</text:p>
          </table:table-cell>
          <table:table-cell table:style-name="ce804" office:value-type="float" office:value="2.2" calcext:value-type="float">
            <text:p>2.2</text:p>
          </table:table-cell>
          <table:table-cell table:style-name="ce804" office:value-type="float" office:value="3" calcext:value-type="float">
            <text:p>3.0</text:p>
          </table:table-cell>
          <table:table-cell table:style-name="ce804" office:value-type="float" office:value="3.1" calcext:value-type="float">
            <text:p>3.1</text:p>
          </table:table-cell>
          <table:table-cell table:style-name="ce804" office:value-type="float" office:value="3.2" calcext:value-type="float">
            <text:p>3.2</text:p>
          </table:table-cell>
          <table:table-cell table:style-name="ce804" office:value-type="float" office:value="4" calcext:value-type="float">
            <text:p>4.0</text:p>
          </table:table-cell>
          <table:table-cell table:style-name="ce804" office:value-type="float" office:value="4.1" calcext:value-type="float">
            <text:p>4.1</text:p>
          </table:table-cell>
          <table:table-cell table:style-name="ce804" office:value-type="float" office:value="4.2" calcext:value-type="float">
            <text:p>4.2</text:p>
          </table:table-cell>
          <table:table-cell table:style-name="ce804" office:value-type="float" office:value="5" calcext:value-type="float">
            <text:p>5.0</text:p>
          </table:table-cell>
          <table:table-cell table:style-name="ce804" office:value-type="float" office:value="5.1" calcext:value-type="float">
            <text:p>5.1</text:p>
          </table:table-cell>
          <table:table-cell table:number-columns-repeated="16"/>
          <table:table-cell table:formula="of:=COM.MICROSOFT.CONCAT(&quot;&quot;&quot;12&quot;&quot;: { &quot;;COM.MICROSOFT.TEXTJOIN(&quot;, &quot;;TRUE();[.AR16:.AV18]);&quot;}&quot;)" office:value-type="string" office:string-value="&quot;12&quot;: { &quot;0&quot;: 14, &quot;1&quot;: 11, &quot;2&quot;: 10, &quot;3&quot;: 9, &quot;4&quot;: 12, &quot;5&quot;: 8, &quot;6&quot;: 4, &quot;7&quot;: 5, &quot;8&quot;: 3, &quot;9&quot;: 6, &quot;10&quot;: 7, &quot;11&quot;: 2, &quot;12&quot;: 9, &quot;13&quot;: 1, &quot;14&quot;: 13}" calcext:value-type="string">
            <text:p>"12": { "0": 14, "1": 11, "2": 10, "3": 9, "4": 12, "5": 8, "6": 4, "7": 5, "8": 3, "9": 6, "10": 7, "11": 2, "12": 9, "13": 1, "14": 13}</text:p>
          </table:table-cell>
          <table:table-cell table:number-columns-repeated="36"/>
        </table:table-row>
        <table:table-row table:style-name="ro1">
          <table:table-cell/>
          <table:table-cell table:style-name="ce572" table:formula="of:=HLOOKUP([.B10];[.$AF$25:.$AW$26];2;0)" office:value-type="float" office:value="5.1" calcext:value-type="float">
            <text:p>5.1</text:p>
          </table:table-cell>
          <table:table-cell table:style-name="ce593" table:formula="of:=HLOOKUP([.C10];[.$AF$25:.$AW$26];2;0)" office:value-type="float" office:value="5" calcext:value-type="float">
            <text:p>5.0</text:p>
          </table:table-cell>
          <table:table-cell table:style-name="ce600" table:formula="of:=HLOOKUP([.D10];[.$AF$25:.$AW$26];2;0)" office:value-type="float" office:value="4.1" calcext:value-type="float">
            <text:p>4.1</text:p>
          </table:table-cell>
          <table:table-cell table:style-name="ce613" table:formula="of:=HLOOKUP([.E10];[.$AF$25:.$AW$26];2;0)" office:value-type="float" office:value="4" calcext:value-type="float">
            <text:p>4.0</text:p>
          </table:table-cell>
          <table:table-cell table:style-name="ce613" table:formula="of:=HLOOKUP([.F10];[.$AF$25:.$AW$26];2;0)" office:value-type="float" office:value="4.2" calcext:value-type="float">
            <text:p>4.2</text:p>
          </table:table-cell>
          <table:table-cell/>
          <table:table-cell table:style-name="ce643" table:formula="of:=HLOOKUP([.H10];[.$AF$25:.$AW$26];2;0)" office:value-type="float" office:value="4.1" calcext:value-type="float">
            <text:p>4.1</text:p>
          </table:table-cell>
          <table:table-cell table:style-name="ce655" table:formula="of:=HLOOKUP([.I10];[.$AF$25:.$AW$26];2;0)" office:value-type="float" office:value="4.2" calcext:value-type="float">
            <text:p>4.2</text:p>
          </table:table-cell>
          <table:table-cell table:style-name="ce673" table:formula="of:=HLOOKUP([.J10];[.$AF$25:.$AW$26];2;0)" office:value-type="float" office:value="4" calcext:value-type="float">
            <text:p>4.0</text:p>
          </table:table-cell>
          <table:table-cell table:style-name="ce678" table:formula="of:=HLOOKUP([.K10];[.$AF$25:.$AW$26];2;0)" office:value-type="float" office:value="3.2" calcext:value-type="float">
            <text:p>3.2</text:p>
          </table:table-cell>
          <table:table-cell table:style-name="ce678" table:formula="of:=HLOOKUP([.L10];[.$AF$25:.$AW$26];2;0)" office:value-type="float" office:value="5" calcext:value-type="float">
            <text:p>5.0</text:p>
          </table:table-cell>
          <table:table-cell/>
          <table:table-cell table:style-name="ce701" table:formula="of:=HLOOKUP([.N10];[.$AF$25:.$AW$26];2;0)" office:value-type="float" office:value="4.2" calcext:value-type="float">
            <text:p>4.2</text:p>
          </table:table-cell>
          <table:table-cell table:style-name="ce715" table:formula="of:=HLOOKUP([.O10];[.$AF$25:.$AW$26];2;0)" office:value-type="float" office:value="4" calcext:value-type="float">
            <text:p>4.0</text:p>
          </table:table-cell>
          <table:table-cell table:style-name="ce721" table:formula="of:=HLOOKUP([.P10];[.$AF$25:.$AW$26];2;0)" office:value-type="float" office:value="4.1" calcext:value-type="float">
            <text:p>4.1</text:p>
          </table:table-cell>
          <table:table-cell table:style-name="ce726" table:formula="of:=HLOOKUP([.Q10];[.$AF$25:.$AW$26];2;0)" office:value-type="float" office:value="3.2" calcext:value-type="float">
            <text:p>3.2</text:p>
          </table:table-cell>
          <table:table-cell table:style-name="ce726" table:formula="of:=HLOOKUP([.R10];[.$AF$25:.$AW$26];2;0)" office:value-type="float" office:value="5" calcext:value-type="float">
            <text:p>5.0</text:p>
          </table:table-cell>
          <table:table-cell/>
          <table:table-cell table:style-name="ce740" table:formula="of:=HLOOKUP([.T10];[.$AF$25:.$AW$26];2;0)" office:value-type="float" office:value="4.2" calcext:value-type="float">
            <text:p>4.2</text:p>
          </table:table-cell>
          <table:table-cell table:style-name="ce748" table:formula="of:=HLOOKUP([.U10];[.$AF$25:.$AW$26];2;0)" office:value-type="float" office:value="4" calcext:value-type="float">
            <text:p>4.0</text:p>
          </table:table-cell>
          <table:table-cell table:style-name="ce752" table:formula="of:=HLOOKUP([.V10];[.$AF$25:.$AW$26];2;0)" office:value-type="float" office:value="3.2" calcext:value-type="float">
            <text:p>3.2</text:p>
          </table:table-cell>
          <table:table-cell table:style-name="ce756" table:formula="of:=HLOOKUP([.W10];[.$AF$25:.$AW$26];2;0)" office:value-type="float" office:value="4.1" calcext:value-type="float">
            <text:p>4.1</text:p>
          </table:table-cell>
          <table:table-cell table:style-name="ce756" table:formula="of:=HLOOKUP([.X10];[.$AF$25:.$AW$26];2;0)" office:value-type="float" office:value="5" calcext:value-type="float">
            <text:p>5.0</text:p>
          </table:table-cell>
          <table:table-cell/>
          <table:table-cell table:style-name="ce769" table:formula="of:=HLOOKUP([.Z10];[.$AF$25:.$AW$26];2;0)" office:value-type="float" office:value="4.2" calcext:value-type="float">
            <text:p>4.2</text:p>
          </table:table-cell>
          <table:table-cell table:style-name="ce775" table:formula="of:=HLOOKUP([.AA10];[.$AF$25:.$AW$26];2;0)" office:value-type="float" office:value="4" calcext:value-type="float">
            <text:p>4.0</text:p>
          </table:table-cell>
          <table:table-cell table:style-name="ce778" table:formula="of:=HLOOKUP([.AB10];[.$AF$25:.$AW$26];2;0)" office:value-type="float" office:value="3.2" calcext:value-type="float">
            <text:p>3.2</text:p>
          </table:table-cell>
          <table:table-cell table:style-name="ce783" table:formula="of:=HLOOKUP([.AC10];[.$AF$25:.$AW$26];2;0)" office:value-type="float" office:value="4.1" calcext:value-type="float">
            <text:p>4.1</text:p>
          </table:table-cell>
          <table:table-cell table:style-name="ce783" table:formula="of:=HLOOKUP([.AD10];[.$AF$25:.$AW$26];2;0)" office:value-type="float" office:value="5" calcext:value-type="float">
            <text:p>5.0</text:p>
          </table:table-cell>
          <table:table-cell table:style-name="ce623"/>
          <table:table-cell table:number-columns-repeated="9"/>
          <table:table-cell table:style-name="ce805" table:number-columns-repeated="15"/>
          <table:table-cell table:number-columns-repeated="7"/>
          <table:table-cell table:formula="of:=COM.MICROSOFT.CONCAT(&quot;&quot;&quot;13&quot;&quot;: { &quot;;COM.MICROSOFT.TEXTJOIN(&quot;, &quot;;TRUE();[.AX16:.BB18]);&quot;}&quot;)" office:value-type="string" office:string-value="&quot;13&quot;: { &quot;0&quot;: 14, &quot;1&quot;: 10, &quot;2&quot;: 8, &quot;3&quot;: 11, &quot;4&quot;: 12, &quot;5&quot;: 7, &quot;6&quot;: 4, &quot;7&quot;: 3, &quot;8&quot;: 5, &quot;9&quot;: 9, &quot;10&quot;: 6, &quot;11&quot;: 2, &quot;12&quot;: 1, &quot;13&quot;: 4, &quot;14&quot;: 13}" calcext:value-type="string">
            <text:p>"13": { "0": 14, "1": 10, "2": 8, "3": 11, "4": 12, "5": 7, "6": 4, "7": 3, "8": 5, "9": 9, "10": 6, "11": 2, "12": 1, "13": 4, "14": 13}</text:p>
          </table:table-cell>
          <table:table-cell table:number-columns-repeated="36"/>
        </table:table-row>
        <table:table-row table:style-name="ro1">
          <table:table-cell/>
          <table:table-cell table:style-name="ce639" table:number-columns-repeated="29"/>
          <table:table-cell table:style-name="ce623"/>
          <table:table-cell table:style-name="ce864" table:formula="of:=COM.MICROSOFT.TEXTJOIN(&quot;, &quot;;TRUE();[.AF26:.AT26])" office:value-type="string" office:string-value="1, 1, 1.1, 1.2, 2, 2.1, 2.2, 3, 3.1, 3.2, 4, 4.1, 4.2, 5, 5.1" calcext:value-type="string">
            <text:p>1, 1, 1.1, 1.2, 2, 2.1, 2.2, 3, 3.1, 3.2, 4, 4.1, 4.2, 5, 5.1</text:p>
          </table:table-cell>
          <table:table-cell table:number-columns-repeated="30"/>
          <table:table-cell table:formula="of:=COM.MICROSOFT.CONCAT(&quot;&quot;&quot;14&quot;&quot;: { &quot;;COM.MICROSOFT.TEXTJOIN(&quot;, &quot;;TRUE();[.BD16:.BH18]);&quot;}&quot;)" office:value-type="string" office:string-value="&quot;14&quot;: { &quot;0&quot;: 14, &quot;1&quot;: 13, &quot;2&quot;: 10, &quot;3&quot;: 12, &quot;4&quot;: 11, &quot;5&quot;: 6, &quot;6&quot;: 4, &quot;7&quot;: 3, &quot;8&quot;: 8, &quot;9&quot;: 9, &quot;10&quot;: 5, &quot;11&quot;: 2, &quot;12&quot;: 1, &quot;13&quot;: 7, &quot;14&quot;: 12}" calcext:value-type="string">
            <text:p>"14": { "0": 14, "1": 13, "2": 10, "3": 12, "4": 11, "5": 6, "6": 4, "7": 3, "8": 8, "9": 9, "10": 5, "11": 2, "12": 1, "13": 7, "14": 12}</text:p>
          </table:table-cell>
          <table:table-cell table:number-columns-repeated="36"/>
        </table:table-row>
        <table:table-row table:style-name="ro1">
          <table:table-cell/>
          <table:table-cell table:style-name="ce640" table:formula="of:=SUM([.B30:.F32])-[.B31]" office:value-type="float" office:value="41.3" calcext:value-type="float" table:number-columns-spanned="2" table:number-rows-spanned="1">
            <text:p>41.3</text:p>
          </table:table-cell>
          <table:covered-table-cell table:style-name="ce647"/>
          <table:table-cell table:style-name="ce647" table:number-columns-repeated="3"/>
          <table:table-cell/>
          <table:table-cell table:style-name="ce640" table:formula="of:=SUM([.H30:.L32])-[.I31]" office:value-type="float" office:value="41.3" calcext:value-type="float" table:number-columns-spanned="2" table:number-rows-spanned="1">
            <text:p>41.3</text:p>
          </table:table-cell>
          <table:covered-table-cell table:style-name="ce647"/>
          <table:table-cell table:style-name="ce647" table:number-columns-repeated="3"/>
          <table:table-cell/>
          <table:table-cell table:style-name="ce640" table:formula="of:=SUM([.N30:.R32])-[.P31]" office:value-type="float" office:value="41.3" calcext:value-type="float" table:number-columns-spanned="2" table:number-rows-spanned="1">
            <text:p>41.3</text:p>
          </table:table-cell>
          <table:covered-table-cell table:style-name="ce647"/>
          <table:table-cell table:style-name="ce647" table:number-columns-repeated="3"/>
          <table:table-cell/>
          <table:table-cell table:style-name="ce640" table:formula="of:=SUM([.T30:.X32])-[.W31]" office:value-type="float" office:value="41.3" calcext:value-type="float" table:number-columns-spanned="2" table:number-rows-spanned="1">
            <text:p>41.3</text:p>
          </table:table-cell>
          <table:covered-table-cell table:style-name="ce647"/>
          <table:table-cell table:style-name="ce647" table:number-columns-repeated="3"/>
          <table:table-cell/>
          <table:table-cell table:style-name="ce640" table:formula="of:=SUM([.Z30:.AD32])-[.AD31]" office:value-type="float" office:value="41.3" calcext:value-type="float" table:number-columns-spanned="2" table:number-rows-spanned="1">
            <text:p>41.3</text:p>
          </table:table-cell>
          <table:covered-table-cell table:style-name="ce647"/>
          <table:table-cell table:style-name="ce647" table:number-columns-repeated="3"/>
          <table:table-cell table:style-name="ce623"/>
          <table:table-cell table:number-columns-repeated="68"/>
        </table:table-row>
        <table:table-row table:style-name="ro1">
          <table:table-cell/>
          <table:table-cell table:style-name="ce575" table:formula="of:=HLOOKUP([.B12];[.$AF$25:.$AW$26];2;0)" office:value-type="float" office:value="5.1" calcext:value-type="float">
            <text:p>5.1</text:p>
          </table:table-cell>
          <table:table-cell table:style-name="ce595" table:formula="of:=HLOOKUP([.C12];[.$AF$25:.$AW$26];2;0)" office:value-type="float" office:value="3.2" calcext:value-type="float">
            <text:p>3.2</text:p>
          </table:table-cell>
          <table:table-cell table:style-name="ce601" table:formula="of:=HLOOKUP([.D12];[.$AF$25:.$AW$26];2;0)" office:value-type="float" office:value="2" calcext:value-type="float">
            <text:p>2.0</text:p>
          </table:table-cell>
          <table:table-cell table:style-name="ce614" table:formula="of:=HLOOKUP([.E12];[.$AF$25:.$AW$26];2;0)" office:value-type="float" office:value="3" calcext:value-type="float">
            <text:p>3.0</text:p>
          </table:table-cell>
          <table:table-cell table:style-name="ce614" table:formula="of:=HLOOKUP([.F12];[.$AF$25:.$AW$26];2;0)" office:value-type="float" office:value="4.1" calcext:value-type="float">
            <text:p>4.1</text:p>
          </table:table-cell>
          <table:table-cell/>
          <table:table-cell table:style-name="ce646" table:formula="of:=HLOOKUP([.H12];[.$AF$25:.$AW$26];2;0)" office:value-type="float" office:value="5.1" calcext:value-type="float">
            <text:p>5.1</text:p>
          </table:table-cell>
          <table:table-cell table:style-name="ce662" table:formula="of:=HLOOKUP([.I12];[.$AF$25:.$AW$26];2;0)" office:value-type="float" office:value="4" calcext:value-type="float">
            <text:p>4.0</text:p>
          </table:table-cell>
          <table:table-cell table:style-name="ce674" table:formula="of:=HLOOKUP([.J12];[.$AF$25:.$AW$26];2;0)" office:value-type="float" office:value="2.1" calcext:value-type="float">
            <text:p>2.1</text:p>
          </table:table-cell>
          <table:table-cell table:style-name="ce680" table:formula="of:=HLOOKUP([.K12];[.$AF$25:.$AW$26];2;0)" office:value-type="float" office:value="4.1" calcext:value-type="float">
            <text:p>4.1</text:p>
          </table:table-cell>
          <table:table-cell table:style-name="ce680" table:formula="of:=HLOOKUP([.L12];[.$AF$25:.$AW$26];2;0)" office:value-type="float" office:value="4.2" calcext:value-type="float">
            <text:p>4.2</text:p>
          </table:table-cell>
          <table:table-cell/>
          <table:table-cell table:style-name="ce705" table:formula="of:=HLOOKUP([.N12];[.$AF$25:.$AW$26];2;0)" office:value-type="float" office:value="5.1" calcext:value-type="float">
            <text:p>5.1</text:p>
          </table:table-cell>
          <table:table-cell table:style-name="ce716" table:formula="of:=HLOOKUP([.O12];[.$AF$25:.$AW$26];2;0)" office:value-type="float" office:value="2.2" calcext:value-type="float">
            <text:p>2.2</text:p>
          </table:table-cell>
          <table:table-cell table:style-name="ce722" table:formula="of:=HLOOKUP([.P12];[.$AF$25:.$AW$26];2;0)" office:value-type="float" office:value="2" calcext:value-type="float">
            <text:p>2.0</text:p>
          </table:table-cell>
          <table:table-cell table:style-name="ce727" table:formula="of:=HLOOKUP([.Q12];[.$AF$25:.$AW$26];2;0)" office:value-type="float" office:value="2.1" calcext:value-type="float">
            <text:p>2.1</text:p>
          </table:table-cell>
          <table:table-cell table:style-name="ce727" table:formula="of:=HLOOKUP([.R12];[.$AF$25:.$AW$26];2;0)" office:value-type="float" office:value="4.1" calcext:value-type="float">
            <text:p>4.1</text:p>
          </table:table-cell>
          <table:table-cell/>
          <table:table-cell table:style-name="ce743" table:formula="of:=HLOOKUP([.T12];[.$AF$25:.$AW$26];2;0)" office:value-type="float" office:value="5.1" calcext:value-type="float">
            <text:p>5.1</text:p>
          </table:table-cell>
          <table:table-cell table:style-name="ce749" table:formula="of:=HLOOKUP([.U12];[.$AF$25:.$AW$26];2;0)" office:value-type="float" office:value="2" calcext:value-type="float">
            <text:p>2.0</text:p>
          </table:table-cell>
          <table:table-cell table:style-name="ce753" table:formula="of:=HLOOKUP([.V12];[.$AF$25:.$AW$26];2;0)" office:value-type="float" office:value="1.2" calcext:value-type="float">
            <text:p>1.2</text:p>
          </table:table-cell>
          <table:table-cell table:style-name="ce757" table:formula="of:=HLOOKUP([.W12];[.$AF$25:.$AW$26];2;0)" office:value-type="float" office:value="2.2" calcext:value-type="float">
            <text:p>2.2</text:p>
          </table:table-cell>
          <table:table-cell table:style-name="ce757" table:formula="of:=HLOOKUP([.X12];[.$AF$25:.$AW$26];2;0)" office:value-type="float" office:value="4.1" calcext:value-type="float">
            <text:p>4.1</text:p>
          </table:table-cell>
          <table:table-cell/>
          <table:table-cell table:style-name="ce770" table:formula="of:=HLOOKUP([.Z12];[.$AF$25:.$AW$26];2;0)" office:value-type="float" office:value="5.1" calcext:value-type="float">
            <text:p>5.1</text:p>
          </table:table-cell>
          <table:table-cell table:style-name="ce776" table:formula="of:=HLOOKUP([.AA12];[.$AF$25:.$AW$26];2;0)" office:value-type="float" office:value="2.1" calcext:value-type="float">
            <text:p>2.1</text:p>
          </table:table-cell>
          <table:table-cell table:style-name="ce779" table:formula="of:=HLOOKUP([.AB12];[.$AF$25:.$AW$26];2;0)" office:value-type="float" office:value="1.2" calcext:value-type="float">
            <text:p>1.2</text:p>
          </table:table-cell>
          <table:table-cell table:style-name="ce785" table:formula="of:=HLOOKUP([.AC12];[.$AF$25:.$AW$26];2;0)" office:value-type="float" office:value="3.2" calcext:value-type="float">
            <text:p>3.2</text:p>
          </table:table-cell>
          <table:table-cell table:style-name="ce785" table:formula="of:=HLOOKUP([.AD12];[.$AF$25:.$AW$26];2;0)" office:value-type="float" office:value="4.1" calcext:value-type="float">
            <text:p>4.1</text:p>
          </table:table-cell>
          <table:table-cell table:style-name="ce623"/>
          <table:table-cell table:number-columns-repeated="31"/>
          <table:table-cell table:formula="of:=COM.MICROSOFT.TEXTJOIN(&quot;, &quot;;TRUE();[.BK24:.BK28])" office:value-type="string" office:string-value="&quot;10&quot;: { &quot;0&quot;: 14, &quot;1&quot;: 11, &quot;2&quot;: 7, &quot;3&quot;: 9, &quot;4&quot;: 12, &quot;5&quot;: 10, &quot;6&quot;: 6, &quot;7&quot;: 4, &quot;8&quot;: 5, &quot;9&quot;: 8, &quot;10&quot;: 11, &quot;11&quot;: 3, &quot;12&quot;: 2, &quot;13&quot;: 1, &quot;14&quot;: 13}, &quot;11&quot;: { &quot;0&quot;: 14, &quot;1&quot;: 10, &quot;2&quot;: 6, &quot;3&quot;: 9, &quot;4&quot;: 12, &quot;5&quot;: 11, &quot;6&quot;: 5, &quot;7&quot;: 3, &quot;8&quot;: 4, &quot;9&quot;: 8, &quot;10&quot;: 7, &quot;11&quot;: 10, &quot;12&quot;: 1, &quot;13&quot;: 2, &quot;14&quot;: 13}, &quot;12&quot;: { &quot;0&quot;: 14, &quot;1&quot;: 11, &quot;2&quot;: 10, &quot;3&quot;: 9, &quot;4&quot;: 12, &quot;5&quot;: 8, &quot;6&quot;: 4, &quot;7&quot;: 5, &quot;8&quot;: 3, &quot;9&quot;: 6, &quot;10&quot;: 7, &quot;11&quot;: 2, &quot;12&quot;: 9, &quot;13&quot;: 1, &quot;14&quot;: 13}, &quot;13&quot;: { &quot;0&quot;: 14, &quot;1&quot;: 10, &quot;2&quot;: 8, &quot;3&quot;: 11, &quot;4&quot;: 12, &quot;5&quot;: 7, &quot;6&quot;: 4, &quot;7&quot;: 3, &quot;8&quot;: 5, &quot;9&quot;: 9, &quot;10&quot;: 6, &quot;11&quot;: 2, &quot;12&quot;: 1, &quot;13&quot;: 4, &quot;14&quot;: 13}, &quot;14&quot;: { &quot;0&quot;: 14, &quot;1&quot;: 13, &quot;2&quot;: 10, &quot;3&quot;: 12, &quot;4&quot;: 11, &quot;5&quot;: 6, &quot;6&quot;: 4, &quot;7&quot;: 3, &quot;8&quot;: 8, &quot;9&quot;: 9, &quot;10&quot;: 5, &quot;11&quot;: 2, &quot;12&quot;: 1, &quot;13&quot;: 7, &quot;14&quot;: 12}" calcext:value-type="string">
            <text:p>"10": { "0": 14, "1": 11, "2": 7, "3": 9, "4": 12, "5": 10, "6": 6, "7": 4, "8": 5, "9": 8, "10": 11, "11": 3, "12": 2, "13": 1, "14": 13}, "11": { "0": 14, "1": 10, "2": 6, "3": 9, "4": 12, "5": 11, "6": 5, "7": 3, "8": 4, "9": 8, "10": 7, "11": 10, "12": 1, "13": 2, "14": 13}, "12": { "0": 14, "1": 11, "2": 10, "3": 9, "4": 12, "5": 8, "6": 4, "7": 5, "8": 3, "9": 6, "10": 7, "11": 2, "12": 9, "13": 1, "14": 13}, "13": { "0": 14, "1": 10, "2": 8, "3": 11, "4": 12, "5": 7, "6": 4, "7": 3, "8": 5, "9": 9, "10": 6, "11": 2, "12": 1, "13": 4, "14": 13}, "14": { "0": 14, "1": 13, "2": 10, "3": 12, "4": 11, "5": 6, "6": 4, "7": 3, "8": 8, "9": 9, "10": 5, "11": 2, "12": 1, "13": 7, "14": 12}</text:p>
          </table:table-cell>
          <table:table-cell table:number-columns-repeated="36"/>
        </table:table-row>
        <table:table-row table:style-name="ro1">
          <table:table-cell/>
          <table:table-cell table:style-name="ce576" table:formula="of:=HLOOKUP([.B13];[.$AF$25:.$AW$26];2;0)" office:value-type="float" office:value="2.1" calcext:value-type="float">
            <text:p>2.1</text:p>
          </table:table-cell>
          <table:table-cell table:style-name="ce595" table:formula="of:=HLOOKUP([.C13];[.$AF$25:.$AW$26];2;0)" office:value-type="float" office:value="1.2" calcext:value-type="float">
            <text:p>1.2</text:p>
          </table:table-cell>
          <table:table-cell table:style-name="ce601" table:formula="of:=HLOOKUP([.D13];[.$AF$25:.$AW$26];2;0)" office:value-type="float" office:value="1.1" calcext:value-type="float">
            <text:p>1.1</text:p>
          </table:table-cell>
          <table:table-cell table:style-name="ce614" table:formula="of:=HLOOKUP([.E13];[.$AF$25:.$AW$26];2;0)" office:value-type="float" office:value="1" calcext:value-type="float">
            <text:p>1.0</text:p>
          </table:table-cell>
          <table:table-cell table:style-name="ce614" table:formula="of:=HLOOKUP([.F13];[.$AF$25:.$AW$26];2;0)" office:value-type="float" office:value="2.2" calcext:value-type="float">
            <text:p>2.2</text:p>
          </table:table-cell>
          <table:table-cell/>
          <table:table-cell table:style-name="ce648" table:formula="of:=HLOOKUP([.H13];[.$AF$25:.$AW$26];2;0)" office:value-type="float" office:value="3" calcext:value-type="float">
            <text:p>3.0</text:p>
          </table:table-cell>
          <table:table-cell table:style-name="ce663" table:formula="of:=HLOOKUP([.I13];[.$AF$25:.$AW$26];2;0)" office:value-type="float" office:value="1.1" calcext:value-type="float">
            <text:p>1.1</text:p>
          </table:table-cell>
          <table:table-cell table:style-name="ce674" table:formula="of:=HLOOKUP([.J13];[.$AF$25:.$AW$26];2;0)" office:value-type="float" office:value="1" calcext:value-type="float">
            <text:p>1.0</text:p>
          </table:table-cell>
          <table:table-cell table:style-name="ce680" table:formula="of:=HLOOKUP([.K13];[.$AF$25:.$AW$26];2;0)" office:value-type="float" office:value="1.1" calcext:value-type="float">
            <text:p>1.1</text:p>
          </table:table-cell>
          <table:table-cell table:style-name="ce680" table:formula="of:=HLOOKUP([.L13];[.$AF$25:.$AW$26];2;0)" office:value-type="float" office:value="2.2" calcext:value-type="float">
            <text:p>2.2</text:p>
          </table:table-cell>
          <table:table-cell/>
          <table:table-cell table:style-name="ce706" table:formula="of:=HLOOKUP([.N13];[.$AF$25:.$AW$26];2;0)" office:value-type="float" office:value="3" calcext:value-type="float">
            <text:p>3.0</text:p>
          </table:table-cell>
          <table:table-cell table:style-name="ce716" table:formula="of:=HLOOKUP([.O13];[.$AF$25:.$AW$26];2;0)" office:value-type="float" office:value="1.1" calcext:value-type="float">
            <text:p>1.1</text:p>
          </table:table-cell>
          <table:table-cell table:style-name="ce723" table:formula="of:=HLOOKUP([.P13];[.$AF$25:.$AW$26];2;0)" office:value-type="float" office:value="1" calcext:value-type="float">
            <text:p>1.0</text:p>
          </table:table-cell>
          <table:table-cell table:style-name="ce727" table:formula="of:=HLOOKUP([.Q13];[.$AF$25:.$AW$26];2;0)" office:value-type="float" office:value="1" calcext:value-type="float">
            <text:p>1.0</text:p>
          </table:table-cell>
          <table:table-cell table:style-name="ce727" table:formula="of:=HLOOKUP([.R13];[.$AF$25:.$AW$26];2;0)" office:value-type="float" office:value="3.1" calcext:value-type="float">
            <text:p>3.1</text:p>
          </table:table-cell>
          <table:table-cell/>
          <table:table-cell table:style-name="ce744" table:formula="of:=HLOOKUP([.T13];[.$AF$25:.$AW$26];2;0)" office:value-type="float" office:value="3" calcext:value-type="float">
            <text:p>3.0</text:p>
          </table:table-cell>
          <table:table-cell table:style-name="ce749" table:formula="of:=HLOOKUP([.U13];[.$AF$25:.$AW$26];2;0)" office:value-type="float" office:value="1.1" calcext:value-type="float">
            <text:p>1.1</text:p>
          </table:table-cell>
          <table:table-cell table:style-name="ce753" table:formula="of:=HLOOKUP([.V13];[.$AF$25:.$AW$26];2;0)" office:value-type="float" office:value="1" calcext:value-type="float">
            <text:p>1.0</text:p>
          </table:table-cell>
          <table:table-cell table:style-name="ce758" table:formula="of:=HLOOKUP([.W13];[.$AF$25:.$AW$26];2;0)" office:value-type="float" office:value="1" calcext:value-type="float">
            <text:p>1.0</text:p>
          </table:table-cell>
          <table:table-cell table:style-name="ce757" table:formula="of:=HLOOKUP([.X13];[.$AF$25:.$AW$26];2;0)" office:value-type="float" office:value="3.1" calcext:value-type="float">
            <text:p>3.1</text:p>
          </table:table-cell>
          <table:table-cell/>
          <table:table-cell table:style-name="ce771" table:formula="of:=HLOOKUP([.Z13];[.$AF$25:.$AW$26];2;0)" office:value-type="float" office:value="3" calcext:value-type="float">
            <text:p>3.0</text:p>
          </table:table-cell>
          <table:table-cell table:style-name="ce776" table:formula="of:=HLOOKUP([.AA13];[.$AF$25:.$AW$26];2;0)" office:value-type="float" office:value="1.1" calcext:value-type="float">
            <text:p>1.1</text:p>
          </table:table-cell>
          <table:table-cell table:style-name="ce779" table:formula="of:=HLOOKUP([.AB13];[.$AF$25:.$AW$26];2;0)" office:value-type="float" office:value="1" calcext:value-type="float">
            <text:p>1.0</text:p>
          </table:table-cell>
          <table:table-cell table:style-name="ce785" table:formula="of:=HLOOKUP([.AC13];[.$AF$25:.$AW$26];2;0)" office:value-type="float" office:value="2" calcext:value-type="float">
            <text:p>2.0</text:p>
          </table:table-cell>
          <table:table-cell table:style-name="ce792" table:formula="of:=HLOOKUP([.AD13];[.$AF$25:.$AW$26];2;0)" office:value-type="float" office:value="3.1" calcext:value-type="float">
            <text:p>3.1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580" table:formula="of:=HLOOKUP([.B14];[.$AF$25:.$AW$26];2;0)" office:value-type="float" office:value="4.2" calcext:value-type="float">
            <text:p>4.2</text:p>
          </table:table-cell>
          <table:table-cell table:style-name="ce595" table:formula="of:=HLOOKUP([.C14];[.$AF$25:.$AW$26];2;0)" office:value-type="float" office:value="4" calcext:value-type="float">
            <text:p>4.0</text:p>
          </table:table-cell>
          <table:table-cell table:style-name="ce601" table:formula="of:=HLOOKUP([.D14];[.$AF$25:.$AW$26];2;0)" office:value-type="float" office:value="3.1" calcext:value-type="float">
            <text:p>3.1</text:p>
          </table:table-cell>
          <table:table-cell table:style-name="ce614" table:formula="of:=HLOOKUP([.E14];[.$AF$25:.$AW$26];2;0)" office:value-type="float" office:value="2.1" calcext:value-type="float">
            <text:p>2.1</text:p>
          </table:table-cell>
          <table:table-cell table:style-name="ce614" table:formula="of:=HLOOKUP([.F14];[.$AF$25:.$AW$26];2;0)" office:value-type="float" office:value="5" calcext:value-type="float">
            <text:p>5.0</text:p>
          </table:table-cell>
          <table:table-cell/>
          <table:table-cell table:style-name="ce648" table:formula="of:=HLOOKUP([.H14];[.$AF$25:.$AW$26];2;0)" office:value-type="float" office:value="3.1" calcext:value-type="float">
            <text:p>3.1</text:p>
          </table:table-cell>
          <table:table-cell table:style-name="ce662" table:formula="of:=HLOOKUP([.I14];[.$AF$25:.$AW$26];2;0)" office:value-type="float" office:value="3.2" calcext:value-type="float">
            <text:p>3.2</text:p>
          </table:table-cell>
          <table:table-cell table:style-name="ce674" table:formula="of:=HLOOKUP([.J14];[.$AF$25:.$AW$26];2;0)" office:value-type="float" office:value="2" calcext:value-type="float">
            <text:p>2.0</text:p>
          </table:table-cell>
          <table:table-cell table:style-name="ce680" table:formula="of:=HLOOKUP([.K14];[.$AF$25:.$AW$26];2;0)" office:value-type="float" office:value="1.2" calcext:value-type="float">
            <text:p>1.2</text:p>
          </table:table-cell>
          <table:table-cell table:style-name="ce680" table:formula="of:=HLOOKUP([.L14];[.$AF$25:.$AW$26];2;0)" office:value-type="float" office:value="5" calcext:value-type="float">
            <text:p>5.0</text:p>
          </table:table-cell>
          <table:table-cell/>
          <table:table-cell table:style-name="ce706" table:formula="of:=HLOOKUP([.N14];[.$AF$25:.$AW$26];2;0)" office:value-type="float" office:value="4.2" calcext:value-type="float">
            <text:p>4.2</text:p>
          </table:table-cell>
          <table:table-cell table:style-name="ce716" table:formula="of:=HLOOKUP([.O14];[.$AF$25:.$AW$26];2;0)" office:value-type="float" office:value="3.2" calcext:value-type="float">
            <text:p>3.2</text:p>
          </table:table-cell>
          <table:table-cell table:style-name="ce722" table:formula="of:=HLOOKUP([.P14];[.$AF$25:.$AW$26];2;0)" office:value-type="float" office:value="4" calcext:value-type="float">
            <text:p>4.0</text:p>
          </table:table-cell>
          <table:table-cell table:style-name="ce727" table:formula="of:=HLOOKUP([.Q14];[.$AF$25:.$AW$26];2;0)" office:value-type="float" office:value="1.2" calcext:value-type="float">
            <text:p>1.2</text:p>
          </table:table-cell>
          <table:table-cell table:style-name="ce727" table:formula="of:=HLOOKUP([.R14];[.$AF$25:.$AW$26];2;0)" office:value-type="float" office:value="5" calcext:value-type="float">
            <text:p>5.0</text:p>
          </table:table-cell>
          <table:table-cell/>
          <table:table-cell table:style-name="ce744" table:formula="of:=HLOOKUP([.T14];[.$AF$25:.$AW$26];2;0)" office:value-type="float" office:value="4.2" calcext:value-type="float">
            <text:p>4.2</text:p>
          </table:table-cell>
          <table:table-cell table:style-name="ce749" table:formula="of:=HLOOKUP([.U14];[.$AF$25:.$AW$26];2;0)" office:value-type="float" office:value="3.2" calcext:value-type="float">
            <text:p>3.2</text:p>
          </table:table-cell>
          <table:table-cell table:style-name="ce753" table:formula="of:=HLOOKUP([.V14];[.$AF$25:.$AW$26];2;0)" office:value-type="float" office:value="4" calcext:value-type="float">
            <text:p>4.0</text:p>
          </table:table-cell>
          <table:table-cell table:style-name="ce757" table:formula="of:=HLOOKUP([.W14];[.$AF$25:.$AW$26];2;0)" office:value-type="float" office:value="2.1" calcext:value-type="float">
            <text:p>2.1</text:p>
          </table:table-cell>
          <table:table-cell table:style-name="ce757" table:formula="of:=HLOOKUP([.X14];[.$AF$25:.$AW$26];2;0)" office:value-type="float" office:value="5" calcext:value-type="float">
            <text:p>5.0</text:p>
          </table:table-cell>
          <table:table-cell/>
          <table:table-cell table:style-name="ce771" table:formula="of:=HLOOKUP([.Z14];[.$AF$25:.$AW$26];2;0)" office:value-type="float" office:value="4.2" calcext:value-type="float">
            <text:p>4.2</text:p>
          </table:table-cell>
          <table:table-cell table:style-name="ce776" table:formula="of:=HLOOKUP([.AA14];[.$AF$25:.$AW$26];2;0)" office:value-type="float" office:value="3.1" calcext:value-type="float">
            <text:p>3.1</text:p>
          </table:table-cell>
          <table:table-cell table:style-name="ce779" table:formula="of:=HLOOKUP([.AB14];[.$AF$25:.$AW$26];2;0)" office:value-type="float" office:value="2.2" calcext:value-type="float">
            <text:p>2.2</text:p>
          </table:table-cell>
          <table:table-cell table:style-name="ce785" table:formula="of:=HLOOKUP([.AC14];[.$AF$25:.$AW$26];2;0)" office:value-type="float" office:value="4" calcext:value-type="float">
            <text:p>4.0</text:p>
          </table:table-cell>
          <table:table-cell table:style-name="ce785" table:formula="of:=HLOOKUP([.AD14];[.$AF$25:.$AW$26];2;0)" office:value-type="float" office:value="5" calcext:value-type="float">
            <text:p>5.0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647" table:number-columns-repeated="5"/>
          <table:table-cell/>
          <table:table-cell table:style-name="ce647" table:number-columns-repeated="5"/>
          <table:table-cell/>
          <table:table-cell table:style-name="ce647" table:number-columns-repeated="5"/>
          <table:table-cell/>
          <table:table-cell table:style-name="ce647" table:number-columns-repeated="5"/>
          <table:table-cell/>
          <table:table-cell table:style-name="ce647" table:number-columns-repeated="5"/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640" table:formula="of:=SUM([.B35:.F37])-[.B37]" office:value-type="float" office:value="41.3" calcext:value-type="float" table:number-columns-spanned="2" table:number-rows-spanned="1">
            <text:p>41.3</text:p>
          </table:table-cell>
          <table:covered-table-cell table:style-name="ce647"/>
          <table:table-cell table:style-name="ce647" table:number-columns-repeated="3"/>
          <table:table-cell/>
          <table:table-cell table:style-name="ce640" table:formula="of:=SUM([.H35:.L37])-[.I37]" office:value-type="float" office:value="41.3" calcext:value-type="float" table:number-columns-spanned="2" table:number-rows-spanned="1">
            <text:p>41.3</text:p>
          </table:table-cell>
          <table:covered-table-cell table:style-name="ce647"/>
          <table:table-cell table:style-name="ce647" table:number-columns-repeated="3"/>
          <table:table-cell/>
          <table:table-cell table:style-name="ce640" table:formula="of:=SUM([.N35:.R37])-[.P37]" office:value-type="float" office:value="41.3" calcext:value-type="float" table:number-columns-spanned="2" table:number-rows-spanned="1">
            <text:p>41.3</text:p>
          </table:table-cell>
          <table:covered-table-cell table:style-name="ce647"/>
          <table:table-cell table:style-name="ce647" table:number-columns-repeated="3"/>
          <table:table-cell/>
          <table:table-cell table:style-name="ce640" table:formula="of:=SUM([.T35:.X37])-[.W37]" office:value-type="float" office:value="41.3" calcext:value-type="float" table:number-columns-spanned="2" table:number-rows-spanned="1">
            <text:p>41.3</text:p>
          </table:table-cell>
          <table:covered-table-cell table:style-name="ce647"/>
          <table:table-cell table:style-name="ce647" table:number-columns-repeated="3"/>
          <table:table-cell/>
          <table:table-cell table:style-name="ce640" table:formula="of:=SUM([.Z35:.AD37])-[.AD37]" office:value-type="float" office:value="41.3" calcext:value-type="float" table:number-columns-spanned="2" table:number-rows-spanned="1">
            <text:p>41.3</text:p>
          </table:table-cell>
          <table:covered-table-cell table:style-name="ce647"/>
          <table:table-cell table:style-name="ce647" table:number-columns-repeated="3"/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582" table:formula="of:=HLOOKUP([.B16];[.$AF$25:.$AW$26];2;0)" office:value-type="float" office:value="5.1" calcext:value-type="float">
            <text:p>5.1</text:p>
          </table:table-cell>
          <table:table-cell table:style-name="ce596" table:formula="of:=HLOOKUP([.C16];[.$AF$25:.$AW$26];2;0)" office:value-type="float" office:value="4.1" calcext:value-type="float">
            <text:p>4.1</text:p>
          </table:table-cell>
          <table:table-cell table:style-name="ce602" table:formula="of:=HLOOKUP([.D16];[.$AF$25:.$AW$26];2;0)" office:value-type="float" office:value="3" calcext:value-type="float">
            <text:p>3.0</text:p>
          </table:table-cell>
          <table:table-cell table:style-name="ce617" table:formula="of:=HLOOKUP([.E16];[.$AF$25:.$AW$26];2;0)" office:value-type="float" office:value="3.2" calcext:value-type="float">
            <text:p>3.2</text:p>
          </table:table-cell>
          <table:table-cell table:style-name="ce617" table:formula="of:=HLOOKUP([.F16];[.$AF$25:.$AW$26];2;0)" office:value-type="float" office:value="4.2" calcext:value-type="float">
            <text:p>4.2</text:p>
          </table:table-cell>
          <table:table-cell/>
          <table:table-cell table:style-name="ce652" table:formula="of:=HLOOKUP([.H16];[.$AF$25:.$AW$26];2;0)" office:value-type="float" office:value="5.1" calcext:value-type="float">
            <text:p>5.1</text:p>
          </table:table-cell>
          <table:table-cell table:style-name="ce664" table:formula="of:=HLOOKUP([.I16];[.$AF$25:.$AW$26];2;0)" office:value-type="float" office:value="4" calcext:value-type="float">
            <text:p>4.0</text:p>
          </table:table-cell>
          <table:table-cell table:style-name="ce675" table:formula="of:=HLOOKUP([.J16];[.$AF$25:.$AW$26];2;0)" office:value-type="float" office:value="2.2" calcext:value-type="float">
            <text:p>2.2</text:p>
          </table:table-cell>
          <table:table-cell table:style-name="ce681" table:formula="of:=HLOOKUP([.K16];[.$AF$25:.$AW$26];2;0)" office:value-type="float" office:value="3.2" calcext:value-type="float">
            <text:p>3.2</text:p>
          </table:table-cell>
          <table:table-cell table:style-name="ce681" table:formula="of:=HLOOKUP([.L16];[.$AF$25:.$AW$26];2;0)" office:value-type="float" office:value="4.2" calcext:value-type="float">
            <text:p>4.2</text:p>
          </table:table-cell>
          <table:table-cell/>
          <table:table-cell table:style-name="ce711" table:formula="of:=HLOOKUP([.N16];[.$AF$25:.$AW$26];2;0)" office:value-type="float" office:value="5.1" calcext:value-type="float">
            <text:p>5.1</text:p>
          </table:table-cell>
          <table:table-cell table:style-name="ce717" table:formula="of:=HLOOKUP([.O16];[.$AF$25:.$AW$26];2;0)" office:value-type="float" office:value="4.1" calcext:value-type="float">
            <text:p>4.1</text:p>
          </table:table-cell>
          <table:table-cell table:style-name="ce724" table:formula="of:=HLOOKUP([.P16];[.$AF$25:.$AW$26];2;0)" office:value-type="float" office:value="4" calcext:value-type="float">
            <text:p>4.0</text:p>
          </table:table-cell>
          <table:table-cell table:style-name="ce728" table:formula="of:=HLOOKUP([.Q16];[.$AF$25:.$AW$26];2;0)" office:value-type="float" office:value="3.2" calcext:value-type="float">
            <text:p>3.2</text:p>
          </table:table-cell>
          <table:table-cell table:style-name="ce728" table:formula="of:=HLOOKUP([.R16];[.$AF$25:.$AW$26];2;0)" office:value-type="float" office:value="4.2" calcext:value-type="float">
            <text:p>4.2</text:p>
          </table:table-cell>
          <table:table-cell/>
          <table:table-cell table:style-name="ce745" table:formula="of:=HLOOKUP([.T16];[.$AF$25:.$AW$26];2;0)" office:value-type="float" office:value="5.1" calcext:value-type="float">
            <text:p>5.1</text:p>
          </table:table-cell>
          <table:table-cell table:style-name="ce751" table:formula="of:=HLOOKUP([.U16];[.$AF$25:.$AW$26];2;0)" office:value-type="float" office:value="4" calcext:value-type="float">
            <text:p>4.0</text:p>
          </table:table-cell>
          <table:table-cell table:style-name="ce754" table:formula="of:=HLOOKUP([.V16];[.$AF$25:.$AW$26];2;0)" office:value-type="float" office:value="3.1" calcext:value-type="float">
            <text:p>3.1</text:p>
          </table:table-cell>
          <table:table-cell table:style-name="ce759" table:formula="of:=HLOOKUP([.W16];[.$AF$25:.$AW$26];2;0)" office:value-type="float" office:value="4.1" calcext:value-type="float">
            <text:p>4.1</text:p>
          </table:table-cell>
          <table:table-cell table:style-name="ce759" table:formula="of:=HLOOKUP([.X16];[.$AF$25:.$AW$26];2;0)" office:value-type="float" office:value="4.2" calcext:value-type="float">
            <text:p>4.2</text:p>
          </table:table-cell>
          <table:table-cell/>
          <table:table-cell table:style-name="ce772" table:formula="of:=HLOOKUP([.Z16];[.$AF$25:.$AW$26];2;0)" office:value-type="float" office:value="5.1" calcext:value-type="float">
            <text:p>5.1</text:p>
          </table:table-cell>
          <table:table-cell table:style-name="ce777" table:formula="of:=HLOOKUP([.AA16];[.$AF$25:.$AW$26];2;0)" office:value-type="float" office:value="5" calcext:value-type="float">
            <text:p>5.0</text:p>
          </table:table-cell>
          <table:table-cell table:style-name="ce780" table:formula="of:=HLOOKUP([.AB16];[.$AF$25:.$AW$26];2;0)" office:value-type="float" office:value="4" calcext:value-type="float">
            <text:p>4.0</text:p>
          </table:table-cell>
          <table:table-cell table:style-name="ce787" table:formula="of:=HLOOKUP([.AC16];[.$AF$25:.$AW$26];2;0)" office:value-type="float" office:value="4.2" calcext:value-type="float">
            <text:p>4.2</text:p>
          </table:table-cell>
          <table:table-cell table:style-name="ce787" table:formula="of:=HLOOKUP([.AD16];[.$AF$25:.$AW$26];2;0)" office:value-type="float" office:value="4.1" calcext:value-type="float">
            <text:p>4.1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583" table:formula="of:=HLOOKUP([.B17];[.$AF$25:.$AW$26];2;0)" office:value-type="float" office:value="4" calcext:value-type="float">
            <text:p>4.0</text:p>
          </table:table-cell>
          <table:table-cell table:style-name="ce596" table:formula="of:=HLOOKUP([.C17];[.$AF$25:.$AW$26];2;0)" office:value-type="float" office:value="2.2" calcext:value-type="float">
            <text:p>2.2</text:p>
          </table:table-cell>
          <table:table-cell table:style-name="ce602" table:formula="of:=HLOOKUP([.D17];[.$AF$25:.$AW$26];2;0)" office:value-type="float" office:value="2" calcext:value-type="float">
            <text:p>2.0</text:p>
          </table:table-cell>
          <table:table-cell table:style-name="ce617" table:formula="of:=HLOOKUP([.E17];[.$AF$25:.$AW$26];2;0)" office:value-type="float" office:value="2.1" calcext:value-type="float">
            <text:p>2.1</text:p>
          </table:table-cell>
          <table:table-cell table:style-name="ce617" table:formula="of:=HLOOKUP([.F17];[.$AF$25:.$AW$26];2;0)" office:value-type="float" office:value="3.1" calcext:value-type="float">
            <text:p>3.1</text:p>
          </table:table-cell>
          <table:table-cell/>
          <table:table-cell table:style-name="ce653" table:formula="of:=HLOOKUP([.H17];[.$AF$25:.$AW$26];2;0)" office:value-type="float" office:value="4.1" calcext:value-type="float">
            <text:p>4.1</text:p>
          </table:table-cell>
          <table:table-cell table:style-name="ce664" table:formula="of:=HLOOKUP([.I17];[.$AF$25:.$AW$26];2;0)" office:value-type="float" office:value="2.1" calcext:value-type="float">
            <text:p>2.1</text:p>
          </table:table-cell>
          <table:table-cell table:style-name="ce675" table:formula="of:=HLOOKUP([.J17];[.$AF$25:.$AW$26];2;0)" office:value-type="float" office:value="1.2" calcext:value-type="float">
            <text:p>1.2</text:p>
          </table:table-cell>
          <table:table-cell table:style-name="ce681" table:formula="of:=HLOOKUP([.K17];[.$AF$25:.$AW$26];2;0)" office:value-type="float" office:value="2" calcext:value-type="float">
            <text:p>2.0</text:p>
          </table:table-cell>
          <table:table-cell table:style-name="ce681" table:formula="of:=HLOOKUP([.L17];[.$AF$25:.$AW$26];2;0)" office:value-type="float" office:value="3.1" calcext:value-type="float">
            <text:p>3.1</text:p>
          </table:table-cell>
          <table:table-cell/>
          <table:table-cell table:style-name="ce712" table:formula="of:=HLOOKUP([.N17];[.$AF$25:.$AW$26];2;0)" office:value-type="float" office:value="3.1" calcext:value-type="float">
            <text:p>3.1</text:p>
          </table:table-cell>
          <table:table-cell table:style-name="ce717" table:formula="of:=HLOOKUP([.O17];[.$AF$25:.$AW$26];2;0)" office:value-type="float" office:value="2" calcext:value-type="float">
            <text:p>2.0</text:p>
          </table:table-cell>
          <table:table-cell table:style-name="ce724" table:formula="of:=HLOOKUP([.P17];[.$AF$25:.$AW$26];2;0)" office:value-type="float" office:value="2.1" calcext:value-type="float">
            <text:p>2.1</text:p>
          </table:table-cell>
          <table:table-cell table:style-name="ce728" table:formula="of:=HLOOKUP([.Q17];[.$AF$25:.$AW$26];2;0)" office:value-type="float" office:value="1.2" calcext:value-type="float">
            <text:p>1.2</text:p>
          </table:table-cell>
          <table:table-cell table:style-name="ce728" table:formula="of:=HLOOKUP([.R17];[.$AF$25:.$AW$26];2;0)" office:value-type="float" office:value="2.2" calcext:value-type="float">
            <text:p>2.2</text:p>
          </table:table-cell>
          <table:table-cell/>
          <table:table-cell table:style-name="ce747" table:formula="of:=HLOOKUP([.T17];[.$AF$25:.$AW$26];2;0)" office:value-type="float" office:value="3" calcext:value-type="float">
            <text:p>3.0</text:p>
          </table:table-cell>
          <table:table-cell table:style-name="ce751" table:formula="of:=HLOOKUP([.U17];[.$AF$25:.$AW$26];2;0)" office:value-type="float" office:value="2" calcext:value-type="float">
            <text:p>2.0</text:p>
          </table:table-cell>
          <table:table-cell table:style-name="ce754" table:formula="of:=HLOOKUP([.V17];[.$AF$25:.$AW$26];2;0)" office:value-type="float" office:value="1.2" calcext:value-type="float">
            <text:p>1.2</text:p>
          </table:table-cell>
          <table:table-cell table:style-name="ce759" table:formula="of:=HLOOKUP([.W17];[.$AF$25:.$AW$26];2;0)" office:value-type="float" office:value="2.1" calcext:value-type="float">
            <text:p>2.1</text:p>
          </table:table-cell>
          <table:table-cell table:style-name="ce759" table:formula="of:=HLOOKUP([.X17];[.$AF$25:.$AW$26];2;0)" office:value-type="float" office:value="3.2" calcext:value-type="float">
            <text:p>3.2</text:p>
          </table:table-cell>
          <table:table-cell/>
          <table:table-cell table:style-name="ce773" table:formula="of:=HLOOKUP([.Z17];[.$AF$25:.$AW$26];2;0)" office:value-type="float" office:value="2.2" calcext:value-type="float">
            <text:p>2.2</text:p>
          </table:table-cell>
          <table:table-cell table:style-name="ce777" table:formula="of:=HLOOKUP([.AA17];[.$AF$25:.$AW$26];2;0)" office:value-type="float" office:value="2" calcext:value-type="float">
            <text:p>2.0</text:p>
          </table:table-cell>
          <table:table-cell table:style-name="ce780" table:formula="of:=HLOOKUP([.AB17];[.$AF$25:.$AW$26];2;0)" office:value-type="float" office:value="1.2" calcext:value-type="float">
            <text:p>1.2</text:p>
          </table:table-cell>
          <table:table-cell table:style-name="ce787" table:formula="of:=HLOOKUP([.AC17];[.$AF$25:.$AW$26];2;0)" office:value-type="float" office:value="3.1" calcext:value-type="float">
            <text:p>3.1</text:p>
          </table:table-cell>
          <table:table-cell table:style-name="ce787" table:formula="of:=HLOOKUP([.AD17];[.$AF$25:.$AW$26];2;0)" office:value-type="float" office:value="3.2" calcext:value-type="float">
            <text:p>3.2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584" table:formula="of:=HLOOKUP([.B18];[.$AF$25:.$AW$26];2;0)" office:value-type="float" office:value="4.1" calcext:value-type="float">
            <text:p>4.1</text:p>
          </table:table-cell>
          <table:table-cell table:style-name="ce596" table:formula="of:=HLOOKUP([.C18];[.$AF$25:.$AW$26];2;0)" office:value-type="float" office:value="1.2" calcext:value-type="float">
            <text:p>1.2</text:p>
          </table:table-cell>
          <table:table-cell table:style-name="ce602" table:formula="of:=HLOOKUP([.D18];[.$AF$25:.$AW$26];2;0)" office:value-type="float" office:value="1.1" calcext:value-type="float">
            <text:p>1.1</text:p>
          </table:table-cell>
          <table:table-cell table:style-name="ce617" table:formula="of:=HLOOKUP([.E18];[.$AF$25:.$AW$26];2;0)" office:value-type="float" office:value="1" calcext:value-type="float">
            <text:p>1.0</text:p>
          </table:table-cell>
          <table:table-cell table:style-name="ce617" table:formula="of:=HLOOKUP([.F18];[.$AF$25:.$AW$26];2;0)" office:value-type="float" office:value="5" calcext:value-type="float">
            <text:p>5.0</text:p>
          </table:table-cell>
          <table:table-cell/>
          <table:table-cell table:style-name="ce653" table:formula="of:=HLOOKUP([.H18];[.$AF$25:.$AW$26];2;0)" office:value-type="float" office:value="3" calcext:value-type="float">
            <text:p>3.0</text:p>
          </table:table-cell>
          <table:table-cell table:style-name="ce668" table:formula="of:=HLOOKUP([.I18];[.$AF$25:.$AW$26];2;0)" office:value-type="float" office:value="4" calcext:value-type="float">
            <text:p>4.0</text:p>
          </table:table-cell>
          <table:table-cell table:style-name="ce675" table:formula="of:=HLOOKUP([.J18];[.$AF$25:.$AW$26];2;0)" office:value-type="float" office:value="1" calcext:value-type="float">
            <text:p>1.0</text:p>
          </table:table-cell>
          <table:table-cell table:style-name="ce681" table:formula="of:=HLOOKUP([.K18];[.$AF$25:.$AW$26];2;0)" office:value-type="float" office:value="1.1" calcext:value-type="float">
            <text:p>1.1</text:p>
          </table:table-cell>
          <table:table-cell table:style-name="ce681" table:formula="of:=HLOOKUP([.L18];[.$AF$25:.$AW$26];2;0)" office:value-type="float" office:value="5" calcext:value-type="float">
            <text:p>5.0</text:p>
          </table:table-cell>
          <table:table-cell/>
          <table:table-cell table:style-name="ce712" table:formula="of:=HLOOKUP([.N18];[.$AF$25:.$AW$26];2;0)" office:value-type="float" office:value="3" calcext:value-type="float">
            <text:p>3.0</text:p>
          </table:table-cell>
          <table:table-cell table:style-name="ce717" table:formula="of:=HLOOKUP([.O18];[.$AF$25:.$AW$26];2;0)" office:value-type="float" office:value="1.1" calcext:value-type="float">
            <text:p>1.1</text:p>
          </table:table-cell>
          <table:table-cell table:style-name="ce725" table:formula="of:=HLOOKUP([.P18];[.$AF$25:.$AW$26];2;0)" office:value-type="float" office:value="3.2" calcext:value-type="float">
            <text:p>3.2</text:p>
          </table:table-cell>
          <table:table-cell table:style-name="ce728" table:formula="of:=HLOOKUP([.Q18];[.$AF$25:.$AW$26];2;0)" office:value-type="float" office:value="1" calcext:value-type="float">
            <text:p>1.0</text:p>
          </table:table-cell>
          <table:table-cell table:style-name="ce728" table:formula="of:=HLOOKUP([.R18];[.$AF$25:.$AW$26];2;0)" office:value-type="float" office:value="5" calcext:value-type="float">
            <text:p>5.0</text:p>
          </table:table-cell>
          <table:table-cell/>
          <table:table-cell table:style-name="ce747" table:formula="of:=HLOOKUP([.T18];[.$AF$25:.$AW$26];2;0)" office:value-type="float" office:value="2.2" calcext:value-type="float">
            <text:p>2.2</text:p>
          </table:table-cell>
          <table:table-cell table:style-name="ce751" table:formula="of:=HLOOKUP([.U18];[.$AF$25:.$AW$26];2;0)" office:value-type="float" office:value="1.1" calcext:value-type="float">
            <text:p>1.1</text:p>
          </table:table-cell>
          <table:table-cell table:style-name="ce754" table:formula="of:=HLOOKUP([.V18];[.$AF$25:.$AW$26];2;0)" office:value-type="float" office:value="1" calcext:value-type="float">
            <text:p>1.0</text:p>
          </table:table-cell>
          <table:table-cell table:style-name="ce761" table:formula="of:=HLOOKUP([.W18];[.$AF$25:.$AW$26];2;0)" office:value-type="float" office:value="2" calcext:value-type="float">
            <text:p>2.0</text:p>
          </table:table-cell>
          <table:table-cell table:style-name="ce759" table:formula="of:=HLOOKUP([.X18];[.$AF$25:.$AW$26];2;0)" office:value-type="float" office:value="5" calcext:value-type="float">
            <text:p>5.0</text:p>
          </table:table-cell>
          <table:table-cell/>
          <table:table-cell table:style-name="ce773" table:formula="of:=HLOOKUP([.Z18];[.$AF$25:.$AW$26];2;0)" office:value-type="float" office:value="2.1" calcext:value-type="float">
            <text:p>2.1</text:p>
          </table:table-cell>
          <table:table-cell table:style-name="ce777" table:formula="of:=HLOOKUP([.AA18];[.$AF$25:.$AW$26];2;0)" office:value-type="float" office:value="1.1" calcext:value-type="float">
            <text:p>1.1</text:p>
          </table:table-cell>
          <table:table-cell table:style-name="ce780" table:formula="of:=HLOOKUP([.AB18];[.$AF$25:.$AW$26];2;0)" office:value-type="float" office:value="1" calcext:value-type="float">
            <text:p>1.0</text:p>
          </table:table-cell>
          <table:table-cell table:style-name="ce787" table:formula="of:=HLOOKUP([.AC18];[.$AF$25:.$AW$26];2;0)" office:value-type="float" office:value="3" calcext:value-type="float">
            <text:p>3.0</text:p>
          </table:table-cell>
          <table:table-cell table:style-name="ce793" table:formula="of:=HLOOKUP([.AD18];[.$AF$25:.$AW$26];2;0)" office:value-type="float" office:value="4.2" calcext:value-type="float">
            <text:p>4.2</text:p>
          </table:table-cell>
          <table:table-cell table:number-columns-repeated="32"/>
          <table:table-cell table:style-name="Default"/>
          <table:table-cell table:number-columns-repeated="36"/>
        </table:table-row>
        <calcext:conditional-formats>
          <calcext:conditional-format calcext:target-range-address="'keys 7'.Z30:'keys 7'.AD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T30:'keys 7'.X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N30:'keys 7'.R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H30:'keys 7'.L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B30:'keys 7'.F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B35:'keys 7'.F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H35:'keys 7'.L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N35:'keys 7'.R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T35:'keys 7'.X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Z35:'keys 7'.AD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B25:'keys 7'.F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H25:'keys 7'.L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N25:'keys 7'.R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T25:'keys 7'.X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Z25:'keys 7'.AD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T2:'keys 7'.X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AF25:'keys 7'.AT25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Z2:'keys 7'.AD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AO27:'keys 7'.BC27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  <calcext:conditional-format calcext:target-range-address="'keys 7'.AO27:'keys 7'.BC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AF26:'keys 7'.AT26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AF26:'keys 7'.AT26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</calcext:conditional-formats>
      </table:table>
      <table:table table:name="keys 6" table:style-name="ta1">
        <table:table-column table:style-name="co1" table:default-cell-style-name="Default"/>
        <table:table-column table:style-name="co1" table:default-cell-style-name="ce881"/>
        <table:table-column table:style-name="co1" table:default-cell-style-name="ce845"/>
        <table:table-column table:style-name="co1" table:default-cell-style-name="ce896"/>
        <table:table-column table:style-name="co1" table:number-columns-repeated="2" table:default-cell-style-name="ce852"/>
        <table:table-column table:style-name="co1" table:default-cell-style-name="ce647"/>
        <table:table-column table:style-name="co1" table:default-cell-style-name="ce881"/>
        <table:table-column table:style-name="co1" table:default-cell-style-name="Default"/>
        <table:table-column table:style-name="co1" table:default-cell-style-name="ce896"/>
        <table:table-column table:style-name="co1" table:number-columns-repeated="2" table:default-cell-style-name="ce852"/>
        <table:table-column table:style-name="co1" table:default-cell-style-name="ce647"/>
        <table:table-column table:style-name="co1" table:default-cell-style-name="ce881"/>
        <table:table-column table:style-name="co1" table:default-cell-style-name="ce845"/>
        <table:table-column table:style-name="co1" table:default-cell-style-name="ce896"/>
        <table:table-column table:style-name="co1" table:default-cell-style-name="ce852"/>
        <table:table-column table:style-name="co1" table:default-cell-style-name="Default"/>
        <table:table-column table:style-name="co1" table:default-cell-style-name="ce647"/>
        <table:table-column table:style-name="co1" table:default-cell-style-name="ce881"/>
        <table:table-column table:style-name="co1" table:default-cell-style-name="ce845"/>
        <table:table-column table:style-name="co1" table:default-cell-style-name="ce896"/>
        <table:table-column table:style-name="co1" table:number-columns-repeated="2" table:default-cell-style-name="ce852"/>
        <table:table-column table:style-name="co1" table:default-cell-style-name="ce647"/>
        <table:table-column table:style-name="co1" table:default-cell-style-name="ce881"/>
        <table:table-column table:style-name="co1" table:default-cell-style-name="ce845"/>
        <table:table-column table:style-name="co1" table:default-cell-style-name="ce896"/>
        <table:table-column table:style-name="co1" table:number-columns-repeated="2" table:default-cell-style-name="ce852"/>
        <table:table-column table:style-name="co1" table:number-columns-repeated="32" table:default-cell-style-name="Default"/>
        <table:table-column table:style-name="co1" table:default-cell-style-name="ce877"/>
        <table:table-column table:style-name="co1" table:number-columns-repeated="36" table:default-cell-style-name="Default"/>
        <table:table-row table:style-name="ro1">
          <table:table-cell table:style-name="ce666" table:number-columns-repeated="4"/>
          <table:table-cell table:style-name="ce677" table:number-columns-repeated="3"/>
          <table:table-cell table:style-name="ce622" office:value-type="string" calcext:value-type="string">
            <text:p>L</text:p>
          </table:table-cell>
          <table:table-cell/>
          <table:table-cell table:style-name="Default" office:value-type="string" calcext:value-type="string">
            <text:p>R</text:p>
          </table:table-cell>
          <table:table-cell table:style-name="ce677" table:number-columns-repeated="2"/>
          <table:table-cell table:style-name="ce731"/>
          <table:table-cell table:style-name="ce666" table:number-columns-repeated="4"/>
          <table:table-cell/>
          <table:table-cell table:style-name="Default"/>
          <table:table-cell table:style-name="ce809" office:value-type="string" calcext:value-type="string">
            <text:p>start priorities</text:p>
          </table:table-cell>
          <table:table-cell table:style-name="Default" table:number-columns-repeated="5"/>
          <table:table-cell table:style-name="ce809" office:value-type="string" calcext:value-type="string">
            <text:p>averages</text:p>
          </table:table-cell>
          <table:table-cell table:style-name="Default" table:number-columns-repeated="4"/>
          <table:table-cell/>
          <table:table-cell table:style-name="ce809" office:value-type="string" calcext:value-type="string">
            <text:p>json</text:p>
          </table:table-cell>
          <table:table-cell table:number-columns-repeated="30"/>
          <table:table-cell table:style-name="Default"/>
          <table:table-cell table:number-columns-repeated="36"/>
        </table:table-row>
        <table:table-row table:style-name="ro1">
          <table:table-cell table:style-name="ce656"/>
          <table:table-cell table:style-name="ce620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666" office:value-type="float" office:value="2" calcext:value-type="float">
            <text:p>2</text:p>
          </table:table-cell>
          <table:table-cell table:style-name="ce677" office:value-type="float" office:value="3" calcext:value-type="float">
            <text:p>3</text:p>
          </table:table-cell>
          <table:table-cell table:style-name="ce677" office:value-type="float" office:value="4" calcext:value-type="float">
            <text:p>4</text:p>
          </table:table-cell>
          <table:table-cell table:style-name="ce677"/>
          <table:table-cell table:style-name="ce622"/>
          <table:table-cell/>
          <table:table-cell table:style-name="ce622"/>
          <table:table-cell table:style-name="ce677"/>
          <table:table-cell table:style-name="ce677" office:value-type="float" office:value="15" calcext:value-type="float">
            <text:p>15</text:p>
          </table:table-cell>
          <table:table-cell table:style-name="ce731" office:value-type="float" office:value="16" calcext:value-type="float">
            <text:p>16</text:p>
          </table:table-cell>
          <table:table-cell table:style-name="ce666" office:value-type="float" office:value="17" calcext:value-type="float">
            <text:p>17</text:p>
          </table:table-cell>
          <table:table-cell table:style-name="ce656" office:value-type="float" office:value="18" calcext:value-type="float">
            <text:p>18</text:p>
          </table:table-cell>
          <table:table-cell table:style-name="ce620" office:value-type="float" office:value="19" calcext:value-type="float">
            <text:p>19</text:p>
          </table:table-cell>
          <table:table-cell table:style-name="ce656"/>
          <table:table-cell/>
          <table:table-cell table:style-name="ce798" office:value-type="float" office:value="1" calcext:value-type="float">
            <text:p>1</text:p>
          </table:table-cell>
          <table:table-cell table:style-name="ce949" office:value-type="float" office:value="14" calcext:value-type="float">
            <text:p>14</text:p>
          </table:table-cell>
          <table:table-cell table:style-name="ce949" office:value-type="float" office:value="6" calcext:value-type="float">
            <text:p>6</text:p>
          </table:table-cell>
          <table:table-cell table:style-name="ce949" office:value-type="float" office:value="3" calcext:value-type="float">
            <text:p>3</text:p>
          </table:table-cell>
          <table:table-cell table:style-name="ce949" office:value-type="float" office:value="7" calcext:value-type="float">
            <text:p>7</text:p>
          </table:table-cell>
          <table:table-cell table:style-name="ce949" office:value-type="float" office:value="13" calcext:value-type="float">
            <text:p>13</text:p>
          </table:table-cell>
          <table:table-cell table:style-name="Default"/>
          <table:table-cell table:style-name="ce971" table:formula="of:=SUM([.H25];[.N25];[.T25];[.Z25];[.Z30];[.T30];[.N30];[.H30];[.B30];[.B35];[.H35];[.N35];[.T35];[.Z35])/[.$Z$6]" office:value-type="float" office:value="64.8" calcext:value-type="float">
            <text:p>64.8</text:p>
          </table:table-cell>
          <table:table-cell table:style-name="ce971" table:formula="of:=SUM([.C25];[.O25];[.U25];[.AA25];[.AA30];[.U30];[.O30];[.I30];[.C30];[.C35];[.I35];[.O35];[.U35];[.AA35])/[.$Z$6]" office:value-type="float" office:value="45.5" calcext:value-type="float">
            <text:p>45.5</text:p>
          </table:table-cell>
          <table:table-cell table:style-name="ce971" table:formula="of:=SUM([.D25];[.J25];[.V25];[.AB25];[.AB30];[.V30];[.P30];[.J30];[.D30];[.D35];[.J35];[.P35];[.V35];[.AB35])/[.$Z$6]" office:value-type="float" office:value="34.5" calcext:value-type="float">
            <text:p>34.5</text:p>
          </table:table-cell>
          <table:table-cell table:style-name="ce971" table:formula="of:=SUM([.E25];[.K25];[.Q25];[.AC25];[.AC30];[.W30];[.Q30];[.K30];[.E30];[.E35];[.K35];[.Q35];[.W35];[.AC35])/[.$Z$6]" office:value-type="float" office:value="46.9" calcext:value-type="float">
            <text:p>46.9</text:p>
          </table:table-cell>
          <table:table-cell table:style-name="ce971" table:formula="of:=SUM([.F25];[.L25];[.R25];[.X25];[.AD30];[.X30];[.R30];[.L30];[.F30];[.F35];[.L35];[.R35];[.X35];[.AD35])/[.$Z$6]" office:value-type="float" office:value="61.5" calcext:value-type="float">
            <text:p>61.5</text:p>
          </table:table-cell>
          <table:table-cell/>
          <table:table-cell table:style-name="ce862" table:formula="of:=COM.MICROSOFT.TEXTJOIN(&quot;&quot;; TRUE(); &quot;{ &quot;&quot;efforts&quot;&quot;: [&quot;; [.AF28]; &quot;], &quot;&quot;pairs&quot;&quot;: &quot;;[.AF20]; &quot;}&quot;)" office:value-type="string" office:string-value="{ &quot;efforts&quot;: [1, 1.1, 1.2, 2, 2.1, 2.2, 3, 3.1, 3.2, 4, 4.1, 4.2, 5, 5.1, 5.2], &quot;pairs&quot;: {&quot;0&quot;: { &quot;0&quot;: 14, &quot;1&quot;: 1, &quot;2&quot;: 2, &quot;3&quot;: 3, &quot;4&quot;: 5, &quot;5&quot;: 9, &quot;6&quot;: 8, &quot;7&quot;: 7, &quot;8&quot;: 4, &quot;9&quot;: 6, &quot;10&quot;: 14, &quot;11&quot;: 13, &quot;12&quot;: 11, &quot;13&quot;: 10, &quot;14&quot;: 12}, &quot;1&quot;: { &quot;0&quot;: 9, &quot;1&quot;: 6, &quot;2&quot;: 1, &quot;3&quot;: 3, &quot;4&quot;: 6, &quot;5&quot;: 7, &quot;6&quot;: 8, &quot;7&quot;: 4, &quot;8&quot;: 2, &quot;9&quot;: 5, &quot;10&quot;: 13, &quot;11&quot;: 14, &quot;12&quot;: 11, &quot;13&quot;: 10, &quot;14&quot;: 12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7, &quot;4&quot;: 8, &quot;5&quot;: 5, &quot;6&quot;: 4, &quot;7&quot;: 6, &quot;8&quot;: 7, &quot;9&quot;: 9, &quot;10&quot;: 13, &quot;11&quot;: 11, &quot;12&quot;: 10, &quot;13&quot;: 12, &quot;14&quot;: 14}, &quot;4&quot;: { &quot;0&quot;: 7, &quot;1&quot;: 2, &quot;2&quot;: 1, &quot;3&quot;: 6, &quot;4&quot;: 13, &quot;5&quot;: 5, &quot;6&quot;: 4, &quot;7&quot;: 3, &quot;8&quot;: 9, &quot;9&quot;: 8, &quot;10&quot;: 12, &quot;11&quot;: 11, &quot;12&quot;: 10, &quot;13&quot;: 14, &quot;14&quot;: 13}, &quot;5&quot;: { &quot;0&quot;: 14, &quot;1&quot;: 9, &quot;2&quot;: 4, &quot;3&quot;: 6, &quot;4&quot;: 13, &quot;5&quot;: 5, &quot;6&quot;: 1, &quot;7&quot;: 2, &quot;8&quot;: 3, &quot;9&quot;: 8, &quot;10&quot;: 12, &quot;11&quot;: 10, &quot;12&quot;: 7, &quot;13&quot;: 5, &quot;14&quot;: 11}, &quot;6&quot;: { &quot;0&quot;: 14, &quot;1&quot;: 8, &quot;2&quot;: 3, &quot;3&quot;: 6, &quot;4&quot;: 13, &quot;5&quot;: 5, &quot;6&quot;: 2, &quot;7&quot;: 1, &quot;8&quot;: 2, &quot;9&quot;: 10, &quot;10&quot;: 11, &quot;11&quot;: 9, &quot;12&quot;: 7, &quot;13&quot;: 4, &quot;14&quot;: 12}, &quot;7&quot;: { &quot;0&quot;: 14, &quot;1&quot;: 5, &quot;2&quot;: 7, &quot;3&quot;: 9, &quot;4&quot;: 13, &quot;5&quot;: 4, &quot;6&quot;: 2, &quot;7&quot;: 0, &quot;8&quot;: 1, &quot;9&quot;: 10, &quot;10&quot;: 11, &quot;11&quot;: 6, &quot;12&quot;: 8, &quot;13&quot;: 3, &quot;14&quot;: 12}, &quot;8&quot;: { &quot;0&quot;: 12, &quot;1&quot;: 5, &quot;2&quot;: 3, &quot;3&quot;: 10, &quot;4&quot;: 14, &quot;5&quot;: 4, &quot;6&quot;: 2, &quot;7&quot;: 1, &quot;8&quot;: 1, &quot;9&quot;: 11, &quot;10&quot;: 8, &quot;11&quot;: 6, &quot;12&quot;: 7, &quot;13&quot;: 9, &quot;14&quot;: 13}, &quot;9&quot;: { &quot;0&quot;: 14, &quot;1&quot;: 6, &quot;2&quot;: 5, &quot;3&quot;: 10, &quot;4&quot;: 12, &quot;5&quot;: 3, &quot;6&quot;: 2, &quot;7&quot;: 1, &quot;8&quot;: 4, &quot;9&quot;: 9, &quot;10&quot;: 13, &quot;11&quot;: 7, &quot;12&quot;: 8, &quot;13&quot;: 9, &quot;14&quot;: 11}, &quot;10&quot;: { &quot;0&quot;: 14, &quot;1&quot;: 13, &quot;2&quot;: 10, &quot;3&quot;: 11, &quot;4&quot;: 12, &quot;5&quot;: 9, &quot;6&quot;: 6, &quot;7&quot;: 4, &quot;8&quot;: 5, &quot;9&quot;: 8, &quot;10&quot;: 11, &quot;11&quot;: 1, &quot;12&quot;: 2, &quot;13&quot;: 3, &quot;14&quot;: 7}, &quot;11&quot;: { &quot;0&quot;: 14, &quot;1&quot;: 13, &quot;2&quot;: 7, &quot;3&quot;: 8, &quot;4&quot;: 12, &quot;5&quot;: 9, &quot;6&quot;: 5, &quot;7&quot;: 3, &quot;8&quot;: 4, &quot;9&quot;: 10, &quot;10&quot;: 6, &quot;11&quot;: 10, &quot;12&quot;: 1, &quot;13&quot;: 2, &quot;14&quot;: 11}, &quot;12&quot;: { &quot;0&quot;: 14, &quot;1&quot;: 13, &quot;2&quot;: 10, &quot;3&quot;: 9, &quot;4&quot;: 12, &quot;5&quot;: 8, &quot;6&quot;: 6, &quot;7&quot;: 4, &quot;8&quot;: 3, &quot;9&quot;: 7, &quot;10&quot;: 5, &quot;11&quot;: 2, &quot;12&quot;: 8, &quot;13&quot;: 1, &quot;14&quot;: 11}, &quot;13&quot;: { &quot;0&quot;: 13, &quot;1&quot;: 12, &quot;2&quot;: 8, &quot;3&quot;: 11, &quot;4&quot;: 14, &quot;5&quot;: 6, &quot;6&quot;: 4, &quot;7&quot;: 3, &quot;8&quot;: 7, &quot;9&quot;: 10, &quot;10&quot;: 5, &quot;11&quot;: 2, &quot;12&quot;: 1, &quot;13&quot;: 4, &quot;14&quot;: 9}, &quot;14&quot;: { &quot;0&quot;: 14, &quot;1&quot;: 13, &quot;2&quot;: 10, &quot;3&quot;: 12, &quot;4&quot;: 11, &quot;5&quot;: 6, &quot;6&quot;: 4, &quot;7&quot;: 3, &quot;8&quot;: 8, &quot;9&quot;: 9, &quot;10&quot;: 5, &quot;11&quot;: 2, &quot;12&quot;: 1, &quot;13&quot;: 7, &quot;14&quot;: 12}}}" calcext:value-type="string" table:number-columns-spanned="29" table:number-rows-spanned="5">
            <text:p>{ "efforts": [1, 1.1, 1.2, 2, 2.1, 2.2, 3, 3.1, 3.2, 4, 4.1, 4.2, 5, 5.1, 5.2], "pairs": {"0": { "0": 14, "1": 1, "2": 2, "3": 3, "4": 5, "5": 9, "6": 8, "7": 7, "8": 4, "9": 6, "10": 14, "11": 13, "12": 11, "13": 10, "14": 12}, "1": { "0": 9, "1": 6, "2": 1, "3": 3, "4": 6, "5": 7, "6": 8, "7": 4, "8": 2, "9": 5, "10": 13, "11": 14, "12": 11, "13": 10, "14": 12}, "2": { "0": 9, "1": 3, "2": 3, "3": 1, "4": 8, "5": 7, "6": 4, "7": 5, "8": 2, "9": 6, "10": 12, "11": 11, "12": 13, "13": 10, "14": 14}, "3": { "0": 3, "1": 2, "2": 1, "3": 7, "4": 8, "5": 5, "6": 4, "7": 6, "8": 7, "9": 9, "10": 13, "11": 11, "12": 10, "13": 12, "14": 14}, "4": { "0": 7, "1": 2, "2": 1, "3": 6, "4": 13, "5": 5, "6": 4, "7": 3, "8": 9, "9": 8, "10": 12, "11": 11, "12": 10, "13": 14, "14": 13}, "5": { "0": 14, "1": 9, "2": 4, "3": 6, "4": 13, "5": 5, "6": 1, "7": 2, "8": 3, "9": 8, "10": 12, "11": 10, "12": 7, "13": 5, "14": 11}, "6": { "0": 14, "1": 8, "2": 3, "3": 6, "4": 13, "5": 5, "6": 2, "7": 1, "8": 2, "9": 10, "10": 11, "11": 9, "12": 7, "13": 4, "14": 12}, "7": { "0": 14, "1": 5, "2": 7, "3": 9, "4": 13, "5": 4, "6": 2, "7": 0, "8": 1, "9": 10, "10": 11, "11": 6, "12": 8, "13": 3, "14": 12}, "8": { "0": 12, "1": 5, "2": 3, "3": 10, "4": 14, "5": 4, "6": 2, "7": 1, "8": 1, "9": 11, "10": 8, "11": 6, "12": 7, "13": 9, "14": 13}, "9": { "0": 14, "1": 6, "2": 5, "3": 10, "4": 12, "5": 3, "6": 2, "7": 1, "8": 4, "9": 9, "10": 13, "11": 7, "12": 8, "13": 9, "14": 11}, "10": { "0": 14, "1": 13, "2": 10, "3": 11, "4": 12, "5": 9, "6": 6, "7": 4, "8": 5, "9": 8, "10": 11, "11": 1, "12": 2, "13": 3, "14": 7}, "11": { "0": 14, "1": 13, "2": 7, "3": 8, "4": 12, "5": 9, "6": 5, "7": 3, "8": 4, "9": 10, "10": 6, "11": 10, "12": 1, "13": 2, "14": 11}, "12": { "0": 14, "1": 13, "2": 10, "3": 9, "4": 12, "5": 8, "6": 6, "7": 4, "8": 3, "9": 7, "10": 5, "11": 2, "12": 8, "13": 1, "14": 11}, "13": { "0": 13, "1": 12, "2": 8, "3": 11, "4": 14, "5": 6, "6": 4, "7": 3, "8": 7, "9": 10, "10": 5, "11": 2, "12": 1, "13": 4, "14": 9}, "14": { "0": 14, "1": 13, "2": 10, "3": 12, "4": 11, "5": 6, "6": 4, "7": 3, "8": 8, "9": 9, "10": 5, "11": 2, "12": 1, "13": 7, "14": 12}}}</text:p>
          </table:table-cell>
          <table:covered-table-cell table:number-columns-repeated="28" table:style-name="ce861"/>
          <table:table-cell table:style-name="ce874"/>
          <table:table-cell table:style-name="ce861"/>
          <table:table-cell table:style-name="Default"/>
          <table:table-cell table:number-columns-repeated="36"/>
        </table:table-row>
        <table:table-row table:style-name="ro1">
          <table:table-cell table:style-name="ce620"/>
          <table:table-cell table:style-name="ce620" office:value-type="float" office:value="5" calcext:value-type="float">
            <text:p>5</text:p>
          </table:table-cell>
          <table:table-cell table:style-name="ce656" office:value-type="float" office:value="6" calcext:value-type="float">
            <text:p>6</text:p>
          </table:table-cell>
          <table:table-cell table:style-name="ce666" office:value-type="float" office:value="7" calcext:value-type="float">
            <text:p>7</text:p>
          </table:table-cell>
          <table:table-cell table:style-name="ce677" office:value-type="float" office:value="8" calcext:value-type="float">
            <text:p>8</text:p>
          </table:table-cell>
          <table:table-cell table:style-name="ce677" office:value-type="float" office:value="9" calcext:value-type="float">
            <text:p>9</text:p>
          </table:table-cell>
          <table:table-cell table:style-name="ce677"/>
          <table:table-cell table:style-name="ce622"/>
          <table:table-cell/>
          <table:table-cell table:style-name="ce708"/>
          <table:table-cell table:style-name="ce677"/>
          <table:table-cell table:style-name="ce677" office:value-type="float" office:value="20" calcext:value-type="float">
            <text:p>20</text:p>
          </table:table-cell>
          <table:table-cell table:style-name="ce731" office:value-type="float" office:value="21" calcext:value-type="float">
            <text:p>21</text:p>
          </table:table-cell>
          <table:table-cell table:style-name="ce666" office:value-type="float" office:value="22" calcext:value-type="float">
            <text:p>22</text:p>
          </table:table-cell>
          <table:table-cell table:style-name="ce656" office:value-type="float" office:value="23" calcext:value-type="float">
            <text:p>23</text:p>
          </table:table-cell>
          <table:table-cell table:style-name="ce620" office:value-type="float" office:value="24" calcext:value-type="float">
            <text:p>24</text:p>
          </table:table-cell>
          <table:table-cell table:style-name="ce620"/>
          <table:table-cell/>
          <table:table-cell table:style-name="ce798" office:value-type="float" office:value="2" calcext:value-type="float">
            <text:p>2</text:p>
          </table:table-cell>
          <table:table-cell table:style-name="ce949" office:value-type="float" office:value="5" calcext:value-type="float">
            <text:p>5</text:p>
          </table:table-cell>
          <table:table-cell table:style-name="ce949" office:value-type="float" office:value="2" calcext:value-type="float">
            <text:p>2</text:p>
          </table:table-cell>
          <table:table-cell table:style-name="ce949" office:value-type="float" office:value="0" calcext:value-type="float">
            <text:p>0</text:p>
          </table:table-cell>
          <table:table-cell table:style-name="ce949" office:value-type="float" office:value="1" calcext:value-type="float">
            <text:p>1</text:p>
          </table:table-cell>
          <table:table-cell table:style-name="ce949" office:value-type="float" office:value="9" calcext:value-type="float">
            <text:p>9</text:p>
          </table:table-cell>
          <table:table-cell table:style-name="Default"/>
          <table:table-cell table:style-name="ce971" table:formula="of:=SUM([.B26];[.H26];[.N26];[.T26];[.Z26];[.Z31];[.T31];[.N31];[.H31];[.B36];[.H36];[.N36];[.T36];[.Z36])/[.$Z$6]" office:value-type="float" office:value="40.2" calcext:value-type="float">
            <text:p>40.2</text:p>
          </table:table-cell>
          <table:table-cell table:style-name="ce971" table:formula="of:=SUM([.C26];[.I26];[.O26];[.U26];[.AA26];[.AA31];[.U31];[.O31];[.C31];[.C36];[.I36];[.O36];[.U36];[.AA36])/[.$Z$6]" office:value-type="float" office:value="29.8" calcext:value-type="float">
            <text:p>29.8</text:p>
          </table:table-cell>
          <table:table-cell table:style-name="ce971" table:formula="of:=SUM([.D26];[.J26];[.P26];[.V26];[.AB26];[.AB31];[.V31];[.J31];[.D31];[.D36];[.J36];[.P36];[.V36];[.AB36])/[.$Z$6]" office:value-type="float" office:value="27.1" calcext:value-type="float">
            <text:p>27.1</text:p>
          </table:table-cell>
          <table:table-cell table:style-name="ce971" table:formula="of:=SUM([.E26];[.K26];[.Q26];[.W26];[.AC26];[.AC31];[.Q31];[.K31];[.E31];[.E36];[.K36];[.Q36];[.W36];[.AC36])/[.$Z$6]" office:value-type="float" office:value="30.6" calcext:value-type="float">
            <text:p>30.6</text:p>
          </table:table-cell>
          <table:table-cell table:style-name="ce971" table:formula="of:=SUM([.F26];[.L26];[.R26];[.X26];[.AD26];[.X31];[.R31];[.L31];[.F31];[.F36];[.L36];[.R36];[.X36];[.AD36])/[.$Z$6]" office:value-type="float" office:value="49.5" calcext:value-type="float">
            <text:p>49.5</text:p>
          </table:table-cell>
          <table:table-cell/>
          <table:covered-table-cell table:number-columns-repeated="29" table:style-name="ce861"/>
          <table:table-cell table:style-name="ce861" table:number-columns-repeated="3"/>
          <table:table-cell table:number-columns-repeated="36"/>
        </table:table-row>
        <table:table-row table:style-name="ro1">
          <table:table-cell table:style-name="ce620"/>
          <table:table-cell table:style-name="ce620" office:value-type="float" office:value="10" calcext:value-type="float">
            <text:p>10</text:p>
          </table:table-cell>
          <table:table-cell table:style-name="ce656" office:value-type="float" office:value="11" calcext:value-type="float">
            <text:p>11</text:p>
          </table:table-cell>
          <table:table-cell table:style-name="ce666" office:value-type="float" office:value="12" calcext:value-type="float">
            <text:p>12</text:p>
          </table:table-cell>
          <table:table-cell table:style-name="ce677" office:value-type="float" office:value="13" calcext:value-type="float">
            <text:p>13</text:p>
          </table:table-cell>
          <table:table-cell table:style-name="ce687" office:value-type="float" office:value="14" calcext:value-type="float">
            <text:p>14</text:p>
          </table:table-cell>
          <table:table-cell table:style-name="ce677" table:number-columns-repeated="2"/>
          <table:table-cell/>
          <table:table-cell table:style-name="ce677" table:number-columns-repeated="2"/>
          <table:table-cell table:style-name="ce677" office:value-type="float" office:value="25" calcext:value-type="float">
            <text:p>25</text:p>
          </table:table-cell>
          <table:table-cell table:style-name="ce731" office:value-type="float" office:value="26" calcext:value-type="float">
            <text:p>26</text:p>
          </table:table-cell>
          <table:table-cell table:style-name="ce666" office:value-type="float" office:value="27" calcext:value-type="float">
            <text:p>27</text:p>
          </table:table-cell>
          <table:table-cell table:style-name="ce656" office:value-type="float" office:value="28" calcext:value-type="float">
            <text:p>28</text:p>
          </table:table-cell>
          <table:table-cell table:style-name="ce620" office:value-type="float" office:value="29" calcext:value-type="float">
            <text:p>29</text:p>
          </table:table-cell>
          <table:table-cell table:style-name="ce620"/>
          <table:table-cell/>
          <table:table-cell table:style-name="ce798" office:value-type="float" office:value="3" calcext:value-type="float">
            <text:p>3</text:p>
          </table:table-cell>
          <table:table-cell table:style-name="ce949" office:value-type="float" office:value="11" calcext:value-type="float">
            <text:p>11</text:p>
          </table:table-cell>
          <table:table-cell table:style-name="ce949" office:value-type="float" office:value="10" calcext:value-type="float">
            <text:p>10</text:p>
          </table:table-cell>
          <table:table-cell table:style-name="ce949" office:value-type="float" office:value="8" calcext:value-type="float">
            <text:p>8</text:p>
          </table:table-cell>
          <table:table-cell table:style-name="ce949" office:value-type="float" office:value="4" calcext:value-type="float">
            <text:p>4</text:p>
          </table:table-cell>
          <table:table-cell table:style-name="ce949" office:value-type="float" office:value="12" calcext:value-type="float">
            <text:p>12</text:p>
          </table:table-cell>
          <table:table-cell table:style-name="Default"/>
          <table:table-cell table:style-name="ce971" table:formula="of:=SUM([.B27];[.H27];[.N27];[.T27];[.Z27];[.Z32];[.T32];[.N32];[.H32];[.B32];[.H37];[.N37];[.T37];[.Z37])/[.$Z$6]" office:value-type="float" office:value="56.7" calcext:value-type="float">
            <text:p>56.7</text:p>
          </table:table-cell>
          <table:table-cell table:style-name="ce971" table:formula="of:=SUM([.C27];[.I27];[.O27];[.U27];[.AA27];[.AA32];[.U32];[.O32];[.I32];[.C32];[.C37];[.O37];[.U37];[.AA37])/[.$Z$6]" office:value-type="float" office:value="44.8" calcext:value-type="float">
            <text:p>44.8</text:p>
          </table:table-cell>
          <table:table-cell table:style-name="ce971" table:formula="of:=SUM([.D27];[.J27];[.P27];[.V27];[.AB27];[.AB32];[.V32];[.P32];[.J32];[.D32];[.D37];[.J37];[.V37];[.AB37])/[.$Z$6]" office:value-type="float" office:value="41.9" calcext:value-type="float">
            <text:p>41.9</text:p>
          </table:table-cell>
          <table:table-cell table:style-name="ce971" table:formula="of:=SUM([.E27];[.K27];[.Q27];[.W27];[.AC27];[.AC32];[.W32];[.Q32];[.K32];[.E32];[.E37];[.K37];[.Q37];[.AC37])/[.$Z$6]" office:value-type="float" office:value="44.2" calcext:value-type="float">
            <text:p>44.2</text:p>
          </table:table-cell>
          <table:table-cell table:style-name="ce971" table:formula="of:=SUM([.F27];[.L27];[.R27];[.X27];[.AD27];[.AD32];[.X32];[.R32];[.L32];[.F32];[.F37];[.L37];[.R37];[.X37])/[.$Z$6]" office:value-type="float" office:value="64.5" calcext:value-type="float">
            <text:p>64.5</text:p>
          </table:table-cell>
          <table:table-cell table:style-name="ce856"/>
          <table:covered-table-cell table:number-columns-repeated="29" table:style-name="ce861"/>
          <table:table-cell table:style-name="ce874"/>
          <table:table-cell table:style-name="ce861" table:number-columns-repeated="2"/>
          <table:table-cell table:number-columns-repeated="36"/>
        </table:table-row>
        <table:table-row table:style-name="ro1">
          <table:table-cell table:style-name="ce620"/>
          <table:table-cell table:style-name="ce879"/>
          <table:table-cell table:style-name="ce656"/>
          <table:table-cell table:style-name="ce666"/>
          <table:table-cell table:style-name="ce679" table:number-columns-spanned="1" table:number-rows-spanned="2"/>
          <table:table-cell table:style-name="ce679" table:number-columns-spanned="1" table:number-rows-spanned="2"/>
          <table:table-cell table:style-name="ce679" table:number-columns-spanned="1" table:number-rows-spanned="2"/>
          <table:table-cell table:style-name="ce679" table:number-columns-spanned="1" table:number-rows-spanned="2"/>
          <table:table-cell/>
          <table:table-cell table:style-name="ce679" table:number-columns-spanned="1" table:number-rows-spanned="2"/>
          <table:table-cell table:style-name="ce679" table:number-columns-spanned="1" table:number-rows-spanned="2"/>
          <table:table-cell table:style-name="ce679" table:number-columns-spanned="1" table:number-rows-spanned="2"/>
          <table:table-cell table:style-name="ce732" table:number-columns-spanned="1" table:number-rows-spanned="2"/>
          <table:table-cell table:style-name="ce666"/>
          <table:table-cell table:style-name="ce656"/>
          <table:table-cell table:style-name="ce939"/>
          <table:table-cell table:style-name="ce620"/>
          <table:table-cell/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798" office:value-type="float" office:value="2" calcext:value-type="float">
            <text:p>2</text:p>
          </table:table-cell>
          <table:table-cell table:style-name="ce798" office:value-type="float" office:value="3" calcext:value-type="float">
            <text:p>3</text:p>
          </table:table-cell>
          <table:table-cell table:style-name="ce798" office:value-type="float" office:value="4" calcext:value-type="float">
            <text:p>4</text:p>
          </table:table-cell>
          <table:table-cell table:style-name="ce798" office:value-type="float" office:value="5" calcext:value-type="float">
            <text:p>5</text:p>
          </table:table-cell>
          <table:table-cell table:style-name="Default"/>
          <table:table-cell table:style-name="ce836"/>
          <table:table-cell table:style-name="ce844"/>
          <table:table-cell table:style-name="ce836"/>
          <table:table-cell table:style-name="Default"/>
          <table:table-cell table:style-name="ce856" table:number-columns-repeated="2"/>
          <table:covered-table-cell table:style-name="ce856"/>
          <table:covered-table-cell table:number-columns-repeated="28"/>
          <table:table-cell table:number-columns-repeated="2"/>
          <table:table-cell table:style-name="Default"/>
          <table:table-cell table:number-columns-repeated="36"/>
        </table:table-row>
        <table:table-row table:style-name="ro1">
          <table:table-cell table:style-name="ce622" table:number-columns-repeated="4"/>
          <table:covered-table-cell table:style-name="ce622"/>
          <table:covered-table-cell table:number-columns-repeated="2" table:style-name="ce903"/>
          <table:covered-table-cell table:style-name="ce679"/>
          <table:table-cell/>
          <table:covered-table-cell table:style-name="ce679"/>
          <table:covered-table-cell table:number-columns-repeated="2" table:style-name="ce903"/>
          <table:covered-table-cell table:style-name="ce732"/>
          <table:table-cell table:style-name="ce622" table:number-columns-repeated="4"/>
          <table:table-cell/>
          <table:table-cell table:style-name="Default"/>
          <table:table-cell table:style-name="ce812" office:value-type="string" calcext:value-type="string">
            <text:p>p</text:p>
          </table:table-cell>
          <table:table-cell table:style-name="ce812" office:value-type="string" calcext:value-type="string">
            <text:p>r</text:p>
          </table:table-cell>
          <table:table-cell table:style-name="ce812" office:value-type="string" calcext:value-type="string">
            <text:p>m</text:p>
          </table:table-cell>
          <table:table-cell table:number-columns-repeated="2" table:style-name="ce812" office:value-type="string" calcext:value-type="string">
            <text:p>i</text:p>
          </table:table-cell>
          <table:table-cell table:style-name="Default"/>
          <table:table-cell table:style-name="ce837" office:value-type="float" office:value="1" calcext:value-type="float">
            <text:p>1.0</text:p>
          </table:table-cell>
          <table:table-cell table:style-name="Default" table:number-columns-repeated="4"/>
          <table:table-cell/>
          <table:covered-table-cell table:number-columns-repeated="13"/>
          <table:covered-table-cell table:number-columns-repeated="3" table:style-name="ce856"/>
          <table:covered-table-cell table:number-columns-repeated="13"/>
          <table:table-cell table:number-columns-repeated="2"/>
          <table:table-cell table:style-name="Default"/>
          <table:table-cell table:number-columns-repeated="36"/>
        </table:table-row>
        <table:table-row table:style-name="ro2">
          <table:table-cell/>
          <table:table-cell table:style-name="Default" office:value-type="string" calcext:value-type="string">
            <text:p>+</text:p>
          </table:table-cell>
          <table:table-cell table:style-name="Default" table:number-columns-repeated="5"/>
          <table:table-cell table:style-name="Default" office:value-type="string" calcext:value-type="string">
            <text:p>+</text:p>
          </table:table-cell>
          <table:table-cell/>
          <table:table-cell table:style-name="Default" table:number-columns-repeated="4"/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/>
          <table:table-cell table:style-name="Default"/>
          <table:table-cell table:style-name="Default" office:value-type="string" calcext:value-type="string">
            <text:p>+</text:p>
          </table:table-cell>
          <table:table-cell table:style-name="Default" table:number-columns-repeated="5"/>
          <table:table-cell table:style-name="Default" office:value-type="string" calcext:value-type="string">
            <text:p>+</text:p>
          </table:table-cell>
          <table:table-cell table:style-name="Default" table:number-columns-repeated="4"/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 table:style-name="ce623"/>
          <table:table-cell table:style-name="ce880" table:formula="of:=[.$T$2]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690"/>
          <table:table-cell office:value-type="float" office:value="9" calcext:value-type="float">
            <text:p>9</text:p>
          </table:table-cell>
          <table:table-cell table:style-name="ce880" table:formula="of:=[.$U$2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690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880" table:formula="of:=[.$V$2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852" office:value-type="float" office:value="8" calcext:value-type="float">
            <text:p>8</text:p>
          </table:table-cell>
          <table:table-cell table:style-name="ce690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0" table:formula="of:=[.$W$2]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690"/>
          <table:table-cell office:value-type="float" office:value="7" calcext:value-type="float">
            <text:p>7</text:p>
          </table:table-cell>
          <table:table-cell table:style-name="ce896" office:value-type="float" office:value="2" calcext:value-type="float">
            <text:p>2</text:p>
          </table:table-cell>
          <table:table-cell table:style-name="ce85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880" table:formula="of:=[.$X$2]" office:value-type="float" office:value="13" calcext:value-type="float">
            <text:p>13</text:p>
          </table:table-cell>
          <table:table-cell/>
          <table:table-cell table:style-name="ce863" table:formula="of:=COM.MICROSOFT.CONCAT(&quot;&quot;&quot;&quot;;[.$B$2]; &quot;&quot;&quot;: &quot;; [.B8])" office:value-type="string" office:string-value="&quot;0&quot;: 14" calcext:value-type="string">
            <text:p>"0": 14</text:p>
          </table:table-cell>
          <table:table-cell table:style-name="ce863" table:formula="of:=COM.MICROSOFT.CONCAT(&quot;&quot;&quot;&quot;;[.$C$2]; &quot;&quot;&quot;: &quot;; [.C8])" office:value-type="string" office:string-value="&quot;1&quot;: 1" calcext:value-type="string">
            <text:p>"1": 1</text:p>
          </table:table-cell>
          <table:table-cell table:style-name="ce863" table:formula="of:=COM.MICROSOFT.CONCAT(&quot;&quot;&quot;&quot;;[.$D$2]; &quot;&quot;&quot;: &quot;; [.D8])" office:value-type="string" office:string-value="&quot;2&quot;: 2" calcext:value-type="string">
            <text:p>"2": 2</text:p>
          </table:table-cell>
          <table:table-cell table:style-name="ce863" table:formula="of:=COM.MICROSOFT.CONCAT(&quot;&quot;&quot;&quot;;[.$E$2]; &quot;&quot;&quot;: &quot;; [.E8])" office:value-type="string" office:string-value="&quot;3&quot;: 3" calcext:value-type="string">
            <text:p>"3": 3</text:p>
          </table:table-cell>
          <table:table-cell table:style-name="ce863" table:formula="of:=COM.MICROSOFT.CONCAT(&quot;&quot;&quot;&quot;;[.$F$2]; &quot;&quot;&quot;: &quot;; [.F8])" office:value-type="string" office:string-value="&quot;4&quot;: 5" calcext:value-type="string">
            <text:p>"4": 5</text:p>
          </table:table-cell>
          <table:table-cell table:style-name="ce863"/>
          <table:table-cell table:style-name="ce863" table:formula="of:=COM.MICROSOFT.CONCAT(&quot;&quot;&quot;&quot;;[.$B$2]; &quot;&quot;&quot;: &quot;; [.H8])" office:value-type="string" office:string-value="&quot;0&quot;: 9" calcext:value-type="string">
            <text:p>"0": 9</text:p>
          </table:table-cell>
          <table:table-cell table:style-name="ce863" table:formula="of:=COM.MICROSOFT.CONCAT(&quot;&quot;&quot;&quot;;[.$C$2]; &quot;&quot;&quot;: &quot;; [.I8])" office:value-type="string" office:string-value="&quot;1&quot;: 6" calcext:value-type="string">
            <text:p>"1": 6</text:p>
          </table:table-cell>
          <table:table-cell table:style-name="ce863" table:formula="of:=COM.MICROSOFT.CONCAT(&quot;&quot;&quot;&quot;;[.$D$2]; &quot;&quot;&quot;: &quot;; [.J8])" office:value-type="string" office:string-value="&quot;2&quot;: 1" calcext:value-type="string">
            <text:p>"2": 1</text:p>
          </table:table-cell>
          <table:table-cell table:style-name="ce863" table:formula="of:=COM.MICROSOFT.CONCAT(&quot;&quot;&quot;&quot;;[.$E$2]; &quot;&quot;&quot;: &quot;; [.K8])" office:value-type="string" office:string-value="&quot;3&quot;: 3" calcext:value-type="string">
            <text:p>"3": 3</text:p>
          </table:table-cell>
          <table:table-cell table:style-name="ce863" table:formula="of:=COM.MICROSOFT.CONCAT(&quot;&quot;&quot;&quot;;[.$F$2]; &quot;&quot;&quot;: &quot;; [.L8])" office:value-type="string" office:string-value="&quot;4&quot;: 6" calcext:value-type="string">
            <text:p>"4": 6</text:p>
          </table:table-cell>
          <table:table-cell table:style-name="ce863"/>
          <table:table-cell table:style-name="ce863" table:formula="of:=COM.MICROSOFT.CONCAT(&quot;&quot;&quot;&quot;;[.$B$2]; &quot;&quot;&quot;: &quot;; [.N8])" office:value-type="string" office:string-value="&quot;0&quot;: 9" calcext:value-type="string">
            <text:p>"0": 9</text:p>
          </table:table-cell>
          <table:table-cell table:style-name="ce863" table:formula="of:=COM.MICROSOFT.CONCAT(&quot;&quot;&quot;&quot;;[.$C$2]; &quot;&quot;&quot;: &quot;; [.O8])" office:value-type="string" office:string-value="&quot;1&quot;: 3" calcext:value-type="string">
            <text:p>"1": 3</text:p>
          </table:table-cell>
          <table:table-cell table:style-name="ce863" table:formula="of:=COM.MICROSOFT.CONCAT(&quot;&quot;&quot;&quot;;[.$D$2]; &quot;&quot;&quot;: &quot;; [.P8])" office:value-type="string" office:string-value="&quot;2&quot;: 3" calcext:value-type="string">
            <text:p>"2": 3</text:p>
          </table:table-cell>
          <table:table-cell table:style-name="ce863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863" table:formula="of:=COM.MICROSOFT.CONCAT(&quot;&quot;&quot;&quot;;[.$F$2]; &quot;&quot;&quot;: &quot;; [.R8])" office:value-type="string" office:string-value="&quot;4&quot;: 8" calcext:value-type="string">
            <text:p>"4": 8</text:p>
          </table:table-cell>
          <table:table-cell table:style-name="ce863"/>
          <table:table-cell table:style-name="ce863" table:formula="of:=COM.MICROSOFT.CONCAT(&quot;&quot;&quot;&quot;;[.$B$2]; &quot;&quot;&quot;: &quot;; [.T8])" office:value-type="string" office:string-value="&quot;0&quot;: 3" calcext:value-type="string">
            <text:p>"0": 3</text:p>
          </table:table-cell>
          <table:table-cell table:style-name="ce863" table:formula="of:=COM.MICROSOFT.CONCAT(&quot;&quot;&quot;&quot;;[.$C$2]; &quot;&quot;&quot;: &quot;; [.U8])" office:value-type="string" office:string-value="&quot;1&quot;: 2" calcext:value-type="string">
            <text:p>"1": 2</text:p>
          </table:table-cell>
          <table:table-cell table:style-name="ce863" table:formula="of:=COM.MICROSOFT.CONCAT(&quot;&quot;&quot;&quot;;[.$D$2]; &quot;&quot;&quot;: &quot;; [.V8])" office:value-type="string" office:string-value="&quot;2&quot;: 1" calcext:value-type="string">
            <text:p>"2": 1</text:p>
          </table:table-cell>
          <table:table-cell table:style-name="ce863" table:formula="of:=COM.MICROSOFT.CONCAT(&quot;&quot;&quot;&quot;;[.$E$2]; &quot;&quot;&quot;: &quot;; [.W8])" office:value-type="string" office:string-value="&quot;3&quot;: 7" calcext:value-type="string">
            <text:p>"3": 7</text:p>
          </table:table-cell>
          <table:table-cell table:style-name="ce863" table:formula="of:=COM.MICROSOFT.CONCAT(&quot;&quot;&quot;&quot;;[.$F$2]; &quot;&quot;&quot;: &quot;; [.X8])" office:value-type="string" office:string-value="&quot;4&quot;: 8" calcext:value-type="string">
            <text:p>"4": 8</text:p>
          </table:table-cell>
          <table:table-cell table:style-name="ce863"/>
          <table:table-cell table:style-name="ce863" table:formula="of:=COM.MICROSOFT.CONCAT(&quot;&quot;&quot;&quot;;[.$B$2]; &quot;&quot;&quot;: &quot;; [.Z8])" office:value-type="string" office:string-value="&quot;0&quot;: 7" calcext:value-type="string">
            <text:p>"0": 7</text:p>
          </table:table-cell>
          <table:table-cell table:style-name="ce863" table:formula="of:=COM.MICROSOFT.CONCAT(&quot;&quot;&quot;&quot;;[.$C$2]; &quot;&quot;&quot;: &quot;; [.AA8])" office:value-type="string" office:string-value="&quot;1&quot;: 2" calcext:value-type="string">
            <text:p>"1": 2</text:p>
          </table:table-cell>
          <table:table-cell table:style-name="ce863" table:formula="of:=COM.MICROSOFT.CONCAT(&quot;&quot;&quot;&quot;;[.$D$2]; &quot;&quot;&quot;: &quot;; [.AB8])" office:value-type="string" office:string-value="&quot;2&quot;: 1" calcext:value-type="string">
            <text:p>"2": 1</text:p>
          </table:table-cell>
          <table:table-cell table:style-name="ce863" table:formula="of:=COM.MICROSOFT.CONCAT(&quot;&quot;&quot;&quot;;[.$E$2]; &quot;&quot;&quot;: &quot;; [.AC8])" office:value-type="string" office:string-value="&quot;3&quot;: 6" calcext:value-type="string">
            <text:p>"3": 6</text:p>
          </table:table-cell>
          <table:table-cell table:style-name="ce863" table:formula="of:=COM.MICROSOFT.CONCAT(&quot;&quot;&quot;&quot;;[.$F$2]; &quot;&quot;&quot;: &quot;; [.AD8])" office:value-type="string" office:string-value="&quot;4&quot;: 13" calcext:value-type="string">
            <text:p>"4": 13</text:p>
          </table:table-cell>
          <table:table-cell table:style-name="ce875" table:number-columns-repeated="2"/>
          <table:table-cell table:style-name="ce864" table:formula="of:=COM.MICROSOFT.CONCAT(&quot;&quot;&quot;0&quot;&quot;: { &quot;;COM.MICROSOFT.TEXTJOIN(&quot;, &quot;;TRUE();[.AF8:.AJ10]);&quot;}&quot;)" office:value-type="string" office:string-value="&quot;0&quot;: { &quot;0&quot;: 14, &quot;1&quot;: 1, &quot;2&quot;: 2, &quot;3&quot;: 3, &quot;4&quot;: 5, &quot;5&quot;: 9, &quot;6&quot;: 8, &quot;7&quot;: 7, &quot;8&quot;: 4, &quot;9&quot;: 6, &quot;10&quot;: 14, &quot;11&quot;: 13, &quot;12&quot;: 11, &quot;13&quot;: 10, &quot;14&quot;: 12}" calcext:value-type="string">
            <text:p>"0": { "0": 14, "1": 1, "2": 2, "3": 3, "4": 5, "5": 9, "6": 8, "7": 7, "8": 4, "9": 6, "10": 14, "11": 13, "12": 11, "13": 10, "14": 12}</text:p>
          </table:table-cell>
          <table:table-cell table:number-columns-repeated="3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690"/>
          <table:table-cell office:value-type="float" office:value="7" calcext:value-type="float">
            <text:p>7</text:p>
          </table:table-cell>
          <table:table-cell table:style-name="ce845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690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852" office:value-type="float" office:value="6" calcext:value-type="float">
            <text:p>6</text:p>
          </table:table-cell>
          <table:table-cell table:style-name="ce690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690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style-name="ce863" table:formula="of:=COM.MICROSOFT.CONCAT(&quot;&quot;&quot;&quot;;[.$B$3]; &quot;&quot;&quot;: &quot;; [.B9])" office:value-type="string" office:string-value="&quot;5&quot;: 9" calcext:value-type="string">
            <text:p>"5": 9</text:p>
          </table:table-cell>
          <table:table-cell table:style-name="ce863" table:formula="of:=COM.MICROSOFT.CONCAT(&quot;&quot;&quot;&quot;;[.$C$3]; &quot;&quot;&quot;: &quot;; [.C9])" office:value-type="string" office:string-value="&quot;6&quot;: 8" calcext:value-type="string">
            <text:p>"6": 8</text:p>
          </table:table-cell>
          <table:table-cell table:style-name="ce863" table:formula="of:=COM.MICROSOFT.CONCAT(&quot;&quot;&quot;&quot;;[.$D$3]; &quot;&quot;&quot;: &quot;; [.D9])" office:value-type="string" office:string-value="&quot;7&quot;: 7" calcext:value-type="string">
            <text:p>"7": 7</text:p>
          </table:table-cell>
          <table:table-cell table:style-name="ce863" table:formula="of:=COM.MICROSOFT.CONCAT(&quot;&quot;&quot;&quot;;[.$E$3]; &quot;&quot;&quot;: &quot;; [.E9])" office:value-type="string" office:string-value="&quot;8&quot;: 4" calcext:value-type="string">
            <text:p>"8": 4</text:p>
          </table:table-cell>
          <table:table-cell table:style-name="ce863" table:formula="of:=COM.MICROSOFT.CONCAT(&quot;&quot;&quot;&quot;;[.$F$3]; &quot;&quot;&quot;: &quot;; [.F9])" office:value-type="string" office:string-value="&quot;9&quot;: 6" calcext:value-type="string">
            <text:p>"9": 6</text:p>
          </table:table-cell>
          <table:table-cell table:style-name="ce863"/>
          <table:table-cell table:style-name="ce863" table:formula="of:=COM.MICROSOFT.CONCAT(&quot;&quot;&quot;&quot;;[.$B$3]; &quot;&quot;&quot;: &quot;; [.H9])" office:value-type="string" office:string-value="&quot;5&quot;: 7" calcext:value-type="string">
            <text:p>"5": 7</text:p>
          </table:table-cell>
          <table:table-cell table:style-name="ce863" table:formula="of:=COM.MICROSOFT.CONCAT(&quot;&quot;&quot;&quot;;[.$C$3]; &quot;&quot;&quot;: &quot;; [.I9])" office:value-type="string" office:string-value="&quot;6&quot;: 8" calcext:value-type="string">
            <text:p>"6": 8</text:p>
          </table:table-cell>
          <table:table-cell table:style-name="ce863" table:formula="of:=COM.MICROSOFT.CONCAT(&quot;&quot;&quot;&quot;;[.$D$3]; &quot;&quot;&quot;: &quot;; [.J9])" office:value-type="string" office:string-value="&quot;7&quot;: 4" calcext:value-type="string">
            <text:p>"7": 4</text:p>
          </table:table-cell>
          <table:table-cell table:style-name="ce863" table:formula="of:=COM.MICROSOFT.CONCAT(&quot;&quot;&quot;&quot;;[.$E$3]; &quot;&quot;&quot;: &quot;; [.K9])" office:value-type="string" office:string-value="&quot;8&quot;: 2" calcext:value-type="string">
            <text:p>"8": 2</text:p>
          </table:table-cell>
          <table:table-cell table:style-name="ce863" table:formula="of:=COM.MICROSOFT.CONCAT(&quot;&quot;&quot;&quot;;[.$F$3]; &quot;&quot;&quot;: &quot;; [.L9])" office:value-type="string" office:string-value="&quot;9&quot;: 5" calcext:value-type="string">
            <text:p>"9": 5</text:p>
          </table:table-cell>
          <table:table-cell table:style-name="ce863"/>
          <table:table-cell table:style-name="ce863" table:formula="of:=COM.MICROSOFT.CONCAT(&quot;&quot;&quot;&quot;;[.$B$3]; &quot;&quot;&quot;: &quot;; [.N9])" office:value-type="string" office:string-value="&quot;5&quot;: 7" calcext:value-type="string">
            <text:p>"5": 7</text:p>
          </table:table-cell>
          <table:table-cell table:style-name="ce863" table:formula="of:=COM.MICROSOFT.CONCAT(&quot;&quot;&quot;&quot;;[.$C$3]; &quot;&quot;&quot;: &quot;; [.O9])" office:value-type="string" office:string-value="&quot;6&quot;: 4" calcext:value-type="string">
            <text:p>"6": 4</text:p>
          </table:table-cell>
          <table:table-cell table:style-name="ce863" table:formula="of:=COM.MICROSOFT.CONCAT(&quot;&quot;&quot;&quot;;[.$D$3]; &quot;&quot;&quot;: &quot;; [.P9])" office:value-type="string" office:string-value="&quot;7&quot;: 5" calcext:value-type="string">
            <text:p>"7": 5</text:p>
          </table:table-cell>
          <table:table-cell table:style-name="ce863" table:formula="of:=COM.MICROSOFT.CONCAT(&quot;&quot;&quot;&quot;;[.$E$3]; &quot;&quot;&quot;: &quot;; [.Q9])" office:value-type="string" office:string-value="&quot;8&quot;: 2" calcext:value-type="string">
            <text:p>"8": 2</text:p>
          </table:table-cell>
          <table:table-cell table:style-name="ce863" table:formula="of:=COM.MICROSOFT.CONCAT(&quot;&quot;&quot;&quot;;[.$F$3]; &quot;&quot;&quot;: &quot;; [.R9])" office:value-type="string" office:string-value="&quot;9&quot;: 6" calcext:value-type="string">
            <text:p>"9": 6</text:p>
          </table:table-cell>
          <table:table-cell table:style-name="ce863"/>
          <table:table-cell table:style-name="ce863" table:formula="of:=COM.MICROSOFT.CONCAT(&quot;&quot;&quot;&quot;;[.$B$3]; &quot;&quot;&quot;: &quot;; [.T9])" office:value-type="string" office:string-value="&quot;5&quot;: 5" calcext:value-type="string">
            <text:p>"5": 5</text:p>
          </table:table-cell>
          <table:table-cell table:style-name="ce863" table:formula="of:=COM.MICROSOFT.CONCAT(&quot;&quot;&quot;&quot;;[.$C$3]; &quot;&quot;&quot;: &quot;; [.U9])" office:value-type="string" office:string-value="&quot;6&quot;: 4" calcext:value-type="string">
            <text:p>"6": 4</text:p>
          </table:table-cell>
          <table:table-cell table:style-name="ce863" table:formula="of:=COM.MICROSOFT.CONCAT(&quot;&quot;&quot;&quot;;[.$D$3]; &quot;&quot;&quot;: &quot;; [.V9])" office:value-type="string" office:string-value="&quot;7&quot;: 6" calcext:value-type="string">
            <text:p>"7": 6</text:p>
          </table:table-cell>
          <table:table-cell table:style-name="ce863" table:formula="of:=COM.MICROSOFT.CONCAT(&quot;&quot;&quot;&quot;;[.$E$3]; &quot;&quot;&quot;: &quot;; [.W9])" office:value-type="string" office:string-value="&quot;8&quot;: 7" calcext:value-type="string">
            <text:p>"8": 7</text:p>
          </table:table-cell>
          <table:table-cell table:style-name="ce863" table:formula="of:=COM.MICROSOFT.CONCAT(&quot;&quot;&quot;&quot;;[.$F$3]; &quot;&quot;&quot;: &quot;; [.X9])" office:value-type="string" office:string-value="&quot;9&quot;: 9" calcext:value-type="string">
            <text:p>"9": 9</text:p>
          </table:table-cell>
          <table:table-cell table:style-name="ce863"/>
          <table:table-cell table:style-name="ce863" table:formula="of:=COM.MICROSOFT.CONCAT(&quot;&quot;&quot;&quot;;[.$B$3]; &quot;&quot;&quot;: &quot;; [.Z9])" office:value-type="string" office:string-value="&quot;5&quot;: 5" calcext:value-type="string">
            <text:p>"5": 5</text:p>
          </table:table-cell>
          <table:table-cell table:style-name="ce863" table:formula="of:=COM.MICROSOFT.CONCAT(&quot;&quot;&quot;&quot;;[.$C$3]; &quot;&quot;&quot;: &quot;; [.AA9])" office:value-type="string" office:string-value="&quot;6&quot;: 4" calcext:value-type="string">
            <text:p>"6": 4</text:p>
          </table:table-cell>
          <table:table-cell table:style-name="ce863" table:formula="of:=COM.MICROSOFT.CONCAT(&quot;&quot;&quot;&quot;;[.$D$3]; &quot;&quot;&quot;: &quot;; [.AB9])" office:value-type="string" office:string-value="&quot;7&quot;: 3" calcext:value-type="string">
            <text:p>"7": 3</text:p>
          </table:table-cell>
          <table:table-cell table:style-name="ce863" table:formula="of:=COM.MICROSOFT.CONCAT(&quot;&quot;&quot;&quot;;[.$E$3]; &quot;&quot;&quot;: &quot;; [.AC9])" office:value-type="string" office:string-value="&quot;8&quot;: 9" calcext:value-type="string">
            <text:p>"8": 9</text:p>
          </table:table-cell>
          <table:table-cell table:style-name="ce863" table:formula="of:=COM.MICROSOFT.CONCAT(&quot;&quot;&quot;&quot;;[.$F$3]; &quot;&quot;&quot;: &quot;; [.AD9])" office:value-type="string" office:string-value="&quot;9&quot;: 8" calcext:value-type="string">
            <text:p>"9": 8</text:p>
          </table:table-cell>
          <table:table-cell table:style-name="ce875" table:number-columns-repeated="2"/>
          <table:table-cell table:formula="of:=COM.MICROSOFT.CONCAT(&quot;&quot;&quot;1&quot;&quot;: { &quot;;COM.MICROSOFT.TEXTJOIN(&quot;, &quot;;TRUE();[.AL8:.AP10]);&quot;}&quot;)" office:value-type="string" office:string-value="&quot;1&quot;: { &quot;0&quot;: 9, &quot;1&quot;: 6, &quot;2&quot;: 1, &quot;3&quot;: 3, &quot;4&quot;: 6, &quot;5&quot;: 7, &quot;6&quot;: 8, &quot;7&quot;: 4, &quot;8&quot;: 2, &quot;9&quot;: 5, &quot;10&quot;: 13, &quot;11&quot;: 14, &quot;12&quot;: 11, &quot;13&quot;: 10, &quot;14&quot;: 12}" calcext:value-type="string">
            <text:p>"1": { "0": 9, "1": 6, "2": 1, "3": 3, "4": 6, "5": 7, "6": 8, "7": 4, "8": 2, "9": 5, "10": 13, "11": 14, "12": 11, "13": 10, "14": 12}</text:p>
          </table:table-cell>
          <table:table-cell table:number-columns-repeated="3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690"/>
          <table:table-cell office:value-type="float" office:value="13" calcext:value-type="float">
            <text:p>13</text:p>
          </table:table-cell>
          <table:table-cell table:style-name="ce845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690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style-name="ce852" office:value-type="float" office:value="14" calcext:value-type="float">
            <text:p>14</text:p>
          </table:table-cell>
          <table:table-cell table:style-name="ce690"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690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863" table:formula="of:=COM.MICROSOFT.CONCAT(&quot;&quot;&quot;&quot;;[.$B$4]; &quot;&quot;&quot;: &quot;; [.B10])" office:value-type="string" office:string-value="&quot;10&quot;: 14" calcext:value-type="string">
            <text:p>"10": 14</text:p>
          </table:table-cell>
          <table:table-cell table:style-name="ce863" table:formula="of:=COM.MICROSOFT.CONCAT(&quot;&quot;&quot;&quot;;[.$C$4]; &quot;&quot;&quot;: &quot;; [.C10])" office:value-type="string" office:string-value="&quot;11&quot;: 13" calcext:value-type="string">
            <text:p>"11": 13</text:p>
          </table:table-cell>
          <table:table-cell table:style-name="ce863" table:formula="of:=COM.MICROSOFT.CONCAT(&quot;&quot;&quot;&quot;;[.$D$4]; &quot;&quot;&quot;: &quot;; [.D10])" office:value-type="string" office:string-value="&quot;12&quot;: 11" calcext:value-type="string">
            <text:p>"12": 11</text:p>
          </table:table-cell>
          <table:table-cell table:style-name="ce863" table:formula="of:=COM.MICROSOFT.CONCAT(&quot;&quot;&quot;&quot;;[.$E$4]; &quot;&quot;&quot;: &quot;; [.E10])" office:value-type="string" office:string-value="&quot;13&quot;: 10" calcext:value-type="string">
            <text:p>"13": 10</text:p>
          </table:table-cell>
          <table:table-cell table:style-name="ce863" table:formula="of:=COM.MICROSOFT.CONCAT(&quot;&quot;&quot;&quot;;[.$F$4]; &quot;&quot;&quot;: &quot;; [.F10])" office:value-type="string" office:string-value="&quot;14&quot;: 12" calcext:value-type="string">
            <text:p>"14": 12</text:p>
          </table:table-cell>
          <table:table-cell table:style-name="ce863"/>
          <table:table-cell table:style-name="ce863" table:formula="of:=COM.MICROSOFT.CONCAT(&quot;&quot;&quot;&quot;;[.$B$4]; &quot;&quot;&quot;: &quot;; [.H10])" office:value-type="string" office:string-value="&quot;10&quot;: 13" calcext:value-type="string">
            <text:p>"10": 13</text:p>
          </table:table-cell>
          <table:table-cell table:style-name="ce863" table:formula="of:=COM.MICROSOFT.CONCAT(&quot;&quot;&quot;&quot;;[.$C$4]; &quot;&quot;&quot;: &quot;; [.I10])" office:value-type="string" office:string-value="&quot;11&quot;: 14" calcext:value-type="string">
            <text:p>"11": 14</text:p>
          </table:table-cell>
          <table:table-cell table:style-name="ce863" table:formula="of:=COM.MICROSOFT.CONCAT(&quot;&quot;&quot;&quot;;[.$D$4]; &quot;&quot;&quot;: &quot;; [.J10])" office:value-type="string" office:string-value="&quot;12&quot;: 11" calcext:value-type="string">
            <text:p>"12": 11</text:p>
          </table:table-cell>
          <table:table-cell table:style-name="ce863" table:formula="of:=COM.MICROSOFT.CONCAT(&quot;&quot;&quot;&quot;;[.$E$4]; &quot;&quot;&quot;: &quot;; [.K10])" office:value-type="string" office:string-value="&quot;13&quot;: 10" calcext:value-type="string">
            <text:p>"13": 10</text:p>
          </table:table-cell>
          <table:table-cell table:style-name="ce863" table:formula="of:=COM.MICROSOFT.CONCAT(&quot;&quot;&quot;&quot;;[.$F$4]; &quot;&quot;&quot;: &quot;; [.L10])" office:value-type="string" office:string-value="&quot;14&quot;: 12" calcext:value-type="string">
            <text:p>"14": 12</text:p>
          </table:table-cell>
          <table:table-cell table:style-name="ce863"/>
          <table:table-cell table:style-name="ce863" table:formula="of:=COM.MICROSOFT.CONCAT(&quot;&quot;&quot;&quot;;[.$B$4]; &quot;&quot;&quot;: &quot;; [.N10])" office:value-type="string" office:string-value="&quot;10&quot;: 12" calcext:value-type="string">
            <text:p>"10": 12</text:p>
          </table:table-cell>
          <table:table-cell table:style-name="ce863" table:formula="of:=COM.MICROSOFT.CONCAT(&quot;&quot;&quot;&quot;;[.$C$4]; &quot;&quot;&quot;: &quot;; [.O10])" office:value-type="string" office:string-value="&quot;11&quot;: 11" calcext:value-type="string">
            <text:p>"11": 11</text:p>
          </table:table-cell>
          <table:table-cell table:style-name="ce863" table:formula="of:=COM.MICROSOFT.CONCAT(&quot;&quot;&quot;&quot;;[.$D$4]; &quot;&quot;&quot;: &quot;; [.P10])" office:value-type="string" office:string-value="&quot;12&quot;: 13" calcext:value-type="string">
            <text:p>"12": 13</text:p>
          </table:table-cell>
          <table:table-cell table:style-name="ce863" table:formula="of:=COM.MICROSOFT.CONCAT(&quot;&quot;&quot;&quot;;[.$E$4]; &quot;&quot;&quot;: &quot;; [.Q10])" office:value-type="string" office:string-value="&quot;13&quot;: 10" calcext:value-type="string">
            <text:p>"13": 10</text:p>
          </table:table-cell>
          <table:table-cell table:style-name="ce863" table:formula="of:=COM.MICROSOFT.CONCAT(&quot;&quot;&quot;&quot;;[.$F$4]; &quot;&quot;&quot;: &quot;; [.R10])" office:value-type="string" office:string-value="&quot;14&quot;: 14" calcext:value-type="string">
            <text:p>"14": 14</text:p>
          </table:table-cell>
          <table:table-cell table:style-name="ce863"/>
          <table:table-cell table:style-name="ce863" table:formula="of:=COM.MICROSOFT.CONCAT(&quot;&quot;&quot;&quot;;[.$B$4]; &quot;&quot;&quot;: &quot;; [.T10])" office:value-type="string" office:string-value="&quot;10&quot;: 13" calcext:value-type="string">
            <text:p>"10": 13</text:p>
          </table:table-cell>
          <table:table-cell table:style-name="ce863" table:formula="of:=COM.MICROSOFT.CONCAT(&quot;&quot;&quot;&quot;;[.$C$4]; &quot;&quot;&quot;: &quot;; [.U10])" office:value-type="string" office:string-value="&quot;11&quot;: 11" calcext:value-type="string">
            <text:p>"11": 11</text:p>
          </table:table-cell>
          <table:table-cell table:style-name="ce863" table:formula="of:=COM.MICROSOFT.CONCAT(&quot;&quot;&quot;&quot;;[.$D$4]; &quot;&quot;&quot;: &quot;; [.V10])" office:value-type="string" office:string-value="&quot;12&quot;: 10" calcext:value-type="string">
            <text:p>"12": 10</text:p>
          </table:table-cell>
          <table:table-cell table:style-name="ce863" table:formula="of:=COM.MICROSOFT.CONCAT(&quot;&quot;&quot;&quot;;[.$E$4]; &quot;&quot;&quot;: &quot;; [.W10])" office:value-type="string" office:string-value="&quot;13&quot;: 12" calcext:value-type="string">
            <text:p>"13": 12</text:p>
          </table:table-cell>
          <table:table-cell table:style-name="ce863" table:formula="of:=COM.MICROSOFT.CONCAT(&quot;&quot;&quot;&quot;;[.$F$4]; &quot;&quot;&quot;: &quot;; [.X10])" office:value-type="string" office:string-value="&quot;14&quot;: 14" calcext:value-type="string">
            <text:p>"14": 14</text:p>
          </table:table-cell>
          <table:table-cell table:style-name="ce863"/>
          <table:table-cell table:style-name="ce863" table:formula="of:=COM.MICROSOFT.CONCAT(&quot;&quot;&quot;&quot;;[.$B$4]; &quot;&quot;&quot;: &quot;; [.Z10])" office:value-type="string" office:string-value="&quot;10&quot;: 12" calcext:value-type="string">
            <text:p>"10": 12</text:p>
          </table:table-cell>
          <table:table-cell table:style-name="ce863" table:formula="of:=COM.MICROSOFT.CONCAT(&quot;&quot;&quot;&quot;;[.$C$4]; &quot;&quot;&quot;: &quot;; [.AA10])" office:value-type="string" office:string-value="&quot;11&quot;: 11" calcext:value-type="string">
            <text:p>"11": 11</text:p>
          </table:table-cell>
          <table:table-cell table:style-name="ce863" table:formula="of:=COM.MICROSOFT.CONCAT(&quot;&quot;&quot;&quot;;[.$D$4]; &quot;&quot;&quot;: &quot;; [.AB10])" office:value-type="string" office:string-value="&quot;12&quot;: 10" calcext:value-type="string">
            <text:p>"12": 10</text:p>
          </table:table-cell>
          <table:table-cell table:style-name="ce863" table:formula="of:=COM.MICROSOFT.CONCAT(&quot;&quot;&quot;&quot;;[.$E$4]; &quot;&quot;&quot;: &quot;; [.AC10])" office:value-type="string" office:string-value="&quot;13&quot;: 14" calcext:value-type="string">
            <text:p>"13": 14</text:p>
          </table:table-cell>
          <table:table-cell table:style-name="ce863" table:formula="of:=COM.MICROSOFT.CONCAT(&quot;&quot;&quot;&quot;;[.$F$4]; &quot;&quot;&quot;: &quot;; [.AD10])" office:value-type="string" office:string-value="&quot;14&quot;: 13" calcext:value-type="string">
            <text:p>"14": 13</text:p>
          </table:table-cell>
          <table:table-cell table:style-name="ce875" table:number-columns-repeated="2"/>
          <table:table-cell table:formula="of:=COM.MICROSOFT.CONCAT(&quot;&quot;&quot;2&quot;&quot;: { &quot;;COM.MICROSOFT.TEXTJOIN(&quot;, &quot;;TRUE();[.AR8:.AV10]);&quot;}&quot;)" office:value-type="string" office:string-value="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" calcext:value-type="string">
            <text:p>"2": { "0": 9, "1": 3, "2": 3, "3": 1, "4": 8, "5": 7, "6": 4, "7": 5, "8": 2, "9": 6, "10": 12, "11": 11, "12": 13, "13": 10, "14": 14}</text:p>
          </table:table-cell>
          <table:table-cell table:number-columns-repeated="36"/>
        </table:table-row>
        <table:table-row table:style-name="ro2">
          <table:table-cell table:style-name="ce623"/>
          <table:table-cell table:style-name="ce882" office:value-type="string" calcext:value-type="string">
            <text:p>+</text:p>
          </table:table-cell>
          <table:table-cell table:style-name="ce882" table:number-columns-repeated="5"/>
          <table:table-cell table:style-name="ce882" office:value-type="string" calcext:value-type="string">
            <text:p>+</text:p>
          </table:table-cell>
          <table:table-cell table:style-name="ce882" table:number-columns-repeated="5"/>
          <table:table-cell table:style-name="ce882" office:value-type="string" calcext:value-type="string">
            <text:p>+</text:p>
          </table:table-cell>
          <table:table-cell table:style-name="ce882" table:number-columns-repeated="5"/>
          <table:table-cell table:style-name="ce882" office:value-type="string" calcext:value-type="string">
            <text:p>+</text:p>
          </table:table-cell>
          <table:table-cell table:style-name="ce882" table:number-columns-repeated="5"/>
          <table:table-cell table:style-name="ce882" office:value-type="string" calcext:value-type="string">
            <text:p>+</text:p>
          </table:table-cell>
          <table:table-cell table:style-name="ce882" table:number-columns-repeated="4"/>
          <table:table-cell table:style-name="ce860"/>
          <table:table-cell table:style-name="ce864" table:number-columns-repeated="27"/>
          <table:table-cell table:style-name="ce873" table:number-columns-repeated="2"/>
          <table:table-cell table:style-name="ce875" table:number-columns-repeated="2"/>
          <table:table-cell table:formula="of:=COM.MICROSOFT.CONCAT(&quot;&quot;&quot;3&quot;&quot;: { &quot;;COM.MICROSOFT.TEXTJOIN(&quot;, &quot;;TRUE();[.AX8:.BB10]);&quot;}&quot;)" office:value-type="string" office:string-value="&quot;3&quot;: { &quot;0&quot;: 3, &quot;1&quot;: 2, &quot;2&quot;: 1, &quot;3&quot;: 7, &quot;4&quot;: 8, &quot;5&quot;: 5, &quot;6&quot;: 4, &quot;7&quot;: 6, &quot;8&quot;: 7, &quot;9&quot;: 9, &quot;10&quot;: 13, &quot;11&quot;: 11, &quot;12&quot;: 10, &quot;13&quot;: 12, &quot;14&quot;: 14}" calcext:value-type="string">
            <text:p>"3": { "0": 3, "1": 2, "2": 1, "3": 7, "4": 8, "5": 5, "6": 4, "7": 6, "8": 7, "9": 9, "10": 13, "11": 11, "12": 10, "13": 12, "14": 14}</text:p>
          </table:table-cell>
          <table:table-cell table:number-columns-repeated="36"/>
        </table:table-row>
        <table:table-row table:style-name="ro1">
          <table:table-cell table:style-name="ce624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style-name="ce690"/>
          <table:table-cell office:value-type="float" office:value="14" calcext:value-type="float">
            <text:p>14</text:p>
          </table:table-cell>
          <table:table-cell table:style-name="ce845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style-name="ce690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852" office:value-type="float" office:value="13" calcext:value-type="float">
            <text:p>13</text:p>
          </table:table-cell>
          <table:table-cell table:style-name="ce690"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style-name="ce690"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865" table:formula="of:=COM.MICROSOFT.CONCAT(&quot;&quot;&quot;&quot;;[.$B$2]; &quot;&quot;&quot;: &quot;; [.B12])" office:value-type="string" office:string-value="&quot;0&quot;: 14" calcext:value-type="string">
            <text:p>"0": 14</text:p>
          </table:table-cell>
          <table:table-cell table:style-name="ce865" table:formula="of:=COM.MICROSOFT.CONCAT(&quot;&quot;&quot;&quot;;[.$C$2]; &quot;&quot;&quot;: &quot;; [.C12])" office:value-type="string" office:string-value="&quot;1&quot;: 9" calcext:value-type="string">
            <text:p>"1": 9</text:p>
          </table:table-cell>
          <table:table-cell table:style-name="ce865" table:formula="of:=COM.MICROSOFT.CONCAT(&quot;&quot;&quot;&quot;;[.$D$2]; &quot;&quot;&quot;: &quot;; [.D12])" office:value-type="string" office:string-value="&quot;2&quot;: 4" calcext:value-type="string">
            <text:p>"2": 4</text:p>
          </table:table-cell>
          <table:table-cell table:style-name="ce865" table:formula="of:=COM.MICROSOFT.CONCAT(&quot;&quot;&quot;&quot;;[.$E$2]; &quot;&quot;&quot;: &quot;; [.E12])" office:value-type="string" office:string-value="&quot;3&quot;: 6" calcext:value-type="string">
            <text:p>"3": 6</text:p>
          </table:table-cell>
          <table:table-cell table:style-name="ce865" table:formula="of:=COM.MICROSOFT.CONCAT(&quot;&quot;&quot;&quot;;[.$F$2]; &quot;&quot;&quot;: &quot;; [.F12])" office:value-type="string" office:string-value="&quot;4&quot;: 13" calcext:value-type="string">
            <text:p>"4": 13</text:p>
          </table:table-cell>
          <table:table-cell table:style-name="ce865"/>
          <table:table-cell table:style-name="ce865" table:formula="of:=COM.MICROSOFT.CONCAT(&quot;&quot;&quot;&quot;;[.$B$2]; &quot;&quot;&quot;: &quot;; [.H12])" office:value-type="string" office:string-value="&quot;0&quot;: 14" calcext:value-type="string">
            <text:p>"0": 14</text:p>
          </table:table-cell>
          <table:table-cell table:style-name="ce865" table:formula="of:=COM.MICROSOFT.CONCAT(&quot;&quot;&quot;&quot;;[.$C$2]; &quot;&quot;&quot;: &quot;; [.I12])" office:value-type="string" office:string-value="&quot;1&quot;: 8" calcext:value-type="string">
            <text:p>"1": 8</text:p>
          </table:table-cell>
          <table:table-cell table:style-name="ce865" table:formula="of:=COM.MICROSOFT.CONCAT(&quot;&quot;&quot;&quot;;[.$D$2]; &quot;&quot;&quot;: &quot;; [.J12])" office:value-type="string" office:string-value="&quot;2&quot;: 3" calcext:value-type="string">
            <text:p>"2": 3</text:p>
          </table:table-cell>
          <table:table-cell table:style-name="ce865" table:formula="of:=COM.MICROSOFT.CONCAT(&quot;&quot;&quot;&quot;;[.$E$2]; &quot;&quot;&quot;: &quot;; [.K12])" office:value-type="string" office:string-value="&quot;3&quot;: 6" calcext:value-type="string">
            <text:p>"3": 6</text:p>
          </table:table-cell>
          <table:table-cell table:style-name="ce865" table:formula="of:=COM.MICROSOFT.CONCAT(&quot;&quot;&quot;&quot;;[.$F$2]; &quot;&quot;&quot;: &quot;; [.L12])" office:value-type="string" office:string-value="&quot;4&quot;: 13" calcext:value-type="string">
            <text:p>"4": 13</text:p>
          </table:table-cell>
          <table:table-cell table:style-name="ce865"/>
          <table:table-cell table:style-name="ce865" table:formula="of:=COM.MICROSOFT.CONCAT(&quot;&quot;&quot;&quot;;[.$B$2]; &quot;&quot;&quot;: &quot;; [.N12])" office:value-type="string" office:string-value="&quot;0&quot;: 14" calcext:value-type="string">
            <text:p>"0": 14</text:p>
          </table:table-cell>
          <table:table-cell table:style-name="ce865" table:formula="of:=COM.MICROSOFT.CONCAT(&quot;&quot;&quot;&quot;;[.$C$2]; &quot;&quot;&quot;: &quot;; [.O12])" office:value-type="string" office:string-value="&quot;1&quot;: 5" calcext:value-type="string">
            <text:p>"1": 5</text:p>
          </table:table-cell>
          <table:table-cell table:style-name="ce865" table:formula="of:=COM.MICROSOFT.CONCAT(&quot;&quot;&quot;&quot;;[.$D$2]; &quot;&quot;&quot;: &quot;; [.P12])" office:value-type="string" office:string-value="&quot;2&quot;: 7" calcext:value-type="string">
            <text:p>"2": 7</text:p>
          </table:table-cell>
          <table:table-cell table:style-name="ce865" table:formula="of:=COM.MICROSOFT.CONCAT(&quot;&quot;&quot;&quot;;[.$E$2]; &quot;&quot;&quot;: &quot;; [.Q12])" office:value-type="string" office:string-value="&quot;3&quot;: 9" calcext:value-type="string">
            <text:p>"3": 9</text:p>
          </table:table-cell>
          <table:table-cell table:style-name="ce865" table:formula="of:=COM.MICROSOFT.CONCAT(&quot;&quot;&quot;&quot;;[.$F$2]; &quot;&quot;&quot;: &quot;; [.R12])" office:value-type="string" office:string-value="&quot;4&quot;: 13" calcext:value-type="string">
            <text:p>"4": 13</text:p>
          </table:table-cell>
          <table:table-cell table:style-name="ce865"/>
          <table:table-cell table:style-name="ce865" table:formula="of:=COM.MICROSOFT.CONCAT(&quot;&quot;&quot;&quot;;[.$B$2]; &quot;&quot;&quot;: &quot;; [.T12])" office:value-type="string" office:string-value="&quot;0&quot;: 12" calcext:value-type="string">
            <text:p>"0": 12</text:p>
          </table:table-cell>
          <table:table-cell table:style-name="ce865" table:formula="of:=COM.MICROSOFT.CONCAT(&quot;&quot;&quot;&quot;;[.$C$2]; &quot;&quot;&quot;: &quot;; [.U12])" office:value-type="string" office:string-value="&quot;1&quot;: 5" calcext:value-type="string">
            <text:p>"1": 5</text:p>
          </table:table-cell>
          <table:table-cell table:style-name="ce865" table:formula="of:=COM.MICROSOFT.CONCAT(&quot;&quot;&quot;&quot;;[.$D$2]; &quot;&quot;&quot;: &quot;; [.V12])" office:value-type="string" office:string-value="&quot;2&quot;: 3" calcext:value-type="string">
            <text:p>"2": 3</text:p>
          </table:table-cell>
          <table:table-cell table:style-name="ce865" table:formula="of:=COM.MICROSOFT.CONCAT(&quot;&quot;&quot;&quot;;[.$E$2]; &quot;&quot;&quot;: &quot;; [.W12])" office:value-type="string" office:string-value="&quot;3&quot;: 10" calcext:value-type="string">
            <text:p>"3": 10</text:p>
          </table:table-cell>
          <table:table-cell table:style-name="ce865" table:formula="of:=COM.MICROSOFT.CONCAT(&quot;&quot;&quot;&quot;;[.$F$2]; &quot;&quot;&quot;: &quot;; [.X12])" office:value-type="string" office:string-value="&quot;4&quot;: 14" calcext:value-type="string">
            <text:p>"4": 14</text:p>
          </table:table-cell>
          <table:table-cell table:style-name="ce865"/>
          <table:table-cell table:style-name="ce865" table:formula="of:=COM.MICROSOFT.CONCAT(&quot;&quot;&quot;&quot;;[.$B$2]; &quot;&quot;&quot;: &quot;; [.Z12])" office:value-type="string" office:string-value="&quot;0&quot;: 14" calcext:value-type="string">
            <text:p>"0": 14</text:p>
          </table:table-cell>
          <table:table-cell table:style-name="ce865" table:formula="of:=COM.MICROSOFT.CONCAT(&quot;&quot;&quot;&quot;;[.$C$2]; &quot;&quot;&quot;: &quot;; [.AA12])" office:value-type="string" office:string-value="&quot;1&quot;: 6" calcext:value-type="string">
            <text:p>"1": 6</text:p>
          </table:table-cell>
          <table:table-cell table:style-name="ce872" table:formula="of:=COM.MICROSOFT.CONCAT(&quot;&quot;&quot;&quot;;[.$D$2]; &quot;&quot;&quot;: &quot;; [.AB12])" office:value-type="string" office:string-value="&quot;2&quot;: 5" calcext:value-type="string">
            <text:p>"2": 5</text:p>
          </table:table-cell>
          <table:table-cell table:style-name="ce865" table:formula="of:=COM.MICROSOFT.CONCAT(&quot;&quot;&quot;&quot;;[.$E$2]; &quot;&quot;&quot;: &quot;; [.AC12])" office:value-type="string" office:string-value="&quot;3&quot;: 10" calcext:value-type="string">
            <text:p>"3": 10</text:p>
          </table:table-cell>
          <table:table-cell table:style-name="ce865" table:formula="of:=COM.MICROSOFT.CONCAT(&quot;&quot;&quot;&quot;;[.$F$2]; &quot;&quot;&quot;: &quot;; [.AD12])" office:value-type="string" office:string-value="&quot;4&quot;: 12" calcext:value-type="string">
            <text:p>"4": 12</text:p>
          </table:table-cell>
          <table:table-cell table:style-name="ce876" table:number-columns-repeated="2"/>
          <table:table-cell table:style-name="ce878" table:formula="of:=COM.MICROSOFT.CONCAT(&quot;&quot;&quot;4&quot;&quot;: { &quot;;COM.MICROSOFT.TEXTJOIN(&quot;, &quot;;TRUE();[.BD8:.BH10]);&quot;}&quot;)" office:value-type="string" office:string-value="&quot;4&quot;: { &quot;0&quot;: 7, &quot;1&quot;: 2, &quot;2&quot;: 1, &quot;3&quot;: 6, &quot;4&quot;: 13, &quot;5&quot;: 5, &quot;6&quot;: 4, &quot;7&quot;: 3, &quot;8&quot;: 9, &quot;9&quot;: 8, &quot;10&quot;: 12, &quot;11&quot;: 11, &quot;12&quot;: 10, &quot;13&quot;: 14, &quot;14&quot;: 13}" calcext:value-type="string">
            <text:p>"4": { "0": 7, "1": 2, "2": 1, "3": 6, "4": 13, "5": 5, "6": 4, "7": 3, "8": 9, "9": 8, "10": 12, "11": 11, "12": 10, "13": 14, "14": 13}</text:p>
          </table:table-cell>
          <table:table-cell table:number-columns-repeated="36"/>
        </table:table-row>
        <table:table-row table:style-name="ro1">
          <table:table-cell table:style-name="ce623"/>
          <table:table-cell table:style-name="ce880" table:formula="of:=[.$T$3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690"/>
          <table:table-cell office:value-type="float" office:value="5" calcext:value-type="float">
            <text:p>5</text:p>
          </table:table-cell>
          <table:table-cell table:style-name="ce880" table:formula="of:=[.$U$3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690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880" table:formula="of:=[.$V$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52" office:value-type="float" office:value="10" calcext:value-type="float">
            <text:p>10</text:p>
          </table:table-cell>
          <table:table-cell table:style-name="ce690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0" table:formula="of:=[.$W$3]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690"/>
          <table:table-cell office:value-type="float" office:value="3" calcext:value-type="float">
            <text:p>3</text:p>
          </table:table-cell>
          <table:table-cell table:style-name="ce896" office:value-type="float" office:value="2" calcext:value-type="float">
            <text:p>2</text:p>
          </table:table-cell>
          <table:table-cell table:style-name="ce85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880" table:formula="of:=[.$X$3]" office:value-type="float" office:value="9" calcext:value-type="float">
            <text:p>9</text:p>
          </table:table-cell>
          <table:table-cell/>
          <table:table-cell table:style-name="ce865" table:formula="of:=COM.MICROSOFT.CONCAT(&quot;&quot;&quot;&quot;;[.$B$3]; &quot;&quot;&quot;: &quot;; [.B13])" office:value-type="string" office:string-value="&quot;5&quot;: 5" calcext:value-type="string">
            <text:p>"5": 5</text:p>
          </table:table-cell>
          <table:table-cell table:style-name="ce865" table:formula="of:=COM.MICROSOFT.CONCAT(&quot;&quot;&quot;&quot;;[.$C$3]; &quot;&quot;&quot;: &quot;; [.C13])" office:value-type="string" office:string-value="&quot;6&quot;: 1" calcext:value-type="string">
            <text:p>"6": 1</text:p>
          </table:table-cell>
          <table:table-cell table:style-name="ce865" table:formula="of:=COM.MICROSOFT.CONCAT(&quot;&quot;&quot;&quot;;[.$D$3]; &quot;&quot;&quot;: &quot;; [.D13])" office:value-type="string" office:string-value="&quot;7&quot;: 2" calcext:value-type="string">
            <text:p>"7": 2</text:p>
          </table:table-cell>
          <table:table-cell table:style-name="ce865" table:formula="of:=COM.MICROSOFT.CONCAT(&quot;&quot;&quot;&quot;;[.$E$3]; &quot;&quot;&quot;: &quot;; [.E13])" office:value-type="string" office:string-value="&quot;8&quot;: 3" calcext:value-type="string">
            <text:p>"8": 3</text:p>
          </table:table-cell>
          <table:table-cell table:style-name="ce865" table:formula="of:=COM.MICROSOFT.CONCAT(&quot;&quot;&quot;&quot;;[.$F$3]; &quot;&quot;&quot;: &quot;; [.F13])" office:value-type="string" office:string-value="&quot;9&quot;: 8" calcext:value-type="string">
            <text:p>"9": 8</text:p>
          </table:table-cell>
          <table:table-cell table:style-name="ce865"/>
          <table:table-cell table:style-name="ce865" table:formula="of:=COM.MICROSOFT.CONCAT(&quot;&quot;&quot;&quot;;[.$B$3]; &quot;&quot;&quot;: &quot;; [.H13])" office:value-type="string" office:string-value="&quot;5&quot;: 5" calcext:value-type="string">
            <text:p>"5": 5</text:p>
          </table:table-cell>
          <table:table-cell table:style-name="ce865" table:formula="of:=COM.MICROSOFT.CONCAT(&quot;&quot;&quot;&quot;;[.$C$3]; &quot;&quot;&quot;: &quot;; [.I13])" office:value-type="string" office:string-value="&quot;6&quot;: 2" calcext:value-type="string">
            <text:p>"6": 2</text:p>
          </table:table-cell>
          <table:table-cell table:style-name="ce865" table:formula="of:=COM.MICROSOFT.CONCAT(&quot;&quot;&quot;&quot;;[.$D$3]; &quot;&quot;&quot;: &quot;; [.J13])" office:value-type="string" office:string-value="&quot;7&quot;: 1" calcext:value-type="string">
            <text:p>"7": 1</text:p>
          </table:table-cell>
          <table:table-cell table:style-name="ce865" table:formula="of:=COM.MICROSOFT.CONCAT(&quot;&quot;&quot;&quot;;[.$E$3]; &quot;&quot;&quot;: &quot;; [.K13])" office:value-type="string" office:string-value="&quot;8&quot;: 2" calcext:value-type="string">
            <text:p>"8": 2</text:p>
          </table:table-cell>
          <table:table-cell table:style-name="ce865" table:formula="of:=COM.MICROSOFT.CONCAT(&quot;&quot;&quot;&quot;;[.$F$3]; &quot;&quot;&quot;: &quot;; [.L13])" office:value-type="string" office:string-value="&quot;9&quot;: 10" calcext:value-type="string">
            <text:p>"9": 10</text:p>
          </table:table-cell>
          <table:table-cell table:style-name="ce865"/>
          <table:table-cell table:style-name="ce865" table:formula="of:=COM.MICROSOFT.CONCAT(&quot;&quot;&quot;&quot;;[.$B$3]; &quot;&quot;&quot;: &quot;; [.N13])" office:value-type="string" office:string-value="&quot;5&quot;: 4" calcext:value-type="string">
            <text:p>"5": 4</text:p>
          </table:table-cell>
          <table:table-cell table:style-name="ce865" table:formula="of:=COM.MICROSOFT.CONCAT(&quot;&quot;&quot;&quot;;[.$C$3]; &quot;&quot;&quot;: &quot;; [.O13])" office:value-type="string" office:string-value="&quot;6&quot;: 2" calcext:value-type="string">
            <text:p>"6": 2</text:p>
          </table:table-cell>
          <table:table-cell table:style-name="ce865" table:formula="of:=COM.MICROSOFT.CONCAT(&quot;&quot;&quot;&quot;;[.$D$3]; &quot;&quot;&quot;: &quot;; [.P13])" office:value-type="string" office:string-value="&quot;7&quot;: 0" calcext:value-type="string">
            <text:p>"7": 0</text:p>
          </table:table-cell>
          <table:table-cell table:style-name="ce865" table:formula="of:=COM.MICROSOFT.CONCAT(&quot;&quot;&quot;&quot;;[.$E$3]; &quot;&quot;&quot;: &quot;; [.Q13])" office:value-type="string" office:string-value="&quot;8&quot;: 1" calcext:value-type="string">
            <text:p>"8": 1</text:p>
          </table:table-cell>
          <table:table-cell table:style-name="ce865" table:formula="of:=COM.MICROSOFT.CONCAT(&quot;&quot;&quot;&quot;;[.$F$3]; &quot;&quot;&quot;: &quot;; [.R13])" office:value-type="string" office:string-value="&quot;9&quot;: 10" calcext:value-type="string">
            <text:p>"9": 10</text:p>
          </table:table-cell>
          <table:table-cell table:style-name="ce865"/>
          <table:table-cell table:style-name="ce865" table:formula="of:=COM.MICROSOFT.CONCAT(&quot;&quot;&quot;&quot;;[.$B$3]; &quot;&quot;&quot;: &quot;; [.T13])" office:value-type="string" office:string-value="&quot;5&quot;: 4" calcext:value-type="string">
            <text:p>"5": 4</text:p>
          </table:table-cell>
          <table:table-cell table:style-name="ce865" table:formula="of:=COM.MICROSOFT.CONCAT(&quot;&quot;&quot;&quot;;[.$C$3]; &quot;&quot;&quot;: &quot;; [.U13])" office:value-type="string" office:string-value="&quot;6&quot;: 2" calcext:value-type="string">
            <text:p>"6": 2</text:p>
          </table:table-cell>
          <table:table-cell table:style-name="ce865" table:formula="of:=COM.MICROSOFT.CONCAT(&quot;&quot;&quot;&quot;;[.$D$3]; &quot;&quot;&quot;: &quot;; [.V13])" office:value-type="string" office:string-value="&quot;7&quot;: 1" calcext:value-type="string">
            <text:p>"7": 1</text:p>
          </table:table-cell>
          <table:table-cell table:style-name="ce865" table:formula="of:=COM.MICROSOFT.CONCAT(&quot;&quot;&quot;&quot;;[.$E$3]; &quot;&quot;&quot;: &quot;; [.W13])" office:value-type="string" office:string-value="&quot;8&quot;: 1" calcext:value-type="string">
            <text:p>"8": 1</text:p>
          </table:table-cell>
          <table:table-cell table:style-name="ce865" table:formula="of:=COM.MICROSOFT.CONCAT(&quot;&quot;&quot;&quot;;[.$F$3]; &quot;&quot;&quot;: &quot;; [.X13])" office:value-type="string" office:string-value="&quot;9&quot;: 11" calcext:value-type="string">
            <text:p>"9": 11</text:p>
          </table:table-cell>
          <table:table-cell table:style-name="ce865"/>
          <table:table-cell table:style-name="ce865" table:formula="of:=COM.MICROSOFT.CONCAT(&quot;&quot;&quot;&quot;;[.$B$3]; &quot;&quot;&quot;: &quot;; [.Z13])" office:value-type="string" office:string-value="&quot;5&quot;: 3" calcext:value-type="string">
            <text:p>"5": 3</text:p>
          </table:table-cell>
          <table:table-cell table:style-name="ce865" table:formula="of:=COM.MICROSOFT.CONCAT(&quot;&quot;&quot;&quot;;[.$C$3]; &quot;&quot;&quot;: &quot;; [.AA13])" office:value-type="string" office:string-value="&quot;6&quot;: 2" calcext:value-type="string">
            <text:p>"6": 2</text:p>
          </table:table-cell>
          <table:table-cell table:style-name="ce865" table:formula="of:=COM.MICROSOFT.CONCAT(&quot;&quot;&quot;&quot;;[.$D$3]; &quot;&quot;&quot;: &quot;; [.AB13])" office:value-type="string" office:string-value="&quot;7&quot;: 1" calcext:value-type="string">
            <text:p>"7": 1</text:p>
          </table:table-cell>
          <table:table-cell table:style-name="ce865" table:formula="of:=COM.MICROSOFT.CONCAT(&quot;&quot;&quot;&quot;;[.$E$3]; &quot;&quot;&quot;: &quot;; [.AC13])" office:value-type="string" office:string-value="&quot;8&quot;: 4" calcext:value-type="string">
            <text:p>"8": 4</text:p>
          </table:table-cell>
          <table:table-cell table:style-name="ce865" table:formula="of:=COM.MICROSOFT.CONCAT(&quot;&quot;&quot;&quot;;[.$F$3]; &quot;&quot;&quot;: &quot;; [.AD13])" office:value-type="string" office:string-value="&quot;9&quot;: 9" calcext:value-type="string">
            <text:p>"9": 9</text:p>
          </table:table-cell>
          <table:table-cell table:style-name="ce875" table:number-columns-repeated="2"/>
          <table:table-cell table:style-name="ce864"/>
          <table:table-cell table:number-columns-repeated="36"/>
        </table:table-row>
        <table:table-row table:style-name="ro1">
          <table:table-cell table:style-name="ce623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690"/>
          <table:table-cell office:value-type="float" office:value="11" calcext:value-type="float">
            <text:p>11</text:p>
          </table:table-cell>
          <table:table-cell table:style-name="ce845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690"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852" office:value-type="float" office:value="12" calcext:value-type="float">
            <text:p>12</text:p>
          </table:table-cell>
          <table:table-cell table:style-name="ce690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style-name="ce690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865" table:formula="of:=COM.MICROSOFT.CONCAT(&quot;&quot;&quot;&quot;;[.$B$4]; &quot;&quot;&quot;: &quot;; [.B14])" office:value-type="string" office:string-value="&quot;10&quot;: 12" calcext:value-type="string">
            <text:p>"10": 12</text:p>
          </table:table-cell>
          <table:table-cell table:style-name="ce865" table:formula="of:=COM.MICROSOFT.CONCAT(&quot;&quot;&quot;&quot;;[.$C$4]; &quot;&quot;&quot;: &quot;; [.C14])" office:value-type="string" office:string-value="&quot;11&quot;: 10" calcext:value-type="string">
            <text:p>"11": 10</text:p>
          </table:table-cell>
          <table:table-cell table:style-name="ce865" table:formula="of:=COM.MICROSOFT.CONCAT(&quot;&quot;&quot;&quot;;[.$D$4]; &quot;&quot;&quot;: &quot;; [.D14])" office:value-type="string" office:string-value="&quot;12&quot;: 7" calcext:value-type="string">
            <text:p>"12": 7</text:p>
          </table:table-cell>
          <table:table-cell table:style-name="ce865" table:formula="of:=COM.MICROSOFT.CONCAT(&quot;&quot;&quot;&quot;;[.$E$4]; &quot;&quot;&quot;: &quot;; [.E14])" office:value-type="string" office:string-value="&quot;13&quot;: 5" calcext:value-type="string">
            <text:p>"13": 5</text:p>
          </table:table-cell>
          <table:table-cell table:style-name="ce865" table:formula="of:=COM.MICROSOFT.CONCAT(&quot;&quot;&quot;&quot;;[.$F$4]; &quot;&quot;&quot;: &quot;; [.F14])" office:value-type="string" office:string-value="&quot;14&quot;: 11" calcext:value-type="string">
            <text:p>"14": 11</text:p>
          </table:table-cell>
          <table:table-cell table:style-name="ce865"/>
          <table:table-cell table:style-name="ce865" table:formula="of:=COM.MICROSOFT.CONCAT(&quot;&quot;&quot;&quot;;[.$B$4]; &quot;&quot;&quot;: &quot;; [.H14])" office:value-type="string" office:string-value="&quot;10&quot;: 11" calcext:value-type="string">
            <text:p>"10": 11</text:p>
          </table:table-cell>
          <table:table-cell table:style-name="ce865" table:formula="of:=COM.MICROSOFT.CONCAT(&quot;&quot;&quot;&quot;;[.$C$4]; &quot;&quot;&quot;: &quot;; [.I14])" office:value-type="string" office:string-value="&quot;11&quot;: 9" calcext:value-type="string">
            <text:p>"11": 9</text:p>
          </table:table-cell>
          <table:table-cell table:style-name="ce865" table:formula="of:=COM.MICROSOFT.CONCAT(&quot;&quot;&quot;&quot;;[.$D$4]; &quot;&quot;&quot;: &quot;; [.J14])" office:value-type="string" office:string-value="&quot;12&quot;: 7" calcext:value-type="string">
            <text:p>"12": 7</text:p>
          </table:table-cell>
          <table:table-cell table:style-name="ce865" table:formula="of:=COM.MICROSOFT.CONCAT(&quot;&quot;&quot;&quot;;[.$E$4]; &quot;&quot;&quot;: &quot;; [.K14])" office:value-type="string" office:string-value="&quot;13&quot;: 4" calcext:value-type="string">
            <text:p>"13": 4</text:p>
          </table:table-cell>
          <table:table-cell table:style-name="ce865" table:formula="of:=COM.MICROSOFT.CONCAT(&quot;&quot;&quot;&quot;;[.$F$4]; &quot;&quot;&quot;: &quot;; [.L14])" office:value-type="string" office:string-value="&quot;14&quot;: 12" calcext:value-type="string">
            <text:p>"14": 12</text:p>
          </table:table-cell>
          <table:table-cell table:style-name="ce865"/>
          <table:table-cell table:style-name="ce865" table:formula="of:=COM.MICROSOFT.CONCAT(&quot;&quot;&quot;&quot;;[.$B$4]; &quot;&quot;&quot;: &quot;; [.N14])" office:value-type="string" office:string-value="&quot;10&quot;: 11" calcext:value-type="string">
            <text:p>"10": 11</text:p>
          </table:table-cell>
          <table:table-cell table:style-name="ce865" table:formula="of:=COM.MICROSOFT.CONCAT(&quot;&quot;&quot;&quot;;[.$C$4]; &quot;&quot;&quot;: &quot;; [.O14])" office:value-type="string" office:string-value="&quot;11&quot;: 6" calcext:value-type="string">
            <text:p>"11": 6</text:p>
          </table:table-cell>
          <table:table-cell table:style-name="ce865" table:formula="of:=COM.MICROSOFT.CONCAT(&quot;&quot;&quot;&quot;;[.$D$4]; &quot;&quot;&quot;: &quot;; [.P14])" office:value-type="string" office:string-value="&quot;12&quot;: 8" calcext:value-type="string">
            <text:p>"12": 8</text:p>
          </table:table-cell>
          <table:table-cell table:style-name="ce865" table:formula="of:=COM.MICROSOFT.CONCAT(&quot;&quot;&quot;&quot;;[.$E$4]; &quot;&quot;&quot;: &quot;; [.Q14])" office:value-type="string" office:string-value="&quot;13&quot;: 3" calcext:value-type="string">
            <text:p>"13": 3</text:p>
          </table:table-cell>
          <table:table-cell table:style-name="ce865" table:formula="of:=COM.MICROSOFT.CONCAT(&quot;&quot;&quot;&quot;;[.$F$4]; &quot;&quot;&quot;: &quot;; [.R14])" office:value-type="string" office:string-value="&quot;14&quot;: 12" calcext:value-type="string">
            <text:p>"14": 12</text:p>
          </table:table-cell>
          <table:table-cell table:style-name="ce865"/>
          <table:table-cell table:style-name="ce865" table:formula="of:=COM.MICROSOFT.CONCAT(&quot;&quot;&quot;&quot;;[.$B$4]; &quot;&quot;&quot;: &quot;; [.T14])" office:value-type="string" office:string-value="&quot;10&quot;: 8" calcext:value-type="string">
            <text:p>"10": 8</text:p>
          </table:table-cell>
          <table:table-cell table:style-name="ce865" table:formula="of:=COM.MICROSOFT.CONCAT(&quot;&quot;&quot;&quot;;[.$C$4]; &quot;&quot;&quot;: &quot;; [.U14])" office:value-type="string" office:string-value="&quot;11&quot;: 6" calcext:value-type="string">
            <text:p>"11": 6</text:p>
          </table:table-cell>
          <table:table-cell table:style-name="ce865" table:formula="of:=COM.MICROSOFT.CONCAT(&quot;&quot;&quot;&quot;;[.$D$4]; &quot;&quot;&quot;: &quot;; [.V14])" office:value-type="string" office:string-value="&quot;12&quot;: 7" calcext:value-type="string">
            <text:p>"12": 7</text:p>
          </table:table-cell>
          <table:table-cell table:style-name="ce865" table:formula="of:=COM.MICROSOFT.CONCAT(&quot;&quot;&quot;&quot;;[.$E$4]; &quot;&quot;&quot;: &quot;; [.W14])" office:value-type="string" office:string-value="&quot;13&quot;: 9" calcext:value-type="string">
            <text:p>"13": 9</text:p>
          </table:table-cell>
          <table:table-cell table:style-name="ce865" table:formula="of:=COM.MICROSOFT.CONCAT(&quot;&quot;&quot;&quot;;[.$F$4]; &quot;&quot;&quot;: &quot;; [.X14])" office:value-type="string" office:string-value="&quot;14&quot;: 13" calcext:value-type="string">
            <text:p>"14": 13</text:p>
          </table:table-cell>
          <table:table-cell table:style-name="ce865"/>
          <table:table-cell table:style-name="ce865" table:formula="of:=COM.MICROSOFT.CONCAT(&quot;&quot;&quot;&quot;;[.$B$4]; &quot;&quot;&quot;: &quot;; [.Z14])" office:value-type="string" office:string-value="&quot;10&quot;: 13" calcext:value-type="string">
            <text:p>"10": 13</text:p>
          </table:table-cell>
          <table:table-cell table:style-name="ce865" table:formula="of:=COM.MICROSOFT.CONCAT(&quot;&quot;&quot;&quot;;[.$C$4]; &quot;&quot;&quot;: &quot;; [.AA14])" office:value-type="string" office:string-value="&quot;11&quot;: 7" calcext:value-type="string">
            <text:p>"11": 7</text:p>
          </table:table-cell>
          <table:table-cell table:style-name="ce865" table:formula="of:=COM.MICROSOFT.CONCAT(&quot;&quot;&quot;&quot;;[.$D$4]; &quot;&quot;&quot;: &quot;; [.AB14])" office:value-type="string" office:string-value="&quot;12&quot;: 8" calcext:value-type="string">
            <text:p>"12": 8</text:p>
          </table:table-cell>
          <table:table-cell table:style-name="ce865" table:formula="of:=COM.MICROSOFT.CONCAT(&quot;&quot;&quot;&quot;;[.$E$4]; &quot;&quot;&quot;: &quot;; [.AC14])" office:value-type="string" office:string-value="&quot;13&quot;: 9" calcext:value-type="string">
            <text:p>"13": 9</text:p>
          </table:table-cell>
          <table:table-cell table:style-name="ce865" table:formula="of:=COM.MICROSOFT.CONCAT(&quot;&quot;&quot;&quot;;[.$F$4]; &quot;&quot;&quot;: &quot;; [.AD14])" office:value-type="string" office:string-value="&quot;14&quot;: 11" calcext:value-type="string">
            <text:p>"14": 11</text:p>
          </table:table-cell>
          <table:table-cell table:style-name="ce875" table:number-columns-repeated="2"/>
          <table:table-cell table:style-name="ce864" table:formula="of:=COM.MICROSOFT.TEXTJOIN(&quot;, &quot;;TRUE();[.BK8:.BK12])" office:value-type="string" office:string-value="&quot;0&quot;: { &quot;0&quot;: 14, &quot;1&quot;: 1, &quot;2&quot;: 2, &quot;3&quot;: 3, &quot;4&quot;: 5, &quot;5&quot;: 9, &quot;6&quot;: 8, &quot;7&quot;: 7, &quot;8&quot;: 4, &quot;9&quot;: 6, &quot;10&quot;: 14, &quot;11&quot;: 13, &quot;12&quot;: 11, &quot;13&quot;: 10, &quot;14&quot;: 12}, &quot;1&quot;: { &quot;0&quot;: 9, &quot;1&quot;: 6, &quot;2&quot;: 1, &quot;3&quot;: 3, &quot;4&quot;: 6, &quot;5&quot;: 7, &quot;6&quot;: 8, &quot;7&quot;: 4, &quot;8&quot;: 2, &quot;9&quot;: 5, &quot;10&quot;: 13, &quot;11&quot;: 14, &quot;12&quot;: 11, &quot;13&quot;: 10, &quot;14&quot;: 12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7, &quot;4&quot;: 8, &quot;5&quot;: 5, &quot;6&quot;: 4, &quot;7&quot;: 6, &quot;8&quot;: 7, &quot;9&quot;: 9, &quot;10&quot;: 13, &quot;11&quot;: 11, &quot;12&quot;: 10, &quot;13&quot;: 12, &quot;14&quot;: 14}, &quot;4&quot;: { &quot;0&quot;: 7, &quot;1&quot;: 2, &quot;2&quot;: 1, &quot;3&quot;: 6, &quot;4&quot;: 13, &quot;5&quot;: 5, &quot;6&quot;: 4, &quot;7&quot;: 3, &quot;8&quot;: 9, &quot;9&quot;: 8, &quot;10&quot;: 12, &quot;11&quot;: 11, &quot;12&quot;: 10, &quot;13&quot;: 14, &quot;14&quot;: 13}" calcext:value-type="string">
            <text:p>"0": { "0": 14, "1": 1, "2": 2, "3": 3, "4": 5, "5": 9, "6": 8, "7": 7, "8": 4, "9": 6, "10": 14, "11": 13, "12": 11, "13": 10, "14": 12}, "1": { "0": 9, "1": 6, "2": 1, "3": 3, "4": 6, "5": 7, "6": 8, "7": 4, "8": 2, "9": 5, "10": 13, "11": 14, "12": 11, "13": 10, "14": 12}, "2": { "0": 9, "1": 3, "2": 3, "3": 1, "4": 8, "5": 7, "6": 4, "7": 5, "8": 2, "9": 6, "10": 12, "11": 11, "12": 13, "13": 10, "14": 14}, "3": { "0": 3, "1": 2, "2": 1, "3": 7, "4": 8, "5": 5, "6": 4, "7": 6, "8": 7, "9": 9, "10": 13, "11": 11, "12": 10, "13": 12, "14": 14}, "4": { "0": 7, "1": 2, "2": 1, "3": 6, "4": 13, "5": 5, "6": 4, "7": 3, "8": 9, "9": 8, "10": 12, "11": 11, "12": 10, "13": 14, "14": 13}</text:p>
          </table:table-cell>
          <table:table-cell table:number-columns-repeated="36"/>
        </table:table-row>
        <table:table-row table:style-name="ro2">
          <table:table-cell table:style-name="ce623"/>
          <table:table-cell table:style-name="ce882" office:value-type="string" calcext:value-type="string">
            <text:p>+</text:p>
          </table:table-cell>
          <table:table-cell table:style-name="ce882" table:number-columns-repeated="5"/>
          <table:table-cell table:style-name="ce882" office:value-type="string" calcext:value-type="string">
            <text:p>+</text:p>
          </table:table-cell>
          <table:table-cell table:style-name="ce882" table:number-columns-repeated="5"/>
          <table:table-cell table:style-name="ce882" office:value-type="string" calcext:value-type="string">
            <text:p>+</text:p>
          </table:table-cell>
          <table:table-cell table:style-name="ce882" table:number-columns-repeated="5"/>
          <table:table-cell table:style-name="ce882" office:value-type="string" calcext:value-type="string">
            <text:p>+</text:p>
          </table:table-cell>
          <table:table-cell table:style-name="ce882" table:number-columns-repeated="5"/>
          <table:table-cell table:style-name="ce882" office:value-type="string" calcext:value-type="string">
            <text:p>+</text:p>
          </table:table-cell>
          <table:table-cell table:style-name="ce882" table:number-columns-repeated="4"/>
          <table:table-cell/>
          <table:table-cell table:style-name="ce864" table:number-columns-repeated="29"/>
          <table:table-cell table:style-name="ce875" table:number-columns-repeated="2"/>
          <table:table-cell table:style-name="ce864"/>
          <table:table-cell table:number-columns-repeated="36"/>
        </table:table-row>
        <table:table-row table:style-name="ro1">
          <table:table-cell table:style-name="ce623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690"/>
          <table:table-cell office:value-type="float" office:value="14" calcext:value-type="float">
            <text:p>14</text:p>
          </table:table-cell>
          <table:table-cell table:style-name="ce845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style-name="ce690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852" office:value-type="float" office:value="12" calcext:value-type="float">
            <text:p>12</text:p>
          </table:table-cell>
          <table:table-cell table:style-name="ce690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style-name="ce690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style-name="ce623"/>
          <table:table-cell table:style-name="ce866" table:formula="of:=COM.MICROSOFT.CONCAT(&quot;&quot;&quot;&quot;;[.$B$2]; &quot;&quot;&quot;: &quot;; [.B16])" office:value-type="string" office:string-value="&quot;0&quot;: 14" calcext:value-type="string">
            <text:p>"0": 14</text:p>
          </table:table-cell>
          <table:table-cell table:style-name="ce866" table:formula="of:=COM.MICROSOFT.CONCAT(&quot;&quot;&quot;&quot;;[.$C$2]; &quot;&quot;&quot;: &quot;; [.C16])" office:value-type="string" office:string-value="&quot;1&quot;: 13" calcext:value-type="string">
            <text:p>"1": 13</text:p>
          </table:table-cell>
          <table:table-cell table:style-name="ce866" table:formula="of:=COM.MICROSOFT.CONCAT(&quot;&quot;&quot;&quot;;[.$D$2]; &quot;&quot;&quot;: &quot;; [.D16])" office:value-type="string" office:string-value="&quot;2&quot;: 10" calcext:value-type="string">
            <text:p>"2": 10</text:p>
          </table:table-cell>
          <table:table-cell table:style-name="ce866" table:formula="of:=COM.MICROSOFT.CONCAT(&quot;&quot;&quot;&quot;;[.$E$2]; &quot;&quot;&quot;: &quot;; [.E16])" office:value-type="string" office:string-value="&quot;3&quot;: 11" calcext:value-type="string">
            <text:p>"3": 11</text:p>
          </table:table-cell>
          <table:table-cell table:style-name="ce866" table:formula="of:=COM.MICROSOFT.CONCAT(&quot;&quot;&quot;&quot;;[.$F$2]; &quot;&quot;&quot;: &quot;; [.F16])" office:value-type="string" office:string-value="&quot;4&quot;: 12" calcext:value-type="string">
            <text:p>"4": 12</text:p>
          </table:table-cell>
          <table:table-cell table:style-name="ce866"/>
          <table:table-cell table:style-name="ce866" table:formula="of:=COM.MICROSOFT.CONCAT(&quot;&quot;&quot;&quot;;[.$B$2]; &quot;&quot;&quot;: &quot;; [.H16])" office:value-type="string" office:string-value="&quot;0&quot;: 14" calcext:value-type="string">
            <text:p>"0": 14</text:p>
          </table:table-cell>
          <table:table-cell table:style-name="ce866" table:formula="of:=COM.MICROSOFT.CONCAT(&quot;&quot;&quot;&quot;;[.$C$2]; &quot;&quot;&quot;: &quot;; [.I16])" office:value-type="string" office:string-value="&quot;1&quot;: 13" calcext:value-type="string">
            <text:p>"1": 13</text:p>
          </table:table-cell>
          <table:table-cell table:style-name="ce866" table:formula="of:=COM.MICROSOFT.CONCAT(&quot;&quot;&quot;&quot;;[.$D$2]; &quot;&quot;&quot;: &quot;; [.J16])" office:value-type="string" office:string-value="&quot;2&quot;: 7" calcext:value-type="string">
            <text:p>"2": 7</text:p>
          </table:table-cell>
          <table:table-cell table:style-name="ce866" table:formula="of:=COM.MICROSOFT.CONCAT(&quot;&quot;&quot;&quot;;[.$E$2]; &quot;&quot;&quot;: &quot;; [.K16])" office:value-type="string" office:string-value="&quot;3&quot;: 8" calcext:value-type="string">
            <text:p>"3": 8</text:p>
          </table:table-cell>
          <table:table-cell table:style-name="ce866" table:formula="of:=COM.MICROSOFT.CONCAT(&quot;&quot;&quot;&quot;;[.$F$2]; &quot;&quot;&quot;: &quot;; [.L16])" office:value-type="string" office:string-value="&quot;4&quot;: 12" calcext:value-type="string">
            <text:p>"4": 12</text:p>
          </table:table-cell>
          <table:table-cell table:style-name="ce866"/>
          <table:table-cell table:style-name="ce866" table:formula="of:=COM.MICROSOFT.CONCAT(&quot;&quot;&quot;&quot;;[.$B$2]; &quot;&quot;&quot;: &quot;; [.N16])" office:value-type="string" office:string-value="&quot;0&quot;: 14" calcext:value-type="string">
            <text:p>"0": 14</text:p>
          </table:table-cell>
          <table:table-cell table:style-name="ce866" table:formula="of:=COM.MICROSOFT.CONCAT(&quot;&quot;&quot;&quot;;[.$C$2]; &quot;&quot;&quot;: &quot;; [.O16])" office:value-type="string" office:string-value="&quot;1&quot;: 13" calcext:value-type="string">
            <text:p>"1": 13</text:p>
          </table:table-cell>
          <table:table-cell table:style-name="ce866" table:formula="of:=COM.MICROSOFT.CONCAT(&quot;&quot;&quot;&quot;;[.$D$2]; &quot;&quot;&quot;: &quot;; [.P16])" office:value-type="string" office:string-value="&quot;2&quot;: 10" calcext:value-type="string">
            <text:p>"2": 10</text:p>
          </table:table-cell>
          <table:table-cell table:style-name="ce866" table:formula="of:=COM.MICROSOFT.CONCAT(&quot;&quot;&quot;&quot;;[.$E$2]; &quot;&quot;&quot;: &quot;; [.Q16])" office:value-type="string" office:string-value="&quot;3&quot;: 9" calcext:value-type="string">
            <text:p>"3": 9</text:p>
          </table:table-cell>
          <table:table-cell table:style-name="ce866" table:formula="of:=COM.MICROSOFT.CONCAT(&quot;&quot;&quot;&quot;;[.$F$2]; &quot;&quot;&quot;: &quot;; [.R16])" office:value-type="string" office:string-value="&quot;4&quot;: 12" calcext:value-type="string">
            <text:p>"4": 12</text:p>
          </table:table-cell>
          <table:table-cell table:style-name="ce866"/>
          <table:table-cell table:style-name="ce866" table:formula="of:=COM.MICROSOFT.CONCAT(&quot;&quot;&quot;&quot;;[.$B$2]; &quot;&quot;&quot;: &quot;; [.T16])" office:value-type="string" office:string-value="&quot;0&quot;: 13" calcext:value-type="string">
            <text:p>"0": 13</text:p>
          </table:table-cell>
          <table:table-cell table:style-name="ce866" table:formula="of:=COM.MICROSOFT.CONCAT(&quot;&quot;&quot;&quot;;[.$C$2]; &quot;&quot;&quot;: &quot;; [.U16])" office:value-type="string" office:string-value="&quot;1&quot;: 12" calcext:value-type="string">
            <text:p>"1": 12</text:p>
          </table:table-cell>
          <table:table-cell table:style-name="ce866" table:formula="of:=COM.MICROSOFT.CONCAT(&quot;&quot;&quot;&quot;;[.$D$2]; &quot;&quot;&quot;: &quot;; [.V16])" office:value-type="string" office:string-value="&quot;2&quot;: 8" calcext:value-type="string">
            <text:p>"2": 8</text:p>
          </table:table-cell>
          <table:table-cell table:style-name="ce866" table:formula="of:=COM.MICROSOFT.CONCAT(&quot;&quot;&quot;&quot;;[.$E$2]; &quot;&quot;&quot;: &quot;; [.W16])" office:value-type="string" office:string-value="&quot;3&quot;: 11" calcext:value-type="string">
            <text:p>"3": 11</text:p>
          </table:table-cell>
          <table:table-cell table:style-name="ce866" table:formula="of:=COM.MICROSOFT.CONCAT(&quot;&quot;&quot;&quot;;[.$F$2]; &quot;&quot;&quot;: &quot;; [.X16])" office:value-type="string" office:string-value="&quot;4&quot;: 14" calcext:value-type="string">
            <text:p>"4": 14</text:p>
          </table:table-cell>
          <table:table-cell table:style-name="ce866"/>
          <table:table-cell table:style-name="ce866" table:formula="of:=COM.MICROSOFT.CONCAT(&quot;&quot;&quot;&quot;;[.$B$2]; &quot;&quot;&quot;: &quot;; [.Z16])" office:value-type="string" office:string-value="&quot;0&quot;: 14" calcext:value-type="string">
            <text:p>"0": 14</text:p>
          </table:table-cell>
          <table:table-cell table:style-name="ce866" table:formula="of:=COM.MICROSOFT.CONCAT(&quot;&quot;&quot;&quot;;[.$C$2]; &quot;&quot;&quot;: &quot;; [.AA16])" office:value-type="string" office:string-value="&quot;1&quot;: 13" calcext:value-type="string">
            <text:p>"1": 13</text:p>
          </table:table-cell>
          <table:table-cell table:style-name="ce866" table:formula="of:=COM.MICROSOFT.CONCAT(&quot;&quot;&quot;&quot;;[.$D$2]; &quot;&quot;&quot;: &quot;; [.AB16])" office:value-type="string" office:string-value="&quot;2&quot;: 10" calcext:value-type="string">
            <text:p>"2": 10</text:p>
          </table:table-cell>
          <table:table-cell table:style-name="ce866" table:formula="of:=COM.MICROSOFT.CONCAT(&quot;&quot;&quot;&quot;;[.$E$2]; &quot;&quot;&quot;: &quot;; [.AC16])" office:value-type="string" office:string-value="&quot;3&quot;: 12" calcext:value-type="string">
            <text:p>"3": 12</text:p>
          </table:table-cell>
          <table:table-cell table:style-name="ce866" table:formula="of:=COM.MICROSOFT.CONCAT(&quot;&quot;&quot;&quot;;[.$F$2]; &quot;&quot;&quot;: &quot;; [.AD16])" office:value-type="string" office:string-value="&quot;4&quot;: 11" calcext:value-type="string">
            <text:p>"4": 11</text:p>
          </table:table-cell>
          <table:table-cell table:style-name="ce875" table:number-columns-repeated="2"/>
          <table:table-cell table:formula="of:=COM.MICROSOFT.CONCAT(&quot;&quot;&quot;5&quot;&quot;: { &quot;;COM.MICROSOFT.TEXTJOIN(&quot;, &quot;;TRUE();[.AF12:.AJ14]);&quot;}&quot;)" office:value-type="string" office:string-value="&quot;5&quot;: { &quot;0&quot;: 14, &quot;1&quot;: 9, &quot;2&quot;: 4, &quot;3&quot;: 6, &quot;4&quot;: 13, &quot;5&quot;: 5, &quot;6&quot;: 1, &quot;7&quot;: 2, &quot;8&quot;: 3, &quot;9&quot;: 8, &quot;10&quot;: 12, &quot;11&quot;: 10, &quot;12&quot;: 7, &quot;13&quot;: 5, &quot;14&quot;: 11}" calcext:value-type="string">
            <text:p>"5": { "0": 14, "1": 9, "2": 4, "3": 6, "4": 13, "5": 5, "6": 1, "7": 2, "8": 3, "9": 8, "10": 12, "11": 10, "12": 7, "13": 5, "14": 11}</text:p>
          </table:table-cell>
          <table:table-cell table:number-columns-repeated="36"/>
        </table:table-row>
        <table:table-row table:style-name="ro1">
          <table:table-cell table:style-name="ce623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690"/>
          <table:table-cell office:value-type="float" office:value="9" calcext:value-type="float">
            <text:p>9</text:p>
          </table:table-cell>
          <table:table-cell table:style-name="ce845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690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852" office:value-type="float" office:value="7" calcext:value-type="float">
            <text:p>7</text:p>
          </table:table-cell>
          <table:table-cell table:style-name="ce690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690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623"/>
          <table:table-cell table:style-name="ce866" table:formula="of:=COM.MICROSOFT.CONCAT(&quot;&quot;&quot;&quot;;[.$B$3]; &quot;&quot;&quot;: &quot;; [.B17])" office:value-type="string" office:string-value="&quot;5&quot;: 9" calcext:value-type="string">
            <text:p>"5": 9</text:p>
          </table:table-cell>
          <table:table-cell table:style-name="ce866" table:formula="of:=COM.MICROSOFT.CONCAT(&quot;&quot;&quot;&quot;;[.$C$3]; &quot;&quot;&quot;: &quot;; [.C17])" office:value-type="string" office:string-value="&quot;6&quot;: 6" calcext:value-type="string">
            <text:p>"6": 6</text:p>
          </table:table-cell>
          <table:table-cell table:style-name="ce866" table:formula="of:=COM.MICROSOFT.CONCAT(&quot;&quot;&quot;&quot;;[.$D$3]; &quot;&quot;&quot;: &quot;; [.D17])" office:value-type="string" office:string-value="&quot;7&quot;: 4" calcext:value-type="string">
            <text:p>"7": 4</text:p>
          </table:table-cell>
          <table:table-cell table:style-name="ce866" table:formula="of:=COM.MICROSOFT.CONCAT(&quot;&quot;&quot;&quot;;[.$E$3]; &quot;&quot;&quot;: &quot;; [.E17])" office:value-type="string" office:string-value="&quot;8&quot;: 5" calcext:value-type="string">
            <text:p>"8": 5</text:p>
          </table:table-cell>
          <table:table-cell table:style-name="ce866" table:formula="of:=COM.MICROSOFT.CONCAT(&quot;&quot;&quot;&quot;;[.$F$3]; &quot;&quot;&quot;: &quot;; [.F17])" office:value-type="string" office:string-value="&quot;9&quot;: 8" calcext:value-type="string">
            <text:p>"9": 8</text:p>
          </table:table-cell>
          <table:table-cell table:style-name="ce866"/>
          <table:table-cell table:style-name="ce866" table:formula="of:=COM.MICROSOFT.CONCAT(&quot;&quot;&quot;&quot;;[.$B$3]; &quot;&quot;&quot;: &quot;; [.H17])" office:value-type="string" office:string-value="&quot;5&quot;: 9" calcext:value-type="string">
            <text:p>"5": 9</text:p>
          </table:table-cell>
          <table:table-cell table:style-name="ce866" table:formula="of:=COM.MICROSOFT.CONCAT(&quot;&quot;&quot;&quot;;[.$C$3]; &quot;&quot;&quot;: &quot;; [.I17])" office:value-type="string" office:string-value="&quot;6&quot;: 5" calcext:value-type="string">
            <text:p>"6": 5</text:p>
          </table:table-cell>
          <table:table-cell table:style-name="ce866" table:formula="of:=COM.MICROSOFT.CONCAT(&quot;&quot;&quot;&quot;;[.$D$3]; &quot;&quot;&quot;: &quot;; [.J17])" office:value-type="string" office:string-value="&quot;7&quot;: 3" calcext:value-type="string">
            <text:p>"7": 3</text:p>
          </table:table-cell>
          <table:table-cell table:style-name="ce866" table:formula="of:=COM.MICROSOFT.CONCAT(&quot;&quot;&quot;&quot;;[.$E$3]; &quot;&quot;&quot;: &quot;; [.K17])" office:value-type="string" office:string-value="&quot;8&quot;: 4" calcext:value-type="string">
            <text:p>"8": 4</text:p>
          </table:table-cell>
          <table:table-cell table:style-name="ce866" table:formula="of:=COM.MICROSOFT.CONCAT(&quot;&quot;&quot;&quot;;[.$F$3]; &quot;&quot;&quot;: &quot;; [.L17])" office:value-type="string" office:string-value="&quot;9&quot;: 10" calcext:value-type="string">
            <text:p>"9": 10</text:p>
          </table:table-cell>
          <table:table-cell table:style-name="ce866"/>
          <table:table-cell table:style-name="ce866" table:formula="of:=COM.MICROSOFT.CONCAT(&quot;&quot;&quot;&quot;;[.$B$3]; &quot;&quot;&quot;: &quot;; [.N17])" office:value-type="string" office:string-value="&quot;5&quot;: 8" calcext:value-type="string">
            <text:p>"5": 8</text:p>
          </table:table-cell>
          <table:table-cell table:style-name="ce866" table:formula="of:=COM.MICROSOFT.CONCAT(&quot;&quot;&quot;&quot;;[.$C$3]; &quot;&quot;&quot;: &quot;; [.O17])" office:value-type="string" office:string-value="&quot;6&quot;: 6" calcext:value-type="string">
            <text:p>"6": 6</text:p>
          </table:table-cell>
          <table:table-cell table:style-name="ce866" table:formula="of:=COM.MICROSOFT.CONCAT(&quot;&quot;&quot;&quot;;[.$D$3]; &quot;&quot;&quot;: &quot;; [.P17])" office:value-type="string" office:string-value="&quot;7&quot;: 4" calcext:value-type="string">
            <text:p>"7": 4</text:p>
          </table:table-cell>
          <table:table-cell table:style-name="ce866" table:formula="of:=COM.MICROSOFT.CONCAT(&quot;&quot;&quot;&quot;;[.$E$3]; &quot;&quot;&quot;: &quot;; [.Q17])" office:value-type="string" office:string-value="&quot;8&quot;: 3" calcext:value-type="string">
            <text:p>"8": 3</text:p>
          </table:table-cell>
          <table:table-cell table:style-name="ce866" table:formula="of:=COM.MICROSOFT.CONCAT(&quot;&quot;&quot;&quot;;[.$F$3]; &quot;&quot;&quot;: &quot;; [.R17])" office:value-type="string" office:string-value="&quot;9&quot;: 7" calcext:value-type="string">
            <text:p>"9": 7</text:p>
          </table:table-cell>
          <table:table-cell table:style-name="ce866"/>
          <table:table-cell table:style-name="ce866" table:formula="of:=COM.MICROSOFT.CONCAT(&quot;&quot;&quot;&quot;;[.$B$3]; &quot;&quot;&quot;: &quot;; [.T17])" office:value-type="string" office:string-value="&quot;5&quot;: 6" calcext:value-type="string">
            <text:p>"5": 6</text:p>
          </table:table-cell>
          <table:table-cell table:style-name="ce866" table:formula="of:=COM.MICROSOFT.CONCAT(&quot;&quot;&quot;&quot;;[.$C$3]; &quot;&quot;&quot;: &quot;; [.U17])" office:value-type="string" office:string-value="&quot;6&quot;: 4" calcext:value-type="string">
            <text:p>"6": 4</text:p>
          </table:table-cell>
          <table:table-cell table:style-name="ce866" table:formula="of:=COM.MICROSOFT.CONCAT(&quot;&quot;&quot;&quot;;[.$D$3]; &quot;&quot;&quot;: &quot;; [.V17])" office:value-type="string" office:string-value="&quot;7&quot;: 3" calcext:value-type="string">
            <text:p>"7": 3</text:p>
          </table:table-cell>
          <table:table-cell table:style-name="ce866" table:formula="of:=COM.MICROSOFT.CONCAT(&quot;&quot;&quot;&quot;;[.$E$3]; &quot;&quot;&quot;: &quot;; [.W17])" office:value-type="string" office:string-value="&quot;8&quot;: 7" calcext:value-type="string">
            <text:p>"8": 7</text:p>
          </table:table-cell>
          <table:table-cell table:style-name="ce866" table:formula="of:=COM.MICROSOFT.CONCAT(&quot;&quot;&quot;&quot;;[.$F$3]; &quot;&quot;&quot;: &quot;; [.X17])" office:value-type="string" office:string-value="&quot;9&quot;: 10" calcext:value-type="string">
            <text:p>"9": 10</text:p>
          </table:table-cell>
          <table:table-cell table:style-name="ce866"/>
          <table:table-cell table:style-name="ce866" table:formula="of:=COM.MICROSOFT.CONCAT(&quot;&quot;&quot;&quot;;[.$B$3]; &quot;&quot;&quot;: &quot;; [.Z17])" office:value-type="string" office:string-value="&quot;5&quot;: 6" calcext:value-type="string">
            <text:p>"5": 6</text:p>
          </table:table-cell>
          <table:table-cell table:style-name="ce866" table:formula="of:=COM.MICROSOFT.CONCAT(&quot;&quot;&quot;&quot;;[.$C$3]; &quot;&quot;&quot;: &quot;; [.AA17])" office:value-type="string" office:string-value="&quot;6&quot;: 4" calcext:value-type="string">
            <text:p>"6": 4</text:p>
          </table:table-cell>
          <table:table-cell table:style-name="ce866" table:formula="of:=COM.MICROSOFT.CONCAT(&quot;&quot;&quot;&quot;;[.$D$3]; &quot;&quot;&quot;: &quot;; [.AB17])" office:value-type="string" office:string-value="&quot;7&quot;: 3" calcext:value-type="string">
            <text:p>"7": 3</text:p>
          </table:table-cell>
          <table:table-cell table:style-name="ce866" table:formula="of:=COM.MICROSOFT.CONCAT(&quot;&quot;&quot;&quot;;[.$E$3]; &quot;&quot;&quot;: &quot;; [.AC17])" office:value-type="string" office:string-value="&quot;8&quot;: 8" calcext:value-type="string">
            <text:p>"8": 8</text:p>
          </table:table-cell>
          <table:table-cell table:style-name="ce866" table:formula="of:=COM.MICROSOFT.CONCAT(&quot;&quot;&quot;&quot;;[.$F$3]; &quot;&quot;&quot;: &quot;; [.AD17])" office:value-type="string" office:string-value="&quot;9&quot;: 9" calcext:value-type="string">
            <text:p>"9": 9</text:p>
          </table:table-cell>
          <table:table-cell table:style-name="ce875" table:number-columns-repeated="2"/>
          <table:table-cell table:formula="of:=COM.MICROSOFT.CONCAT(&quot;&quot;&quot;6&quot;&quot;: { &quot;;COM.MICROSOFT.TEXTJOIN(&quot;, &quot;;TRUE();[.AL12:.AP14]);&quot;}&quot;)" office:value-type="string" office:string-value="&quot;6&quot;: { &quot;0&quot;: 14, &quot;1&quot;: 8, &quot;2&quot;: 3, &quot;3&quot;: 6, &quot;4&quot;: 13, &quot;5&quot;: 5, &quot;6&quot;: 2, &quot;7&quot;: 1, &quot;8&quot;: 2, &quot;9&quot;: 10, &quot;10&quot;: 11, &quot;11&quot;: 9, &quot;12&quot;: 7, &quot;13&quot;: 4, &quot;14&quot;: 12}" calcext:value-type="string">
            <text:p>"6": { "0": 14, "1": 8, "2": 3, "3": 6, "4": 13, "5": 5, "6": 2, "7": 1, "8": 2, "9": 10, "10": 11, "11": 9, "12": 7, "13": 4, "14": 12}</text:p>
          </table:table-cell>
          <table:table-cell table:number-columns-repeated="36"/>
        </table:table-row>
        <table:table-row table:style-name="ro1">
          <table:table-cell table:style-name="ce623"/>
          <table:table-cell table:style-name="ce880" table:formula="of:=[.$T$4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690"/>
          <table:table-cell office:value-type="float" office:value="6" calcext:value-type="float">
            <text:p>6</text:p>
          </table:table-cell>
          <table:table-cell table:style-name="ce880" table:formula="of:=[.$U$4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690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880" table:formula="of:=[.$V$4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852" office:value-type="float" office:value="11" calcext:value-type="float">
            <text:p>11</text:p>
          </table:table-cell>
          <table:table-cell table:style-name="ce690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0" table:formula="of:=[.$W$4]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690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880" table:formula="of:=[.$X$4]" office:value-type="float" office:value="12" calcext:value-type="float">
            <text:p>12</text:p>
          </table:table-cell>
          <table:table-cell table:style-name="ce623"/>
          <table:table-cell table:style-name="ce866" table:formula="of:=COM.MICROSOFT.CONCAT(&quot;&quot;&quot;&quot;;[.$B$4]; &quot;&quot;&quot;: &quot;; [.B18])" office:value-type="string" office:string-value="&quot;10&quot;: 11" calcext:value-type="string">
            <text:p>"10": 11</text:p>
          </table:table-cell>
          <table:table-cell table:style-name="ce866" table:formula="of:=COM.MICROSOFT.CONCAT(&quot;&quot;&quot;&quot;;[.$C$4]; &quot;&quot;&quot;: &quot;; [.C18])" office:value-type="string" office:string-value="&quot;11&quot;: 1" calcext:value-type="string">
            <text:p>"11": 1</text:p>
          </table:table-cell>
          <table:table-cell table:style-name="ce866" table:formula="of:=COM.MICROSOFT.CONCAT(&quot;&quot;&quot;&quot;;[.$D$4]; &quot;&quot;&quot;: &quot;; [.D18])" office:value-type="string" office:string-value="&quot;12&quot;: 2" calcext:value-type="string">
            <text:p>"12": 2</text:p>
          </table:table-cell>
          <table:table-cell table:style-name="ce866" table:formula="of:=COM.MICROSOFT.CONCAT(&quot;&quot;&quot;&quot;;[.$E$4]; &quot;&quot;&quot;: &quot;; [.E18])" office:value-type="string" office:string-value="&quot;13&quot;: 3" calcext:value-type="string">
            <text:p>"13": 3</text:p>
          </table:table-cell>
          <table:table-cell table:style-name="ce866" table:formula="of:=COM.MICROSOFT.CONCAT(&quot;&quot;&quot;&quot;;[.$F$4]; &quot;&quot;&quot;: &quot;; [.F18])" office:value-type="string" office:string-value="&quot;14&quot;: 7" calcext:value-type="string">
            <text:p>"14": 7</text:p>
          </table:table-cell>
          <table:table-cell table:style-name="ce866"/>
          <table:table-cell table:style-name="ce866" table:formula="of:=COM.MICROSOFT.CONCAT(&quot;&quot;&quot;&quot;;[.$B$4]; &quot;&quot;&quot;: &quot;; [.H18])" office:value-type="string" office:string-value="&quot;10&quot;: 6" calcext:value-type="string">
            <text:p>"10": 6</text:p>
          </table:table-cell>
          <table:table-cell table:style-name="ce866" table:formula="of:=COM.MICROSOFT.CONCAT(&quot;&quot;&quot;&quot;;[.$C$4]; &quot;&quot;&quot;: &quot;; [.I18])" office:value-type="string" office:string-value="&quot;11&quot;: 10" calcext:value-type="string">
            <text:p>"11": 10</text:p>
          </table:table-cell>
          <table:table-cell table:style-name="ce866" table:formula="of:=COM.MICROSOFT.CONCAT(&quot;&quot;&quot;&quot;;[.$D$4]; &quot;&quot;&quot;: &quot;; [.J18])" office:value-type="string" office:string-value="&quot;12&quot;: 1" calcext:value-type="string">
            <text:p>"12": 1</text:p>
          </table:table-cell>
          <table:table-cell table:style-name="ce866" table:formula="of:=COM.MICROSOFT.CONCAT(&quot;&quot;&quot;&quot;;[.$E$4]; &quot;&quot;&quot;: &quot;; [.K18])" office:value-type="string" office:string-value="&quot;13&quot;: 2" calcext:value-type="string">
            <text:p>"13": 2</text:p>
          </table:table-cell>
          <table:table-cell table:style-name="ce866" table:formula="of:=COM.MICROSOFT.CONCAT(&quot;&quot;&quot;&quot;;[.$F$4]; &quot;&quot;&quot;: &quot;; [.L18])" office:value-type="string" office:string-value="&quot;14&quot;: 11" calcext:value-type="string">
            <text:p>"14": 11</text:p>
          </table:table-cell>
          <table:table-cell table:style-name="ce866"/>
          <table:table-cell table:style-name="ce866" table:formula="of:=COM.MICROSOFT.CONCAT(&quot;&quot;&quot;&quot;;[.$B$4]; &quot;&quot;&quot;: &quot;; [.N18])" office:value-type="string" office:string-value="&quot;10&quot;: 5" calcext:value-type="string">
            <text:p>"10": 5</text:p>
          </table:table-cell>
          <table:table-cell table:style-name="ce866" table:formula="of:=COM.MICROSOFT.CONCAT(&quot;&quot;&quot;&quot;;[.$C$4]; &quot;&quot;&quot;: &quot;; [.O18])" office:value-type="string" office:string-value="&quot;11&quot;: 2" calcext:value-type="string">
            <text:p>"11": 2</text:p>
          </table:table-cell>
          <table:table-cell table:style-name="ce866" table:formula="of:=COM.MICROSOFT.CONCAT(&quot;&quot;&quot;&quot;;[.$D$4]; &quot;&quot;&quot;: &quot;; [.P18])" office:value-type="string" office:string-value="&quot;12&quot;: 8" calcext:value-type="string">
            <text:p>"12": 8</text:p>
          </table:table-cell>
          <table:table-cell table:style-name="ce866" table:formula="of:=COM.MICROSOFT.CONCAT(&quot;&quot;&quot;&quot;;[.$E$4]; &quot;&quot;&quot;: &quot;; [.Q18])" office:value-type="string" office:string-value="&quot;13&quot;: 1" calcext:value-type="string">
            <text:p>"13": 1</text:p>
          </table:table-cell>
          <table:table-cell table:style-name="ce866" table:formula="of:=COM.MICROSOFT.CONCAT(&quot;&quot;&quot;&quot;;[.$F$4]; &quot;&quot;&quot;: &quot;; [.R18])" office:value-type="string" office:string-value="&quot;14&quot;: 11" calcext:value-type="string">
            <text:p>"14": 11</text:p>
          </table:table-cell>
          <table:table-cell table:style-name="ce866"/>
          <table:table-cell table:style-name="ce866" table:formula="of:=COM.MICROSOFT.CONCAT(&quot;&quot;&quot;&quot;;[.$B$4]; &quot;&quot;&quot;: &quot;; [.T18])" office:value-type="string" office:string-value="&quot;10&quot;: 5" calcext:value-type="string">
            <text:p>"10": 5</text:p>
          </table:table-cell>
          <table:table-cell table:style-name="ce866" table:formula="of:=COM.MICROSOFT.CONCAT(&quot;&quot;&quot;&quot;;[.$C$4]; &quot;&quot;&quot;: &quot;; [.U18])" office:value-type="string" office:string-value="&quot;11&quot;: 2" calcext:value-type="string">
            <text:p>"11": 2</text:p>
          </table:table-cell>
          <table:table-cell table:style-name="ce866" table:formula="of:=COM.MICROSOFT.CONCAT(&quot;&quot;&quot;&quot;;[.$D$4]; &quot;&quot;&quot;: &quot;; [.V18])" office:value-type="string" office:string-value="&quot;12&quot;: 1" calcext:value-type="string">
            <text:p>"12": 1</text:p>
          </table:table-cell>
          <table:table-cell table:style-name="ce866" table:formula="of:=COM.MICROSOFT.CONCAT(&quot;&quot;&quot;&quot;;[.$E$4]; &quot;&quot;&quot;: &quot;; [.W18])" office:value-type="string" office:string-value="&quot;13&quot;: 4" calcext:value-type="string">
            <text:p>"13": 4</text:p>
          </table:table-cell>
          <table:table-cell table:style-name="ce866" table:formula="of:=COM.MICROSOFT.CONCAT(&quot;&quot;&quot;&quot;;[.$F$4]; &quot;&quot;&quot;: &quot;; [.X18])" office:value-type="string" office:string-value="&quot;14&quot;: 9" calcext:value-type="string">
            <text:p>"14": 9</text:p>
          </table:table-cell>
          <table:table-cell table:style-name="ce866"/>
          <table:table-cell table:style-name="ce866" table:formula="of:=COM.MICROSOFT.CONCAT(&quot;&quot;&quot;&quot;;[.$B$4]; &quot;&quot;&quot;: &quot;; [.Z18])" office:value-type="string" office:string-value="&quot;10&quot;: 5" calcext:value-type="string">
            <text:p>"10": 5</text:p>
          </table:table-cell>
          <table:table-cell table:style-name="ce866" table:formula="of:=COM.MICROSOFT.CONCAT(&quot;&quot;&quot;&quot;;[.$C$4]; &quot;&quot;&quot;: &quot;; [.AA18])" office:value-type="string" office:string-value="&quot;11&quot;: 2" calcext:value-type="string">
            <text:p>"11": 2</text:p>
          </table:table-cell>
          <table:table-cell table:style-name="ce866" table:formula="of:=COM.MICROSOFT.CONCAT(&quot;&quot;&quot;&quot;;[.$D$4]; &quot;&quot;&quot;: &quot;; [.AB18])" office:value-type="string" office:string-value="&quot;12&quot;: 1" calcext:value-type="string">
            <text:p>"12": 1</text:p>
          </table:table-cell>
          <table:table-cell table:style-name="ce866" table:formula="of:=COM.MICROSOFT.CONCAT(&quot;&quot;&quot;&quot;;[.$E$4]; &quot;&quot;&quot;: &quot;; [.AC18])" office:value-type="string" office:string-value="&quot;13&quot;: 7" calcext:value-type="string">
            <text:p>"13": 7</text:p>
          </table:table-cell>
          <table:table-cell table:style-name="ce866" table:formula="of:=COM.MICROSOFT.CONCAT(&quot;&quot;&quot;&quot;;[.$F$4]; &quot;&quot;&quot;: &quot;; [.AD18])" office:value-type="string" office:string-value="&quot;14&quot;: 12" calcext:value-type="string">
            <text:p>"14": 12</text:p>
          </table:table-cell>
          <table:table-cell table:style-name="ce875" table:number-columns-repeated="2"/>
          <table:table-cell table:formula="of:=COM.MICROSOFT.CONCAT(&quot;&quot;&quot;7&quot;&quot;: { &quot;;COM.MICROSOFT.TEXTJOIN(&quot;, &quot;;TRUE();[.AR12:.AV14]);&quot;}&quot;)" office:value-type="string" office:string-value="&quot;7&quot;: { &quot;0&quot;: 14, &quot;1&quot;: 5, &quot;2&quot;: 7, &quot;3&quot;: 9, &quot;4&quot;: 13, &quot;5&quot;: 4, &quot;6&quot;: 2, &quot;7&quot;: 0, &quot;8&quot;: 1, &quot;9&quot;: 10, &quot;10&quot;: 11, &quot;11&quot;: 6, &quot;12&quot;: 8, &quot;13&quot;: 3, &quot;14&quot;: 12}" calcext:value-type="string">
            <text:p>"7": { "0": 14, "1": 5, "2": 7, "3": 9, "4": 13, "5": 4, "6": 2, "7": 0, "8": 1, "9": 10, "10": 11, "11": 6, "12": 8, "13": 3, "14": 12}</text:p>
          </table:table-cell>
          <table:table-cell table:number-columns-repeated="36"/>
        </table:table-row>
        <table:table-row table:style-name="ro2">
          <table:table-cell table:style-name="ce623"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ce802" office:value-type="string" calcext:value-type="string">
            <text:p><text:s text:c="43"/></text:p>
          </table:table-cell>
          <table:table-cell table:style-name="Default" table:number-columns-repeated="11"/>
          <table:table-cell/>
          <table:table-cell table:style-name="ce864" table:number-columns-repeated="29"/>
          <table:table-cell table:style-name="ce875" table:number-columns-repeated="2"/>
          <table:table-cell table:formula="of:=COM.MICROSOFT.CONCAT(&quot;&quot;&quot;8&quot;&quot;: { &quot;;COM.MICROSOFT.TEXTJOIN(&quot;, &quot;;TRUE();[.AX12:.BB14]);&quot;}&quot;)" office:value-type="string" office:string-value="&quot;8&quot;: { &quot;0&quot;: 12, &quot;1&quot;: 5, &quot;2&quot;: 3, &quot;3&quot;: 10, &quot;4&quot;: 14, &quot;5&quot;: 4, &quot;6&quot;: 2, &quot;7&quot;: 1, &quot;8&quot;: 1, &quot;9&quot;: 11, &quot;10&quot;: 8, &quot;11&quot;: 6, &quot;12&quot;: 7, &quot;13&quot;: 9, &quot;14&quot;: 13}" calcext:value-type="string">
            <text:p>"8": { "0": 12, "1": 5, "2": 3, "3": 10, "4": 14, "5": 4, "6": 2, "7": 1, "8": 1, "9": 11, "10": 8, "11": 6, "12": 7, "13": 9, "14": 13}</text:p>
          </table:table-cell>
          <table:table-cell table:number-columns-repeated="36"/>
        </table:table-row>
        <table:table-row table:style-name="ro2">
          <table:table-cell table:style-name="ce623"/>
          <table:table-cell table:style-name="ce633" table:number-columns-spanned="29" table:number-rows-spanned="3"/>
          <table:covered-table-cell table:number-columns-repeated="28" table:style-name="ce634"/>
          <table:table-cell table:style-name="ce861"/>
          <table:table-cell table:style-name="ce867" table:formula="of:=COM.MICROSOFT.CONCAT(&quot;{&quot;; COM.MICROSOFT.TEXTJOIN(&quot;, &quot;;TRUE();[.BK14]; [.BK22]; [.BK30]);&quot;}&quot;)" office:value-type="string" office:string-value="{&quot;0&quot;: { &quot;0&quot;: 14, &quot;1&quot;: 1, &quot;2&quot;: 2, &quot;3&quot;: 3, &quot;4&quot;: 5, &quot;5&quot;: 9, &quot;6&quot;: 8, &quot;7&quot;: 7, &quot;8&quot;: 4, &quot;9&quot;: 6, &quot;10&quot;: 14, &quot;11&quot;: 13, &quot;12&quot;: 11, &quot;13&quot;: 10, &quot;14&quot;: 12}, &quot;1&quot;: { &quot;0&quot;: 9, &quot;1&quot;: 6, &quot;2&quot;: 1, &quot;3&quot;: 3, &quot;4&quot;: 6, &quot;5&quot;: 7, &quot;6&quot;: 8, &quot;7&quot;: 4, &quot;8&quot;: 2, &quot;9&quot;: 5, &quot;10&quot;: 13, &quot;11&quot;: 14, &quot;12&quot;: 11, &quot;13&quot;: 10, &quot;14&quot;: 12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7, &quot;4&quot;: 8, &quot;5&quot;: 5, &quot;6&quot;: 4, &quot;7&quot;: 6, &quot;8&quot;: 7, &quot;9&quot;: 9, &quot;10&quot;: 13, &quot;11&quot;: 11, &quot;12&quot;: 10, &quot;13&quot;: 12, &quot;14&quot;: 14}, &quot;4&quot;: { &quot;0&quot;: 7, &quot;1&quot;: 2, &quot;2&quot;: 1, &quot;3&quot;: 6, &quot;4&quot;: 13, &quot;5&quot;: 5, &quot;6&quot;: 4, &quot;7&quot;: 3, &quot;8&quot;: 9, &quot;9&quot;: 8, &quot;10&quot;: 12, &quot;11&quot;: 11, &quot;12&quot;: 10, &quot;13&quot;: 14, &quot;14&quot;: 13}, &quot;5&quot;: { &quot;0&quot;: 14, &quot;1&quot;: 9, &quot;2&quot;: 4, &quot;3&quot;: 6, &quot;4&quot;: 13, &quot;5&quot;: 5, &quot;6&quot;: 1, &quot;7&quot;: 2, &quot;8&quot;: 3, &quot;9&quot;: 8, &quot;10&quot;: 12, &quot;11&quot;: 10, &quot;12&quot;: 7, &quot;13&quot;: 5, &quot;14&quot;: 11}, &quot;6&quot;: { &quot;0&quot;: 14, &quot;1&quot;: 8, &quot;2&quot;: 3, &quot;3&quot;: 6, &quot;4&quot;: 13, &quot;5&quot;: 5, &quot;6&quot;: 2, &quot;7&quot;: 1, &quot;8&quot;: 2, &quot;9&quot;: 10, &quot;10&quot;: 11, &quot;11&quot;: 9, &quot;12&quot;: 7, &quot;13&quot;: 4, &quot;14&quot;: 12}, &quot;7&quot;: { &quot;0&quot;: 14, &quot;1&quot;: 5, &quot;2&quot;: 7, &quot;3&quot;: 9, &quot;4&quot;: 13, &quot;5&quot;: 4, &quot;6&quot;: 2, &quot;7&quot;: 0, &quot;8&quot;: 1, &quot;9&quot;: 10, &quot;10&quot;: 11, &quot;11&quot;: 6, &quot;12&quot;: 8, &quot;13&quot;: 3, &quot;14&quot;: 12}, &quot;8&quot;: { &quot;0&quot;: 12, &quot;1&quot;: 5, &quot;2&quot;: 3, &quot;3&quot;: 10, &quot;4&quot;: 14, &quot;5&quot;: 4, &quot;6&quot;: 2, &quot;7&quot;: 1, &quot;8&quot;: 1, &quot;9&quot;: 11, &quot;10&quot;: 8, &quot;11&quot;: 6, &quot;12&quot;: 7, &quot;13&quot;: 9, &quot;14&quot;: 13}, &quot;9&quot;: { &quot;0&quot;: 14, &quot;1&quot;: 6, &quot;2&quot;: 5, &quot;3&quot;: 10, &quot;4&quot;: 12, &quot;5&quot;: 3, &quot;6&quot;: 2, &quot;7&quot;: 1, &quot;8&quot;: 4, &quot;9&quot;: 9, &quot;10&quot;: 13, &quot;11&quot;: 7, &quot;12&quot;: 8, &quot;13&quot;: 9, &quot;14&quot;: 11}, &quot;10&quot;: { &quot;0&quot;: 14, &quot;1&quot;: 13, &quot;2&quot;: 10, &quot;3&quot;: 11, &quot;4&quot;: 12, &quot;5&quot;: 9, &quot;6&quot;: 6, &quot;7&quot;: 4, &quot;8&quot;: 5, &quot;9&quot;: 8, &quot;10&quot;: 11, &quot;11&quot;: 1, &quot;12&quot;: 2, &quot;13&quot;: 3, &quot;14&quot;: 7}, &quot;11&quot;: { &quot;0&quot;: 14, &quot;1&quot;: 13, &quot;2&quot;: 7, &quot;3&quot;: 8, &quot;4&quot;: 12, &quot;5&quot;: 9, &quot;6&quot;: 5, &quot;7&quot;: 3, &quot;8&quot;: 4, &quot;9&quot;: 10, &quot;10&quot;: 6, &quot;11&quot;: 10, &quot;12&quot;: 1, &quot;13&quot;: 2, &quot;14&quot;: 11}, &quot;12&quot;: { &quot;0&quot;: 14, &quot;1&quot;: 13, &quot;2&quot;: 10, &quot;3&quot;: 9, &quot;4&quot;: 12, &quot;5&quot;: 8, &quot;6&quot;: 6, &quot;7&quot;: 4, &quot;8&quot;: 3, &quot;9&quot;: 7, &quot;10&quot;: 5, &quot;11&quot;: 2, &quot;12&quot;: 8, &quot;13&quot;: 1, &quot;14&quot;: 11}, &quot;13&quot;: { &quot;0&quot;: 13, &quot;1&quot;: 12, &quot;2&quot;: 8, &quot;3&quot;: 11, &quot;4&quot;: 14, &quot;5&quot;: 6, &quot;6&quot;: 4, &quot;7&quot;: 3, &quot;8&quot;: 7, &quot;9&quot;: 10, &quot;10&quot;: 5, &quot;11&quot;: 2, &quot;12&quot;: 1, &quot;13&quot;: 4, &quot;14&quot;: 9}, &quot;14&quot;: { &quot;0&quot;: 14, &quot;1&quot;: 13, &quot;2&quot;: 10, &quot;3&quot;: 12, &quot;4&quot;: 11, &quot;5&quot;: 6, &quot;6&quot;: 4, &quot;7&quot;: 3, &quot;8&quot;: 8, &quot;9&quot;: 9, &quot;10&quot;: 5, &quot;11&quot;: 2, &quot;12&quot;: 1, &quot;13&quot;: 7, &quot;14&quot;: 12}}" calcext:value-type="string" table:number-columns-spanned="29" table:number-rows-spanned="4">
            <text:p>{"0": { "0": 14, "1": 1, "2": 2, "3": 3, "4": 5, "5": 9, "6": 8, "7": 7, "8": 4, "9": 6, "10": 14, "11": 13, "12": 11, "13": 10, "14": 12}, "1": { "0": 9, "1": 6, "2": 1, "3": 3, "4": 6, "5": 7, "6": 8, "7": 4, "8": 2, "9": 5, "10": 13, "11": 14, "12": 11, "13": 10, "14": 12}, "2": { "0": 9, "1": 3, "2": 3, "3": 1, "4": 8, "5": 7, "6": 4, "7": 5, "8": 2, "9": 6, "10": 12, "11": 11, "12": 13, "13": 10, "14": 14}, "3": { "0": 3, "1": 2, "2": 1, "3": 7, "4": 8, "5": 5, "6": 4, "7": 6, "8": 7, "9": 9, "10": 13, "11": 11, "12": 10, "13": 12, "14": 14}, "4": { "0": 7, "1": 2, "2": 1, "3": 6, "4": 13, "5": 5, "6": 4, "7": 3, "8": 9, "9": 8, "10": 12, "11": 11, "12": 10, "13": 14, "14": 13}, "5": { "0": 14, "1": 9, "2": 4, "3": 6, "4": 13, "5": 5, "6": 1, "7": 2, "8": 3, "9": 8, "10": 12, "11": 10, "12": 7, "13": 5, "14": 11}, "6": { "0": 14, "1": 8, "2": 3, "3": 6, "4": 13, "5": 5, "6": 2, "7": 1, "8": 2, "9": 10, "10": 11, "11": 9, "12": 7, "13": 4, "14": 12}, "7": { "0": 14, "1": 5, "2": 7, "3": 9, "4": 13, "5": 4, "6": 2, "7": 0, "8": 1, "9": 10, "10": 11, "11": 6, "12": 8, "13": 3, "14": 12}, "8": { "0": 12, "1": 5, "2": 3, "3": 10, "4": 14, "5": 4, "6": 2, "7": 1, "8": 1, "9": 11, "10": 8, "11": 6, "12": 7, "13": 9, "14": 13}, "9": { "0": 14, "1": 6, "2": 5, "3": 10, "4": 12, "5": 3, "6": 2, "7": 1, "8": 4, "9": 9, "10": 13, "11": 7, "12": 8, "13": 9, "14": 11}, "10": { "0": 14, "1": 13, "2": 10, "3": 11, "4": 12, "5": 9, "6": 6, "7": 4, "8": 5, "9": 8, "10": 11, "11": 1, "12": 2, "13": 3, "14": 7}, "11": { "0": 14, "1": 13, "2": 7, "3": 8, "4": 12, "5": 9, "6": 5, "7": 3, "8": 4, "9": 10, "10": 6, "11": 10, "12": 1, "13": 2, "14": 11}, "12": { "0": 14, "1": 13, "2": 10, "3": 9, "4": 12, "5": 8, "6": 6, "7": 4, "8": 3, "9": 7, "10": 5, "11": 2, "12": 8, "13": 1, "14": 11}, "13": { "0": 13, "1": 12, "2": 8, "3": 11, "4": 14, "5": 6, "6": 4, "7": 3, "8": 7, "9": 10, "10": 5, "11": 2, "12": 1, "13": 4, "14": 9}, "14": { "0": 14, "1": 13, "2": 10, "3": 12, "4": 11, "5": 6, "6": 4, "7": 3, "8": 8, "9": 9, "10": 5, "11": 2, "12": 1, "13": 7, "14": 12}}</text:p>
          </table:table-cell>
          <table:covered-table-cell table:number-columns-repeated="28" table:style-name="ce868"/>
          <table:table-cell table:style-name="ce875" table:number-columns-repeated="2"/>
          <table:table-cell table:formula="of:=COM.MICROSOFT.CONCAT(&quot;&quot;&quot;9&quot;&quot;: { &quot;;COM.MICROSOFT.TEXTJOIN(&quot;, &quot;;TRUE();[.BD12:.BH14]);&quot;}&quot;)" office:value-type="string" office:string-value="&quot;9&quot;: { &quot;0&quot;: 14, &quot;1&quot;: 6, &quot;2&quot;: 5, &quot;3&quot;: 10, &quot;4&quot;: 12, &quot;5&quot;: 3, &quot;6&quot;: 2, &quot;7&quot;: 1, &quot;8&quot;: 4, &quot;9&quot;: 9, &quot;10&quot;: 13, &quot;11&quot;: 7, &quot;12&quot;: 8, &quot;13&quot;: 9, &quot;14&quot;: 11}" calcext:value-type="string">
            <text:p>"9": { "0": 14, "1": 6, "2": 5, "3": 10, "4": 12, "5": 3, "6": 2, "7": 1, "8": 4, "9": 9, "10": 13, "11": 7, "12": 8, "13": 9, "14": 11}</text:p>
          </table:table-cell>
          <table:table-cell table:number-columns-repeated="36"/>
        </table:table-row>
        <table:table-row table:style-name="ro2">
          <table:table-cell table:style-name="ce623"/>
          <table:covered-table-cell table:number-columns-repeated="29" table:style-name="ce634"/>
          <table:table-cell table:style-name="ce861"/>
          <table:covered-table-cell table:number-columns-repeated="29" table:style-name="ce868"/>
          <table:table-cell table:style-name="ce875" table:number-columns-repeated="2"/>
          <table:table-cell table:style-name="ce864"/>
          <table:table-cell table:number-columns-repeated="36"/>
        </table:table-row>
        <table:table-row table:style-name="ro2">
          <table:table-cell table:style-name="ce623"/>
          <table:covered-table-cell table:number-columns-repeated="29" table:style-name="ce634"/>
          <table:table-cell table:style-name="ce861"/>
          <table:covered-table-cell table:number-columns-repeated="29" table:style-name="ce868"/>
          <table:table-cell table:style-name="ce875" table:number-columns-repeated="2"/>
          <table:table-cell table:formula="of:=COM.MICROSOFT.TEXTJOIN(&quot;, &quot;;TRUE();[.BK16:.BK20])" office:value-type="string" office:string-value="&quot;5&quot;: { &quot;0&quot;: 14, &quot;1&quot;: 9, &quot;2&quot;: 4, &quot;3&quot;: 6, &quot;4&quot;: 13, &quot;5&quot;: 5, &quot;6&quot;: 1, &quot;7&quot;: 2, &quot;8&quot;: 3, &quot;9&quot;: 8, &quot;10&quot;: 12, &quot;11&quot;: 10, &quot;12&quot;: 7, &quot;13&quot;: 5, &quot;14&quot;: 11}, &quot;6&quot;: { &quot;0&quot;: 14, &quot;1&quot;: 8, &quot;2&quot;: 3, &quot;3&quot;: 6, &quot;4&quot;: 13, &quot;5&quot;: 5, &quot;6&quot;: 2, &quot;7&quot;: 1, &quot;8&quot;: 2, &quot;9&quot;: 10, &quot;10&quot;: 11, &quot;11&quot;: 9, &quot;12&quot;: 7, &quot;13&quot;: 4, &quot;14&quot;: 12}, &quot;7&quot;: { &quot;0&quot;: 14, &quot;1&quot;: 5, &quot;2&quot;: 7, &quot;3&quot;: 9, &quot;4&quot;: 13, &quot;5&quot;: 4, &quot;6&quot;: 2, &quot;7&quot;: 0, &quot;8&quot;: 1, &quot;9&quot;: 10, &quot;10&quot;: 11, &quot;11&quot;: 6, &quot;12&quot;: 8, &quot;13&quot;: 3, &quot;14&quot;: 12}, &quot;8&quot;: { &quot;0&quot;: 12, &quot;1&quot;: 5, &quot;2&quot;: 3, &quot;3&quot;: 10, &quot;4&quot;: 14, &quot;5&quot;: 4, &quot;6&quot;: 2, &quot;7&quot;: 1, &quot;8&quot;: 1, &quot;9&quot;: 11, &quot;10&quot;: 8, &quot;11&quot;: 6, &quot;12&quot;: 7, &quot;13&quot;: 9, &quot;14&quot;: 13}, &quot;9&quot;: { &quot;0&quot;: 14, &quot;1&quot;: 6, &quot;2&quot;: 5, &quot;3&quot;: 10, &quot;4&quot;: 12, &quot;5&quot;: 3, &quot;6&quot;: 2, &quot;7&quot;: 1, &quot;8&quot;: 4, &quot;9&quot;: 9, &quot;10&quot;: 13, &quot;11&quot;: 7, &quot;12&quot;: 8, &quot;13&quot;: 9, &quot;14&quot;: 11}" calcext:value-type="string">
            <text:p>"5": { "0": 14, "1": 9, "2": 4, "3": 6, "4": 13, "5": 5, "6": 1, "7": 2, "8": 3, "9": 8, "10": 12, "11": 10, "12": 7, "13": 5, "14": 11}, "6": { "0": 14, "1": 8, "2": 3, "3": 6, "4": 13, "5": 5, "6": 2, "7": 1, "8": 2, "9": 10, "10": 11, "11": 9, "12": 7, "13": 4, "14": 12}, "7": { "0": 14, "1": 5, "2": 7, "3": 9, "4": 13, "5": 4, "6": 2, "7": 0, "8": 1, "9": 10, "10": 11, "11": 6, "12": 8, "13": 3, "14": 12}, "8": { "0": 12, "1": 5, "2": 3, "3": 10, "4": 14, "5": 4, "6": 2, "7": 1, "8": 1, "9": 11, "10": 8, "11": 6, "12": 7, "13": 9, "14": 13}, "9": { "0": 14, "1": 6, "2": 5, "3": 10, "4": 12, "5": 3, "6": 2, "7": 1, "8": 4, "9": 9, "10": 13, "11": 7, "12": 8, "13": 9, "14": 11}</text:p>
          </table:table-cell>
          <table:table-cell table:number-columns-repeated="36"/>
        </table:table-row>
        <table:table-row table:style-name="ro2">
          <table:table-cell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Default" table:number-columns-repeated="12"/>
          <table:table-cell/>
          <table:covered-table-cell table:number-columns-repeated="29" table:style-name="ce864"/>
          <table:table-cell table:style-name="ce875" table:number-columns-repeated="2"/>
          <table:table-cell table:style-name="ce864"/>
          <table:table-cell table:number-columns-repeated="36"/>
        </table:table-row>
        <table:table-row table:style-name="ro2">
          <table:table-cell/>
          <table:table-cell table:style-name="ce635" table:formula="of:=SUM([.B25:.F27])-[.B25]" office:value-type="float" office:value="45.5" calcext:value-type="float" table:number-columns-spanned="2" table:number-rows-spanned="1">
            <text:p>45.5</text:p>
          </table:table-cell>
          <table:covered-table-cell table:style-name="ce659"/>
          <table:table-cell table:style-name="ce659" table:number-columns-repeated="4"/>
          <table:table-cell table:style-name="ce691" table:formula="of:=SUM([.H25:.L27])-[.I25]" office:value-type="float" office:value="45.5" calcext:value-type="float" table:number-columns-spanned="2" table:number-rows-spanned="1">
            <text:p>45.5</text:p>
          </table:table-cell>
          <table:covered-table-cell table:style-name="ce659"/>
          <table:table-cell table:style-name="ce659" table:number-columns-repeated="4"/>
          <table:table-cell table:style-name="ce635" table:formula="of:=SUM([.N25:.R27])-[.P25]" office:value-type="float" office:value="45.5" calcext:value-type="float" table:number-columns-spanned="2" table:number-rows-spanned="1">
            <text:p>45.5</text:p>
          </table:table-cell>
          <table:covered-table-cell table:style-name="ce659"/>
          <table:table-cell table:style-name="ce659" table:number-columns-repeated="4"/>
          <table:table-cell table:style-name="ce691" table:formula="of:=SUM([.T25:.X27])-[.W25]" office:value-type="float" office:value="45.5" calcext:value-type="float" table:number-columns-spanned="2" table:number-rows-spanned="1">
            <text:p>45.5</text:p>
          </table:table-cell>
          <table:covered-table-cell table:style-name="ce659"/>
          <table:table-cell table:style-name="ce659" table:number-columns-repeated="4"/>
          <table:table-cell table:style-name="ce635" table:formula="of:=SUM([.Z25:.AD27])-[.AD25]" office:value-type="float" office:value="45.5" calcext:value-type="float" table:number-columns-spanned="2" table:number-rows-spanned="1">
            <text:p>45.5</text:p>
          </table:table-cell>
          <table:covered-table-cell table:style-name="ce659"/>
          <table:table-cell table:style-name="ce659" table:number-columns-repeated="3"/>
          <table:table-cell table:style-name="ce623"/>
          <table:table-cell table:number-columns-repeated="31"/>
          <table:table-cell table:formula="of:=COM.MICROSOFT.CONCAT(&quot;&quot;&quot;10&quot;&quot;: { &quot;;COM.MICROSOFT.TEXTJOIN(&quot;, &quot;;TRUE();[.AF16:.AJ18]);&quot;}&quot;)" office:value-type="string" office:string-value="&quot;10&quot;: { &quot;0&quot;: 14, &quot;1&quot;: 13, &quot;2&quot;: 10, &quot;3&quot;: 11, &quot;4&quot;: 12, &quot;5&quot;: 9, &quot;6&quot;: 6, &quot;7&quot;: 4, &quot;8&quot;: 5, &quot;9&quot;: 8, &quot;10&quot;: 11, &quot;11&quot;: 1, &quot;12&quot;: 2, &quot;13&quot;: 3, &quot;14&quot;: 7}" calcext:value-type="string">
            <text:p>"10": { "0": 14, "1": 13, "2": 10, "3": 11, "4": 12, "5": 9, "6": 6, "7": 4, "8": 5, "9": 8, "10": 11, "11": 1, "12": 2, "13": 3, "14": 7}</text:p>
          </table:table-cell>
          <table:table-cell table:number-columns-repeated="36"/>
        </table:table-row>
        <table:table-row table:style-name="ro1">
          <table:table-cell/>
          <table:table-cell table:style-name="ce883" table:formula="of:=HLOOKUP([.B8];[.$AF$25:.$AW$26];2;0)" office:value-type="float" office:value="5.2" calcext:value-type="float">
            <text:p>5.2</text:p>
          </table:table-cell>
          <table:table-cell table:style-name="ce893" table:formula="of:=HLOOKUP([.C8];[.$AF$25:.$AW$26];2;0)" office:value-type="float" office:value="1.1" calcext:value-type="float">
            <text:p>1.1</text:p>
          </table:table-cell>
          <table:table-cell table:style-name="ce897" table:formula="of:=HLOOKUP([.D8];[.$AF$25:.$AW$26];2;0)" office:value-type="float" office:value="1.2" calcext:value-type="float">
            <text:p>1.2</text:p>
          </table:table-cell>
          <table:table-cell table:style-name="ce900" table:formula="of:=HLOOKUP([.E8];[.$AF$25:.$AW$26];2;0)" office:value-type="float" office:value="2" calcext:value-type="float">
            <text:p>2.0</text:p>
          </table:table-cell>
          <table:table-cell table:style-name="ce900" table:formula="of:=HLOOKUP([.F8];[.$AF$25:.$AW$26];2;0)" office:value-type="float" office:value="2.2" calcext:value-type="float">
            <text:p>2.2</text:p>
          </table:table-cell>
          <table:table-cell/>
          <table:table-cell table:style-name="ce905" table:formula="of:=HLOOKUP([.H8];[.$AF$25:.$AW$26];2;0)" office:value-type="float" office:value="4" calcext:value-type="float">
            <text:p>4.0</text:p>
          </table:table-cell>
          <table:table-cell table:style-name="ce911" table:formula="of:=HLOOKUP([.I8];[.$AF$25:.$AW$26];2;0)" office:value-type="float" office:value="3" calcext:value-type="float">
            <text:p>3.0</text:p>
          </table:table-cell>
          <table:table-cell table:style-name="ce917" table:formula="of:=HLOOKUP([.J8];[.$AF$25:.$AW$26];2;0)" office:value-type="float" office:value="1.1" calcext:value-type="float">
            <text:p>1.1</text:p>
          </table:table-cell>
          <table:table-cell table:style-name="ce920" table:formula="of:=HLOOKUP([.K8];[.$AF$25:.$AW$26];2;0)" office:value-type="float" office:value="2" calcext:value-type="float">
            <text:p>2.0</text:p>
          </table:table-cell>
          <table:table-cell table:style-name="ce920" table:formula="of:=HLOOKUP([.L8];[.$AF$25:.$AW$26];2;0)" office:value-type="float" office:value="3" calcext:value-type="float">
            <text:p>3.0</text:p>
          </table:table-cell>
          <table:table-cell/>
          <table:table-cell table:style-name="ce929" table:formula="of:=HLOOKUP([.N8];[.$AF$25:.$AW$26];2;0)" office:value-type="float" office:value="4" calcext:value-type="float">
            <text:p>4.0</text:p>
          </table:table-cell>
          <table:table-cell table:style-name="ce936" table:formula="of:=HLOOKUP([.O8];[.$AF$25:.$AW$26];2;0)" office:value-type="float" office:value="2" calcext:value-type="float">
            <text:p>2.0</text:p>
          </table:table-cell>
          <table:table-cell table:style-name="ce940" table:formula="of:=HLOOKUP([.P8];[.$AF$25:.$AW$26];2;0)" office:value-type="float" office:value="2" calcext:value-type="float">
            <text:p>2.0</text:p>
          </table:table-cell>
          <table:table-cell table:style-name="ce946" table:formula="of:=HLOOKUP([.Q8];[.$AF$25:.$AW$26];2;0)" office:value-type="float" office:value="1.1" calcext:value-type="float">
            <text:p>1.1</text:p>
          </table:table-cell>
          <table:table-cell table:style-name="ce946" table:formula="of:=HLOOKUP([.R8];[.$AF$25:.$AW$26];2;0)" office:value-type="float" office:value="3.2" calcext:value-type="float">
            <text:p>3.2</text:p>
          </table:table-cell>
          <table:table-cell/>
          <table:table-cell table:style-name="ce950" table:formula="of:=HLOOKUP([.T8];[.$AF$25:.$AW$26];2;0)" office:value-type="float" office:value="2" calcext:value-type="float">
            <text:p>2.0</text:p>
          </table:table-cell>
          <table:table-cell table:style-name="ce959" table:formula="of:=HLOOKUP([.U8];[.$AF$25:.$AW$26];2;0)" office:value-type="float" office:value="1.2" calcext:value-type="float">
            <text:p>1.2</text:p>
          </table:table-cell>
          <table:table-cell table:style-name="ce962" table:formula="of:=HLOOKUP([.V8];[.$AF$25:.$AW$26];2;0)" office:value-type="float" office:value="1.1" calcext:value-type="float">
            <text:p>1.1</text:p>
          </table:table-cell>
          <table:table-cell table:style-name="ce965" table:formula="of:=HLOOKUP([.W8];[.$AF$25:.$AW$26];2;0)" office:value-type="float" office:value="3.1" calcext:value-type="float">
            <text:p>3.1</text:p>
          </table:table-cell>
          <table:table-cell table:style-name="ce966" table:formula="of:=HLOOKUP([.X8];[.$AF$25:.$AW$26];2;0)" office:value-type="float" office:value="3.2" calcext:value-type="float">
            <text:p>3.2</text:p>
          </table:table-cell>
          <table:table-cell/>
          <table:table-cell table:style-name="ce973" table:formula="of:=HLOOKUP([.Z8];[.$AF$25:.$AW$26];2;0)" office:value-type="float" office:value="3.1" calcext:value-type="float">
            <text:p>3.1</text:p>
          </table:table-cell>
          <table:table-cell table:style-name="ce981" table:formula="of:=HLOOKUP([.AA8];[.$AF$25:.$AW$26];2;0)" office:value-type="float" office:value="1.2" calcext:value-type="float">
            <text:p>1.2</text:p>
          </table:table-cell>
          <table:table-cell table:style-name="ce984" table:formula="of:=HLOOKUP([.AB8];[.$AF$25:.$AW$26];2;0)" office:value-type="float" office:value="1.1" calcext:value-type="float">
            <text:p>1.1</text:p>
          </table:table-cell>
          <table:table-cell table:style-name="ce987" table:formula="of:=HLOOKUP([.AC8];[.$AF$25:.$AW$26];2;0)" office:value-type="float" office:value="3" calcext:value-type="float">
            <text:p>3.0</text:p>
          </table:table-cell>
          <table:table-cell table:style-name="ce990" table:formula="of:=HLOOKUP([.AD8];[.$AF$25:.$AW$26];2;0)" office:value-type="float" office:value="5.1" calcext:value-type="float">
            <text:p>5.1</text:p>
          </table:table-cell>
          <table:table-cell table:style-name="ce623"/>
          <table:table-cell table:style-name="ce993" office:value-type="float" office:value="0" calcext:value-type="float">
            <text:p>0</text:p>
          </table:table-cell>
          <table:table-cell table:style-name="ce993" office:value-type="float" office:value="1" calcext:value-type="float">
            <text:p>1</text:p>
          </table:table-cell>
          <table:table-cell table:style-name="ce993" office:value-type="float" office:value="2" calcext:value-type="float">
            <text:p>2</text:p>
          </table:table-cell>
          <table:table-cell table:style-name="ce993" office:value-type="float" office:value="3" calcext:value-type="float">
            <text:p>3</text:p>
          </table:table-cell>
          <table:table-cell table:style-name="ce993" office:value-type="float" office:value="4" calcext:value-type="float">
            <text:p>4</text:p>
          </table:table-cell>
          <table:table-cell table:style-name="ce993" office:value-type="float" office:value="5" calcext:value-type="float">
            <text:p>5</text:p>
          </table:table-cell>
          <table:table-cell table:style-name="ce993" office:value-type="float" office:value="6" calcext:value-type="float">
            <text:p>6</text:p>
          </table:table-cell>
          <table:table-cell table:style-name="ce993" office:value-type="float" office:value="7" calcext:value-type="float">
            <text:p>7</text:p>
          </table:table-cell>
          <table:table-cell table:style-name="ce993" office:value-type="float" office:value="8" calcext:value-type="float">
            <text:p>8</text:p>
          </table:table-cell>
          <table:table-cell table:style-name="ce993" office:value-type="float" office:value="9" calcext:value-type="float">
            <text:p>9</text:p>
          </table:table-cell>
          <table:table-cell table:style-name="ce993" office:value-type="float" office:value="10" calcext:value-type="float">
            <text:p>10</text:p>
          </table:table-cell>
          <table:table-cell table:style-name="ce993" office:value-type="float" office:value="11" calcext:value-type="float">
            <text:p>11</text:p>
          </table:table-cell>
          <table:table-cell table:style-name="ce993" office:value-type="float" office:value="12" calcext:value-type="float">
            <text:p>12</text:p>
          </table:table-cell>
          <table:table-cell table:style-name="ce993" office:value-type="float" office:value="13" calcext:value-type="float">
            <text:p>13</text:p>
          </table:table-cell>
          <table:table-cell table:style-name="ce993" office:value-type="float" office:value="14" calcext:value-type="float">
            <text:p>14</text:p>
          </table:table-cell>
          <table:table-cell table:number-columns-repeated="16"/>
          <table:table-cell table:formula="of:=COM.MICROSOFT.CONCAT(&quot;&quot;&quot;11&quot;&quot;: { &quot;;COM.MICROSOFT.TEXTJOIN(&quot;, &quot;;TRUE();[.AL16:.AP18]);&quot;}&quot;)" office:value-type="string" office:string-value="&quot;11&quot;: { &quot;0&quot;: 14, &quot;1&quot;: 13, &quot;2&quot;: 7, &quot;3&quot;: 8, &quot;4&quot;: 12, &quot;5&quot;: 9, &quot;6&quot;: 5, &quot;7&quot;: 3, &quot;8&quot;: 4, &quot;9&quot;: 10, &quot;10&quot;: 6, &quot;11&quot;: 10, &quot;12&quot;: 1, &quot;13&quot;: 2, &quot;14&quot;: 11}" calcext:value-type="string">
            <text:p>"11": { "0": 14, "1": 13, "2": 7, "3": 8, "4": 12, "5": 9, "6": 5, "7": 3, "8": 4, "9": 10, "10": 6, "11": 10, "12": 1, "13": 2, "14": 11}</text:p>
          </table:table-cell>
          <table:table-cell table:number-columns-repeated="36"/>
        </table:table-row>
        <table:table-row table:style-name="ro1">
          <table:table-cell/>
          <table:table-cell table:style-name="ce886" table:formula="of:=HLOOKUP([.B9];[.$AF$25:.$AW$26];2;0)" office:value-type="float" office:value="4" calcext:value-type="float">
            <text:p>4.0</text:p>
          </table:table-cell>
          <table:table-cell table:style-name="ce893" table:formula="of:=HLOOKUP([.C9];[.$AF$25:.$AW$26];2;0)" office:value-type="float" office:value="3.2" calcext:value-type="float">
            <text:p>3.2</text:p>
          </table:table-cell>
          <table:table-cell table:style-name="ce897" table:formula="of:=HLOOKUP([.D9];[.$AF$25:.$AW$26];2;0)" office:value-type="float" office:value="3.1" calcext:value-type="float">
            <text:p>3.1</text:p>
          </table:table-cell>
          <table:table-cell table:style-name="ce900" table:formula="of:=HLOOKUP([.E9];[.$AF$25:.$AW$26];2;0)" office:value-type="float" office:value="2.1" calcext:value-type="float">
            <text:p>2.1</text:p>
          </table:table-cell>
          <table:table-cell table:style-name="ce900" table:formula="of:=HLOOKUP([.F9];[.$AF$25:.$AW$26];2;0)" office:value-type="float" office:value="3" calcext:value-type="float">
            <text:p>3.0</text:p>
          </table:table-cell>
          <table:table-cell/>
          <table:table-cell table:style-name="ce906" table:formula="of:=HLOOKUP([.H9];[.$AF$25:.$AW$26];2;0)" office:value-type="float" office:value="3.1" calcext:value-type="float">
            <text:p>3.1</text:p>
          </table:table-cell>
          <table:table-cell table:style-name="ce912" table:formula="of:=HLOOKUP([.I9];[.$AF$25:.$AW$26];2;0)" office:value-type="float" office:value="3.2" calcext:value-type="float">
            <text:p>3.2</text:p>
          </table:table-cell>
          <table:table-cell table:style-name="ce917" table:formula="of:=HLOOKUP([.J9];[.$AF$25:.$AW$26];2;0)" office:value-type="float" office:value="2.1" calcext:value-type="float">
            <text:p>2.1</text:p>
          </table:table-cell>
          <table:table-cell table:style-name="ce920" table:formula="of:=HLOOKUP([.K9];[.$AF$25:.$AW$26];2;0)" office:value-type="float" office:value="1.2" calcext:value-type="float">
            <text:p>1.2</text:p>
          </table:table-cell>
          <table:table-cell table:style-name="ce920" table:formula="of:=HLOOKUP([.L9];[.$AF$25:.$AW$26];2;0)" office:value-type="float" office:value="2.2" calcext:value-type="float">
            <text:p>2.2</text:p>
          </table:table-cell>
          <table:table-cell/>
          <table:table-cell table:style-name="ce930" table:formula="of:=HLOOKUP([.N9];[.$AF$25:.$AW$26];2;0)" office:value-type="float" office:value="3.1" calcext:value-type="float">
            <text:p>3.1</text:p>
          </table:table-cell>
          <table:table-cell table:style-name="ce936" table:formula="of:=HLOOKUP([.O9];[.$AF$25:.$AW$26];2;0)" office:value-type="float" office:value="2.1" calcext:value-type="float">
            <text:p>2.1</text:p>
          </table:table-cell>
          <table:table-cell table:style-name="ce941" table:formula="of:=HLOOKUP([.P9];[.$AF$25:.$AW$26];2;0)" office:value-type="float" office:value="2.2" calcext:value-type="float">
            <text:p>2.2</text:p>
          </table:table-cell>
          <table:table-cell table:style-name="ce946" table:formula="of:=HLOOKUP([.Q9];[.$AF$25:.$AW$26];2;0)" office:value-type="float" office:value="1.2" calcext:value-type="float">
            <text:p>1.2</text:p>
          </table:table-cell>
          <table:table-cell table:style-name="ce946" table:formula="of:=HLOOKUP([.R9];[.$AF$25:.$AW$26];2;0)" office:value-type="float" office:value="3" calcext:value-type="float">
            <text:p>3.0</text:p>
          </table:table-cell>
          <table:table-cell/>
          <table:table-cell table:style-name="ce952" table:formula="of:=HLOOKUP([.T9];[.$AF$25:.$AW$26];2;0)" office:value-type="float" office:value="2.2" calcext:value-type="float">
            <text:p>2.2</text:p>
          </table:table-cell>
          <table:table-cell table:style-name="ce959" table:formula="of:=HLOOKUP([.U9];[.$AF$25:.$AW$26];2;0)" office:value-type="float" office:value="2.1" calcext:value-type="float">
            <text:p>2.1</text:p>
          </table:table-cell>
          <table:table-cell table:style-name="ce962" table:formula="of:=HLOOKUP([.V9];[.$AF$25:.$AW$26];2;0)" office:value-type="float" office:value="3" calcext:value-type="float">
            <text:p>3.0</text:p>
          </table:table-cell>
          <table:table-cell table:style-name="ce966" table:formula="of:=HLOOKUP([.W9];[.$AF$25:.$AW$26];2;0)" office:value-type="float" office:value="3.1" calcext:value-type="float">
            <text:p>3.1</text:p>
          </table:table-cell>
          <table:table-cell table:style-name="ce966" table:formula="of:=HLOOKUP([.X9];[.$AF$25:.$AW$26];2;0)" office:value-type="float" office:value="4" calcext:value-type="float">
            <text:p>4.0</text:p>
          </table:table-cell>
          <table:table-cell/>
          <table:table-cell table:style-name="ce974" table:formula="of:=HLOOKUP([.Z9];[.$AF$25:.$AW$26];2;0)" office:value-type="float" office:value="2.2" calcext:value-type="float">
            <text:p>2.2</text:p>
          </table:table-cell>
          <table:table-cell table:style-name="ce981" table:formula="of:=HLOOKUP([.AA9];[.$AF$25:.$AW$26];2;0)" office:value-type="float" office:value="2.1" calcext:value-type="float">
            <text:p>2.1</text:p>
          </table:table-cell>
          <table:table-cell table:style-name="ce984" table:formula="of:=HLOOKUP([.AB9];[.$AF$25:.$AW$26];2;0)" office:value-type="float" office:value="2" calcext:value-type="float">
            <text:p>2.0</text:p>
          </table:table-cell>
          <table:table-cell table:style-name="ce987" table:formula="of:=HLOOKUP([.AC9];[.$AF$25:.$AW$26];2;0)" office:value-type="float" office:value="4" calcext:value-type="float">
            <text:p>4.0</text:p>
          </table:table-cell>
          <table:table-cell table:style-name="ce987" table:formula="of:=HLOOKUP([.AD9];[.$AF$25:.$AW$26];2;0)" office:value-type="float" office:value="3.2" calcext:value-type="float">
            <text:p>3.2</text:p>
          </table:table-cell>
          <table:table-cell table:style-name="ce623"/>
          <table:table-cell table:style-name="ce994" office:value-type="float" office:value="1" calcext:value-type="float">
            <text:p>1.0</text:p>
          </table:table-cell>
          <table:table-cell table:style-name="ce994" office:value-type="float" office:value="1.1" calcext:value-type="float">
            <text:p>1.1</text:p>
          </table:table-cell>
          <table:table-cell table:style-name="ce994" office:value-type="float" office:value="1.2" calcext:value-type="float">
            <text:p>1.2</text:p>
          </table:table-cell>
          <table:table-cell table:style-name="ce994" office:value-type="float" office:value="2" calcext:value-type="float">
            <text:p>2.0</text:p>
          </table:table-cell>
          <table:table-cell table:style-name="ce994" office:value-type="float" office:value="2.1" calcext:value-type="float">
            <text:p>2.1</text:p>
          </table:table-cell>
          <table:table-cell table:style-name="ce994" office:value-type="float" office:value="2.2" calcext:value-type="float">
            <text:p>2.2</text:p>
          </table:table-cell>
          <table:table-cell table:style-name="ce994" office:value-type="float" office:value="3" calcext:value-type="float">
            <text:p>3.0</text:p>
          </table:table-cell>
          <table:table-cell table:style-name="ce994" office:value-type="float" office:value="3.1" calcext:value-type="float">
            <text:p>3.1</text:p>
          </table:table-cell>
          <table:table-cell table:style-name="ce994" office:value-type="float" office:value="3.2" calcext:value-type="float">
            <text:p>3.2</text:p>
          </table:table-cell>
          <table:table-cell table:style-name="ce994" office:value-type="float" office:value="4" calcext:value-type="float">
            <text:p>4.0</text:p>
          </table:table-cell>
          <table:table-cell table:style-name="ce994" office:value-type="float" office:value="4.1" calcext:value-type="float">
            <text:p>4.1</text:p>
          </table:table-cell>
          <table:table-cell table:style-name="ce994" office:value-type="float" office:value="4.2" calcext:value-type="float">
            <text:p>4.2</text:p>
          </table:table-cell>
          <table:table-cell table:style-name="ce994" office:value-type="float" office:value="5" calcext:value-type="float">
            <text:p>5.0</text:p>
          </table:table-cell>
          <table:table-cell table:style-name="ce994" office:value-type="float" office:value="5.1" calcext:value-type="float">
            <text:p>5.1</text:p>
          </table:table-cell>
          <table:table-cell table:style-name="ce994" office:value-type="float" office:value="5.2" calcext:value-type="float">
            <text:p>5.2</text:p>
          </table:table-cell>
          <table:table-cell table:number-columns-repeated="16"/>
          <table:table-cell table:formula="of:=COM.MICROSOFT.CONCAT(&quot;&quot;&quot;12&quot;&quot;: { &quot;;COM.MICROSOFT.TEXTJOIN(&quot;, &quot;;TRUE();[.AR16:.AV18]);&quot;}&quot;)" office:value-type="string" office:string-value="&quot;12&quot;: { &quot;0&quot;: 14, &quot;1&quot;: 13, &quot;2&quot;: 10, &quot;3&quot;: 9, &quot;4&quot;: 12, &quot;5&quot;: 8, &quot;6&quot;: 6, &quot;7&quot;: 4, &quot;8&quot;: 3, &quot;9&quot;: 7, &quot;10&quot;: 5, &quot;11&quot;: 2, &quot;12&quot;: 8, &quot;13&quot;: 1, &quot;14&quot;: 11}" calcext:value-type="string">
            <text:p>"12": { "0": 14, "1": 13, "2": 10, "3": 9, "4": 12, "5": 8, "6": 6, "7": 4, "8": 3, "9": 7, "10": 5, "11": 2, "12": 8, "13": 1, "14": 11}</text:p>
          </table:table-cell>
          <table:table-cell table:number-columns-repeated="36"/>
        </table:table-row>
        <table:table-row table:style-name="ro1">
          <table:table-cell/>
          <table:table-cell table:style-name="ce886" table:formula="of:=HLOOKUP([.B10];[.$AF$25:.$AW$26];2;0)" office:value-type="float" office:value="5.2" calcext:value-type="float">
            <text:p>5.2</text:p>
          </table:table-cell>
          <table:table-cell table:style-name="ce893" table:formula="of:=HLOOKUP([.C10];[.$AF$25:.$AW$26];2;0)" office:value-type="float" office:value="5.1" calcext:value-type="float">
            <text:p>5.1</text:p>
          </table:table-cell>
          <table:table-cell table:style-name="ce897" table:formula="of:=HLOOKUP([.D10];[.$AF$25:.$AW$26];2;0)" office:value-type="float" office:value="4.2" calcext:value-type="float">
            <text:p>4.2</text:p>
          </table:table-cell>
          <table:table-cell table:style-name="ce900" table:formula="of:=HLOOKUP([.E10];[.$AF$25:.$AW$26];2;0)" office:value-type="float" office:value="4.1" calcext:value-type="float">
            <text:p>4.1</text:p>
          </table:table-cell>
          <table:table-cell table:style-name="ce900" table:formula="of:=HLOOKUP([.F10];[.$AF$25:.$AW$26];2;0)" office:value-type="float" office:value="5" calcext:value-type="float">
            <text:p>5.0</text:p>
          </table:table-cell>
          <table:table-cell/>
          <table:table-cell table:style-name="ce906" table:formula="of:=HLOOKUP([.H10];[.$AF$25:.$AW$26];2;0)" office:value-type="float" office:value="5.1" calcext:value-type="float">
            <text:p>5.1</text:p>
          </table:table-cell>
          <table:table-cell table:style-name="ce912" table:formula="of:=HLOOKUP([.I10];[.$AF$25:.$AW$26];2;0)" office:value-type="float" office:value="5.2" calcext:value-type="float">
            <text:p>5.2</text:p>
          </table:table-cell>
          <table:table-cell table:style-name="ce917" table:formula="of:=HLOOKUP([.J10];[.$AF$25:.$AW$26];2;0)" office:value-type="float" office:value="4.2" calcext:value-type="float">
            <text:p>4.2</text:p>
          </table:table-cell>
          <table:table-cell table:style-name="ce920" table:formula="of:=HLOOKUP([.K10];[.$AF$25:.$AW$26];2;0)" office:value-type="float" office:value="4.1" calcext:value-type="float">
            <text:p>4.1</text:p>
          </table:table-cell>
          <table:table-cell table:style-name="ce920" table:formula="of:=HLOOKUP([.L10];[.$AF$25:.$AW$26];2;0)" office:value-type="float" office:value="5" calcext:value-type="float">
            <text:p>5.0</text:p>
          </table:table-cell>
          <table:table-cell/>
          <table:table-cell table:style-name="ce930" table:formula="of:=HLOOKUP([.N10];[.$AF$25:.$AW$26];2;0)" office:value-type="float" office:value="5" calcext:value-type="float">
            <text:p>5.0</text:p>
          </table:table-cell>
          <table:table-cell table:style-name="ce936" table:formula="of:=HLOOKUP([.O10];[.$AF$25:.$AW$26];2;0)" office:value-type="float" office:value="4.2" calcext:value-type="float">
            <text:p>4.2</text:p>
          </table:table-cell>
          <table:table-cell table:style-name="ce941" table:formula="of:=HLOOKUP([.P10];[.$AF$25:.$AW$26];2;0)" office:value-type="float" office:value="5.1" calcext:value-type="float">
            <text:p>5.1</text:p>
          </table:table-cell>
          <table:table-cell table:style-name="ce946" table:formula="of:=HLOOKUP([.Q10];[.$AF$25:.$AW$26];2;0)" office:value-type="float" office:value="4.1" calcext:value-type="float">
            <text:p>4.1</text:p>
          </table:table-cell>
          <table:table-cell table:style-name="ce946" table:formula="of:=HLOOKUP([.R10];[.$AF$25:.$AW$26];2;0)" office:value-type="float" office:value="5.2" calcext:value-type="float">
            <text:p>5.2</text:p>
          </table:table-cell>
          <table:table-cell/>
          <table:table-cell table:style-name="ce952" table:formula="of:=HLOOKUP([.T10];[.$AF$25:.$AW$26];2;0)" office:value-type="float" office:value="5.1" calcext:value-type="float">
            <text:p>5.1</text:p>
          </table:table-cell>
          <table:table-cell table:style-name="ce959" table:formula="of:=HLOOKUP([.U10];[.$AF$25:.$AW$26];2;0)" office:value-type="float" office:value="4.2" calcext:value-type="float">
            <text:p>4.2</text:p>
          </table:table-cell>
          <table:table-cell table:style-name="ce962" table:formula="of:=HLOOKUP([.V10];[.$AF$25:.$AW$26];2;0)" office:value-type="float" office:value="4.1" calcext:value-type="float">
            <text:p>4.1</text:p>
          </table:table-cell>
          <table:table-cell table:style-name="ce966" table:formula="of:=HLOOKUP([.W10];[.$AF$25:.$AW$26];2;0)" office:value-type="float" office:value="5" calcext:value-type="float">
            <text:p>5.0</text:p>
          </table:table-cell>
          <table:table-cell table:style-name="ce966" table:formula="of:=HLOOKUP([.X10];[.$AF$25:.$AW$26];2;0)" office:value-type="float" office:value="5.2" calcext:value-type="float">
            <text:p>5.2</text:p>
          </table:table-cell>
          <table:table-cell/>
          <table:table-cell table:style-name="ce974" table:formula="of:=HLOOKUP([.Z10];[.$AF$25:.$AW$26];2;0)" office:value-type="float" office:value="5" calcext:value-type="float">
            <text:p>5.0</text:p>
          </table:table-cell>
          <table:table-cell table:style-name="ce981" table:formula="of:=HLOOKUP([.AA10];[.$AF$25:.$AW$26];2;0)" office:value-type="float" office:value="4.2" calcext:value-type="float">
            <text:p>4.2</text:p>
          </table:table-cell>
          <table:table-cell table:style-name="ce984" table:formula="of:=HLOOKUP([.AB10];[.$AF$25:.$AW$26];2;0)" office:value-type="float" office:value="4.1" calcext:value-type="float">
            <text:p>4.1</text:p>
          </table:table-cell>
          <table:table-cell table:style-name="ce987" table:formula="of:=HLOOKUP([.AC10];[.$AF$25:.$AW$26];2;0)" office:value-type="float" office:value="5.2" calcext:value-type="float">
            <text:p>5.2</text:p>
          </table:table-cell>
          <table:table-cell table:style-name="ce987" table:formula="of:=HLOOKUP([.AD10];[.$AF$25:.$AW$26];2;0)" office:value-type="float" office:value="5.1" calcext:value-type="float">
            <text:p>5.1</text:p>
          </table:table-cell>
          <table:table-cell table:style-name="ce623"/>
          <table:table-cell table:number-columns-repeated="9"/>
          <table:table-cell table:style-name="ce995" table:number-columns-repeated="15"/>
          <table:table-cell table:number-columns-repeated="7"/>
          <table:table-cell table:formula="of:=COM.MICROSOFT.CONCAT(&quot;&quot;&quot;13&quot;&quot;: { &quot;;COM.MICROSOFT.TEXTJOIN(&quot;, &quot;;TRUE();[.AX16:.BB18]);&quot;}&quot;)" office:value-type="string" office:string-value="&quot;13&quot;: { &quot;0&quot;: 13, &quot;1&quot;: 12, &quot;2&quot;: 8, &quot;3&quot;: 11, &quot;4&quot;: 14, &quot;5&quot;: 6, &quot;6&quot;: 4, &quot;7&quot;: 3, &quot;8&quot;: 7, &quot;9&quot;: 10, &quot;10&quot;: 5, &quot;11&quot;: 2, &quot;12&quot;: 1, &quot;13&quot;: 4, &quot;14&quot;: 9}" calcext:value-type="string">
            <text:p>"13": { "0": 13, "1": 12, "2": 8, "3": 11, "4": 14, "5": 6, "6": 4, "7": 3, "8": 7, "9": 10, "10": 5, "11": 2, "12": 1, "13": 4, "14": 9}</text:p>
          </table:table-cell>
          <table:table-cell table:number-columns-repeated="36"/>
        </table:table-row>
        <table:table-row table:style-name="ro1">
          <table:table-cell/>
          <table:table-cell table:style-name="ce639" table:number-columns-repeated="29"/>
          <table:table-cell table:style-name="ce623"/>
          <table:table-cell table:style-name="ce864" table:formula="of:=COM.MICROSOFT.TEXTJOIN(&quot;, &quot;;TRUE();[.AF26:.AT26])" office:value-type="string" office:string-value="1, 1.1, 1.2, 2, 2.1, 2.2, 3, 3.1, 3.2, 4, 4.1, 4.2, 5, 5.1, 5.2" calcext:value-type="string">
            <text:p>1, 1.1, 1.2, 2, 2.1, 2.2, 3, 3.1, 3.2, 4, 4.1, 4.2, 5, 5.1, 5.2</text:p>
          </table:table-cell>
          <table:table-cell table:number-columns-repeated="30"/>
          <table:table-cell table:formula="of:=COM.MICROSOFT.CONCAT(&quot;&quot;&quot;14&quot;&quot;: { &quot;;COM.MICROSOFT.TEXTJOIN(&quot;, &quot;;TRUE();[.BD16:.BH18]);&quot;}&quot;)" office:value-type="string" office:string-value="&quot;14&quot;: { &quot;0&quot;: 14, &quot;1&quot;: 13, &quot;2&quot;: 10, &quot;3&quot;: 12, &quot;4&quot;: 11, &quot;5&quot;: 6, &quot;6&quot;: 4, &quot;7&quot;: 3, &quot;8&quot;: 8, &quot;9&quot;: 9, &quot;10&quot;: 5, &quot;11&quot;: 2, &quot;12&quot;: 1, &quot;13&quot;: 7, &quot;14&quot;: 12}" calcext:value-type="string">
            <text:p>"14": { "0": 14, "1": 13, "2": 10, "3": 12, "4": 11, "5": 6, "6": 4, "7": 3, "8": 8, "9": 9, "10": 5, "11": 2, "12": 1, "13": 7, "14": 12}</text:p>
          </table:table-cell>
          <table:table-cell table:number-columns-repeated="36"/>
        </table:table-row>
        <table:table-row table:style-name="ro1">
          <table:table-cell/>
          <table:table-cell table:style-name="ce640" table:formula="of:=SUM([.B30:.F32])-[.B31]" office:value-type="float" office:value="45.5" calcext:value-type="float" table:number-columns-spanned="2" table:number-rows-spanned="1">
            <text:p>45.5</text:p>
          </table:table-cell>
          <table:covered-table-cell table:style-name="ce647"/>
          <table:table-cell table:style-name="ce647" table:number-columns-repeated="3"/>
          <table:table-cell/>
          <table:table-cell table:style-name="ce640" table:formula="of:=SUM([.H30:.L32])-[.I31]" office:value-type="float" office:value="45.5" calcext:value-type="float" table:number-columns-spanned="2" table:number-rows-spanned="1">
            <text:p>45.5</text:p>
          </table:table-cell>
          <table:covered-table-cell table:style-name="ce647"/>
          <table:table-cell table:style-name="ce647" table:number-columns-repeated="3"/>
          <table:table-cell/>
          <table:table-cell table:style-name="ce640" table:formula="of:=SUM([.N30:.R32])-[.P31]" office:value-type="float" office:value="45.5" calcext:value-type="float" table:number-columns-spanned="2" table:number-rows-spanned="1">
            <text:p>45.5</text:p>
          </table:table-cell>
          <table:covered-table-cell table:style-name="ce647"/>
          <table:table-cell table:style-name="ce647" table:number-columns-repeated="3"/>
          <table:table-cell/>
          <table:table-cell table:style-name="ce640" table:formula="of:=SUM([.T30:.X32])-[.W31]" office:value-type="float" office:value="45.5" calcext:value-type="float" table:number-columns-spanned="2" table:number-rows-spanned="1">
            <text:p>45.5</text:p>
          </table:table-cell>
          <table:covered-table-cell table:style-name="ce647"/>
          <table:table-cell table:style-name="ce647" table:number-columns-repeated="3"/>
          <table:table-cell/>
          <table:table-cell table:style-name="ce640" table:formula="of:=SUM([.Z30:.AD32])-[.AD31]" office:value-type="float" office:value="45.5" calcext:value-type="float" table:number-columns-spanned="2" table:number-rows-spanned="1">
            <text:p>45.5</text:p>
          </table:table-cell>
          <table:covered-table-cell table:style-name="ce647"/>
          <table:table-cell table:style-name="ce647" table:number-columns-repeated="3"/>
          <table:table-cell table:style-name="ce623"/>
          <table:table-cell table:number-columns-repeated="68"/>
        </table:table-row>
        <table:table-row table:style-name="ro1">
          <table:table-cell/>
          <table:table-cell table:style-name="ce887" table:formula="of:=HLOOKUP([.B12];[.$AF$25:.$AW$26];2;0)" office:value-type="float" office:value="5.2" calcext:value-type="float">
            <text:p>5.2</text:p>
          </table:table-cell>
          <table:table-cell table:style-name="ce894" table:formula="of:=HLOOKUP([.C12];[.$AF$25:.$AW$26];2;0)" office:value-type="float" office:value="4" calcext:value-type="float">
            <text:p>4.0</text:p>
          </table:table-cell>
          <table:table-cell table:style-name="ce898" table:formula="of:=HLOOKUP([.D12];[.$AF$25:.$AW$26];2;0)" office:value-type="float" office:value="2.1" calcext:value-type="float">
            <text:p>2.1</text:p>
          </table:table-cell>
          <table:table-cell table:style-name="ce901" table:formula="of:=HLOOKUP([.E12];[.$AF$25:.$AW$26];2;0)" office:value-type="float" office:value="3" calcext:value-type="float">
            <text:p>3.0</text:p>
          </table:table-cell>
          <table:table-cell table:style-name="ce901" table:formula="of:=HLOOKUP([.F12];[.$AF$25:.$AW$26];2;0)" office:value-type="float" office:value="5.1" calcext:value-type="float">
            <text:p>5.1</text:p>
          </table:table-cell>
          <table:table-cell/>
          <table:table-cell table:style-name="ce907" table:formula="of:=HLOOKUP([.H12];[.$AF$25:.$AW$26];2;0)" office:value-type="float" office:value="5.2" calcext:value-type="float">
            <text:p>5.2</text:p>
          </table:table-cell>
          <table:table-cell table:style-name="ce913" table:formula="of:=HLOOKUP([.I12];[.$AF$25:.$AW$26];2;0)" office:value-type="float" office:value="3.2" calcext:value-type="float">
            <text:p>3.2</text:p>
          </table:table-cell>
          <table:table-cell table:style-name="ce918" table:formula="of:=HLOOKUP([.J12];[.$AF$25:.$AW$26];2;0)" office:value-type="float" office:value="2" calcext:value-type="float">
            <text:p>2.0</text:p>
          </table:table-cell>
          <table:table-cell table:style-name="ce921" table:formula="of:=HLOOKUP([.K12];[.$AF$25:.$AW$26];2;0)" office:value-type="float" office:value="3" calcext:value-type="float">
            <text:p>3.0</text:p>
          </table:table-cell>
          <table:table-cell table:style-name="ce921" table:formula="of:=HLOOKUP([.L12];[.$AF$25:.$AW$26];2;0)" office:value-type="float" office:value="5.1" calcext:value-type="float">
            <text:p>5.1</text:p>
          </table:table-cell>
          <table:table-cell/>
          <table:table-cell table:style-name="ce931" table:formula="of:=HLOOKUP([.N12];[.$AF$25:.$AW$26];2;0)" office:value-type="float" office:value="5.2" calcext:value-type="float">
            <text:p>5.2</text:p>
          </table:table-cell>
          <table:table-cell table:style-name="ce937" table:formula="of:=HLOOKUP([.O12];[.$AF$25:.$AW$26];2;0)" office:value-type="float" office:value="2.2" calcext:value-type="float">
            <text:p>2.2</text:p>
          </table:table-cell>
          <table:table-cell table:style-name="ce942" table:formula="of:=HLOOKUP([.P12];[.$AF$25:.$AW$26];2;0)" office:value-type="float" office:value="3.1" calcext:value-type="float">
            <text:p>3.1</text:p>
          </table:table-cell>
          <table:table-cell table:style-name="ce947" table:formula="of:=HLOOKUP([.Q12];[.$AF$25:.$AW$26];2;0)" office:value-type="float" office:value="4" calcext:value-type="float">
            <text:p>4.0</text:p>
          </table:table-cell>
          <table:table-cell table:style-name="ce947" table:formula="of:=HLOOKUP([.R12];[.$AF$25:.$AW$26];2;0)" office:value-type="float" office:value="5.1" calcext:value-type="float">
            <text:p>5.1</text:p>
          </table:table-cell>
          <table:table-cell/>
          <table:table-cell table:style-name="ce953" table:formula="of:=HLOOKUP([.T12];[.$AF$25:.$AW$26];2;0)" office:value-type="float" office:value="5" calcext:value-type="float">
            <text:p>5.0</text:p>
          </table:table-cell>
          <table:table-cell table:style-name="ce960" table:formula="of:=HLOOKUP([.U12];[.$AF$25:.$AW$26];2;0)" office:value-type="float" office:value="2.2" calcext:value-type="float">
            <text:p>2.2</text:p>
          </table:table-cell>
          <table:table-cell table:style-name="ce963" table:formula="of:=HLOOKUP([.V12];[.$AF$25:.$AW$26];2;0)" office:value-type="float" office:value="2" calcext:value-type="float">
            <text:p>2.0</text:p>
          </table:table-cell>
          <table:table-cell table:style-name="ce967" table:formula="of:=HLOOKUP([.W12];[.$AF$25:.$AW$26];2;0)" office:value-type="float" office:value="4.1" calcext:value-type="float">
            <text:p>4.1</text:p>
          </table:table-cell>
          <table:table-cell table:style-name="ce967" table:formula="of:=HLOOKUP([.X12];[.$AF$25:.$AW$26];2;0)" office:value-type="float" office:value="5.2" calcext:value-type="float">
            <text:p>5.2</text:p>
          </table:table-cell>
          <table:table-cell/>
          <table:table-cell table:style-name="ce976" table:formula="of:=HLOOKUP([.Z12];[.$AF$25:.$AW$26];2;0)" office:value-type="float" office:value="5.2" calcext:value-type="float">
            <text:p>5.2</text:p>
          </table:table-cell>
          <table:table-cell table:style-name="ce982" table:formula="of:=HLOOKUP([.AA12];[.$AF$25:.$AW$26];2;0)" office:value-type="float" office:value="3" calcext:value-type="float">
            <text:p>3.0</text:p>
          </table:table-cell>
          <table:table-cell table:style-name="ce985" table:formula="of:=HLOOKUP([.AB12];[.$AF$25:.$AW$26];2;0)" office:value-type="float" office:value="2.2" calcext:value-type="float">
            <text:p>2.2</text:p>
          </table:table-cell>
          <table:table-cell table:style-name="ce988" table:formula="of:=HLOOKUP([.AC12];[.$AF$25:.$AW$26];2;0)" office:value-type="float" office:value="4.1" calcext:value-type="float">
            <text:p>4.1</text:p>
          </table:table-cell>
          <table:table-cell table:style-name="ce988" table:formula="of:=HLOOKUP([.AD12];[.$AF$25:.$AW$26];2;0)" office:value-type="float" office:value="5" calcext:value-type="float">
            <text:p>5.0</text:p>
          </table:table-cell>
          <table:table-cell table:style-name="ce623"/>
          <table:table-cell table:number-columns-repeated="31"/>
          <table:table-cell table:formula="of:=COM.MICROSOFT.TEXTJOIN(&quot;, &quot;;TRUE();[.BK24:.BK28])" office:value-type="string" office:string-value="&quot;10&quot;: { &quot;0&quot;: 14, &quot;1&quot;: 13, &quot;2&quot;: 10, &quot;3&quot;: 11, &quot;4&quot;: 12, &quot;5&quot;: 9, &quot;6&quot;: 6, &quot;7&quot;: 4, &quot;8&quot;: 5, &quot;9&quot;: 8, &quot;10&quot;: 11, &quot;11&quot;: 1, &quot;12&quot;: 2, &quot;13&quot;: 3, &quot;14&quot;: 7}, &quot;11&quot;: { &quot;0&quot;: 14, &quot;1&quot;: 13, &quot;2&quot;: 7, &quot;3&quot;: 8, &quot;4&quot;: 12, &quot;5&quot;: 9, &quot;6&quot;: 5, &quot;7&quot;: 3, &quot;8&quot;: 4, &quot;9&quot;: 10, &quot;10&quot;: 6, &quot;11&quot;: 10, &quot;12&quot;: 1, &quot;13&quot;: 2, &quot;14&quot;: 11}, &quot;12&quot;: { &quot;0&quot;: 14, &quot;1&quot;: 13, &quot;2&quot;: 10, &quot;3&quot;: 9, &quot;4&quot;: 12, &quot;5&quot;: 8, &quot;6&quot;: 6, &quot;7&quot;: 4, &quot;8&quot;: 3, &quot;9&quot;: 7, &quot;10&quot;: 5, &quot;11&quot;: 2, &quot;12&quot;: 8, &quot;13&quot;: 1, &quot;14&quot;: 11}, &quot;13&quot;: { &quot;0&quot;: 13, &quot;1&quot;: 12, &quot;2&quot;: 8, &quot;3&quot;: 11, &quot;4&quot;: 14, &quot;5&quot;: 6, &quot;6&quot;: 4, &quot;7&quot;: 3, &quot;8&quot;: 7, &quot;9&quot;: 10, &quot;10&quot;: 5, &quot;11&quot;: 2, &quot;12&quot;: 1, &quot;13&quot;: 4, &quot;14&quot;: 9}, &quot;14&quot;: { &quot;0&quot;: 14, &quot;1&quot;: 13, &quot;2&quot;: 10, &quot;3&quot;: 12, &quot;4&quot;: 11, &quot;5&quot;: 6, &quot;6&quot;: 4, &quot;7&quot;: 3, &quot;8&quot;: 8, &quot;9&quot;: 9, &quot;10&quot;: 5, &quot;11&quot;: 2, &quot;12&quot;: 1, &quot;13&quot;: 7, &quot;14&quot;: 12}" calcext:value-type="string">
            <text:p>"10": { "0": 14, "1": 13, "2": 10, "3": 11, "4": 12, "5": 9, "6": 6, "7": 4, "8": 5, "9": 8, "10": 11, "11": 1, "12": 2, "13": 3, "14": 7}, "11": { "0": 14, "1": 13, "2": 7, "3": 8, "4": 12, "5": 9, "6": 5, "7": 3, "8": 4, "9": 10, "10": 6, "11": 10, "12": 1, "13": 2, "14": 11}, "12": { "0": 14, "1": 13, "2": 10, "3": 9, "4": 12, "5": 8, "6": 6, "7": 4, "8": 3, "9": 7, "10": 5, "11": 2, "12": 8, "13": 1, "14": 11}, "13": { "0": 13, "1": 12, "2": 8, "3": 11, "4": 14, "5": 6, "6": 4, "7": 3, "8": 7, "9": 10, "10": 5, "11": 2, "12": 1, "13": 4, "14": 9}, "14": { "0": 14, "1": 13, "2": 10, "3": 12, "4": 11, "5": 6, "6": 4, "7": 3, "8": 8, "9": 9, "10": 5, "11": 2, "12": 1, "13": 7, "14": 12}</text:p>
          </table:table-cell>
          <table:table-cell table:number-columns-repeated="36"/>
        </table:table-row>
        <table:table-row table:style-name="ro1">
          <table:table-cell/>
          <table:table-cell table:style-name="ce888" table:formula="of:=HLOOKUP([.B13];[.$AF$25:.$AW$26];2;0)" office:value-type="float" office:value="2.2" calcext:value-type="float">
            <text:p>2.2</text:p>
          </table:table-cell>
          <table:table-cell table:style-name="ce894" table:formula="of:=HLOOKUP([.C13];[.$AF$25:.$AW$26];2;0)" office:value-type="float" office:value="1.1" calcext:value-type="float">
            <text:p>1.1</text:p>
          </table:table-cell>
          <table:table-cell table:style-name="ce898" table:formula="of:=HLOOKUP([.D13];[.$AF$25:.$AW$26];2;0)" office:value-type="float" office:value="1.2" calcext:value-type="float">
            <text:p>1.2</text:p>
          </table:table-cell>
          <table:table-cell table:style-name="ce901" table:formula="of:=HLOOKUP([.E13];[.$AF$25:.$AW$26];2;0)" office:value-type="float" office:value="2" calcext:value-type="float">
            <text:p>2.0</text:p>
          </table:table-cell>
          <table:table-cell table:style-name="ce901" table:formula="of:=HLOOKUP([.F13];[.$AF$25:.$AW$26];2;0)" office:value-type="float" office:value="3.2" calcext:value-type="float">
            <text:p>3.2</text:p>
          </table:table-cell>
          <table:table-cell/>
          <table:table-cell table:style-name="ce908" table:formula="of:=HLOOKUP([.H13];[.$AF$25:.$AW$26];2;0)" office:value-type="float" office:value="2.2" calcext:value-type="float">
            <text:p>2.2</text:p>
          </table:table-cell>
          <table:table-cell table:style-name="ce914" table:formula="of:=HLOOKUP([.I13];[.$AF$25:.$AW$26];2;0)" office:value-type="float" office:value="1.2" calcext:value-type="float">
            <text:p>1.2</text:p>
          </table:table-cell>
          <table:table-cell table:style-name="ce918" table:formula="of:=HLOOKUP([.J13];[.$AF$25:.$AW$26];2;0)" office:value-type="float" office:value="1.1" calcext:value-type="float">
            <text:p>1.1</text:p>
          </table:table-cell>
          <table:table-cell table:style-name="ce921" table:formula="of:=HLOOKUP([.K13];[.$AF$25:.$AW$26];2;0)" office:value-type="float" office:value="1.2" calcext:value-type="float">
            <text:p>1.2</text:p>
          </table:table-cell>
          <table:table-cell table:style-name="ce921" table:formula="of:=HLOOKUP([.L13];[.$AF$25:.$AW$26];2;0)" office:value-type="float" office:value="4.1" calcext:value-type="float">
            <text:p>4.1</text:p>
          </table:table-cell>
          <table:table-cell/>
          <table:table-cell table:style-name="ce932" table:formula="of:=HLOOKUP([.N13];[.$AF$25:.$AW$26];2;0)" office:value-type="float" office:value="2.1" calcext:value-type="float">
            <text:p>2.1</text:p>
          </table:table-cell>
          <table:table-cell table:style-name="ce937" table:formula="of:=HLOOKUP([.O13];[.$AF$25:.$AW$26];2;0)" office:value-type="float" office:value="1.2" calcext:value-type="float">
            <text:p>1.2</text:p>
          </table:table-cell>
          <table:table-cell table:style-name="ce943" table:formula="of:=HLOOKUP([.P13];[.$AF$25:.$AW$26];2;0)" office:value-type="float" office:value="1" calcext:value-type="float">
            <text:p>1.0</text:p>
          </table:table-cell>
          <table:table-cell table:style-name="ce947" table:formula="of:=HLOOKUP([.Q13];[.$AF$25:.$AW$26];2;0)" office:value-type="float" office:value="1.1" calcext:value-type="float">
            <text:p>1.1</text:p>
          </table:table-cell>
          <table:table-cell table:style-name="ce947" table:formula="of:=HLOOKUP([.R13];[.$AF$25:.$AW$26];2;0)" office:value-type="float" office:value="4.1" calcext:value-type="float">
            <text:p>4.1</text:p>
          </table:table-cell>
          <table:table-cell/>
          <table:table-cell table:style-name="ce955" table:formula="of:=HLOOKUP([.T13];[.$AF$25:.$AW$26];2;0)" office:value-type="float" office:value="2.1" calcext:value-type="float">
            <text:p>2.1</text:p>
          </table:table-cell>
          <table:table-cell table:style-name="ce960" table:formula="of:=HLOOKUP([.U13];[.$AF$25:.$AW$26];2;0)" office:value-type="float" office:value="1.2" calcext:value-type="float">
            <text:p>1.2</text:p>
          </table:table-cell>
          <table:table-cell table:style-name="ce963" table:formula="of:=HLOOKUP([.V13];[.$AF$25:.$AW$26];2;0)" office:value-type="float" office:value="1.1" calcext:value-type="float">
            <text:p>1.1</text:p>
          </table:table-cell>
          <table:table-cell table:style-name="ce968" table:formula="of:=HLOOKUP([.W13];[.$AF$25:.$AW$26];2;0)" office:value-type="float" office:value="1.1" calcext:value-type="float">
            <text:p>1.1</text:p>
          </table:table-cell>
          <table:table-cell table:style-name="ce967" table:formula="of:=HLOOKUP([.X13];[.$AF$25:.$AW$26];2;0)" office:value-type="float" office:value="4.2" calcext:value-type="float">
            <text:p>4.2</text:p>
          </table:table-cell>
          <table:table-cell/>
          <table:table-cell table:style-name="ce978" table:formula="of:=HLOOKUP([.Z13];[.$AF$25:.$AW$26];2;0)" office:value-type="float" office:value="2" calcext:value-type="float">
            <text:p>2.0</text:p>
          </table:table-cell>
          <table:table-cell table:style-name="ce982" table:formula="of:=HLOOKUP([.AA13];[.$AF$25:.$AW$26];2;0)" office:value-type="float" office:value="1.2" calcext:value-type="float">
            <text:p>1.2</text:p>
          </table:table-cell>
          <table:table-cell table:style-name="ce985" table:formula="of:=HLOOKUP([.AB13];[.$AF$25:.$AW$26];2;0)" office:value-type="float" office:value="1.1" calcext:value-type="float">
            <text:p>1.1</text:p>
          </table:table-cell>
          <table:table-cell table:style-name="ce988" table:formula="of:=HLOOKUP([.AC13];[.$AF$25:.$AW$26];2;0)" office:value-type="float" office:value="2.1" calcext:value-type="float">
            <text:p>2.1</text:p>
          </table:table-cell>
          <table:table-cell table:style-name="ce991" table:formula="of:=HLOOKUP([.AD13];[.$AF$25:.$AW$26];2;0)" office:value-type="float" office:value="4" calcext:value-type="float">
            <text:p>4.0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889" table:formula="of:=HLOOKUP([.B14];[.$AF$25:.$AW$26];2;0)" office:value-type="float" office:value="5" calcext:value-type="float">
            <text:p>5.0</text:p>
          </table:table-cell>
          <table:table-cell table:style-name="ce894" table:formula="of:=HLOOKUP([.C14];[.$AF$25:.$AW$26];2;0)" office:value-type="float" office:value="4.1" calcext:value-type="float">
            <text:p>4.1</text:p>
          </table:table-cell>
          <table:table-cell table:style-name="ce898" table:formula="of:=HLOOKUP([.D14];[.$AF$25:.$AW$26];2;0)" office:value-type="float" office:value="3.1" calcext:value-type="float">
            <text:p>3.1</text:p>
          </table:table-cell>
          <table:table-cell table:style-name="ce901" table:formula="of:=HLOOKUP([.E14];[.$AF$25:.$AW$26];2;0)" office:value-type="float" office:value="2.2" calcext:value-type="float">
            <text:p>2.2</text:p>
          </table:table-cell>
          <table:table-cell table:style-name="ce901" table:formula="of:=HLOOKUP([.F14];[.$AF$25:.$AW$26];2;0)" office:value-type="float" office:value="4.2" calcext:value-type="float">
            <text:p>4.2</text:p>
          </table:table-cell>
          <table:table-cell/>
          <table:table-cell table:style-name="ce908" table:formula="of:=HLOOKUP([.H14];[.$AF$25:.$AW$26];2;0)" office:value-type="float" office:value="4.2" calcext:value-type="float">
            <text:p>4.2</text:p>
          </table:table-cell>
          <table:table-cell table:style-name="ce913" table:formula="of:=HLOOKUP([.I14];[.$AF$25:.$AW$26];2;0)" office:value-type="float" office:value="4" calcext:value-type="float">
            <text:p>4.0</text:p>
          </table:table-cell>
          <table:table-cell table:style-name="ce918" table:formula="of:=HLOOKUP([.J14];[.$AF$25:.$AW$26];2;0)" office:value-type="float" office:value="3.1" calcext:value-type="float">
            <text:p>3.1</text:p>
          </table:table-cell>
          <table:table-cell table:style-name="ce921" table:formula="of:=HLOOKUP([.K14];[.$AF$25:.$AW$26];2;0)" office:value-type="float" office:value="2.1" calcext:value-type="float">
            <text:p>2.1</text:p>
          </table:table-cell>
          <table:table-cell table:style-name="ce921" table:formula="of:=HLOOKUP([.L14];[.$AF$25:.$AW$26];2;0)" office:value-type="float" office:value="5" calcext:value-type="float">
            <text:p>5.0</text:p>
          </table:table-cell>
          <table:table-cell/>
          <table:table-cell table:style-name="ce932" table:formula="of:=HLOOKUP([.N14];[.$AF$25:.$AW$26];2;0)" office:value-type="float" office:value="4.2" calcext:value-type="float">
            <text:p>4.2</text:p>
          </table:table-cell>
          <table:table-cell table:style-name="ce937" table:formula="of:=HLOOKUP([.O14];[.$AF$25:.$AW$26];2;0)" office:value-type="float" office:value="3" calcext:value-type="float">
            <text:p>3.0</text:p>
          </table:table-cell>
          <table:table-cell table:style-name="ce942" table:formula="of:=HLOOKUP([.P14];[.$AF$25:.$AW$26];2;0)" office:value-type="float" office:value="3.2" calcext:value-type="float">
            <text:p>3.2</text:p>
          </table:table-cell>
          <table:table-cell table:style-name="ce947" table:formula="of:=HLOOKUP([.Q14];[.$AF$25:.$AW$26];2;0)" office:value-type="float" office:value="2" calcext:value-type="float">
            <text:p>2.0</text:p>
          </table:table-cell>
          <table:table-cell table:style-name="ce947" table:formula="of:=HLOOKUP([.R14];[.$AF$25:.$AW$26];2;0)" office:value-type="float" office:value="5" calcext:value-type="float">
            <text:p>5.0</text:p>
          </table:table-cell>
          <table:table-cell/>
          <table:table-cell table:style-name="ce955" table:formula="of:=HLOOKUP([.T14];[.$AF$25:.$AW$26];2;0)" office:value-type="float" office:value="3.2" calcext:value-type="float">
            <text:p>3.2</text:p>
          </table:table-cell>
          <table:table-cell table:style-name="ce960" table:formula="of:=HLOOKUP([.U14];[.$AF$25:.$AW$26];2;0)" office:value-type="float" office:value="3" calcext:value-type="float">
            <text:p>3.0</text:p>
          </table:table-cell>
          <table:table-cell table:style-name="ce963" table:formula="of:=HLOOKUP([.V14];[.$AF$25:.$AW$26];2;0)" office:value-type="float" office:value="3.1" calcext:value-type="float">
            <text:p>3.1</text:p>
          </table:table-cell>
          <table:table-cell table:style-name="ce967" table:formula="of:=HLOOKUP([.W14];[.$AF$25:.$AW$26];2;0)" office:value-type="float" office:value="4" calcext:value-type="float">
            <text:p>4.0</text:p>
          </table:table-cell>
          <table:table-cell table:style-name="ce967" table:formula="of:=HLOOKUP([.X14];[.$AF$25:.$AW$26];2;0)" office:value-type="float" office:value="5.1" calcext:value-type="float">
            <text:p>5.1</text:p>
          </table:table-cell>
          <table:table-cell/>
          <table:table-cell table:style-name="ce978" table:formula="of:=HLOOKUP([.Z14];[.$AF$25:.$AW$26];2;0)" office:value-type="float" office:value="5.1" calcext:value-type="float">
            <text:p>5.1</text:p>
          </table:table-cell>
          <table:table-cell table:style-name="ce982" table:formula="of:=HLOOKUP([.AA14];[.$AF$25:.$AW$26];2;0)" office:value-type="float" office:value="3.1" calcext:value-type="float">
            <text:p>3.1</text:p>
          </table:table-cell>
          <table:table-cell table:style-name="ce985" table:formula="of:=HLOOKUP([.AB14];[.$AF$25:.$AW$26];2;0)" office:value-type="float" office:value="3.2" calcext:value-type="float">
            <text:p>3.2</text:p>
          </table:table-cell>
          <table:table-cell table:style-name="ce988" table:formula="of:=HLOOKUP([.AC14];[.$AF$25:.$AW$26];2;0)" office:value-type="float" office:value="4" calcext:value-type="float">
            <text:p>4.0</text:p>
          </table:table-cell>
          <table:table-cell table:style-name="ce988" table:formula="of:=HLOOKUP([.AD14];[.$AF$25:.$AW$26];2;0)" office:value-type="float" office:value="4.2" calcext:value-type="float">
            <text:p>4.2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647" table:number-columns-repeated="5"/>
          <table:table-cell/>
          <table:table-cell table:style-name="ce647" table:number-columns-repeated="5"/>
          <table:table-cell/>
          <table:table-cell table:style-name="ce647" table:number-columns-repeated="5"/>
          <table:table-cell/>
          <table:table-cell table:style-name="ce647" table:number-columns-repeated="5"/>
          <table:table-cell/>
          <table:table-cell table:style-name="ce647" table:number-columns-repeated="5"/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640" table:formula="of:=SUM([.B35:.F37])-[.B37]" office:value-type="float" office:value="45.5" calcext:value-type="float" table:number-columns-spanned="2" table:number-rows-spanned="1">
            <text:p>45.5</text:p>
          </table:table-cell>
          <table:covered-table-cell table:style-name="ce647"/>
          <table:table-cell table:style-name="ce647" table:number-columns-repeated="3"/>
          <table:table-cell/>
          <table:table-cell table:style-name="ce640" table:formula="of:=SUM([.H35:.L37])-[.I37]" office:value-type="float" office:value="45.5" calcext:value-type="float" table:number-columns-spanned="2" table:number-rows-spanned="1">
            <text:p>45.5</text:p>
          </table:table-cell>
          <table:covered-table-cell table:style-name="ce647"/>
          <table:table-cell table:style-name="ce647" table:number-columns-repeated="3"/>
          <table:table-cell/>
          <table:table-cell table:style-name="ce640" table:formula="of:=SUM([.N35:.R37])-[.P37]" office:value-type="float" office:value="45.5" calcext:value-type="float" table:number-columns-spanned="2" table:number-rows-spanned="1">
            <text:p>45.5</text:p>
          </table:table-cell>
          <table:covered-table-cell table:style-name="ce647"/>
          <table:table-cell table:style-name="ce647" table:number-columns-repeated="3"/>
          <table:table-cell/>
          <table:table-cell table:style-name="ce640" table:formula="of:=SUM([.T35:.X37])-[.W37]" office:value-type="float" office:value="45.5" calcext:value-type="float" table:number-columns-spanned="2" table:number-rows-spanned="1">
            <text:p>45.5</text:p>
          </table:table-cell>
          <table:covered-table-cell table:style-name="ce647"/>
          <table:table-cell table:style-name="ce647" table:number-columns-repeated="3"/>
          <table:table-cell/>
          <table:table-cell table:style-name="ce640" table:formula="of:=SUM([.Z35:.AD37])-[.AD37]" office:value-type="float" office:value="45.5" calcext:value-type="float" table:number-columns-spanned="2" table:number-rows-spanned="1">
            <text:p>45.5</text:p>
          </table:table-cell>
          <table:covered-table-cell table:style-name="ce647"/>
          <table:table-cell table:style-name="ce647" table:number-columns-repeated="3"/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890" table:formula="of:=HLOOKUP([.B16];[.$AF$25:.$AW$26];2;0)" office:value-type="float" office:value="5.2" calcext:value-type="float">
            <text:p>5.2</text:p>
          </table:table-cell>
          <table:table-cell table:style-name="ce895" table:formula="of:=HLOOKUP([.C16];[.$AF$25:.$AW$26];2;0)" office:value-type="float" office:value="5.1" calcext:value-type="float">
            <text:p>5.1</text:p>
          </table:table-cell>
          <table:table-cell table:style-name="ce899" table:formula="of:=HLOOKUP([.D16];[.$AF$25:.$AW$26];2;0)" office:value-type="float" office:value="4.1" calcext:value-type="float">
            <text:p>4.1</text:p>
          </table:table-cell>
          <table:table-cell table:style-name="ce902" table:formula="of:=HLOOKUP([.E16];[.$AF$25:.$AW$26];2;0)" office:value-type="float" office:value="4.2" calcext:value-type="float">
            <text:p>4.2</text:p>
          </table:table-cell>
          <table:table-cell table:style-name="ce902" table:formula="of:=HLOOKUP([.F16];[.$AF$25:.$AW$26];2;0)" office:value-type="float" office:value="5" calcext:value-type="float">
            <text:p>5.0</text:p>
          </table:table-cell>
          <table:table-cell/>
          <table:table-cell table:style-name="ce909" table:formula="of:=HLOOKUP([.H16];[.$AF$25:.$AW$26];2;0)" office:value-type="float" office:value="5.2" calcext:value-type="float">
            <text:p>5.2</text:p>
          </table:table-cell>
          <table:table-cell table:style-name="ce915" table:formula="of:=HLOOKUP([.I16];[.$AF$25:.$AW$26];2;0)" office:value-type="float" office:value="5.1" calcext:value-type="float">
            <text:p>5.1</text:p>
          </table:table-cell>
          <table:table-cell table:style-name="ce919" table:formula="of:=HLOOKUP([.J16];[.$AF$25:.$AW$26];2;0)" office:value-type="float" office:value="3.1" calcext:value-type="float">
            <text:p>3.1</text:p>
          </table:table-cell>
          <table:table-cell table:style-name="ce922" table:formula="of:=HLOOKUP([.K16];[.$AF$25:.$AW$26];2;0)" office:value-type="float" office:value="3.2" calcext:value-type="float">
            <text:p>3.2</text:p>
          </table:table-cell>
          <table:table-cell table:style-name="ce922" table:formula="of:=HLOOKUP([.L16];[.$AF$25:.$AW$26];2;0)" office:value-type="float" office:value="5" calcext:value-type="float">
            <text:p>5.0</text:p>
          </table:table-cell>
          <table:table-cell/>
          <table:table-cell table:style-name="ce933" table:formula="of:=HLOOKUP([.N16];[.$AF$25:.$AW$26];2;0)" office:value-type="float" office:value="5.2" calcext:value-type="float">
            <text:p>5.2</text:p>
          </table:table-cell>
          <table:table-cell table:style-name="ce938" table:formula="of:=HLOOKUP([.O16];[.$AF$25:.$AW$26];2;0)" office:value-type="float" office:value="5.1" calcext:value-type="float">
            <text:p>5.1</text:p>
          </table:table-cell>
          <table:table-cell table:style-name="ce944" table:formula="of:=HLOOKUP([.P16];[.$AF$25:.$AW$26];2;0)" office:value-type="float" office:value="4.1" calcext:value-type="float">
            <text:p>4.1</text:p>
          </table:table-cell>
          <table:table-cell table:style-name="ce948" table:formula="of:=HLOOKUP([.Q16];[.$AF$25:.$AW$26];2;0)" office:value-type="float" office:value="4" calcext:value-type="float">
            <text:p>4.0</text:p>
          </table:table-cell>
          <table:table-cell table:style-name="ce948" table:formula="of:=HLOOKUP([.R16];[.$AF$25:.$AW$26];2;0)" office:value-type="float" office:value="5" calcext:value-type="float">
            <text:p>5.0</text:p>
          </table:table-cell>
          <table:table-cell/>
          <table:table-cell table:style-name="ce957" table:formula="of:=HLOOKUP([.T16];[.$AF$25:.$AW$26];2;0)" office:value-type="float" office:value="5.1" calcext:value-type="float">
            <text:p>5.1</text:p>
          </table:table-cell>
          <table:table-cell table:style-name="ce961" table:formula="of:=HLOOKUP([.U16];[.$AF$25:.$AW$26];2;0)" office:value-type="float" office:value="5" calcext:value-type="float">
            <text:p>5.0</text:p>
          </table:table-cell>
          <table:table-cell table:style-name="ce964" table:formula="of:=HLOOKUP([.V16];[.$AF$25:.$AW$26];2;0)" office:value-type="float" office:value="3.2" calcext:value-type="float">
            <text:p>3.2</text:p>
          </table:table-cell>
          <table:table-cell table:style-name="ce969" table:formula="of:=HLOOKUP([.W16];[.$AF$25:.$AW$26];2;0)" office:value-type="float" office:value="4.2" calcext:value-type="float">
            <text:p>4.2</text:p>
          </table:table-cell>
          <table:table-cell table:style-name="ce969" table:formula="of:=HLOOKUP([.X16];[.$AF$25:.$AW$26];2;0)" office:value-type="float" office:value="5.2" calcext:value-type="float">
            <text:p>5.2</text:p>
          </table:table-cell>
          <table:table-cell/>
          <table:table-cell table:style-name="ce979" table:formula="of:=HLOOKUP([.Z16];[.$AF$25:.$AW$26];2;0)" office:value-type="float" office:value="5.2" calcext:value-type="float">
            <text:p>5.2</text:p>
          </table:table-cell>
          <table:table-cell table:style-name="ce983" table:formula="of:=HLOOKUP([.AA16];[.$AF$25:.$AW$26];2;0)" office:value-type="float" office:value="5.1" calcext:value-type="float">
            <text:p>5.1</text:p>
          </table:table-cell>
          <table:table-cell table:style-name="ce986" table:formula="of:=HLOOKUP([.AB16];[.$AF$25:.$AW$26];2;0)" office:value-type="float" office:value="4.1" calcext:value-type="float">
            <text:p>4.1</text:p>
          </table:table-cell>
          <table:table-cell table:style-name="ce989" table:formula="of:=HLOOKUP([.AC16];[.$AF$25:.$AW$26];2;0)" office:value-type="float" office:value="5" calcext:value-type="float">
            <text:p>5.0</text:p>
          </table:table-cell>
          <table:table-cell table:style-name="ce989" table:formula="of:=HLOOKUP([.AD16];[.$AF$25:.$AW$26];2;0)" office:value-type="float" office:value="4.2" calcext:value-type="float">
            <text:p>4.2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891" table:formula="of:=HLOOKUP([.B17];[.$AF$25:.$AW$26];2;0)" office:value-type="float" office:value="4" calcext:value-type="float">
            <text:p>4.0</text:p>
          </table:table-cell>
          <table:table-cell table:style-name="ce895" table:formula="of:=HLOOKUP([.C17];[.$AF$25:.$AW$26];2;0)" office:value-type="float" office:value="3" calcext:value-type="float">
            <text:p>3.0</text:p>
          </table:table-cell>
          <table:table-cell table:style-name="ce899" table:formula="of:=HLOOKUP([.D17];[.$AF$25:.$AW$26];2;0)" office:value-type="float" office:value="2.1" calcext:value-type="float">
            <text:p>2.1</text:p>
          </table:table-cell>
          <table:table-cell table:style-name="ce902" table:formula="of:=HLOOKUP([.E17];[.$AF$25:.$AW$26];2;0)" office:value-type="float" office:value="2.2" calcext:value-type="float">
            <text:p>2.2</text:p>
          </table:table-cell>
          <table:table-cell table:style-name="ce902" table:formula="of:=HLOOKUP([.F17];[.$AF$25:.$AW$26];2;0)" office:value-type="float" office:value="3.2" calcext:value-type="float">
            <text:p>3.2</text:p>
          </table:table-cell>
          <table:table-cell/>
          <table:table-cell table:style-name="ce910" table:formula="of:=HLOOKUP([.H17];[.$AF$25:.$AW$26];2;0)" office:value-type="float" office:value="4" calcext:value-type="float">
            <text:p>4.0</text:p>
          </table:table-cell>
          <table:table-cell table:style-name="ce915" table:formula="of:=HLOOKUP([.I17];[.$AF$25:.$AW$26];2;0)" office:value-type="float" office:value="2.2" calcext:value-type="float">
            <text:p>2.2</text:p>
          </table:table-cell>
          <table:table-cell table:style-name="ce919" table:formula="of:=HLOOKUP([.J17];[.$AF$25:.$AW$26];2;0)" office:value-type="float" office:value="2" calcext:value-type="float">
            <text:p>2.0</text:p>
          </table:table-cell>
          <table:table-cell table:style-name="ce922" table:formula="of:=HLOOKUP([.K17];[.$AF$25:.$AW$26];2;0)" office:value-type="float" office:value="2.1" calcext:value-type="float">
            <text:p>2.1</text:p>
          </table:table-cell>
          <table:table-cell table:style-name="ce922" table:formula="of:=HLOOKUP([.L17];[.$AF$25:.$AW$26];2;0)" office:value-type="float" office:value="4.1" calcext:value-type="float">
            <text:p>4.1</text:p>
          </table:table-cell>
          <table:table-cell/>
          <table:table-cell table:style-name="ce934" table:formula="of:=HLOOKUP([.N17];[.$AF$25:.$AW$26];2;0)" office:value-type="float" office:value="3.2" calcext:value-type="float">
            <text:p>3.2</text:p>
          </table:table-cell>
          <table:table-cell table:style-name="ce938" table:formula="of:=HLOOKUP([.O17];[.$AF$25:.$AW$26];2;0)" office:value-type="float" office:value="3" calcext:value-type="float">
            <text:p>3.0</text:p>
          </table:table-cell>
          <table:table-cell table:style-name="ce944" table:formula="of:=HLOOKUP([.P17];[.$AF$25:.$AW$26];2;0)" office:value-type="float" office:value="2.1" calcext:value-type="float">
            <text:p>2.1</text:p>
          </table:table-cell>
          <table:table-cell table:style-name="ce948" table:formula="of:=HLOOKUP([.Q17];[.$AF$25:.$AW$26];2;0)" office:value-type="float" office:value="2" calcext:value-type="float">
            <text:p>2.0</text:p>
          </table:table-cell>
          <table:table-cell table:style-name="ce948" table:formula="of:=HLOOKUP([.R17];[.$AF$25:.$AW$26];2;0)" office:value-type="float" office:value="3.1" calcext:value-type="float">
            <text:p>3.1</text:p>
          </table:table-cell>
          <table:table-cell/>
          <table:table-cell table:style-name="ce958" table:formula="of:=HLOOKUP([.T17];[.$AF$25:.$AW$26];2;0)" office:value-type="float" office:value="3" calcext:value-type="float">
            <text:p>3.0</text:p>
          </table:table-cell>
          <table:table-cell table:style-name="ce961" table:formula="of:=HLOOKUP([.U17];[.$AF$25:.$AW$26];2;0)" office:value-type="float" office:value="2.1" calcext:value-type="float">
            <text:p>2.1</text:p>
          </table:table-cell>
          <table:table-cell table:style-name="ce964" table:formula="of:=HLOOKUP([.V17];[.$AF$25:.$AW$26];2;0)" office:value-type="float" office:value="2" calcext:value-type="float">
            <text:p>2.0</text:p>
          </table:table-cell>
          <table:table-cell table:style-name="ce969" table:formula="of:=HLOOKUP([.W17];[.$AF$25:.$AW$26];2;0)" office:value-type="float" office:value="3.1" calcext:value-type="float">
            <text:p>3.1</text:p>
          </table:table-cell>
          <table:table-cell table:style-name="ce969" table:formula="of:=HLOOKUP([.X17];[.$AF$25:.$AW$26];2;0)" office:value-type="float" office:value="4.1" calcext:value-type="float">
            <text:p>4.1</text:p>
          </table:table-cell>
          <table:table-cell/>
          <table:table-cell table:style-name="ce980" table:formula="of:=HLOOKUP([.Z17];[.$AF$25:.$AW$26];2;0)" office:value-type="float" office:value="3" calcext:value-type="float">
            <text:p>3.0</text:p>
          </table:table-cell>
          <table:table-cell table:style-name="ce983" table:formula="of:=HLOOKUP([.AA17];[.$AF$25:.$AW$26];2;0)" office:value-type="float" office:value="2.1" calcext:value-type="float">
            <text:p>2.1</text:p>
          </table:table-cell>
          <table:table-cell table:style-name="ce986" table:formula="of:=HLOOKUP([.AB17];[.$AF$25:.$AW$26];2;0)" office:value-type="float" office:value="2" calcext:value-type="float">
            <text:p>2.0</text:p>
          </table:table-cell>
          <table:table-cell table:style-name="ce989" table:formula="of:=HLOOKUP([.AC17];[.$AF$25:.$AW$26];2;0)" office:value-type="float" office:value="3.2" calcext:value-type="float">
            <text:p>3.2</text:p>
          </table:table-cell>
          <table:table-cell table:style-name="ce989" table:formula="of:=HLOOKUP([.AD17];[.$AF$25:.$AW$26];2;0)" office:value-type="float" office:value="4" calcext:value-type="float">
            <text:p>4.0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892" table:formula="of:=HLOOKUP([.B18];[.$AF$25:.$AW$26];2;0)" office:value-type="float" office:value="4.2" calcext:value-type="float">
            <text:p>4.2</text:p>
          </table:table-cell>
          <table:table-cell table:style-name="ce895" table:formula="of:=HLOOKUP([.C18];[.$AF$25:.$AW$26];2;0)" office:value-type="float" office:value="1.1" calcext:value-type="float">
            <text:p>1.1</text:p>
          </table:table-cell>
          <table:table-cell table:style-name="ce899" table:formula="of:=HLOOKUP([.D18];[.$AF$25:.$AW$26];2;0)" office:value-type="float" office:value="1.2" calcext:value-type="float">
            <text:p>1.2</text:p>
          </table:table-cell>
          <table:table-cell table:style-name="ce902" table:formula="of:=HLOOKUP([.E18];[.$AF$25:.$AW$26];2;0)" office:value-type="float" office:value="2" calcext:value-type="float">
            <text:p>2.0</text:p>
          </table:table-cell>
          <table:table-cell table:style-name="ce902" table:formula="of:=HLOOKUP([.F18];[.$AF$25:.$AW$26];2;0)" office:value-type="float" office:value="3.1" calcext:value-type="float">
            <text:p>3.1</text:p>
          </table:table-cell>
          <table:table-cell/>
          <table:table-cell table:style-name="ce910" table:formula="of:=HLOOKUP([.H18];[.$AF$25:.$AW$26];2;0)" office:value-type="float" office:value="3" calcext:value-type="float">
            <text:p>3.0</text:p>
          </table:table-cell>
          <table:table-cell table:style-name="ce916" table:formula="of:=HLOOKUP([.I18];[.$AF$25:.$AW$26];2;0)" office:value-type="float" office:value="4.1" calcext:value-type="float">
            <text:p>4.1</text:p>
          </table:table-cell>
          <table:table-cell table:style-name="ce919" table:formula="of:=HLOOKUP([.J18];[.$AF$25:.$AW$26];2;0)" office:value-type="float" office:value="1.1" calcext:value-type="float">
            <text:p>1.1</text:p>
          </table:table-cell>
          <table:table-cell table:style-name="ce922" table:formula="of:=HLOOKUP([.K18];[.$AF$25:.$AW$26];2;0)" office:value-type="float" office:value="1.2" calcext:value-type="float">
            <text:p>1.2</text:p>
          </table:table-cell>
          <table:table-cell table:style-name="ce922" table:formula="of:=HLOOKUP([.L18];[.$AF$25:.$AW$26];2;0)" office:value-type="float" office:value="4.2" calcext:value-type="float">
            <text:p>4.2</text:p>
          </table:table-cell>
          <table:table-cell/>
          <table:table-cell table:style-name="ce934" table:formula="of:=HLOOKUP([.N18];[.$AF$25:.$AW$26];2;0)" office:value-type="float" office:value="2.2" calcext:value-type="float">
            <text:p>2.2</text:p>
          </table:table-cell>
          <table:table-cell table:style-name="ce938" table:formula="of:=HLOOKUP([.O18];[.$AF$25:.$AW$26];2;0)" office:value-type="float" office:value="1.2" calcext:value-type="float">
            <text:p>1.2</text:p>
          </table:table-cell>
          <table:table-cell table:style-name="ce945" table:formula="of:=HLOOKUP([.P18];[.$AF$25:.$AW$26];2;0)" office:value-type="float" office:value="3.2" calcext:value-type="float">
            <text:p>3.2</text:p>
          </table:table-cell>
          <table:table-cell table:style-name="ce948" table:formula="of:=HLOOKUP([.Q18];[.$AF$25:.$AW$26];2;0)" office:value-type="float" office:value="1.1" calcext:value-type="float">
            <text:p>1.1</text:p>
          </table:table-cell>
          <table:table-cell table:style-name="ce948" table:formula="of:=HLOOKUP([.R18];[.$AF$25:.$AW$26];2;0)" office:value-type="float" office:value="4.2" calcext:value-type="float">
            <text:p>4.2</text:p>
          </table:table-cell>
          <table:table-cell/>
          <table:table-cell table:style-name="ce958" table:formula="of:=HLOOKUP([.T18];[.$AF$25:.$AW$26];2;0)" office:value-type="float" office:value="2.2" calcext:value-type="float">
            <text:p>2.2</text:p>
          </table:table-cell>
          <table:table-cell table:style-name="ce961" table:formula="of:=HLOOKUP([.U18];[.$AF$25:.$AW$26];2;0)" office:value-type="float" office:value="1.2" calcext:value-type="float">
            <text:p>1.2</text:p>
          </table:table-cell>
          <table:table-cell table:style-name="ce964" table:formula="of:=HLOOKUP([.V18];[.$AF$25:.$AW$26];2;0)" office:value-type="float" office:value="1.1" calcext:value-type="float">
            <text:p>1.1</text:p>
          </table:table-cell>
          <table:table-cell table:style-name="ce970" table:formula="of:=HLOOKUP([.W18];[.$AF$25:.$AW$26];2;0)" office:value-type="float" office:value="2.1" calcext:value-type="float">
            <text:p>2.1</text:p>
          </table:table-cell>
          <table:table-cell table:style-name="ce969" table:formula="of:=HLOOKUP([.X18];[.$AF$25:.$AW$26];2;0)" office:value-type="float" office:value="4" calcext:value-type="float">
            <text:p>4.0</text:p>
          </table:table-cell>
          <table:table-cell/>
          <table:table-cell table:style-name="ce980" table:formula="of:=HLOOKUP([.Z18];[.$AF$25:.$AW$26];2;0)" office:value-type="float" office:value="2.2" calcext:value-type="float">
            <text:p>2.2</text:p>
          </table:table-cell>
          <table:table-cell table:style-name="ce983" table:formula="of:=HLOOKUP([.AA18];[.$AF$25:.$AW$26];2;0)" office:value-type="float" office:value="1.2" calcext:value-type="float">
            <text:p>1.2</text:p>
          </table:table-cell>
          <table:table-cell table:style-name="ce986" table:formula="of:=HLOOKUP([.AB18];[.$AF$25:.$AW$26];2;0)" office:value-type="float" office:value="1.1" calcext:value-type="float">
            <text:p>1.1</text:p>
          </table:table-cell>
          <table:table-cell table:style-name="ce989" table:formula="of:=HLOOKUP([.AC18];[.$AF$25:.$AW$26];2;0)" office:value-type="float" office:value="3.1" calcext:value-type="float">
            <text:p>3.1</text:p>
          </table:table-cell>
          <table:table-cell table:style-name="ce992" table:formula="of:=HLOOKUP([.AD18];[.$AF$25:.$AW$26];2;0)" office:value-type="float" office:value="5" calcext:value-type="float">
            <text:p>5.0</text:p>
          </table:table-cell>
          <table:table-cell table:number-columns-repeated="32"/>
          <table:table-cell table:style-name="Default"/>
          <table:table-cell table:number-columns-repeated="36"/>
        </table:table-row>
        <calcext:conditional-formats>
          <calcext:conditional-format calcext:target-range-address="'keys 6'.Z30:'keys 6'.AD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T30:'keys 6'.X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N30:'keys 6'.R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H30:'keys 6'.L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B30:'keys 6'.F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B35:'keys 6'.F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H35:'keys 6'.L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N35:'keys 6'.R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T35:'keys 6'.X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Z35:'keys 6'.AD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B25:'keys 6'.F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H25:'keys 6'.L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N25:'keys 6'.R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T25:'keys 6'.X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Z25:'keys 6'.AD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T2:'keys 6'.X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AF25:'keys 6'.AT25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Z2:'keys 6'.AD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AO27:'keys 6'.BC27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  <calcext:conditional-format calcext:target-range-address="'keys 6'.AO27:'keys 6'.BC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AF26:'keys 6'.AT26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AF26:'keys 6'.AT26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</calcext:conditional-formats>
      </table:table>
      <table:table table:name="keys 5" table:style-name="ta1">
        <table:table-column table:style-name="co1" table:default-cell-style-name="Default"/>
        <table:table-column table:style-name="co1" table:default-cell-style-name="ce881"/>
        <table:table-column table:style-name="co1" table:default-cell-style-name="ce845"/>
        <table:table-column table:style-name="co1" table:default-cell-style-name="ce896"/>
        <table:table-column table:style-name="co1" table:number-columns-repeated="2" table:default-cell-style-name="ce852"/>
        <table:table-column table:style-name="co1" table:default-cell-style-name="ce647"/>
        <table:table-column table:style-name="co1" table:default-cell-style-name="ce881"/>
        <table:table-column table:style-name="co1" table:default-cell-style-name="Default"/>
        <table:table-column table:style-name="co1" table:default-cell-style-name="ce896"/>
        <table:table-column table:style-name="co1" table:number-columns-repeated="2" table:default-cell-style-name="ce852"/>
        <table:table-column table:style-name="co1" table:default-cell-style-name="ce647"/>
        <table:table-column table:style-name="co1" table:default-cell-style-name="ce881"/>
        <table:table-column table:style-name="co1" table:default-cell-style-name="ce845"/>
        <table:table-column table:style-name="co1" table:default-cell-style-name="ce896"/>
        <table:table-column table:style-name="co1" table:default-cell-style-name="ce852"/>
        <table:table-column table:style-name="co1" table:default-cell-style-name="Default"/>
        <table:table-column table:style-name="co1" table:default-cell-style-name="ce647"/>
        <table:table-column table:style-name="co1" table:default-cell-style-name="ce881"/>
        <table:table-column table:style-name="co1" table:default-cell-style-name="ce845"/>
        <table:table-column table:style-name="co1" table:default-cell-style-name="ce896"/>
        <table:table-column table:style-name="co1" table:number-columns-repeated="2" table:default-cell-style-name="ce852"/>
        <table:table-column table:style-name="co1" table:default-cell-style-name="ce647"/>
        <table:table-column table:style-name="co1" table:default-cell-style-name="ce881"/>
        <table:table-column table:style-name="co1" table:default-cell-style-name="ce845"/>
        <table:table-column table:style-name="co1" table:default-cell-style-name="ce896"/>
        <table:table-column table:style-name="co1" table:number-columns-repeated="2" table:default-cell-style-name="ce852"/>
        <table:table-column table:style-name="co1" table:number-columns-repeated="32" table:default-cell-style-name="Default"/>
        <table:table-column table:style-name="co1" table:default-cell-style-name="ce877"/>
        <table:table-column table:style-name="co1" table:number-columns-repeated="36" table:default-cell-style-name="Default"/>
        <table:table-row table:style-name="ro1">
          <table:table-cell table:style-name="ce666" table:number-columns-repeated="4"/>
          <table:table-cell table:style-name="ce677" table:number-columns-repeated="3"/>
          <table:table-cell table:style-name="ce622" office:value-type="string" calcext:value-type="string">
            <text:p>L</text:p>
          </table:table-cell>
          <table:table-cell/>
          <table:table-cell table:style-name="Default" office:value-type="string" calcext:value-type="string">
            <text:p>R</text:p>
          </table:table-cell>
          <table:table-cell table:style-name="ce677" table:number-columns-repeated="2"/>
          <table:table-cell table:style-name="ce731"/>
          <table:table-cell table:style-name="ce666" table:number-columns-repeated="4"/>
          <table:table-cell/>
          <table:table-cell table:style-name="Default"/>
          <table:table-cell table:style-name="ce809" office:value-type="string" calcext:value-type="string">
            <text:p>start priorities</text:p>
          </table:table-cell>
          <table:table-cell table:style-name="Default" table:number-columns-repeated="5"/>
          <table:table-cell table:style-name="ce809" office:value-type="string" calcext:value-type="string">
            <text:p>averages</text:p>
          </table:table-cell>
          <table:table-cell table:style-name="Default" table:number-columns-repeated="4"/>
          <table:table-cell/>
          <table:table-cell table:style-name="ce809" office:value-type="string" calcext:value-type="string">
            <text:p>json</text:p>
          </table:table-cell>
          <table:table-cell table:number-columns-repeated="30"/>
          <table:table-cell table:style-name="Default"/>
          <table:table-cell table:number-columns-repeated="36"/>
        </table:table-row>
        <table:table-row table:style-name="ro1">
          <table:table-cell table:style-name="ce656"/>
          <table:table-cell table:style-name="ce620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666" office:value-type="float" office:value="2" calcext:value-type="float">
            <text:p>2</text:p>
          </table:table-cell>
          <table:table-cell table:style-name="ce677" office:value-type="float" office:value="3" calcext:value-type="float">
            <text:p>3</text:p>
          </table:table-cell>
          <table:table-cell table:style-name="ce677" office:value-type="float" office:value="4" calcext:value-type="float">
            <text:p>4</text:p>
          </table:table-cell>
          <table:table-cell table:style-name="ce677"/>
          <table:table-cell table:style-name="ce622"/>
          <table:table-cell/>
          <table:table-cell table:style-name="ce622"/>
          <table:table-cell table:style-name="ce677"/>
          <table:table-cell table:style-name="ce677" office:value-type="float" office:value="15" calcext:value-type="float">
            <text:p>15</text:p>
          </table:table-cell>
          <table:table-cell table:style-name="ce731" office:value-type="float" office:value="16" calcext:value-type="float">
            <text:p>16</text:p>
          </table:table-cell>
          <table:table-cell table:style-name="ce666" office:value-type="float" office:value="17" calcext:value-type="float">
            <text:p>17</text:p>
          </table:table-cell>
          <table:table-cell table:style-name="ce656" office:value-type="float" office:value="18" calcext:value-type="float">
            <text:p>18</text:p>
          </table:table-cell>
          <table:table-cell table:style-name="ce620" office:value-type="float" office:value="19" calcext:value-type="float">
            <text:p>19</text:p>
          </table:table-cell>
          <table:table-cell table:style-name="ce656"/>
          <table:table-cell/>
          <table:table-cell table:style-name="ce798" office:value-type="float" office:value="1" calcext:value-type="float">
            <text:p>1</text:p>
          </table:table-cell>
          <table:table-cell table:style-name="ce1071" office:value-type="float" office:value="14" calcext:value-type="float">
            <text:p>14</text:p>
          </table:table-cell>
          <table:table-cell table:style-name="ce1072" office:value-type="float" office:value="6" calcext:value-type="float">
            <text:p>6</text:p>
          </table:table-cell>
          <table:table-cell table:style-name="ce1071" office:value-type="float" office:value="3" calcext:value-type="float">
            <text:p>3</text:p>
          </table:table-cell>
          <table:table-cell table:style-name="ce1072" office:value-type="float" office:value="5" calcext:value-type="float">
            <text:p>5</text:p>
          </table:table-cell>
          <table:table-cell table:style-name="ce1071" office:value-type="float" office:value="13" calcext:value-type="float">
            <text:p>13</text:p>
          </table:table-cell>
          <table:table-cell table:style-name="Default"/>
          <table:table-cell table:style-name="ce1091" table:formula="of:=SUM([.B25];[.H25];[.N25];[.T25];[.Z25];[.Z30];[.T30];[.N30];[.H30];[.B30];[.B35];[.H35];[.N35];[.T35];[.Z35])/[.$Z$6]" office:value-type="float" office:value="57.5" calcext:value-type="float">
            <text:p>57.5</text:p>
          </table:table-cell>
          <table:table-cell table:style-name="ce1091" table:formula="of:=SUM([.C25];[.I25];[.O25];[.U25];[.AA25];[.AA30];[.U30];[.O30];[.I30];[.C30];[.C35];[.I35];[.O35];[.U35];[.AA35])/[.$Z$6]" office:value-type="float" office:value="40.3" calcext:value-type="float">
            <text:p>40.3</text:p>
          </table:table-cell>
          <table:table-cell table:style-name="ce1091" table:formula="of:=SUM([.D25];[.J25];[.P25];[.V25];[.AB25];[.AB30];[.V30];[.P30];[.J30];[.D30];[.D35];[.J35];[.P35];[.V35];[.AB35])/[.$Z$6]" office:value-type="float" office:value="29.6" calcext:value-type="float">
            <text:p>29.6</text:p>
          </table:table-cell>
          <table:table-cell table:style-name="ce1091" table:formula="of:=SUM([.E25];[.K25];[.Q25];[.W25];[.AC25];[.AC30];[.W30];[.Q30];[.K30];[.E30];[.E35];[.K35];[.Q35];[.W35];[.AC35])/[.$Z$6]" office:value-type="float" office:value="39.2" calcext:value-type="float">
            <text:p>39.2</text:p>
          </table:table-cell>
          <table:table-cell table:style-name="ce1091" table:formula="of:=SUM([.F25];[.L25];[.R25];[.X25];[.AD25];[.AD30];[.X30];[.R30];[.L30];[.F30];[.F35];[.L35];[.R35];[.X35];[.AD35])/[.$Z$6]" office:value-type="float" office:value="55.5" calcext:value-type="float">
            <text:p>55.5</text:p>
          </table:table-cell>
          <table:table-cell/>
          <table:table-cell table:style-name="ce862" table:formula="of:=COM.MICROSOFT.TEXTJOIN(&quot;&quot;; TRUE(); &quot;{ &quot;&quot;efforts&quot;&quot;: [&quot;; [.AF28]; &quot;], &quot;&quot;pairs&quot;&quot;: &quot;;[.AF20]; &quot;}&quot;)" office:value-type="string" office:string-value="{ &quot;efforts&quot;: [1, 1.1, 1.2, 1.3, 2, 2.1, 2.2, 2.3, 3, 3.1, 3.2, 3.6, 4, 4.2, 4.4], &quot;pairs&quot;: {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6, &quot;2&quot;: 1, &quot;3&quot;: 3, &quot;4&quot;: 6, &quot;5&quot;: 7, &quot;6&quot;: 8, &quot;7&quot;: 4, &quot;8&quot;: 2, &quot;9&quot;: 5, &quot;10&quot;: 13, &quot;11&quot;: 14, &quot;12&quot;: 12, &quot;13&quot;: 10, &quot;14&quot;: 11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5, &quot;4&quot;: 8, &quot;5&quot;: 5, &quot;6&quot;: 4, &quot;7&quot;: 6, &quot;8&quot;: 7, &quot;9&quot;: 9, &quot;10&quot;: 13, &quot;11&quot;: 11, &quot;12&quot;: 10, &quot;13&quot;: 12, &quot;14&quot;: 14}, &quot;4&quot;: { &quot;0&quot;: 6, &quot;1&quot;: 2, &quot;2&quot;: 1, &quot;3&quot;: 7, &quot;4&quot;: 13, &quot;5&quot;: 5, &quot;6&quot;: 4, &quot;7&quot;: 3, &quot;8&quot;: 9, &quot;9&quot;: 8, &quot;10&quot;: 12, &quot;11&quot;: 11, &quot;12&quot;: 10, &quot;13&quot;: 14, &quot;14&quot;: 13}, &quot;5&quot;: { &quot;0&quot;: 14, &quot;1&quot;: 9, &quot;2&quot;: 4, &quot;3&quot;: 6, &quot;4&quot;: 13, &quot;5&quot;: 7, &quot;6&quot;: 1, &quot;7&quot;: 2, &quot;8&quot;: 3, &quot;9&quot;: 8, &quot;10&quot;: 12, &quot;11&quot;: 10, &quot;12&quot;: 7, &quot;13&quot;: 5, &quot;14&quot;: 11}, 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, &quot;7&quot;: { &quot;0&quot;: 14, &quot;1&quot;: 5, &quot;2&quot;: 6, &quot;3&quot;: 9, &quot;4&quot;: 13, &quot;5&quot;: 4, &quot;6&quot;: 2, &quot;7&quot;: 0, &quot;8&quot;: 1, &quot;9&quot;: 10, &quot;10&quot;: 11, &quot;11&quot;: 7, &quot;12&quot;: 8, &quot;13&quot;: 3, &quot;14&quot;: 12}, &quot;8&quot;: { &quot;0&quot;: 12, &quot;1&quot;: 5, &quot;2&quot;: 3, &quot;3&quot;: 10, &quot;4&quot;: 14, &quot;5&quot;: 4, &quot;6&quot;: 2, &quot;7&quot;: 1, &quot;8&quot;: 1, &quot;9&quot;: 11, &quot;10&quot;: 8, &quot;11&quot;: 6, &quot;12&quot;: 7, &quot;13&quot;: 9, &quot;14&quot;: 13}, &quot;9&quot;: { &quot;0&quot;: 14, &quot;1&quot;: 6, &quot;2&quot;: 5, &quot;3&quot;: 10, &quot;4&quot;: 12, &quot;5&quot;: 3, &quot;6&quot;: 2, &quot;7&quot;: 1, &quot;8&quot;: 4, &quot;9&quot;: 8, &quot;10&quot;: 13, &quot;11&quot;: 7, &quot;12&quot;: 8, &quot;13&quot;: 9, &quot;14&quot;: 11}, &quot;10&quot;: { &quot;0&quot;: 14, &quot;1&quot;: 13, &quot;2&quot;: 10, &quot;3&quot;: 11, &quot;4&quot;: 12, &quot;5&quot;: 9, &quot;6&quot;: 6, &quot;7&quot;: 4, &quot;8&quot;: 5, &quot;9&quot;: 8, &quot;10&quot;: 11, &quot;11&quot;: 1, &quot;12&quot;: 2, &quot;13&quot;: 3, &quot;14&quot;: 7}, &quot;11&quot;: { &quot;0&quot;: 14, &quot;1&quot;: 13, &quot;2&quot;: 7, &quot;3&quot;: 8, &quot;4&quot;: 12, &quot;5&quot;: 9, &quot;6&quot;: 5, &quot;7&quot;: 3, &quot;8&quot;: 4, &quot;9&quot;: 10, &quot;10&quot;: 6, &quot;11&quot;: 10, &quot;12&quot;: 1, &quot;13&quot;: 2, &quot;14&quot;: 11}, &quot;12&quot;: { &quot;0&quot;: 14, &quot;1&quot;: 13, &quot;2&quot;: 10, &quot;3&quot;: 9, &quot;4&quot;: 12, &quot;5&quot;: 8, &quot;6&quot;: 6, &quot;7&quot;: 4, &quot;8&quot;: 3, &quot;9&quot;: 7, &quot;10&quot;: 5, &quot;11&quot;: 2, &quot;12&quot;: 9, &quot;13&quot;: 1, &quot;14&quot;: 11}, 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, &quot;14&quot;: { &quot;0&quot;: 14, &quot;1&quot;: 13, &quot;2&quot;: 10, &quot;3&quot;: 12, &quot;4&quot;: 11, &quot;5&quot;: 6, &quot;6&quot;: 4, &quot;7&quot;: 3, &quot;8&quot;: 8, &quot;9&quot;: 9, &quot;10&quot;: 5, &quot;11&quot;: 2, &quot;12&quot;: 1, &quot;13&quot;: 7, &quot;14&quot;: 12}}}" calcext:value-type="string" table:number-columns-spanned="29" table:number-rows-spanned="5">
            <text:p>{ "efforts": [1, 1.1, 1.2, 1.3, 2, 2.1, 2.2, 2.3, 3, 3.1, 3.2, 3.6, 4, 4.2, 4.4], "pairs": {"0": { "0": 14, "1": 1, "2": 2, "3": 3, "4": 5, "5": 9, "6": 8, "7": 7, "8": 4, "9": 6, "10": 12, "11": 14, "12": 13, "13": 10, "14": 11}, "1": { "0": 9, "1": 6, "2": 1, "3": 3, "4": 6, "5": 7, "6": 8, "7": 4, "8": 2, "9": 5, "10": 13, "11": 14, "12": 12, "13": 10, "14": 11}, "2": { "0": 9, "1": 3, "2": 3, "3": 1, "4": 8, "5": 7, "6": 4, "7": 5, "8": 2, "9": 6, "10": 12, "11": 11, "12": 13, "13": 10, "14": 14}, "3": { "0": 3, "1": 2, "2": 1, "3": 5, "4": 8, "5": 5, "6": 4, "7": 6, "8": 7, "9": 9, "10": 13, "11": 11, "12": 10, "13": 12, "14": 14}, "4": { "0": 6, "1": 2, "2": 1, "3": 7, "4": 13, "5": 5, "6": 4, "7": 3, "8": 9, "9": 8, "10": 12, "11": 11, "12": 10, "13": 14, "14": 13}, "5": { "0": 14, "1": 9, "2": 4, "3": 6, "4": 13, "5": 7, "6": 1, "7": 2, "8": 3, "9": 8, "10": 12, "11": 10, "12": 7, "13": 5, "14": 11}, "6": { "0": 14, "1": 8, "2": 3, "3": 5, "4": 13, "5": 6, "6": 2, "7": 1, "8": 2, "9": 7, "10": 11, "11": 9, "12": 10, "13": 4, "14": 12}, "7": { "0": 14, "1": 5, "2": 6, "3": 9, "4": 13, "5": 4, "6": 2, "7": 0, "8": 1, "9": 10, "10": 11, "11": 7, "12": 8, "13": 3, "14": 12}, "8": { "0": 12, "1": 5, "2": 3, "3": 10, "4": 14, "5": 4, "6": 2, "7": 1, "8": 1, "9": 11, "10": 8, "11": 6, "12": 7, "13": 9, "14": 13}, "9": { "0": 14, "1": 6, "2": 5, "3": 10, "4": 12, "5": 3, "6": 2, "7": 1, "8": 4, "9": 8, "10": 13, "11": 7, "12": 8, "13": 9, "14": 11}, "10": { "0": 14, "1": 13, "2": 10, "3": 11, "4": 12, "5": 9, "6": 6, "7": 4, "8": 5, "9": 8, "10": 11, "11": 1, "12": 2, "13": 3, "14": 7}, "11": { "0": 14, "1": 13, "2": 7, "3": 8, "4": 12, "5": 9, "6": 5, "7": 3, "8": 4, "9": 10, "10": 6, "11": 10, "12": 1, "13": 2, "14": 11}, "12": { "0": 14, "1": 13, "2": 10, "3": 9, "4": 12, "5": 8, "6": 6, "7": 4, "8": 3, "9": 7, "10": 5, "11": 2, "12": 9, "13": 1, "14": 11}, "13": { "0": 13, "1": 12, "2": 8, "3": 11, "4": 14, "5": 6, "6": 4, "7": 3, "8": 7, "9": 9, "10": 5, "11": 2, "12": 1, "13": 4, "14": 10}, "14": { "0": 14, "1": 13, "2": 10, "3": 12, "4": 11, "5": 6, "6": 4, "7": 3, "8": 8, "9": 9, "10": 5, "11": 2, "12": 1, "13": 7, "14": 12}}}</text:p>
          </table:table-cell>
          <table:covered-table-cell table:number-columns-repeated="28" table:style-name="ce861"/>
          <table:table-cell table:style-name="ce874"/>
          <table:table-cell table:style-name="ce861"/>
          <table:table-cell table:style-name="Default"/>
          <table:table-cell table:number-columns-repeated="36"/>
        </table:table-row>
        <table:table-row table:style-name="ro1">
          <table:table-cell table:style-name="ce620"/>
          <table:table-cell table:style-name="ce620" office:value-type="float" office:value="5" calcext:value-type="float">
            <text:p>5</text:p>
          </table:table-cell>
          <table:table-cell table:style-name="ce656" office:value-type="float" office:value="6" calcext:value-type="float">
            <text:p>6</text:p>
          </table:table-cell>
          <table:table-cell table:style-name="ce666" office:value-type="float" office:value="7" calcext:value-type="float">
            <text:p>7</text:p>
          </table:table-cell>
          <table:table-cell table:style-name="ce677" office:value-type="float" office:value="8" calcext:value-type="float">
            <text:p>8</text:p>
          </table:table-cell>
          <table:table-cell table:style-name="ce677" office:value-type="float" office:value="9" calcext:value-type="float">
            <text:p>9</text:p>
          </table:table-cell>
          <table:table-cell table:style-name="ce677"/>
          <table:table-cell table:style-name="ce622"/>
          <table:table-cell/>
          <table:table-cell table:style-name="ce708"/>
          <table:table-cell table:style-name="ce677"/>
          <table:table-cell table:style-name="ce677" office:value-type="float" office:value="20" calcext:value-type="float">
            <text:p>20</text:p>
          </table:table-cell>
          <table:table-cell table:style-name="ce731" office:value-type="float" office:value="21" calcext:value-type="float">
            <text:p>21</text:p>
          </table:table-cell>
          <table:table-cell table:style-name="ce666" office:value-type="float" office:value="22" calcext:value-type="float">
            <text:p>22</text:p>
          </table:table-cell>
          <table:table-cell table:style-name="ce656" office:value-type="float" office:value="23" calcext:value-type="float">
            <text:p>23</text:p>
          </table:table-cell>
          <table:table-cell table:style-name="ce620" office:value-type="float" office:value="24" calcext:value-type="float">
            <text:p>24</text:p>
          </table:table-cell>
          <table:table-cell table:style-name="ce620"/>
          <table:table-cell/>
          <table:table-cell table:style-name="ce798" office:value-type="float" office:value="2" calcext:value-type="float">
            <text:p>2</text:p>
          </table:table-cell>
          <table:table-cell table:style-name="ce1072" office:value-type="float" office:value="7" calcext:value-type="float">
            <text:p>7</text:p>
          </table:table-cell>
          <table:table-cell table:style-name="ce1071" office:value-type="float" office:value="2" calcext:value-type="float">
            <text:p>2</text:p>
          </table:table-cell>
          <table:table-cell table:style-name="ce1071" office:value-type="float" office:value="0" calcext:value-type="float">
            <text:p>0</text:p>
          </table:table-cell>
          <table:table-cell table:style-name="ce1071" office:value-type="float" office:value="1" calcext:value-type="float">
            <text:p>1</text:p>
          </table:table-cell>
          <table:table-cell table:style-name="ce1072" office:value-type="float" office:value="8" calcext:value-type="float">
            <text:p>8</text:p>
          </table:table-cell>
          <table:table-cell table:style-name="Default"/>
          <table:table-cell table:style-name="ce1091" table:formula="of:=SUM([.B26];[.H26];[.N26];[.T26];[.Z26];[.Z31];[.T31];[.N31];[.H31];[.B31];[.B36];[.H36];[.N36];[.T36];[.Z36])/[.$Z$6]" office:value-type="float" office:value="35.3" calcext:value-type="float">
            <text:p>35.3</text:p>
          </table:table-cell>
          <table:table-cell table:style-name="ce1091" table:formula="of:=SUM([.C26];[.I26];[.O26];[.U26];[.AA26];[.AA31];[.U31];[.O31];[.I31];[.C31];[.C36];[.I36];[.O36];[.U36];[.AA36])/[.$Z$6]" office:value-type="float" office:value="28.4" calcext:value-type="float">
            <text:p>28.4</text:p>
          </table:table-cell>
          <table:table-cell table:style-name="ce1091" table:formula="of:=SUM([.D26];[.J26];[.P26];[.V26];[.AB26];[.AB31];[.V31];[.P31];[.J31];[.D31];[.D36];[.J36];[.P36];[.V36];[.AB36])/[.$Z$6]" office:value-type="float" office:value="23.3" calcext:value-type="float">
            <text:p>23.3</text:p>
          </table:table-cell>
          <table:table-cell table:style-name="ce1091" table:formula="of:=SUM([.E26];[.K26];[.Q26];[.W26];[.AC26];[.AC31];[.W31];[.Q31];[.K31];[.E31];[.E36];[.K36];[.Q36];[.W36];[.AC36])/[.$Z$6]" office:value-type="float" office:value="27.2" calcext:value-type="float">
            <text:p>27.2</text:p>
          </table:table-cell>
          <table:table-cell table:style-name="ce1091" table:formula="of:=SUM([.F26];[.L26];[.R26];[.X26];[.AD26];[.AD31];[.X31];[.R31];[.L31];[.F31];[.F36];[.L36];[.R36];[.X36];[.AD36])/[.$Z$6]" office:value-type="float" office:value="42.4" calcext:value-type="float">
            <text:p>42.4</text:p>
          </table:table-cell>
          <table:table-cell/>
          <table:covered-table-cell table:number-columns-repeated="29" table:style-name="ce861"/>
          <table:table-cell table:style-name="ce861" table:number-columns-repeated="3"/>
          <table:table-cell table:number-columns-repeated="36"/>
        </table:table-row>
        <table:table-row table:style-name="ro1">
          <table:table-cell table:style-name="ce620"/>
          <table:table-cell table:style-name="ce620" office:value-type="float" office:value="10" calcext:value-type="float">
            <text:p>10</text:p>
          </table:table-cell>
          <table:table-cell table:style-name="ce656" office:value-type="float" office:value="11" calcext:value-type="float">
            <text:p>11</text:p>
          </table:table-cell>
          <table:table-cell table:style-name="ce666" office:value-type="float" office:value="12" calcext:value-type="float">
            <text:p>12</text:p>
          </table:table-cell>
          <table:table-cell table:style-name="ce677" office:value-type="float" office:value="13" calcext:value-type="float">
            <text:p>13</text:p>
          </table:table-cell>
          <table:table-cell table:style-name="ce687" office:value-type="float" office:value="14" calcext:value-type="float">
            <text:p>14</text:p>
          </table:table-cell>
          <table:table-cell table:style-name="ce677" table:number-columns-repeated="2"/>
          <table:table-cell/>
          <table:table-cell table:style-name="ce677" table:number-columns-repeated="2"/>
          <table:table-cell table:style-name="ce677" office:value-type="float" office:value="25" calcext:value-type="float">
            <text:p>25</text:p>
          </table:table-cell>
          <table:table-cell table:style-name="ce731" office:value-type="float" office:value="26" calcext:value-type="float">
            <text:p>26</text:p>
          </table:table-cell>
          <table:table-cell table:style-name="ce666" office:value-type="float" office:value="27" calcext:value-type="float">
            <text:p>27</text:p>
          </table:table-cell>
          <table:table-cell table:style-name="ce656" office:value-type="float" office:value="28" calcext:value-type="float">
            <text:p>28</text:p>
          </table:table-cell>
          <table:table-cell table:style-name="ce620" office:value-type="float" office:value="29" calcext:value-type="float">
            <text:p>29</text:p>
          </table:table-cell>
          <table:table-cell table:style-name="ce620"/>
          <table:table-cell/>
          <table:table-cell table:style-name="ce798" office:value-type="float" office:value="3" calcext:value-type="float">
            <text:p>3</text:p>
          </table:table-cell>
          <table:table-cell table:style-name="ce1071" office:value-type="float" office:value="11" calcext:value-type="float">
            <text:p>11</text:p>
          </table:table-cell>
          <table:table-cell table:style-name="ce1072" office:value-type="float" office:value="10" calcext:value-type="float">
            <text:p>10</text:p>
          </table:table-cell>
          <table:table-cell table:style-name="ce1072" office:value-type="float" office:value="9" calcext:value-type="float">
            <text:p>9</text:p>
          </table:table-cell>
          <table:table-cell table:style-name="ce1071" office:value-type="float" office:value="4" calcext:value-type="float">
            <text:p>4</text:p>
          </table:table-cell>
          <table:table-cell table:style-name="ce1071" office:value-type="float" office:value="12" calcext:value-type="float">
            <text:p>12</text:p>
          </table:table-cell>
          <table:table-cell table:style-name="Default"/>
          <table:table-cell table:style-name="ce1091" table:formula="of:=SUM([.B27];[.H27];[.N27];[.T27];[.Z27];[.Z32];[.T32];[.N32];[.H32];[.B32];[.B37];[.H37];[.N37];[.T37];[.Z37])/[.$Z$6]" office:value-type="float" office:value="50.9" calcext:value-type="float">
            <text:p>50.9</text:p>
          </table:table-cell>
          <table:table-cell table:style-name="ce1091" table:formula="of:=SUM([.C27];[.I27];[.O27];[.U27];[.AA27];[.AA32];[.U32];[.O32];[.I32];[.C32];[.C37];[.I37];[.O37];[.U37];[.AA37])/[.$Z$6]" office:value-type="float" office:value="40.6" calcext:value-type="float">
            <text:p>40.6</text:p>
          </table:table-cell>
          <table:table-cell table:style-name="ce1091" table:formula="of:=SUM([.D27];[.J27];[.P27];[.V27];[.AB27];[.AB32];[.V32];[.P32];[.J32];[.D32];[.D37];[.J37];[.P37];[.V37];[.AB37])/[.$Z$6]" office:value-type="float" office:value="40.2" calcext:value-type="float">
            <text:p>40.2</text:p>
          </table:table-cell>
          <table:table-cell table:style-name="ce1091" table:formula="of:=SUM([.E27];[.K27];[.Q27];[.W27];[.AC27];[.AC32];[.W32];[.Q32];[.K32];[.E32];[.E37];[.K37];[.Q37];[.W37];[.AC37])/[.$Z$6]" office:value-type="float" office:value="37.5" calcext:value-type="float">
            <text:p>37.5</text:p>
          </table:table-cell>
          <table:table-cell table:style-name="ce1091" table:formula="of:=SUM([.F27];[.L27];[.R27];[.X27];[.AD27];[.AD32];[.X32];[.R32];[.L32];[.F32];[.F37];[.L37];[.R37];[.X37];[.AD37])/[.$Z$6]" office:value-type="float" office:value="56.3" calcext:value-type="float">
            <text:p>56.3</text:p>
          </table:table-cell>
          <table:table-cell table:style-name="ce856"/>
          <table:covered-table-cell table:number-columns-repeated="29" table:style-name="ce861"/>
          <table:table-cell table:style-name="ce874"/>
          <table:table-cell table:style-name="ce861" table:number-columns-repeated="2"/>
          <table:table-cell table:number-columns-repeated="36"/>
        </table:table-row>
        <table:table-row table:style-name="ro1">
          <table:table-cell table:style-name="ce620"/>
          <table:table-cell table:style-name="ce879"/>
          <table:table-cell table:style-name="ce656"/>
          <table:table-cell table:style-name="ce666"/>
          <table:table-cell table:style-name="ce679" table:number-columns-spanned="1" table:number-rows-spanned="2"/>
          <table:table-cell table:style-name="ce679" table:number-columns-spanned="1" table:number-rows-spanned="2"/>
          <table:table-cell table:style-name="ce679" table:number-columns-spanned="1" table:number-rows-spanned="2"/>
          <table:table-cell table:style-name="ce679" table:number-columns-spanned="1" table:number-rows-spanned="2"/>
          <table:table-cell/>
          <table:table-cell table:style-name="ce679" table:number-columns-spanned="1" table:number-rows-spanned="2"/>
          <table:table-cell table:style-name="ce679" table:number-columns-spanned="1" table:number-rows-spanned="2"/>
          <table:table-cell table:style-name="ce679" table:number-columns-spanned="1" table:number-rows-spanned="2"/>
          <table:table-cell table:style-name="ce732" table:number-columns-spanned="1" table:number-rows-spanned="2"/>
          <table:table-cell table:style-name="ce666"/>
          <table:table-cell table:style-name="ce656"/>
          <table:table-cell table:style-name="ce939"/>
          <table:table-cell table:style-name="ce620"/>
          <table:table-cell/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798" office:value-type="float" office:value="2" calcext:value-type="float">
            <text:p>2</text:p>
          </table:table-cell>
          <table:table-cell table:style-name="ce798" office:value-type="float" office:value="3" calcext:value-type="float">
            <text:p>3</text:p>
          </table:table-cell>
          <table:table-cell table:style-name="ce798" office:value-type="float" office:value="4" calcext:value-type="float">
            <text:p>4</text:p>
          </table:table-cell>
          <table:table-cell table:style-name="ce798" office:value-type="float" office:value="5" calcext:value-type="float">
            <text:p>5</text:p>
          </table:table-cell>
          <table:table-cell table:style-name="Default"/>
          <table:table-cell table:style-name="ce836"/>
          <table:table-cell table:style-name="ce844"/>
          <table:table-cell table:style-name="ce836"/>
          <table:table-cell table:style-name="Default"/>
          <table:table-cell table:style-name="ce856" table:number-columns-repeated="2"/>
          <table:covered-table-cell table:style-name="ce856"/>
          <table:covered-table-cell table:number-columns-repeated="28"/>
          <table:table-cell table:number-columns-repeated="2"/>
          <table:table-cell table:style-name="Default"/>
          <table:table-cell table:number-columns-repeated="36"/>
        </table:table-row>
        <table:table-row table:style-name="ro1">
          <table:table-cell table:style-name="ce622" table:number-columns-repeated="4"/>
          <table:covered-table-cell table:style-name="ce622"/>
          <table:covered-table-cell table:number-columns-repeated="2" table:style-name="ce903"/>
          <table:covered-table-cell table:style-name="ce679"/>
          <table:table-cell/>
          <table:covered-table-cell table:style-name="ce679"/>
          <table:covered-table-cell table:number-columns-repeated="2" table:style-name="ce903"/>
          <table:covered-table-cell table:style-name="ce732"/>
          <table:table-cell table:style-name="ce622" table:number-columns-repeated="4"/>
          <table:table-cell/>
          <table:table-cell table:style-name="Default"/>
          <table:table-cell table:style-name="ce812" office:value-type="string" calcext:value-type="string">
            <text:p>p</text:p>
          </table:table-cell>
          <table:table-cell table:style-name="ce812" office:value-type="string" calcext:value-type="string">
            <text:p>r</text:p>
          </table:table-cell>
          <table:table-cell table:style-name="ce812" office:value-type="string" calcext:value-type="string">
            <text:p>m</text:p>
          </table:table-cell>
          <table:table-cell table:number-columns-repeated="2" table:style-name="ce812" office:value-type="string" calcext:value-type="string">
            <text:p>i</text:p>
          </table:table-cell>
          <table:table-cell table:style-name="Default"/>
          <table:table-cell table:style-name="ce837" office:value-type="float" office:value="1" calcext:value-type="float">
            <text:p>1.0</text:p>
          </table:table-cell>
          <table:table-cell table:style-name="Default" table:number-columns-repeated="4"/>
          <table:table-cell/>
          <table:covered-table-cell table:number-columns-repeated="13"/>
          <table:covered-table-cell table:number-columns-repeated="3" table:style-name="ce856"/>
          <table:covered-table-cell table:number-columns-repeated="13"/>
          <table:table-cell table:number-columns-repeated="2"/>
          <table:table-cell table:style-name="Default"/>
          <table:table-cell table:number-columns-repeated="36"/>
        </table:table-row>
        <table:table-row table:style-name="ro2">
          <table:table-cell/>
          <table:table-cell table:style-name="Default" office:value-type="string" calcext:value-type="string">
            <text:p>+</text:p>
          </table:table-cell>
          <table:table-cell table:style-name="Default" table:number-columns-repeated="5"/>
          <table:table-cell table:style-name="Default" office:value-type="string" calcext:value-type="string">
            <text:p>+</text:p>
          </table:table-cell>
          <table:table-cell/>
          <table:table-cell table:style-name="Default" table:number-columns-repeated="4"/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/>
          <table:table-cell table:style-name="Default"/>
          <table:table-cell table:style-name="Default" office:value-type="string" calcext:value-type="string">
            <text:p>+</text:p>
          </table:table-cell>
          <table:table-cell table:style-name="Default" table:number-columns-repeated="5"/>
          <table:table-cell table:style-name="Default" office:value-type="string" calcext:value-type="string">
            <text:p>+</text:p>
          </table:table-cell>
          <table:table-cell table:style-name="Default" table:number-columns-repeated="4"/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 table:style-name="ce623"/>
          <table:table-cell table:style-name="ce880" table:formula="of:=[.$T$2]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690"/>
          <table:table-cell office:value-type="float" office:value="9" calcext:value-type="float">
            <text:p>9</text:p>
          </table:table-cell>
          <table:table-cell table:style-name="ce880" table:formula="of:=[.$U$2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690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880" table:formula="of:=[.$V$2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852" office:value-type="float" office:value="8" calcext:value-type="float">
            <text:p>8</text:p>
          </table:table-cell>
          <table:table-cell table:style-name="ce690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0" table:formula="of:=[.$W$2]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690"/>
          <table:table-cell office:value-type="float" office:value="6" calcext:value-type="float">
            <text:p>6</text:p>
          </table:table-cell>
          <table:table-cell table:style-name="ce896" office:value-type="float" office:value="2" calcext:value-type="float">
            <text:p>2</text:p>
          </table:table-cell>
          <table:table-cell table:style-name="ce85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880" table:formula="of:=[.$X$2]" office:value-type="float" office:value="13" calcext:value-type="float">
            <text:p>13</text:p>
          </table:table-cell>
          <table:table-cell/>
          <table:table-cell table:style-name="ce863" table:formula="of:=COM.MICROSOFT.CONCAT(&quot;&quot;&quot;&quot;;[.$B$2]; &quot;&quot;&quot;: &quot;; [.B8])" office:value-type="string" office:string-value="&quot;0&quot;: 14" calcext:value-type="string">
            <text:p>"0": 14</text:p>
          </table:table-cell>
          <table:table-cell table:style-name="ce863" table:formula="of:=COM.MICROSOFT.CONCAT(&quot;&quot;&quot;&quot;;[.$C$2]; &quot;&quot;&quot;: &quot;; [.C8])" office:value-type="string" office:string-value="&quot;1&quot;: 1" calcext:value-type="string">
            <text:p>"1": 1</text:p>
          </table:table-cell>
          <table:table-cell table:style-name="ce863" table:formula="of:=COM.MICROSOFT.CONCAT(&quot;&quot;&quot;&quot;;[.$D$2]; &quot;&quot;&quot;: &quot;; [.D8])" office:value-type="string" office:string-value="&quot;2&quot;: 2" calcext:value-type="string">
            <text:p>"2": 2</text:p>
          </table:table-cell>
          <table:table-cell table:style-name="ce863" table:formula="of:=COM.MICROSOFT.CONCAT(&quot;&quot;&quot;&quot;;[.$E$2]; &quot;&quot;&quot;: &quot;; [.E8])" office:value-type="string" office:string-value="&quot;3&quot;: 3" calcext:value-type="string">
            <text:p>"3": 3</text:p>
          </table:table-cell>
          <table:table-cell table:style-name="ce863" table:formula="of:=COM.MICROSOFT.CONCAT(&quot;&quot;&quot;&quot;;[.$F$2]; &quot;&quot;&quot;: &quot;; [.F8])" office:value-type="string" office:string-value="&quot;4&quot;: 5" calcext:value-type="string">
            <text:p>"4": 5</text:p>
          </table:table-cell>
          <table:table-cell table:style-name="ce863"/>
          <table:table-cell table:style-name="ce863" table:formula="of:=COM.MICROSOFT.CONCAT(&quot;&quot;&quot;&quot;;[.$B$2]; &quot;&quot;&quot;: &quot;; [.H8])" office:value-type="string" office:string-value="&quot;0&quot;: 9" calcext:value-type="string">
            <text:p>"0": 9</text:p>
          </table:table-cell>
          <table:table-cell table:style-name="ce863" table:formula="of:=COM.MICROSOFT.CONCAT(&quot;&quot;&quot;&quot;;[.$C$2]; &quot;&quot;&quot;: &quot;; [.I8])" office:value-type="string" office:string-value="&quot;1&quot;: 6" calcext:value-type="string">
            <text:p>"1": 6</text:p>
          </table:table-cell>
          <table:table-cell table:style-name="ce863" table:formula="of:=COM.MICROSOFT.CONCAT(&quot;&quot;&quot;&quot;;[.$D$2]; &quot;&quot;&quot;: &quot;; [.J8])" office:value-type="string" office:string-value="&quot;2&quot;: 1" calcext:value-type="string">
            <text:p>"2": 1</text:p>
          </table:table-cell>
          <table:table-cell table:style-name="ce863" table:formula="of:=COM.MICROSOFT.CONCAT(&quot;&quot;&quot;&quot;;[.$E$2]; &quot;&quot;&quot;: &quot;; [.K8])" office:value-type="string" office:string-value="&quot;3&quot;: 3" calcext:value-type="string">
            <text:p>"3": 3</text:p>
          </table:table-cell>
          <table:table-cell table:style-name="ce863" table:formula="of:=COM.MICROSOFT.CONCAT(&quot;&quot;&quot;&quot;;[.$F$2]; &quot;&quot;&quot;: &quot;; [.L8])" office:value-type="string" office:string-value="&quot;4&quot;: 6" calcext:value-type="string">
            <text:p>"4": 6</text:p>
          </table:table-cell>
          <table:table-cell table:style-name="ce863"/>
          <table:table-cell table:style-name="ce863" table:formula="of:=COM.MICROSOFT.CONCAT(&quot;&quot;&quot;&quot;;[.$B$2]; &quot;&quot;&quot;: &quot;; [.N8])" office:value-type="string" office:string-value="&quot;0&quot;: 9" calcext:value-type="string">
            <text:p>"0": 9</text:p>
          </table:table-cell>
          <table:table-cell table:style-name="ce863" table:formula="of:=COM.MICROSOFT.CONCAT(&quot;&quot;&quot;&quot;;[.$C$2]; &quot;&quot;&quot;: &quot;; [.O8])" office:value-type="string" office:string-value="&quot;1&quot;: 3" calcext:value-type="string">
            <text:p>"1": 3</text:p>
          </table:table-cell>
          <table:table-cell table:style-name="ce863" table:formula="of:=COM.MICROSOFT.CONCAT(&quot;&quot;&quot;&quot;;[.$D$2]; &quot;&quot;&quot;: &quot;; [.P8])" office:value-type="string" office:string-value="&quot;2&quot;: 3" calcext:value-type="string">
            <text:p>"2": 3</text:p>
          </table:table-cell>
          <table:table-cell table:style-name="ce863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863" table:formula="of:=COM.MICROSOFT.CONCAT(&quot;&quot;&quot;&quot;;[.$F$2]; &quot;&quot;&quot;: &quot;; [.R8])" office:value-type="string" office:string-value="&quot;4&quot;: 8" calcext:value-type="string">
            <text:p>"4": 8</text:p>
          </table:table-cell>
          <table:table-cell table:style-name="ce863"/>
          <table:table-cell table:style-name="ce863" table:formula="of:=COM.MICROSOFT.CONCAT(&quot;&quot;&quot;&quot;;[.$B$2]; &quot;&quot;&quot;: &quot;; [.T8])" office:value-type="string" office:string-value="&quot;0&quot;: 3" calcext:value-type="string">
            <text:p>"0": 3</text:p>
          </table:table-cell>
          <table:table-cell table:style-name="ce863" table:formula="of:=COM.MICROSOFT.CONCAT(&quot;&quot;&quot;&quot;;[.$C$2]; &quot;&quot;&quot;: &quot;; [.U8])" office:value-type="string" office:string-value="&quot;1&quot;: 2" calcext:value-type="string">
            <text:p>"1": 2</text:p>
          </table:table-cell>
          <table:table-cell table:style-name="ce863" table:formula="of:=COM.MICROSOFT.CONCAT(&quot;&quot;&quot;&quot;;[.$D$2]; &quot;&quot;&quot;: &quot;; [.V8])" office:value-type="string" office:string-value="&quot;2&quot;: 1" calcext:value-type="string">
            <text:p>"2": 1</text:p>
          </table:table-cell>
          <table:table-cell table:style-name="ce863" table:formula="of:=COM.MICROSOFT.CONCAT(&quot;&quot;&quot;&quot;;[.$E$2]; &quot;&quot;&quot;: &quot;; [.W8])" office:value-type="string" office:string-value="&quot;3&quot;: 5" calcext:value-type="string">
            <text:p>"3": 5</text:p>
          </table:table-cell>
          <table:table-cell table:style-name="ce863" table:formula="of:=COM.MICROSOFT.CONCAT(&quot;&quot;&quot;&quot;;[.$F$2]; &quot;&quot;&quot;: &quot;; [.X8])" office:value-type="string" office:string-value="&quot;4&quot;: 8" calcext:value-type="string">
            <text:p>"4": 8</text:p>
          </table:table-cell>
          <table:table-cell table:style-name="ce863"/>
          <table:table-cell table:style-name="ce863" table:formula="of:=COM.MICROSOFT.CONCAT(&quot;&quot;&quot;&quot;;[.$B$2]; &quot;&quot;&quot;: &quot;; [.Z8])" office:value-type="string" office:string-value="&quot;0&quot;: 6" calcext:value-type="string">
            <text:p>"0": 6</text:p>
          </table:table-cell>
          <table:table-cell table:style-name="ce863" table:formula="of:=COM.MICROSOFT.CONCAT(&quot;&quot;&quot;&quot;;[.$C$2]; &quot;&quot;&quot;: &quot;; [.AA8])" office:value-type="string" office:string-value="&quot;1&quot;: 2" calcext:value-type="string">
            <text:p>"1": 2</text:p>
          </table:table-cell>
          <table:table-cell table:style-name="ce863" table:formula="of:=COM.MICROSOFT.CONCAT(&quot;&quot;&quot;&quot;;[.$D$2]; &quot;&quot;&quot;: &quot;; [.AB8])" office:value-type="string" office:string-value="&quot;2&quot;: 1" calcext:value-type="string">
            <text:p>"2": 1</text:p>
          </table:table-cell>
          <table:table-cell table:style-name="ce863" table:formula="of:=COM.MICROSOFT.CONCAT(&quot;&quot;&quot;&quot;;[.$E$2]; &quot;&quot;&quot;: &quot;; [.AC8])" office:value-type="string" office:string-value="&quot;3&quot;: 7" calcext:value-type="string">
            <text:p>"3": 7</text:p>
          </table:table-cell>
          <table:table-cell table:style-name="ce863" table:formula="of:=COM.MICROSOFT.CONCAT(&quot;&quot;&quot;&quot;;[.$F$2]; &quot;&quot;&quot;: &quot;; [.AD8])" office:value-type="string" office:string-value="&quot;4&quot;: 13" calcext:value-type="string">
            <text:p>"4": 13</text:p>
          </table:table-cell>
          <table:table-cell table:style-name="ce875" table:number-columns-repeated="2"/>
          <table:table-cell table:style-name="ce864" table:formula="of:=COM.MICROSOFT.CONCAT(&quot;&quot;&quot;0&quot;&quot;: { &quot;;COM.MICROSOFT.TEXTJOIN(&quot;, &quot;;TRUE();[.AF8:.AJ10]);&quot;}&quot;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" calcext:value-type="string">
            <text:p>"0": { "0": 14, "1": 1, "2": 2, "3": 3, "4": 5, "5": 9, "6": 8, "7": 7, "8": 4, "9": 6, "10": 12, "11": 14, "12": 13, "13": 10, "14": 11}</text:p>
          </table:table-cell>
          <table:table-cell table:number-columns-repeated="3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690"/>
          <table:table-cell office:value-type="float" office:value="7" calcext:value-type="float">
            <text:p>7</text:p>
          </table:table-cell>
          <table:table-cell table:style-name="ce845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690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852" office:value-type="float" office:value="6" calcext:value-type="float">
            <text:p>6</text:p>
          </table:table-cell>
          <table:table-cell table:style-name="ce690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690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style-name="ce863" table:formula="of:=COM.MICROSOFT.CONCAT(&quot;&quot;&quot;&quot;;[.$B$3]; &quot;&quot;&quot;: &quot;; [.B9])" office:value-type="string" office:string-value="&quot;5&quot;: 9" calcext:value-type="string">
            <text:p>"5": 9</text:p>
          </table:table-cell>
          <table:table-cell table:style-name="ce863" table:formula="of:=COM.MICROSOFT.CONCAT(&quot;&quot;&quot;&quot;;[.$C$3]; &quot;&quot;&quot;: &quot;; [.C9])" office:value-type="string" office:string-value="&quot;6&quot;: 8" calcext:value-type="string">
            <text:p>"6": 8</text:p>
          </table:table-cell>
          <table:table-cell table:style-name="ce863" table:formula="of:=COM.MICROSOFT.CONCAT(&quot;&quot;&quot;&quot;;[.$D$3]; &quot;&quot;&quot;: &quot;; [.D9])" office:value-type="string" office:string-value="&quot;7&quot;: 7" calcext:value-type="string">
            <text:p>"7": 7</text:p>
          </table:table-cell>
          <table:table-cell table:style-name="ce863" table:formula="of:=COM.MICROSOFT.CONCAT(&quot;&quot;&quot;&quot;;[.$E$3]; &quot;&quot;&quot;: &quot;; [.E9])" office:value-type="string" office:string-value="&quot;8&quot;: 4" calcext:value-type="string">
            <text:p>"8": 4</text:p>
          </table:table-cell>
          <table:table-cell table:style-name="ce863" table:formula="of:=COM.MICROSOFT.CONCAT(&quot;&quot;&quot;&quot;;[.$F$3]; &quot;&quot;&quot;: &quot;; [.F9])" office:value-type="string" office:string-value="&quot;9&quot;: 6" calcext:value-type="string">
            <text:p>"9": 6</text:p>
          </table:table-cell>
          <table:table-cell table:style-name="ce863"/>
          <table:table-cell table:style-name="ce863" table:formula="of:=COM.MICROSOFT.CONCAT(&quot;&quot;&quot;&quot;;[.$B$3]; &quot;&quot;&quot;: &quot;; [.H9])" office:value-type="string" office:string-value="&quot;5&quot;: 7" calcext:value-type="string">
            <text:p>"5": 7</text:p>
          </table:table-cell>
          <table:table-cell table:style-name="ce863" table:formula="of:=COM.MICROSOFT.CONCAT(&quot;&quot;&quot;&quot;;[.$C$3]; &quot;&quot;&quot;: &quot;; [.I9])" office:value-type="string" office:string-value="&quot;6&quot;: 8" calcext:value-type="string">
            <text:p>"6": 8</text:p>
          </table:table-cell>
          <table:table-cell table:style-name="ce863" table:formula="of:=COM.MICROSOFT.CONCAT(&quot;&quot;&quot;&quot;;[.$D$3]; &quot;&quot;&quot;: &quot;; [.J9])" office:value-type="string" office:string-value="&quot;7&quot;: 4" calcext:value-type="string">
            <text:p>"7": 4</text:p>
          </table:table-cell>
          <table:table-cell table:style-name="ce863" table:formula="of:=COM.MICROSOFT.CONCAT(&quot;&quot;&quot;&quot;;[.$E$3]; &quot;&quot;&quot;: &quot;; [.K9])" office:value-type="string" office:string-value="&quot;8&quot;: 2" calcext:value-type="string">
            <text:p>"8": 2</text:p>
          </table:table-cell>
          <table:table-cell table:style-name="ce863" table:formula="of:=COM.MICROSOFT.CONCAT(&quot;&quot;&quot;&quot;;[.$F$3]; &quot;&quot;&quot;: &quot;; [.L9])" office:value-type="string" office:string-value="&quot;9&quot;: 5" calcext:value-type="string">
            <text:p>"9": 5</text:p>
          </table:table-cell>
          <table:table-cell table:style-name="ce863"/>
          <table:table-cell table:style-name="ce863" table:formula="of:=COM.MICROSOFT.CONCAT(&quot;&quot;&quot;&quot;;[.$B$3]; &quot;&quot;&quot;: &quot;; [.N9])" office:value-type="string" office:string-value="&quot;5&quot;: 7" calcext:value-type="string">
            <text:p>"5": 7</text:p>
          </table:table-cell>
          <table:table-cell table:style-name="ce863" table:formula="of:=COM.MICROSOFT.CONCAT(&quot;&quot;&quot;&quot;;[.$C$3]; &quot;&quot;&quot;: &quot;; [.O9])" office:value-type="string" office:string-value="&quot;6&quot;: 4" calcext:value-type="string">
            <text:p>"6": 4</text:p>
          </table:table-cell>
          <table:table-cell table:style-name="ce863" table:formula="of:=COM.MICROSOFT.CONCAT(&quot;&quot;&quot;&quot;;[.$D$3]; &quot;&quot;&quot;: &quot;; [.P9])" office:value-type="string" office:string-value="&quot;7&quot;: 5" calcext:value-type="string">
            <text:p>"7": 5</text:p>
          </table:table-cell>
          <table:table-cell table:style-name="ce863" table:formula="of:=COM.MICROSOFT.CONCAT(&quot;&quot;&quot;&quot;;[.$E$3]; &quot;&quot;&quot;: &quot;; [.Q9])" office:value-type="string" office:string-value="&quot;8&quot;: 2" calcext:value-type="string">
            <text:p>"8": 2</text:p>
          </table:table-cell>
          <table:table-cell table:style-name="ce863" table:formula="of:=COM.MICROSOFT.CONCAT(&quot;&quot;&quot;&quot;;[.$F$3]; &quot;&quot;&quot;: &quot;; [.R9])" office:value-type="string" office:string-value="&quot;9&quot;: 6" calcext:value-type="string">
            <text:p>"9": 6</text:p>
          </table:table-cell>
          <table:table-cell table:style-name="ce863"/>
          <table:table-cell table:style-name="ce863" table:formula="of:=COM.MICROSOFT.CONCAT(&quot;&quot;&quot;&quot;;[.$B$3]; &quot;&quot;&quot;: &quot;; [.T9])" office:value-type="string" office:string-value="&quot;5&quot;: 5" calcext:value-type="string">
            <text:p>"5": 5</text:p>
          </table:table-cell>
          <table:table-cell table:style-name="ce863" table:formula="of:=COM.MICROSOFT.CONCAT(&quot;&quot;&quot;&quot;;[.$C$3]; &quot;&quot;&quot;: &quot;; [.U9])" office:value-type="string" office:string-value="&quot;6&quot;: 4" calcext:value-type="string">
            <text:p>"6": 4</text:p>
          </table:table-cell>
          <table:table-cell table:style-name="ce863" table:formula="of:=COM.MICROSOFT.CONCAT(&quot;&quot;&quot;&quot;;[.$D$3]; &quot;&quot;&quot;: &quot;; [.V9])" office:value-type="string" office:string-value="&quot;7&quot;: 6" calcext:value-type="string">
            <text:p>"7": 6</text:p>
          </table:table-cell>
          <table:table-cell table:style-name="ce863" table:formula="of:=COM.MICROSOFT.CONCAT(&quot;&quot;&quot;&quot;;[.$E$3]; &quot;&quot;&quot;: &quot;; [.W9])" office:value-type="string" office:string-value="&quot;8&quot;: 7" calcext:value-type="string">
            <text:p>"8": 7</text:p>
          </table:table-cell>
          <table:table-cell table:style-name="ce863" table:formula="of:=COM.MICROSOFT.CONCAT(&quot;&quot;&quot;&quot;;[.$F$3]; &quot;&quot;&quot;: &quot;; [.X9])" office:value-type="string" office:string-value="&quot;9&quot;: 9" calcext:value-type="string">
            <text:p>"9": 9</text:p>
          </table:table-cell>
          <table:table-cell table:style-name="ce863"/>
          <table:table-cell table:style-name="ce863" table:formula="of:=COM.MICROSOFT.CONCAT(&quot;&quot;&quot;&quot;;[.$B$3]; &quot;&quot;&quot;: &quot;; [.Z9])" office:value-type="string" office:string-value="&quot;5&quot;: 5" calcext:value-type="string">
            <text:p>"5": 5</text:p>
          </table:table-cell>
          <table:table-cell table:style-name="ce863" table:formula="of:=COM.MICROSOFT.CONCAT(&quot;&quot;&quot;&quot;;[.$C$3]; &quot;&quot;&quot;: &quot;; [.AA9])" office:value-type="string" office:string-value="&quot;6&quot;: 4" calcext:value-type="string">
            <text:p>"6": 4</text:p>
          </table:table-cell>
          <table:table-cell table:style-name="ce863" table:formula="of:=COM.MICROSOFT.CONCAT(&quot;&quot;&quot;&quot;;[.$D$3]; &quot;&quot;&quot;: &quot;; [.AB9])" office:value-type="string" office:string-value="&quot;7&quot;: 3" calcext:value-type="string">
            <text:p>"7": 3</text:p>
          </table:table-cell>
          <table:table-cell table:style-name="ce863" table:formula="of:=COM.MICROSOFT.CONCAT(&quot;&quot;&quot;&quot;;[.$E$3]; &quot;&quot;&quot;: &quot;; [.AC9])" office:value-type="string" office:string-value="&quot;8&quot;: 9" calcext:value-type="string">
            <text:p>"8": 9</text:p>
          </table:table-cell>
          <table:table-cell table:style-name="ce863" table:formula="of:=COM.MICROSOFT.CONCAT(&quot;&quot;&quot;&quot;;[.$F$3]; &quot;&quot;&quot;: &quot;; [.AD9])" office:value-type="string" office:string-value="&quot;9&quot;: 8" calcext:value-type="string">
            <text:p>"9": 8</text:p>
          </table:table-cell>
          <table:table-cell table:style-name="ce875" table:number-columns-repeated="2"/>
          <table:table-cell table:formula="of:=COM.MICROSOFT.CONCAT(&quot;&quot;&quot;1&quot;&quot;: { &quot;;COM.MICROSOFT.TEXTJOIN(&quot;, &quot;;TRUE();[.AL8:.AP10]);&quot;}&quot;)" office:value-type="string" office:string-value="&quot;1&quot;: { &quot;0&quot;: 9, &quot;1&quot;: 6, &quot;2&quot;: 1, &quot;3&quot;: 3, &quot;4&quot;: 6, &quot;5&quot;: 7, &quot;6&quot;: 8, &quot;7&quot;: 4, &quot;8&quot;: 2, &quot;9&quot;: 5, &quot;10&quot;: 13, &quot;11&quot;: 14, &quot;12&quot;: 12, &quot;13&quot;: 10, &quot;14&quot;: 11}" calcext:value-type="string">
            <text:p>"1": { "0": 9, "1": 6, "2": 1, "3": 3, "4": 6, "5": 7, "6": 8, "7": 4, "8": 2, "9": 5, "10": 13, "11": 14, "12": 12, "13": 10, "14": 11}</text:p>
          </table:table-cell>
          <table:table-cell table:number-columns-repeated="3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690"/>
          <table:table-cell office:value-type="float" office:value="13" calcext:value-type="float">
            <text:p>13</text:p>
          </table:table-cell>
          <table:table-cell table:style-name="ce845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690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style-name="ce852" office:value-type="float" office:value="14" calcext:value-type="float">
            <text:p>14</text:p>
          </table:table-cell>
          <table:table-cell table:style-name="ce690"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690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863" table:formula="of:=COM.MICROSOFT.CONCAT(&quot;&quot;&quot;&quot;;[.$B$4]; &quot;&quot;&quot;: &quot;; [.B10])" office:value-type="string" office:string-value="&quot;10&quot;: 12" calcext:value-type="string">
            <text:p>"10": 12</text:p>
          </table:table-cell>
          <table:table-cell table:style-name="ce863" table:formula="of:=COM.MICROSOFT.CONCAT(&quot;&quot;&quot;&quot;;[.$C$4]; &quot;&quot;&quot;: &quot;; [.C10])" office:value-type="string" office:string-value="&quot;11&quot;: 14" calcext:value-type="string">
            <text:p>"11": 14</text:p>
          </table:table-cell>
          <table:table-cell table:style-name="ce863" table:formula="of:=COM.MICROSOFT.CONCAT(&quot;&quot;&quot;&quot;;[.$D$4]; &quot;&quot;&quot;: &quot;; [.D10])" office:value-type="string" office:string-value="&quot;12&quot;: 13" calcext:value-type="string">
            <text:p>"12": 13</text:p>
          </table:table-cell>
          <table:table-cell table:style-name="ce863" table:formula="of:=COM.MICROSOFT.CONCAT(&quot;&quot;&quot;&quot;;[.$E$4]; &quot;&quot;&quot;: &quot;; [.E10])" office:value-type="string" office:string-value="&quot;13&quot;: 10" calcext:value-type="string">
            <text:p>"13": 10</text:p>
          </table:table-cell>
          <table:table-cell table:style-name="ce863" table:formula="of:=COM.MICROSOFT.CONCAT(&quot;&quot;&quot;&quot;;[.$F$4]; &quot;&quot;&quot;: &quot;; [.F10])" office:value-type="string" office:string-value="&quot;14&quot;: 11" calcext:value-type="string">
            <text:p>"14": 11</text:p>
          </table:table-cell>
          <table:table-cell table:style-name="ce863"/>
          <table:table-cell table:style-name="ce863" table:formula="of:=COM.MICROSOFT.CONCAT(&quot;&quot;&quot;&quot;;[.$B$4]; &quot;&quot;&quot;: &quot;; [.H10])" office:value-type="string" office:string-value="&quot;10&quot;: 13" calcext:value-type="string">
            <text:p>"10": 13</text:p>
          </table:table-cell>
          <table:table-cell table:style-name="ce863" table:formula="of:=COM.MICROSOFT.CONCAT(&quot;&quot;&quot;&quot;;[.$C$4]; &quot;&quot;&quot;: &quot;; [.I10])" office:value-type="string" office:string-value="&quot;11&quot;: 14" calcext:value-type="string">
            <text:p>"11": 14</text:p>
          </table:table-cell>
          <table:table-cell table:style-name="ce863" table:formula="of:=COM.MICROSOFT.CONCAT(&quot;&quot;&quot;&quot;;[.$D$4]; &quot;&quot;&quot;: &quot;; [.J10])" office:value-type="string" office:string-value="&quot;12&quot;: 12" calcext:value-type="string">
            <text:p>"12": 12</text:p>
          </table:table-cell>
          <table:table-cell table:style-name="ce863" table:formula="of:=COM.MICROSOFT.CONCAT(&quot;&quot;&quot;&quot;;[.$E$4]; &quot;&quot;&quot;: &quot;; [.K10])" office:value-type="string" office:string-value="&quot;13&quot;: 10" calcext:value-type="string">
            <text:p>"13": 10</text:p>
          </table:table-cell>
          <table:table-cell table:style-name="ce863" table:formula="of:=COM.MICROSOFT.CONCAT(&quot;&quot;&quot;&quot;;[.$F$4]; &quot;&quot;&quot;: &quot;; [.L10])" office:value-type="string" office:string-value="&quot;14&quot;: 11" calcext:value-type="string">
            <text:p>"14": 11</text:p>
          </table:table-cell>
          <table:table-cell table:style-name="ce863"/>
          <table:table-cell table:style-name="ce863" table:formula="of:=COM.MICROSOFT.CONCAT(&quot;&quot;&quot;&quot;;[.$B$4]; &quot;&quot;&quot;: &quot;; [.N10])" office:value-type="string" office:string-value="&quot;10&quot;: 12" calcext:value-type="string">
            <text:p>"10": 12</text:p>
          </table:table-cell>
          <table:table-cell table:style-name="ce863" table:formula="of:=COM.MICROSOFT.CONCAT(&quot;&quot;&quot;&quot;;[.$C$4]; &quot;&quot;&quot;: &quot;; [.O10])" office:value-type="string" office:string-value="&quot;11&quot;: 11" calcext:value-type="string">
            <text:p>"11": 11</text:p>
          </table:table-cell>
          <table:table-cell table:style-name="ce863" table:formula="of:=COM.MICROSOFT.CONCAT(&quot;&quot;&quot;&quot;;[.$D$4]; &quot;&quot;&quot;: &quot;; [.P10])" office:value-type="string" office:string-value="&quot;12&quot;: 13" calcext:value-type="string">
            <text:p>"12": 13</text:p>
          </table:table-cell>
          <table:table-cell table:style-name="ce863" table:formula="of:=COM.MICROSOFT.CONCAT(&quot;&quot;&quot;&quot;;[.$E$4]; &quot;&quot;&quot;: &quot;; [.Q10])" office:value-type="string" office:string-value="&quot;13&quot;: 10" calcext:value-type="string">
            <text:p>"13": 10</text:p>
          </table:table-cell>
          <table:table-cell table:style-name="ce863" table:formula="of:=COM.MICROSOFT.CONCAT(&quot;&quot;&quot;&quot;;[.$F$4]; &quot;&quot;&quot;: &quot;; [.R10])" office:value-type="string" office:string-value="&quot;14&quot;: 14" calcext:value-type="string">
            <text:p>"14": 14</text:p>
          </table:table-cell>
          <table:table-cell table:style-name="ce863"/>
          <table:table-cell table:style-name="ce863" table:formula="of:=COM.MICROSOFT.CONCAT(&quot;&quot;&quot;&quot;;[.$B$4]; &quot;&quot;&quot;: &quot;; [.T10])" office:value-type="string" office:string-value="&quot;10&quot;: 13" calcext:value-type="string">
            <text:p>"10": 13</text:p>
          </table:table-cell>
          <table:table-cell table:style-name="ce863" table:formula="of:=COM.MICROSOFT.CONCAT(&quot;&quot;&quot;&quot;;[.$C$4]; &quot;&quot;&quot;: &quot;; [.U10])" office:value-type="string" office:string-value="&quot;11&quot;: 11" calcext:value-type="string">
            <text:p>"11": 11</text:p>
          </table:table-cell>
          <table:table-cell table:style-name="ce863" table:formula="of:=COM.MICROSOFT.CONCAT(&quot;&quot;&quot;&quot;;[.$D$4]; &quot;&quot;&quot;: &quot;; [.V10])" office:value-type="string" office:string-value="&quot;12&quot;: 10" calcext:value-type="string">
            <text:p>"12": 10</text:p>
          </table:table-cell>
          <table:table-cell table:style-name="ce863" table:formula="of:=COM.MICROSOFT.CONCAT(&quot;&quot;&quot;&quot;;[.$E$4]; &quot;&quot;&quot;: &quot;; [.W10])" office:value-type="string" office:string-value="&quot;13&quot;: 12" calcext:value-type="string">
            <text:p>"13": 12</text:p>
          </table:table-cell>
          <table:table-cell table:style-name="ce863" table:formula="of:=COM.MICROSOFT.CONCAT(&quot;&quot;&quot;&quot;;[.$F$4]; &quot;&quot;&quot;: &quot;; [.X10])" office:value-type="string" office:string-value="&quot;14&quot;: 14" calcext:value-type="string">
            <text:p>"14": 14</text:p>
          </table:table-cell>
          <table:table-cell table:style-name="ce863"/>
          <table:table-cell table:style-name="ce863" table:formula="of:=COM.MICROSOFT.CONCAT(&quot;&quot;&quot;&quot;;[.$B$4]; &quot;&quot;&quot;: &quot;; [.Z10])" office:value-type="string" office:string-value="&quot;10&quot;: 12" calcext:value-type="string">
            <text:p>"10": 12</text:p>
          </table:table-cell>
          <table:table-cell table:style-name="ce863" table:formula="of:=COM.MICROSOFT.CONCAT(&quot;&quot;&quot;&quot;;[.$C$4]; &quot;&quot;&quot;: &quot;; [.AA10])" office:value-type="string" office:string-value="&quot;11&quot;: 11" calcext:value-type="string">
            <text:p>"11": 11</text:p>
          </table:table-cell>
          <table:table-cell table:style-name="ce863" table:formula="of:=COM.MICROSOFT.CONCAT(&quot;&quot;&quot;&quot;;[.$D$4]; &quot;&quot;&quot;: &quot;; [.AB10])" office:value-type="string" office:string-value="&quot;12&quot;: 10" calcext:value-type="string">
            <text:p>"12": 10</text:p>
          </table:table-cell>
          <table:table-cell table:style-name="ce863" table:formula="of:=COM.MICROSOFT.CONCAT(&quot;&quot;&quot;&quot;;[.$E$4]; &quot;&quot;&quot;: &quot;; [.AC10])" office:value-type="string" office:string-value="&quot;13&quot;: 14" calcext:value-type="string">
            <text:p>"13": 14</text:p>
          </table:table-cell>
          <table:table-cell table:style-name="ce863" table:formula="of:=COM.MICROSOFT.CONCAT(&quot;&quot;&quot;&quot;;[.$F$4]; &quot;&quot;&quot;: &quot;; [.AD10])" office:value-type="string" office:string-value="&quot;14&quot;: 13" calcext:value-type="string">
            <text:p>"14": 13</text:p>
          </table:table-cell>
          <table:table-cell table:style-name="ce875" table:number-columns-repeated="2"/>
          <table:table-cell table:formula="of:=COM.MICROSOFT.CONCAT(&quot;&quot;&quot;2&quot;&quot;: { &quot;;COM.MICROSOFT.TEXTJOIN(&quot;, &quot;;TRUE();[.AR8:.AV10]);&quot;}&quot;)" office:value-type="string" office:string-value="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" calcext:value-type="string">
            <text:p>"2": { "0": 9, "1": 3, "2": 3, "3": 1, "4": 8, "5": 7, "6": 4, "7": 5, "8": 2, "9": 6, "10": 12, "11": 11, "12": 13, "13": 10, "14": 14}</text:p>
          </table:table-cell>
          <table:table-cell table:number-columns-repeated="36"/>
        </table:table-row>
        <table:table-row table:style-name="ro2">
          <table:table-cell table:style-name="ce623"/>
          <table:table-cell table:style-name="ce882" office:value-type="string" calcext:value-type="string">
            <text:p>+</text:p>
          </table:table-cell>
          <table:table-cell table:style-name="ce882" table:number-columns-repeated="5"/>
          <table:table-cell table:style-name="ce882" office:value-type="string" calcext:value-type="string">
            <text:p>+</text:p>
          </table:table-cell>
          <table:table-cell table:style-name="ce882" table:number-columns-repeated="5"/>
          <table:table-cell table:style-name="ce882" office:value-type="string" calcext:value-type="string">
            <text:p>+</text:p>
          </table:table-cell>
          <table:table-cell table:style-name="ce882" table:number-columns-repeated="5"/>
          <table:table-cell table:style-name="ce882" office:value-type="string" calcext:value-type="string">
            <text:p>+</text:p>
          </table:table-cell>
          <table:table-cell table:style-name="ce882" table:number-columns-repeated="5"/>
          <table:table-cell table:style-name="ce882" office:value-type="string" calcext:value-type="string">
            <text:p>+</text:p>
          </table:table-cell>
          <table:table-cell table:style-name="ce882" table:number-columns-repeated="4"/>
          <table:table-cell table:style-name="ce860"/>
          <table:table-cell table:style-name="ce864" table:number-columns-repeated="27"/>
          <table:table-cell table:style-name="ce873" table:number-columns-repeated="2"/>
          <table:table-cell table:style-name="ce875" table:number-columns-repeated="2"/>
          <table:table-cell table:formula="of:=COM.MICROSOFT.CONCAT(&quot;&quot;&quot;3&quot;&quot;: { &quot;;COM.MICROSOFT.TEXTJOIN(&quot;, &quot;;TRUE();[.AX8:.BB10]);&quot;}&quot;)" office:value-type="string" office:string-value="&quot;3&quot;: { &quot;0&quot;: 3, &quot;1&quot;: 2, &quot;2&quot;: 1, &quot;3&quot;: 5, &quot;4&quot;: 8, &quot;5&quot;: 5, &quot;6&quot;: 4, &quot;7&quot;: 6, &quot;8&quot;: 7, &quot;9&quot;: 9, &quot;10&quot;: 13, &quot;11&quot;: 11, &quot;12&quot;: 10, &quot;13&quot;: 12, &quot;14&quot;: 14}" calcext:value-type="string">
            <text:p>"3": { "0": 3, "1": 2, "2": 1, "3": 5, "4": 8, "5": 5, "6": 4, "7": 6, "8": 7, "9": 9, "10": 13, "11": 11, "12": 10, "13": 12, "14": 14}</text:p>
          </table:table-cell>
          <table:table-cell table:number-columns-repeated="36"/>
        </table:table-row>
        <table:table-row table:style-name="ro1">
          <table:table-cell table:style-name="ce624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style-name="ce690"/>
          <table:table-cell office:value-type="float" office:value="14" calcext:value-type="float">
            <text:p>14</text:p>
          </table:table-cell>
          <table:table-cell table:style-name="ce845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690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ce852" office:value-type="float" office:value="13" calcext:value-type="float">
            <text:p>13</text:p>
          </table:table-cell>
          <table:table-cell table:style-name="ce690"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style-name="ce690"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865" table:formula="of:=COM.MICROSOFT.CONCAT(&quot;&quot;&quot;&quot;;[.$B$2]; &quot;&quot;&quot;: &quot;; [.B12])" office:value-type="string" office:string-value="&quot;0&quot;: 14" calcext:value-type="string">
            <text:p>"0": 14</text:p>
          </table:table-cell>
          <table:table-cell table:style-name="ce865" table:formula="of:=COM.MICROSOFT.CONCAT(&quot;&quot;&quot;&quot;;[.$C$2]; &quot;&quot;&quot;: &quot;; [.C12])" office:value-type="string" office:string-value="&quot;1&quot;: 9" calcext:value-type="string">
            <text:p>"1": 9</text:p>
          </table:table-cell>
          <table:table-cell table:style-name="ce865" table:formula="of:=COM.MICROSOFT.CONCAT(&quot;&quot;&quot;&quot;;[.$D$2]; &quot;&quot;&quot;: &quot;; [.D12])" office:value-type="string" office:string-value="&quot;2&quot;: 4" calcext:value-type="string">
            <text:p>"2": 4</text:p>
          </table:table-cell>
          <table:table-cell table:style-name="ce865" table:formula="of:=COM.MICROSOFT.CONCAT(&quot;&quot;&quot;&quot;;[.$E$2]; &quot;&quot;&quot;: &quot;; [.E12])" office:value-type="string" office:string-value="&quot;3&quot;: 6" calcext:value-type="string">
            <text:p>"3": 6</text:p>
          </table:table-cell>
          <table:table-cell table:style-name="ce865" table:formula="of:=COM.MICROSOFT.CONCAT(&quot;&quot;&quot;&quot;;[.$F$2]; &quot;&quot;&quot;: &quot;; [.F12])" office:value-type="string" office:string-value="&quot;4&quot;: 13" calcext:value-type="string">
            <text:p>"4": 13</text:p>
          </table:table-cell>
          <table:table-cell table:style-name="ce865"/>
          <table:table-cell table:style-name="ce865" table:formula="of:=COM.MICROSOFT.CONCAT(&quot;&quot;&quot;&quot;;[.$B$2]; &quot;&quot;&quot;: &quot;; [.H12])" office:value-type="string" office:string-value="&quot;0&quot;: 14" calcext:value-type="string">
            <text:p>"0": 14</text:p>
          </table:table-cell>
          <table:table-cell table:style-name="ce865" table:formula="of:=COM.MICROSOFT.CONCAT(&quot;&quot;&quot;&quot;;[.$C$2]; &quot;&quot;&quot;: &quot;; [.I12])" office:value-type="string" office:string-value="&quot;1&quot;: 8" calcext:value-type="string">
            <text:p>"1": 8</text:p>
          </table:table-cell>
          <table:table-cell table:style-name="ce865" table:formula="of:=COM.MICROSOFT.CONCAT(&quot;&quot;&quot;&quot;;[.$D$2]; &quot;&quot;&quot;: &quot;; [.J12])" office:value-type="string" office:string-value="&quot;2&quot;: 3" calcext:value-type="string">
            <text:p>"2": 3</text:p>
          </table:table-cell>
          <table:table-cell table:style-name="ce865" table:formula="of:=COM.MICROSOFT.CONCAT(&quot;&quot;&quot;&quot;;[.$E$2]; &quot;&quot;&quot;: &quot;; [.K12])" office:value-type="string" office:string-value="&quot;3&quot;: 5" calcext:value-type="string">
            <text:p>"3": 5</text:p>
          </table:table-cell>
          <table:table-cell table:style-name="ce865" table:formula="of:=COM.MICROSOFT.CONCAT(&quot;&quot;&quot;&quot;;[.$F$2]; &quot;&quot;&quot;: &quot;; [.L12])" office:value-type="string" office:string-value="&quot;4&quot;: 13" calcext:value-type="string">
            <text:p>"4": 13</text:p>
          </table:table-cell>
          <table:table-cell table:style-name="ce865"/>
          <table:table-cell table:style-name="ce865" table:formula="of:=COM.MICROSOFT.CONCAT(&quot;&quot;&quot;&quot;;[.$B$2]; &quot;&quot;&quot;: &quot;; [.N12])" office:value-type="string" office:string-value="&quot;0&quot;: 14" calcext:value-type="string">
            <text:p>"0": 14</text:p>
          </table:table-cell>
          <table:table-cell table:style-name="ce865" table:formula="of:=COM.MICROSOFT.CONCAT(&quot;&quot;&quot;&quot;;[.$C$2]; &quot;&quot;&quot;: &quot;; [.O12])" office:value-type="string" office:string-value="&quot;1&quot;: 5" calcext:value-type="string">
            <text:p>"1": 5</text:p>
          </table:table-cell>
          <table:table-cell table:style-name="ce865" table:formula="of:=COM.MICROSOFT.CONCAT(&quot;&quot;&quot;&quot;;[.$D$2]; &quot;&quot;&quot;: &quot;; [.P12])" office:value-type="string" office:string-value="&quot;2&quot;: 6" calcext:value-type="string">
            <text:p>"2": 6</text:p>
          </table:table-cell>
          <table:table-cell table:style-name="ce865" table:formula="of:=COM.MICROSOFT.CONCAT(&quot;&quot;&quot;&quot;;[.$E$2]; &quot;&quot;&quot;: &quot;; [.Q12])" office:value-type="string" office:string-value="&quot;3&quot;: 9" calcext:value-type="string">
            <text:p>"3": 9</text:p>
          </table:table-cell>
          <table:table-cell table:style-name="ce865" table:formula="of:=COM.MICROSOFT.CONCAT(&quot;&quot;&quot;&quot;;[.$F$2]; &quot;&quot;&quot;: &quot;; [.R12])" office:value-type="string" office:string-value="&quot;4&quot;: 13" calcext:value-type="string">
            <text:p>"4": 13</text:p>
          </table:table-cell>
          <table:table-cell table:style-name="ce865"/>
          <table:table-cell table:style-name="ce865" table:formula="of:=COM.MICROSOFT.CONCAT(&quot;&quot;&quot;&quot;;[.$B$2]; &quot;&quot;&quot;: &quot;; [.T12])" office:value-type="string" office:string-value="&quot;0&quot;: 12" calcext:value-type="string">
            <text:p>"0": 12</text:p>
          </table:table-cell>
          <table:table-cell table:style-name="ce865" table:formula="of:=COM.MICROSOFT.CONCAT(&quot;&quot;&quot;&quot;;[.$C$2]; &quot;&quot;&quot;: &quot;; [.U12])" office:value-type="string" office:string-value="&quot;1&quot;: 5" calcext:value-type="string">
            <text:p>"1": 5</text:p>
          </table:table-cell>
          <table:table-cell table:style-name="ce865" table:formula="of:=COM.MICROSOFT.CONCAT(&quot;&quot;&quot;&quot;;[.$D$2]; &quot;&quot;&quot;: &quot;; [.V12])" office:value-type="string" office:string-value="&quot;2&quot;: 3" calcext:value-type="string">
            <text:p>"2": 3</text:p>
          </table:table-cell>
          <table:table-cell table:style-name="ce865" table:formula="of:=COM.MICROSOFT.CONCAT(&quot;&quot;&quot;&quot;;[.$E$2]; &quot;&quot;&quot;: &quot;; [.W12])" office:value-type="string" office:string-value="&quot;3&quot;: 10" calcext:value-type="string">
            <text:p>"3": 10</text:p>
          </table:table-cell>
          <table:table-cell table:style-name="ce865" table:formula="of:=COM.MICROSOFT.CONCAT(&quot;&quot;&quot;&quot;;[.$F$2]; &quot;&quot;&quot;: &quot;; [.X12])" office:value-type="string" office:string-value="&quot;4&quot;: 14" calcext:value-type="string">
            <text:p>"4": 14</text:p>
          </table:table-cell>
          <table:table-cell table:style-name="ce865"/>
          <table:table-cell table:style-name="ce865" table:formula="of:=COM.MICROSOFT.CONCAT(&quot;&quot;&quot;&quot;;[.$B$2]; &quot;&quot;&quot;: &quot;; [.Z12])" office:value-type="string" office:string-value="&quot;0&quot;: 14" calcext:value-type="string">
            <text:p>"0": 14</text:p>
          </table:table-cell>
          <table:table-cell table:style-name="ce865" table:formula="of:=COM.MICROSOFT.CONCAT(&quot;&quot;&quot;&quot;;[.$C$2]; &quot;&quot;&quot;: &quot;; [.AA12])" office:value-type="string" office:string-value="&quot;1&quot;: 6" calcext:value-type="string">
            <text:p>"1": 6</text:p>
          </table:table-cell>
          <table:table-cell table:style-name="ce872" table:formula="of:=COM.MICROSOFT.CONCAT(&quot;&quot;&quot;&quot;;[.$D$2]; &quot;&quot;&quot;: &quot;; [.AB12])" office:value-type="string" office:string-value="&quot;2&quot;: 5" calcext:value-type="string">
            <text:p>"2": 5</text:p>
          </table:table-cell>
          <table:table-cell table:style-name="ce865" table:formula="of:=COM.MICROSOFT.CONCAT(&quot;&quot;&quot;&quot;;[.$E$2]; &quot;&quot;&quot;: &quot;; [.AC12])" office:value-type="string" office:string-value="&quot;3&quot;: 10" calcext:value-type="string">
            <text:p>"3": 10</text:p>
          </table:table-cell>
          <table:table-cell table:style-name="ce865" table:formula="of:=COM.MICROSOFT.CONCAT(&quot;&quot;&quot;&quot;;[.$F$2]; &quot;&quot;&quot;: &quot;; [.AD12])" office:value-type="string" office:string-value="&quot;4&quot;: 12" calcext:value-type="string">
            <text:p>"4": 12</text:p>
          </table:table-cell>
          <table:table-cell table:style-name="ce876" table:number-columns-repeated="2"/>
          <table:table-cell table:style-name="ce878" table:formula="of:=COM.MICROSOFT.CONCAT(&quot;&quot;&quot;4&quot;&quot;: { &quot;;COM.MICROSOFT.TEXTJOIN(&quot;, &quot;;TRUE();[.BD8:.BH10]);&quot;}&quot;)" office:value-type="string" office:string-value="&quot;4&quot;: { &quot;0&quot;: 6, &quot;1&quot;: 2, &quot;2&quot;: 1, &quot;3&quot;: 7, &quot;4&quot;: 13, &quot;5&quot;: 5, &quot;6&quot;: 4, &quot;7&quot;: 3, &quot;8&quot;: 9, &quot;9&quot;: 8, &quot;10&quot;: 12, &quot;11&quot;: 11, &quot;12&quot;: 10, &quot;13&quot;: 14, &quot;14&quot;: 13}" calcext:value-type="string">
            <text:p>"4": { "0": 6, "1": 2, "2": 1, "3": 7, "4": 13, "5": 5, "6": 4, "7": 3, "8": 9, "9": 8, "10": 12, "11": 11, "12": 10, "13": 14, "14": 13}</text:p>
          </table:table-cell>
          <table:table-cell table:number-columns-repeated="36"/>
        </table:table-row>
        <table:table-row table:style-name="ro1">
          <table:table-cell table:style-name="ce623"/>
          <table:table-cell table:style-name="ce880" table:formula="of:=[.$T$3]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690"/>
          <table:table-cell office:value-type="float" office:value="6" calcext:value-type="float">
            <text:p>6</text:p>
          </table:table-cell>
          <table:table-cell table:style-name="ce880" table:formula="of:=[.$U$3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690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880" table:formula="of:=[.$V$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52" office:value-type="float" office:value="10" calcext:value-type="float">
            <text:p>10</text:p>
          </table:table-cell>
          <table:table-cell table:style-name="ce690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0" table:formula="of:=[.$W$3]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690"/>
          <table:table-cell office:value-type="float" office:value="3" calcext:value-type="float">
            <text:p>3</text:p>
          </table:table-cell>
          <table:table-cell table:style-name="ce896" office:value-type="float" office:value="2" calcext:value-type="float">
            <text:p>2</text:p>
          </table:table-cell>
          <table:table-cell table:style-name="ce85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880" table:formula="of:=[.$X$3]" office:value-type="float" office:value="8" calcext:value-type="float">
            <text:p>8</text:p>
          </table:table-cell>
          <table:table-cell/>
          <table:table-cell table:style-name="ce865" table:formula="of:=COM.MICROSOFT.CONCAT(&quot;&quot;&quot;&quot;;[.$B$3]; &quot;&quot;&quot;: &quot;; [.B13])" office:value-type="string" office:string-value="&quot;5&quot;: 7" calcext:value-type="string">
            <text:p>"5": 7</text:p>
          </table:table-cell>
          <table:table-cell table:style-name="ce865" table:formula="of:=COM.MICROSOFT.CONCAT(&quot;&quot;&quot;&quot;;[.$C$3]; &quot;&quot;&quot;: &quot;; [.C13])" office:value-type="string" office:string-value="&quot;6&quot;: 1" calcext:value-type="string">
            <text:p>"6": 1</text:p>
          </table:table-cell>
          <table:table-cell table:style-name="ce865" table:formula="of:=COM.MICROSOFT.CONCAT(&quot;&quot;&quot;&quot;;[.$D$3]; &quot;&quot;&quot;: &quot;; [.D13])" office:value-type="string" office:string-value="&quot;7&quot;: 2" calcext:value-type="string">
            <text:p>"7": 2</text:p>
          </table:table-cell>
          <table:table-cell table:style-name="ce865" table:formula="of:=COM.MICROSOFT.CONCAT(&quot;&quot;&quot;&quot;;[.$E$3]; &quot;&quot;&quot;: &quot;; [.E13])" office:value-type="string" office:string-value="&quot;8&quot;: 3" calcext:value-type="string">
            <text:p>"8": 3</text:p>
          </table:table-cell>
          <table:table-cell table:style-name="ce865" table:formula="of:=COM.MICROSOFT.CONCAT(&quot;&quot;&quot;&quot;;[.$F$3]; &quot;&quot;&quot;: &quot;; [.F13])" office:value-type="string" office:string-value="&quot;9&quot;: 8" calcext:value-type="string">
            <text:p>"9": 8</text:p>
          </table:table-cell>
          <table:table-cell table:style-name="ce865"/>
          <table:table-cell table:style-name="ce865" table:formula="of:=COM.MICROSOFT.CONCAT(&quot;&quot;&quot;&quot;;[.$B$3]; &quot;&quot;&quot;: &quot;; [.H13])" office:value-type="string" office:string-value="&quot;5&quot;: 6" calcext:value-type="string">
            <text:p>"5": 6</text:p>
          </table:table-cell>
          <table:table-cell table:style-name="ce865" table:formula="of:=COM.MICROSOFT.CONCAT(&quot;&quot;&quot;&quot;;[.$C$3]; &quot;&quot;&quot;: &quot;; [.I13])" office:value-type="string" office:string-value="&quot;6&quot;: 2" calcext:value-type="string">
            <text:p>"6": 2</text:p>
          </table:table-cell>
          <table:table-cell table:style-name="ce865" table:formula="of:=COM.MICROSOFT.CONCAT(&quot;&quot;&quot;&quot;;[.$D$3]; &quot;&quot;&quot;: &quot;; [.J13])" office:value-type="string" office:string-value="&quot;7&quot;: 1" calcext:value-type="string">
            <text:p>"7": 1</text:p>
          </table:table-cell>
          <table:table-cell table:style-name="ce865" table:formula="of:=COM.MICROSOFT.CONCAT(&quot;&quot;&quot;&quot;;[.$E$3]; &quot;&quot;&quot;: &quot;; [.K13])" office:value-type="string" office:string-value="&quot;8&quot;: 2" calcext:value-type="string">
            <text:p>"8": 2</text:p>
          </table:table-cell>
          <table:table-cell table:style-name="ce865" table:formula="of:=COM.MICROSOFT.CONCAT(&quot;&quot;&quot;&quot;;[.$F$3]; &quot;&quot;&quot;: &quot;; [.L13])" office:value-type="string" office:string-value="&quot;9&quot;: 7" calcext:value-type="string">
            <text:p>"9": 7</text:p>
          </table:table-cell>
          <table:table-cell table:style-name="ce865"/>
          <table:table-cell table:style-name="ce865" table:formula="of:=COM.MICROSOFT.CONCAT(&quot;&quot;&quot;&quot;;[.$B$3]; &quot;&quot;&quot;: &quot;; [.N13])" office:value-type="string" office:string-value="&quot;5&quot;: 4" calcext:value-type="string">
            <text:p>"5": 4</text:p>
          </table:table-cell>
          <table:table-cell table:style-name="ce865" table:formula="of:=COM.MICROSOFT.CONCAT(&quot;&quot;&quot;&quot;;[.$C$3]; &quot;&quot;&quot;: &quot;; [.O13])" office:value-type="string" office:string-value="&quot;6&quot;: 2" calcext:value-type="string">
            <text:p>"6": 2</text:p>
          </table:table-cell>
          <table:table-cell table:style-name="ce865" table:formula="of:=COM.MICROSOFT.CONCAT(&quot;&quot;&quot;&quot;;[.$D$3]; &quot;&quot;&quot;: &quot;; [.P13])" office:value-type="string" office:string-value="&quot;7&quot;: 0" calcext:value-type="string">
            <text:p>"7": 0</text:p>
          </table:table-cell>
          <table:table-cell table:style-name="ce865" table:formula="of:=COM.MICROSOFT.CONCAT(&quot;&quot;&quot;&quot;;[.$E$3]; &quot;&quot;&quot;: &quot;; [.Q13])" office:value-type="string" office:string-value="&quot;8&quot;: 1" calcext:value-type="string">
            <text:p>"8": 1</text:p>
          </table:table-cell>
          <table:table-cell table:style-name="ce865" table:formula="of:=COM.MICROSOFT.CONCAT(&quot;&quot;&quot;&quot;;[.$F$3]; &quot;&quot;&quot;: &quot;; [.R13])" office:value-type="string" office:string-value="&quot;9&quot;: 10" calcext:value-type="string">
            <text:p>"9": 10</text:p>
          </table:table-cell>
          <table:table-cell table:style-name="ce865"/>
          <table:table-cell table:style-name="ce865" table:formula="of:=COM.MICROSOFT.CONCAT(&quot;&quot;&quot;&quot;;[.$B$3]; &quot;&quot;&quot;: &quot;; [.T13])" office:value-type="string" office:string-value="&quot;5&quot;: 4" calcext:value-type="string">
            <text:p>"5": 4</text:p>
          </table:table-cell>
          <table:table-cell table:style-name="ce865" table:formula="of:=COM.MICROSOFT.CONCAT(&quot;&quot;&quot;&quot;;[.$C$3]; &quot;&quot;&quot;: &quot;; [.U13])" office:value-type="string" office:string-value="&quot;6&quot;: 2" calcext:value-type="string">
            <text:p>"6": 2</text:p>
          </table:table-cell>
          <table:table-cell table:style-name="ce865" table:formula="of:=COM.MICROSOFT.CONCAT(&quot;&quot;&quot;&quot;;[.$D$3]; &quot;&quot;&quot;: &quot;; [.V13])" office:value-type="string" office:string-value="&quot;7&quot;: 1" calcext:value-type="string">
            <text:p>"7": 1</text:p>
          </table:table-cell>
          <table:table-cell table:style-name="ce865" table:formula="of:=COM.MICROSOFT.CONCAT(&quot;&quot;&quot;&quot;;[.$E$3]; &quot;&quot;&quot;: &quot;; [.W13])" office:value-type="string" office:string-value="&quot;8&quot;: 1" calcext:value-type="string">
            <text:p>"8": 1</text:p>
          </table:table-cell>
          <table:table-cell table:style-name="ce865" table:formula="of:=COM.MICROSOFT.CONCAT(&quot;&quot;&quot;&quot;;[.$F$3]; &quot;&quot;&quot;: &quot;; [.X13])" office:value-type="string" office:string-value="&quot;9&quot;: 11" calcext:value-type="string">
            <text:p>"9": 11</text:p>
          </table:table-cell>
          <table:table-cell table:style-name="ce865"/>
          <table:table-cell table:style-name="ce865" table:formula="of:=COM.MICROSOFT.CONCAT(&quot;&quot;&quot;&quot;;[.$B$3]; &quot;&quot;&quot;: &quot;; [.Z13])" office:value-type="string" office:string-value="&quot;5&quot;: 3" calcext:value-type="string">
            <text:p>"5": 3</text:p>
          </table:table-cell>
          <table:table-cell table:style-name="ce865" table:formula="of:=COM.MICROSOFT.CONCAT(&quot;&quot;&quot;&quot;;[.$C$3]; &quot;&quot;&quot;: &quot;; [.AA13])" office:value-type="string" office:string-value="&quot;6&quot;: 2" calcext:value-type="string">
            <text:p>"6": 2</text:p>
          </table:table-cell>
          <table:table-cell table:style-name="ce865" table:formula="of:=COM.MICROSOFT.CONCAT(&quot;&quot;&quot;&quot;;[.$D$3]; &quot;&quot;&quot;: &quot;; [.AB13])" office:value-type="string" office:string-value="&quot;7&quot;: 1" calcext:value-type="string">
            <text:p>"7": 1</text:p>
          </table:table-cell>
          <table:table-cell table:style-name="ce865" table:formula="of:=COM.MICROSOFT.CONCAT(&quot;&quot;&quot;&quot;;[.$E$3]; &quot;&quot;&quot;: &quot;; [.AC13])" office:value-type="string" office:string-value="&quot;8&quot;: 4" calcext:value-type="string">
            <text:p>"8": 4</text:p>
          </table:table-cell>
          <table:table-cell table:style-name="ce865" table:formula="of:=COM.MICROSOFT.CONCAT(&quot;&quot;&quot;&quot;;[.$F$3]; &quot;&quot;&quot;: &quot;; [.AD13])" office:value-type="string" office:string-value="&quot;9&quot;: 8" calcext:value-type="string">
            <text:p>"9": 8</text:p>
          </table:table-cell>
          <table:table-cell table:style-name="ce875" table:number-columns-repeated="2"/>
          <table:table-cell table:style-name="ce864"/>
          <table:table-cell table:number-columns-repeated="36"/>
        </table:table-row>
        <table:table-row table:style-name="ro1">
          <table:table-cell table:style-name="ce623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690"/>
          <table:table-cell office:value-type="float" office:value="11" calcext:value-type="float">
            <text:p>11</text:p>
          </table:table-cell>
          <table:table-cell table:style-name="ce845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690"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852" office:value-type="float" office:value="12" calcext:value-type="float">
            <text:p>12</text:p>
          </table:table-cell>
          <table:table-cell table:style-name="ce690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style-name="ce690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865" table:formula="of:=COM.MICROSOFT.CONCAT(&quot;&quot;&quot;&quot;;[.$B$4]; &quot;&quot;&quot;: &quot;; [.B14])" office:value-type="string" office:string-value="&quot;10&quot;: 12" calcext:value-type="string">
            <text:p>"10": 12</text:p>
          </table:table-cell>
          <table:table-cell table:style-name="ce865" table:formula="of:=COM.MICROSOFT.CONCAT(&quot;&quot;&quot;&quot;;[.$C$4]; &quot;&quot;&quot;: &quot;; [.C14])" office:value-type="string" office:string-value="&quot;11&quot;: 10" calcext:value-type="string">
            <text:p>"11": 10</text:p>
          </table:table-cell>
          <table:table-cell table:style-name="ce865" table:formula="of:=COM.MICROSOFT.CONCAT(&quot;&quot;&quot;&quot;;[.$D$4]; &quot;&quot;&quot;: &quot;; [.D14])" office:value-type="string" office:string-value="&quot;12&quot;: 7" calcext:value-type="string">
            <text:p>"12": 7</text:p>
          </table:table-cell>
          <table:table-cell table:style-name="ce865" table:formula="of:=COM.MICROSOFT.CONCAT(&quot;&quot;&quot;&quot;;[.$E$4]; &quot;&quot;&quot;: &quot;; [.E14])" office:value-type="string" office:string-value="&quot;13&quot;: 5" calcext:value-type="string">
            <text:p>"13": 5</text:p>
          </table:table-cell>
          <table:table-cell table:style-name="ce865" table:formula="of:=COM.MICROSOFT.CONCAT(&quot;&quot;&quot;&quot;;[.$F$4]; &quot;&quot;&quot;: &quot;; [.F14])" office:value-type="string" office:string-value="&quot;14&quot;: 11" calcext:value-type="string">
            <text:p>"14": 11</text:p>
          </table:table-cell>
          <table:table-cell table:style-name="ce865"/>
          <table:table-cell table:style-name="ce865" table:formula="of:=COM.MICROSOFT.CONCAT(&quot;&quot;&quot;&quot;;[.$B$4]; &quot;&quot;&quot;: &quot;; [.H14])" office:value-type="string" office:string-value="&quot;10&quot;: 11" calcext:value-type="string">
            <text:p>"10": 11</text:p>
          </table:table-cell>
          <table:table-cell table:style-name="ce865" table:formula="of:=COM.MICROSOFT.CONCAT(&quot;&quot;&quot;&quot;;[.$C$4]; &quot;&quot;&quot;: &quot;; [.I14])" office:value-type="string" office:string-value="&quot;11&quot;: 9" calcext:value-type="string">
            <text:p>"11": 9</text:p>
          </table:table-cell>
          <table:table-cell table:style-name="ce865" table:formula="of:=COM.MICROSOFT.CONCAT(&quot;&quot;&quot;&quot;;[.$D$4]; &quot;&quot;&quot;: &quot;; [.J14])" office:value-type="string" office:string-value="&quot;12&quot;: 10" calcext:value-type="string">
            <text:p>"12": 10</text:p>
          </table:table-cell>
          <table:table-cell table:style-name="ce865" table:formula="of:=COM.MICROSOFT.CONCAT(&quot;&quot;&quot;&quot;;[.$E$4]; &quot;&quot;&quot;: &quot;; [.K14])" office:value-type="string" office:string-value="&quot;13&quot;: 4" calcext:value-type="string">
            <text:p>"13": 4</text:p>
          </table:table-cell>
          <table:table-cell table:style-name="ce865" table:formula="of:=COM.MICROSOFT.CONCAT(&quot;&quot;&quot;&quot;;[.$F$4]; &quot;&quot;&quot;: &quot;; [.L14])" office:value-type="string" office:string-value="&quot;14&quot;: 12" calcext:value-type="string">
            <text:p>"14": 12</text:p>
          </table:table-cell>
          <table:table-cell table:style-name="ce865"/>
          <table:table-cell table:style-name="ce865" table:formula="of:=COM.MICROSOFT.CONCAT(&quot;&quot;&quot;&quot;;[.$B$4]; &quot;&quot;&quot;: &quot;; [.N14])" office:value-type="string" office:string-value="&quot;10&quot;: 11" calcext:value-type="string">
            <text:p>"10": 11</text:p>
          </table:table-cell>
          <table:table-cell table:style-name="ce865" table:formula="of:=COM.MICROSOFT.CONCAT(&quot;&quot;&quot;&quot;;[.$C$4]; &quot;&quot;&quot;: &quot;; [.O14])" office:value-type="string" office:string-value="&quot;11&quot;: 7" calcext:value-type="string">
            <text:p>"11": 7</text:p>
          </table:table-cell>
          <table:table-cell table:style-name="ce865" table:formula="of:=COM.MICROSOFT.CONCAT(&quot;&quot;&quot;&quot;;[.$D$4]; &quot;&quot;&quot;: &quot;; [.P14])" office:value-type="string" office:string-value="&quot;12&quot;: 8" calcext:value-type="string">
            <text:p>"12": 8</text:p>
          </table:table-cell>
          <table:table-cell table:style-name="ce865" table:formula="of:=COM.MICROSOFT.CONCAT(&quot;&quot;&quot;&quot;;[.$E$4]; &quot;&quot;&quot;: &quot;; [.Q14])" office:value-type="string" office:string-value="&quot;13&quot;: 3" calcext:value-type="string">
            <text:p>"13": 3</text:p>
          </table:table-cell>
          <table:table-cell table:style-name="ce865" table:formula="of:=COM.MICROSOFT.CONCAT(&quot;&quot;&quot;&quot;;[.$F$4]; &quot;&quot;&quot;: &quot;; [.R14])" office:value-type="string" office:string-value="&quot;14&quot;: 12" calcext:value-type="string">
            <text:p>"14": 12</text:p>
          </table:table-cell>
          <table:table-cell table:style-name="ce865"/>
          <table:table-cell table:style-name="ce865" table:formula="of:=COM.MICROSOFT.CONCAT(&quot;&quot;&quot;&quot;;[.$B$4]; &quot;&quot;&quot;: &quot;; [.T14])" office:value-type="string" office:string-value="&quot;10&quot;: 8" calcext:value-type="string">
            <text:p>"10": 8</text:p>
          </table:table-cell>
          <table:table-cell table:style-name="ce865" table:formula="of:=COM.MICROSOFT.CONCAT(&quot;&quot;&quot;&quot;;[.$C$4]; &quot;&quot;&quot;: &quot;; [.U14])" office:value-type="string" office:string-value="&quot;11&quot;: 6" calcext:value-type="string">
            <text:p>"11": 6</text:p>
          </table:table-cell>
          <table:table-cell table:style-name="ce865" table:formula="of:=COM.MICROSOFT.CONCAT(&quot;&quot;&quot;&quot;;[.$D$4]; &quot;&quot;&quot;: &quot;; [.V14])" office:value-type="string" office:string-value="&quot;12&quot;: 7" calcext:value-type="string">
            <text:p>"12": 7</text:p>
          </table:table-cell>
          <table:table-cell table:style-name="ce865" table:formula="of:=COM.MICROSOFT.CONCAT(&quot;&quot;&quot;&quot;;[.$E$4]; &quot;&quot;&quot;: &quot;; [.W14])" office:value-type="string" office:string-value="&quot;13&quot;: 9" calcext:value-type="string">
            <text:p>"13": 9</text:p>
          </table:table-cell>
          <table:table-cell table:style-name="ce865" table:formula="of:=COM.MICROSOFT.CONCAT(&quot;&quot;&quot;&quot;;[.$F$4]; &quot;&quot;&quot;: &quot;; [.X14])" office:value-type="string" office:string-value="&quot;14&quot;: 13" calcext:value-type="string">
            <text:p>"14": 13</text:p>
          </table:table-cell>
          <table:table-cell table:style-name="ce865"/>
          <table:table-cell table:style-name="ce865" table:formula="of:=COM.MICROSOFT.CONCAT(&quot;&quot;&quot;&quot;;[.$B$4]; &quot;&quot;&quot;: &quot;; [.Z14])" office:value-type="string" office:string-value="&quot;10&quot;: 13" calcext:value-type="string">
            <text:p>"10": 13</text:p>
          </table:table-cell>
          <table:table-cell table:style-name="ce865" table:formula="of:=COM.MICROSOFT.CONCAT(&quot;&quot;&quot;&quot;;[.$C$4]; &quot;&quot;&quot;: &quot;; [.AA14])" office:value-type="string" office:string-value="&quot;11&quot;: 7" calcext:value-type="string">
            <text:p>"11": 7</text:p>
          </table:table-cell>
          <table:table-cell table:style-name="ce865" table:formula="of:=COM.MICROSOFT.CONCAT(&quot;&quot;&quot;&quot;;[.$D$4]; &quot;&quot;&quot;: &quot;; [.AB14])" office:value-type="string" office:string-value="&quot;12&quot;: 8" calcext:value-type="string">
            <text:p>"12": 8</text:p>
          </table:table-cell>
          <table:table-cell table:style-name="ce865" table:formula="of:=COM.MICROSOFT.CONCAT(&quot;&quot;&quot;&quot;;[.$E$4]; &quot;&quot;&quot;: &quot;; [.AC14])" office:value-type="string" office:string-value="&quot;13&quot;: 9" calcext:value-type="string">
            <text:p>"13": 9</text:p>
          </table:table-cell>
          <table:table-cell table:style-name="ce865" table:formula="of:=COM.MICROSOFT.CONCAT(&quot;&quot;&quot;&quot;;[.$F$4]; &quot;&quot;&quot;: &quot;; [.AD14])" office:value-type="string" office:string-value="&quot;14&quot;: 11" calcext:value-type="string">
            <text:p>"14": 11</text:p>
          </table:table-cell>
          <table:table-cell table:style-name="ce875" table:number-columns-repeated="2"/>
          <table:table-cell table:style-name="ce864" table:formula="of:=COM.MICROSOFT.TEXTJOIN(&quot;, &quot;;TRUE();[.BK8:.BK12]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6, &quot;2&quot;: 1, &quot;3&quot;: 3, &quot;4&quot;: 6, &quot;5&quot;: 7, &quot;6&quot;: 8, &quot;7&quot;: 4, &quot;8&quot;: 2, &quot;9&quot;: 5, &quot;10&quot;: 13, &quot;11&quot;: 14, &quot;12&quot;: 12, &quot;13&quot;: 10, &quot;14&quot;: 11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5, &quot;4&quot;: 8, &quot;5&quot;: 5, &quot;6&quot;: 4, &quot;7&quot;: 6, &quot;8&quot;: 7, &quot;9&quot;: 9, &quot;10&quot;: 13, &quot;11&quot;: 11, &quot;12&quot;: 10, &quot;13&quot;: 12, &quot;14&quot;: 14}, &quot;4&quot;: { &quot;0&quot;: 6, &quot;1&quot;: 2, &quot;2&quot;: 1, &quot;3&quot;: 7, &quot;4&quot;: 13, &quot;5&quot;: 5, &quot;6&quot;: 4, &quot;7&quot;: 3, &quot;8&quot;: 9, &quot;9&quot;: 8, &quot;10&quot;: 12, &quot;11&quot;: 11, &quot;12&quot;: 10, &quot;13&quot;: 14, &quot;14&quot;: 13}" calcext:value-type="string">
            <text:p>"0": { "0": 14, "1": 1, "2": 2, "3": 3, "4": 5, "5": 9, "6": 8, "7": 7, "8": 4, "9": 6, "10": 12, "11": 14, "12": 13, "13": 10, "14": 11}, "1": { "0": 9, "1": 6, "2": 1, "3": 3, "4": 6, "5": 7, "6": 8, "7": 4, "8": 2, "9": 5, "10": 13, "11": 14, "12": 12, "13": 10, "14": 11}, "2": { "0": 9, "1": 3, "2": 3, "3": 1, "4": 8, "5": 7, "6": 4, "7": 5, "8": 2, "9": 6, "10": 12, "11": 11, "12": 13, "13": 10, "14": 14}, "3": { "0": 3, "1": 2, "2": 1, "3": 5, "4": 8, "5": 5, "6": 4, "7": 6, "8": 7, "9": 9, "10": 13, "11": 11, "12": 10, "13": 12, "14": 14}, "4": { "0": 6, "1": 2, "2": 1, "3": 7, "4": 13, "5": 5, "6": 4, "7": 3, "8": 9, "9": 8, "10": 12, "11": 11, "12": 10, "13": 14, "14": 13}</text:p>
          </table:table-cell>
          <table:table-cell table:number-columns-repeated="36"/>
        </table:table-row>
        <table:table-row table:style-name="ro2">
          <table:table-cell table:style-name="ce623"/>
          <table:table-cell table:style-name="ce882" office:value-type="string" calcext:value-type="string">
            <text:p>+</text:p>
          </table:table-cell>
          <table:table-cell table:style-name="ce882" table:number-columns-repeated="5"/>
          <table:table-cell table:style-name="ce882" office:value-type="string" calcext:value-type="string">
            <text:p>+</text:p>
          </table:table-cell>
          <table:table-cell table:style-name="ce882" table:number-columns-repeated="5"/>
          <table:table-cell table:style-name="ce882" office:value-type="string" calcext:value-type="string">
            <text:p>+</text:p>
          </table:table-cell>
          <table:table-cell table:style-name="ce882" table:number-columns-repeated="5"/>
          <table:table-cell table:style-name="ce882" office:value-type="string" calcext:value-type="string">
            <text:p>+</text:p>
          </table:table-cell>
          <table:table-cell table:style-name="ce882" table:number-columns-repeated="5"/>
          <table:table-cell table:style-name="ce882" office:value-type="string" calcext:value-type="string">
            <text:p>+</text:p>
          </table:table-cell>
          <table:table-cell table:style-name="ce882" table:number-columns-repeated="4"/>
          <table:table-cell/>
          <table:table-cell table:style-name="ce864" table:number-columns-repeated="29"/>
          <table:table-cell table:style-name="ce875" table:number-columns-repeated="2"/>
          <table:table-cell table:style-name="ce864"/>
          <table:table-cell table:number-columns-repeated="36"/>
        </table:table-row>
        <table:table-row table:style-name="ro1">
          <table:table-cell table:style-name="ce623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690"/>
          <table:table-cell office:value-type="float" office:value="14" calcext:value-type="float">
            <text:p>14</text:p>
          </table:table-cell>
          <table:table-cell table:style-name="ce845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style-name="ce690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852" office:value-type="float" office:value="12" calcext:value-type="float">
            <text:p>12</text:p>
          </table:table-cell>
          <table:table-cell table:style-name="ce690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style-name="ce690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style-name="ce623"/>
          <table:table-cell table:style-name="ce866" table:formula="of:=COM.MICROSOFT.CONCAT(&quot;&quot;&quot;&quot;;[.$B$2]; &quot;&quot;&quot;: &quot;; [.B16])" office:value-type="string" office:string-value="&quot;0&quot;: 14" calcext:value-type="string">
            <text:p>"0": 14</text:p>
          </table:table-cell>
          <table:table-cell table:style-name="ce866" table:formula="of:=COM.MICROSOFT.CONCAT(&quot;&quot;&quot;&quot;;[.$C$2]; &quot;&quot;&quot;: &quot;; [.C16])" office:value-type="string" office:string-value="&quot;1&quot;: 13" calcext:value-type="string">
            <text:p>"1": 13</text:p>
          </table:table-cell>
          <table:table-cell table:style-name="ce866" table:formula="of:=COM.MICROSOFT.CONCAT(&quot;&quot;&quot;&quot;;[.$D$2]; &quot;&quot;&quot;: &quot;; [.D16])" office:value-type="string" office:string-value="&quot;2&quot;: 10" calcext:value-type="string">
            <text:p>"2": 10</text:p>
          </table:table-cell>
          <table:table-cell table:style-name="ce866" table:formula="of:=COM.MICROSOFT.CONCAT(&quot;&quot;&quot;&quot;;[.$E$2]; &quot;&quot;&quot;: &quot;; [.E16])" office:value-type="string" office:string-value="&quot;3&quot;: 11" calcext:value-type="string">
            <text:p>"3": 11</text:p>
          </table:table-cell>
          <table:table-cell table:style-name="ce866" table:formula="of:=COM.MICROSOFT.CONCAT(&quot;&quot;&quot;&quot;;[.$F$2]; &quot;&quot;&quot;: &quot;; [.F16])" office:value-type="string" office:string-value="&quot;4&quot;: 12" calcext:value-type="string">
            <text:p>"4": 12</text:p>
          </table:table-cell>
          <table:table-cell table:style-name="ce866"/>
          <table:table-cell table:style-name="ce866" table:formula="of:=COM.MICROSOFT.CONCAT(&quot;&quot;&quot;&quot;;[.$B$2]; &quot;&quot;&quot;: &quot;; [.H16])" office:value-type="string" office:string-value="&quot;0&quot;: 14" calcext:value-type="string">
            <text:p>"0": 14</text:p>
          </table:table-cell>
          <table:table-cell table:style-name="ce866" table:formula="of:=COM.MICROSOFT.CONCAT(&quot;&quot;&quot;&quot;;[.$C$2]; &quot;&quot;&quot;: &quot;; [.I16])" office:value-type="string" office:string-value="&quot;1&quot;: 13" calcext:value-type="string">
            <text:p>"1": 13</text:p>
          </table:table-cell>
          <table:table-cell table:style-name="ce866" table:formula="of:=COM.MICROSOFT.CONCAT(&quot;&quot;&quot;&quot;;[.$D$2]; &quot;&quot;&quot;: &quot;; [.J16])" office:value-type="string" office:string-value="&quot;2&quot;: 7" calcext:value-type="string">
            <text:p>"2": 7</text:p>
          </table:table-cell>
          <table:table-cell table:style-name="ce866" table:formula="of:=COM.MICROSOFT.CONCAT(&quot;&quot;&quot;&quot;;[.$E$2]; &quot;&quot;&quot;: &quot;; [.K16])" office:value-type="string" office:string-value="&quot;3&quot;: 8" calcext:value-type="string">
            <text:p>"3": 8</text:p>
          </table:table-cell>
          <table:table-cell table:style-name="ce866" table:formula="of:=COM.MICROSOFT.CONCAT(&quot;&quot;&quot;&quot;;[.$F$2]; &quot;&quot;&quot;: &quot;; [.L16])" office:value-type="string" office:string-value="&quot;4&quot;: 12" calcext:value-type="string">
            <text:p>"4": 12</text:p>
          </table:table-cell>
          <table:table-cell table:style-name="ce866"/>
          <table:table-cell table:style-name="ce866" table:formula="of:=COM.MICROSOFT.CONCAT(&quot;&quot;&quot;&quot;;[.$B$2]; &quot;&quot;&quot;: &quot;; [.N16])" office:value-type="string" office:string-value="&quot;0&quot;: 14" calcext:value-type="string">
            <text:p>"0": 14</text:p>
          </table:table-cell>
          <table:table-cell table:style-name="ce866" table:formula="of:=COM.MICROSOFT.CONCAT(&quot;&quot;&quot;&quot;;[.$C$2]; &quot;&quot;&quot;: &quot;; [.O16])" office:value-type="string" office:string-value="&quot;1&quot;: 13" calcext:value-type="string">
            <text:p>"1": 13</text:p>
          </table:table-cell>
          <table:table-cell table:style-name="ce866" table:formula="of:=COM.MICROSOFT.CONCAT(&quot;&quot;&quot;&quot;;[.$D$2]; &quot;&quot;&quot;: &quot;; [.P16])" office:value-type="string" office:string-value="&quot;2&quot;: 10" calcext:value-type="string">
            <text:p>"2": 10</text:p>
          </table:table-cell>
          <table:table-cell table:style-name="ce866" table:formula="of:=COM.MICROSOFT.CONCAT(&quot;&quot;&quot;&quot;;[.$E$2]; &quot;&quot;&quot;: &quot;; [.Q16])" office:value-type="string" office:string-value="&quot;3&quot;: 9" calcext:value-type="string">
            <text:p>"3": 9</text:p>
          </table:table-cell>
          <table:table-cell table:style-name="ce866" table:formula="of:=COM.MICROSOFT.CONCAT(&quot;&quot;&quot;&quot;;[.$F$2]; &quot;&quot;&quot;: &quot;; [.R16])" office:value-type="string" office:string-value="&quot;4&quot;: 12" calcext:value-type="string">
            <text:p>"4": 12</text:p>
          </table:table-cell>
          <table:table-cell table:style-name="ce866"/>
          <table:table-cell table:style-name="ce866" table:formula="of:=COM.MICROSOFT.CONCAT(&quot;&quot;&quot;&quot;;[.$B$2]; &quot;&quot;&quot;: &quot;; [.T16])" office:value-type="string" office:string-value="&quot;0&quot;: 13" calcext:value-type="string">
            <text:p>"0": 13</text:p>
          </table:table-cell>
          <table:table-cell table:style-name="ce866" table:formula="of:=COM.MICROSOFT.CONCAT(&quot;&quot;&quot;&quot;;[.$C$2]; &quot;&quot;&quot;: &quot;; [.U16])" office:value-type="string" office:string-value="&quot;1&quot;: 12" calcext:value-type="string">
            <text:p>"1": 12</text:p>
          </table:table-cell>
          <table:table-cell table:style-name="ce866" table:formula="of:=COM.MICROSOFT.CONCAT(&quot;&quot;&quot;&quot;;[.$D$2]; &quot;&quot;&quot;: &quot;; [.V16])" office:value-type="string" office:string-value="&quot;2&quot;: 8" calcext:value-type="string">
            <text:p>"2": 8</text:p>
          </table:table-cell>
          <table:table-cell table:style-name="ce866" table:formula="of:=COM.MICROSOFT.CONCAT(&quot;&quot;&quot;&quot;;[.$E$2]; &quot;&quot;&quot;: &quot;; [.W16])" office:value-type="string" office:string-value="&quot;3&quot;: 11" calcext:value-type="string">
            <text:p>"3": 11</text:p>
          </table:table-cell>
          <table:table-cell table:style-name="ce866" table:formula="of:=COM.MICROSOFT.CONCAT(&quot;&quot;&quot;&quot;;[.$F$2]; &quot;&quot;&quot;: &quot;; [.X16])" office:value-type="string" office:string-value="&quot;4&quot;: 14" calcext:value-type="string">
            <text:p>"4": 14</text:p>
          </table:table-cell>
          <table:table-cell table:style-name="ce866"/>
          <table:table-cell table:style-name="ce866" table:formula="of:=COM.MICROSOFT.CONCAT(&quot;&quot;&quot;&quot;;[.$B$2]; &quot;&quot;&quot;: &quot;; [.Z16])" office:value-type="string" office:string-value="&quot;0&quot;: 14" calcext:value-type="string">
            <text:p>"0": 14</text:p>
          </table:table-cell>
          <table:table-cell table:style-name="ce866" table:formula="of:=COM.MICROSOFT.CONCAT(&quot;&quot;&quot;&quot;;[.$C$2]; &quot;&quot;&quot;: &quot;; [.AA16])" office:value-type="string" office:string-value="&quot;1&quot;: 13" calcext:value-type="string">
            <text:p>"1": 13</text:p>
          </table:table-cell>
          <table:table-cell table:style-name="ce866" table:formula="of:=COM.MICROSOFT.CONCAT(&quot;&quot;&quot;&quot;;[.$D$2]; &quot;&quot;&quot;: &quot;; [.AB16])" office:value-type="string" office:string-value="&quot;2&quot;: 10" calcext:value-type="string">
            <text:p>"2": 10</text:p>
          </table:table-cell>
          <table:table-cell table:style-name="ce866" table:formula="of:=COM.MICROSOFT.CONCAT(&quot;&quot;&quot;&quot;;[.$E$2]; &quot;&quot;&quot;: &quot;; [.AC16])" office:value-type="string" office:string-value="&quot;3&quot;: 12" calcext:value-type="string">
            <text:p>"3": 12</text:p>
          </table:table-cell>
          <table:table-cell table:style-name="ce866" table:formula="of:=COM.MICROSOFT.CONCAT(&quot;&quot;&quot;&quot;;[.$F$2]; &quot;&quot;&quot;: &quot;; [.AD16])" office:value-type="string" office:string-value="&quot;4&quot;: 11" calcext:value-type="string">
            <text:p>"4": 11</text:p>
          </table:table-cell>
          <table:table-cell table:style-name="ce875" table:number-columns-repeated="2"/>
          <table:table-cell table:formula="of:=COM.MICROSOFT.CONCAT(&quot;&quot;&quot;5&quot;&quot;: { &quot;;COM.MICROSOFT.TEXTJOIN(&quot;, &quot;;TRUE();[.AF12:.AJ14]);&quot;}&quot;)" office:value-type="string" office:string-value="&quot;5&quot;: { &quot;0&quot;: 14, &quot;1&quot;: 9, &quot;2&quot;: 4, &quot;3&quot;: 6, &quot;4&quot;: 13, &quot;5&quot;: 7, &quot;6&quot;: 1, &quot;7&quot;: 2, &quot;8&quot;: 3, &quot;9&quot;: 8, &quot;10&quot;: 12, &quot;11&quot;: 10, &quot;12&quot;: 7, &quot;13&quot;: 5, &quot;14&quot;: 11}" calcext:value-type="string">
            <text:p>"5": { "0": 14, "1": 9, "2": 4, "3": 6, "4": 13, "5": 7, "6": 1, "7": 2, "8": 3, "9": 8, "10": 12, "11": 10, "12": 7, "13": 5, "14": 11}</text:p>
          </table:table-cell>
          <table:table-cell table:number-columns-repeated="36"/>
        </table:table-row>
        <table:table-row table:style-name="ro1">
          <table:table-cell table:style-name="ce623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690"/>
          <table:table-cell office:value-type="float" office:value="9" calcext:value-type="float">
            <text:p>9</text:p>
          </table:table-cell>
          <table:table-cell table:style-name="ce845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690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852" office:value-type="float" office:value="7" calcext:value-type="float">
            <text:p>7</text:p>
          </table:table-cell>
          <table:table-cell table:style-name="ce690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690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623"/>
          <table:table-cell table:style-name="ce866" table:formula="of:=COM.MICROSOFT.CONCAT(&quot;&quot;&quot;&quot;;[.$B$3]; &quot;&quot;&quot;: &quot;; [.B17])" office:value-type="string" office:string-value="&quot;5&quot;: 9" calcext:value-type="string">
            <text:p>"5": 9</text:p>
          </table:table-cell>
          <table:table-cell table:style-name="ce866" table:formula="of:=COM.MICROSOFT.CONCAT(&quot;&quot;&quot;&quot;;[.$C$3]; &quot;&quot;&quot;: &quot;; [.C17])" office:value-type="string" office:string-value="&quot;6&quot;: 6" calcext:value-type="string">
            <text:p>"6": 6</text:p>
          </table:table-cell>
          <table:table-cell table:style-name="ce866" table:formula="of:=COM.MICROSOFT.CONCAT(&quot;&quot;&quot;&quot;;[.$D$3]; &quot;&quot;&quot;: &quot;; [.D17])" office:value-type="string" office:string-value="&quot;7&quot;: 4" calcext:value-type="string">
            <text:p>"7": 4</text:p>
          </table:table-cell>
          <table:table-cell table:style-name="ce866" table:formula="of:=COM.MICROSOFT.CONCAT(&quot;&quot;&quot;&quot;;[.$E$3]; &quot;&quot;&quot;: &quot;; [.E17])" office:value-type="string" office:string-value="&quot;8&quot;: 5" calcext:value-type="string">
            <text:p>"8": 5</text:p>
          </table:table-cell>
          <table:table-cell table:style-name="ce866" table:formula="of:=COM.MICROSOFT.CONCAT(&quot;&quot;&quot;&quot;;[.$F$3]; &quot;&quot;&quot;: &quot;; [.F17])" office:value-type="string" office:string-value="&quot;9&quot;: 8" calcext:value-type="string">
            <text:p>"9": 8</text:p>
          </table:table-cell>
          <table:table-cell table:style-name="ce866"/>
          <table:table-cell table:style-name="ce866" table:formula="of:=COM.MICROSOFT.CONCAT(&quot;&quot;&quot;&quot;;[.$B$3]; &quot;&quot;&quot;: &quot;; [.H17])" office:value-type="string" office:string-value="&quot;5&quot;: 9" calcext:value-type="string">
            <text:p>"5": 9</text:p>
          </table:table-cell>
          <table:table-cell table:style-name="ce866" table:formula="of:=COM.MICROSOFT.CONCAT(&quot;&quot;&quot;&quot;;[.$C$3]; &quot;&quot;&quot;: &quot;; [.I17])" office:value-type="string" office:string-value="&quot;6&quot;: 5" calcext:value-type="string">
            <text:p>"6": 5</text:p>
          </table:table-cell>
          <table:table-cell table:style-name="ce866" table:formula="of:=COM.MICROSOFT.CONCAT(&quot;&quot;&quot;&quot;;[.$D$3]; &quot;&quot;&quot;: &quot;; [.J17])" office:value-type="string" office:string-value="&quot;7&quot;: 3" calcext:value-type="string">
            <text:p>"7": 3</text:p>
          </table:table-cell>
          <table:table-cell table:style-name="ce866" table:formula="of:=COM.MICROSOFT.CONCAT(&quot;&quot;&quot;&quot;;[.$E$3]; &quot;&quot;&quot;: &quot;; [.K17])" office:value-type="string" office:string-value="&quot;8&quot;: 4" calcext:value-type="string">
            <text:p>"8": 4</text:p>
          </table:table-cell>
          <table:table-cell table:style-name="ce866" table:formula="of:=COM.MICROSOFT.CONCAT(&quot;&quot;&quot;&quot;;[.$F$3]; &quot;&quot;&quot;: &quot;; [.L17])" office:value-type="string" office:string-value="&quot;9&quot;: 10" calcext:value-type="string">
            <text:p>"9": 10</text:p>
          </table:table-cell>
          <table:table-cell table:style-name="ce866"/>
          <table:table-cell table:style-name="ce866" table:formula="of:=COM.MICROSOFT.CONCAT(&quot;&quot;&quot;&quot;;[.$B$3]; &quot;&quot;&quot;: &quot;; [.N17])" office:value-type="string" office:string-value="&quot;5&quot;: 8" calcext:value-type="string">
            <text:p>"5": 8</text:p>
          </table:table-cell>
          <table:table-cell table:style-name="ce866" table:formula="of:=COM.MICROSOFT.CONCAT(&quot;&quot;&quot;&quot;;[.$C$3]; &quot;&quot;&quot;: &quot;; [.O17])" office:value-type="string" office:string-value="&quot;6&quot;: 6" calcext:value-type="string">
            <text:p>"6": 6</text:p>
          </table:table-cell>
          <table:table-cell table:style-name="ce866" table:formula="of:=COM.MICROSOFT.CONCAT(&quot;&quot;&quot;&quot;;[.$D$3]; &quot;&quot;&quot;: &quot;; [.P17])" office:value-type="string" office:string-value="&quot;7&quot;: 4" calcext:value-type="string">
            <text:p>"7": 4</text:p>
          </table:table-cell>
          <table:table-cell table:style-name="ce866" table:formula="of:=COM.MICROSOFT.CONCAT(&quot;&quot;&quot;&quot;;[.$E$3]; &quot;&quot;&quot;: &quot;; [.Q17])" office:value-type="string" office:string-value="&quot;8&quot;: 3" calcext:value-type="string">
            <text:p>"8": 3</text:p>
          </table:table-cell>
          <table:table-cell table:style-name="ce866" table:formula="of:=COM.MICROSOFT.CONCAT(&quot;&quot;&quot;&quot;;[.$F$3]; &quot;&quot;&quot;: &quot;; [.R17])" office:value-type="string" office:string-value="&quot;9&quot;: 7" calcext:value-type="string">
            <text:p>"9": 7</text:p>
          </table:table-cell>
          <table:table-cell table:style-name="ce866"/>
          <table:table-cell table:style-name="ce866" table:formula="of:=COM.MICROSOFT.CONCAT(&quot;&quot;&quot;&quot;;[.$B$3]; &quot;&quot;&quot;: &quot;; [.T17])" office:value-type="string" office:string-value="&quot;5&quot;: 6" calcext:value-type="string">
            <text:p>"5": 6</text:p>
          </table:table-cell>
          <table:table-cell table:style-name="ce866" table:formula="of:=COM.MICROSOFT.CONCAT(&quot;&quot;&quot;&quot;;[.$C$3]; &quot;&quot;&quot;: &quot;; [.U17])" office:value-type="string" office:string-value="&quot;6&quot;: 4" calcext:value-type="string">
            <text:p>"6": 4</text:p>
          </table:table-cell>
          <table:table-cell table:style-name="ce866" table:formula="of:=COM.MICROSOFT.CONCAT(&quot;&quot;&quot;&quot;;[.$D$3]; &quot;&quot;&quot;: &quot;; [.V17])" office:value-type="string" office:string-value="&quot;7&quot;: 3" calcext:value-type="string">
            <text:p>"7": 3</text:p>
          </table:table-cell>
          <table:table-cell table:style-name="ce866" table:formula="of:=COM.MICROSOFT.CONCAT(&quot;&quot;&quot;&quot;;[.$E$3]; &quot;&quot;&quot;: &quot;; [.W17])" office:value-type="string" office:string-value="&quot;8&quot;: 7" calcext:value-type="string">
            <text:p>"8": 7</text:p>
          </table:table-cell>
          <table:table-cell table:style-name="ce866" table:formula="of:=COM.MICROSOFT.CONCAT(&quot;&quot;&quot;&quot;;[.$F$3]; &quot;&quot;&quot;: &quot;; [.X17])" office:value-type="string" office:string-value="&quot;9&quot;: 9" calcext:value-type="string">
            <text:p>"9": 9</text:p>
          </table:table-cell>
          <table:table-cell table:style-name="ce866"/>
          <table:table-cell table:style-name="ce866" table:formula="of:=COM.MICROSOFT.CONCAT(&quot;&quot;&quot;&quot;;[.$B$3]; &quot;&quot;&quot;: &quot;; [.Z17])" office:value-type="string" office:string-value="&quot;5&quot;: 6" calcext:value-type="string">
            <text:p>"5": 6</text:p>
          </table:table-cell>
          <table:table-cell table:style-name="ce866" table:formula="of:=COM.MICROSOFT.CONCAT(&quot;&quot;&quot;&quot;;[.$C$3]; &quot;&quot;&quot;: &quot;; [.AA17])" office:value-type="string" office:string-value="&quot;6&quot;: 4" calcext:value-type="string">
            <text:p>"6": 4</text:p>
          </table:table-cell>
          <table:table-cell table:style-name="ce866" table:formula="of:=COM.MICROSOFT.CONCAT(&quot;&quot;&quot;&quot;;[.$D$3]; &quot;&quot;&quot;: &quot;; [.AB17])" office:value-type="string" office:string-value="&quot;7&quot;: 3" calcext:value-type="string">
            <text:p>"7": 3</text:p>
          </table:table-cell>
          <table:table-cell table:style-name="ce866" table:formula="of:=COM.MICROSOFT.CONCAT(&quot;&quot;&quot;&quot;;[.$E$3]; &quot;&quot;&quot;: &quot;; [.AC17])" office:value-type="string" office:string-value="&quot;8&quot;: 8" calcext:value-type="string">
            <text:p>"8": 8</text:p>
          </table:table-cell>
          <table:table-cell table:style-name="ce866" table:formula="of:=COM.MICROSOFT.CONCAT(&quot;&quot;&quot;&quot;;[.$F$3]; &quot;&quot;&quot;: &quot;; [.AD17])" office:value-type="string" office:string-value="&quot;9&quot;: 9" calcext:value-type="string">
            <text:p>"9": 9</text:p>
          </table:table-cell>
          <table:table-cell table:style-name="ce875" table:number-columns-repeated="2"/>
          <table:table-cell table:formula="of:=COM.MICROSOFT.CONCAT(&quot;&quot;&quot;6&quot;&quot;: { &quot;;COM.MICROSOFT.TEXTJOIN(&quot;, &quot;;TRUE();[.AL12:.AP14]);&quot;}&quot;)" office:value-type="string" office:string-value="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" calcext:value-type="string">
            <text:p>"6": { "0": 14, "1": 8, "2": 3, "3": 5, "4": 13, "5": 6, "6": 2, "7": 1, "8": 2, "9": 7, "10": 11, "11": 9, "12": 10, "13": 4, "14": 12}</text:p>
          </table:table-cell>
          <table:table-cell table:number-columns-repeated="36"/>
        </table:table-row>
        <table:table-row table:style-name="ro1">
          <table:table-cell table:style-name="ce623"/>
          <table:table-cell table:style-name="ce880" table:formula="of:=[.$T$4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690"/>
          <table:table-cell office:value-type="float" office:value="6" calcext:value-type="float">
            <text:p>6</text:p>
          </table:table-cell>
          <table:table-cell table:style-name="ce880" table:formula="of:=[.$U$4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690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880" table:formula="of:=[.$V$4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852" office:value-type="float" office:value="11" calcext:value-type="float">
            <text:p>11</text:p>
          </table:table-cell>
          <table:table-cell table:style-name="ce690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0" table:formula="of:=[.$W$4]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690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880" table:formula="of:=[.$X$4]" office:value-type="float" office:value="12" calcext:value-type="float">
            <text:p>12</text:p>
          </table:table-cell>
          <table:table-cell table:style-name="ce623"/>
          <table:table-cell table:style-name="ce866" table:formula="of:=COM.MICROSOFT.CONCAT(&quot;&quot;&quot;&quot;;[.$B$4]; &quot;&quot;&quot;: &quot;; [.B18])" office:value-type="string" office:string-value="&quot;10&quot;: 11" calcext:value-type="string">
            <text:p>"10": 11</text:p>
          </table:table-cell>
          <table:table-cell table:style-name="ce866" table:formula="of:=COM.MICROSOFT.CONCAT(&quot;&quot;&quot;&quot;;[.$C$4]; &quot;&quot;&quot;: &quot;; [.C18])" office:value-type="string" office:string-value="&quot;11&quot;: 1" calcext:value-type="string">
            <text:p>"11": 1</text:p>
          </table:table-cell>
          <table:table-cell table:style-name="ce866" table:formula="of:=COM.MICROSOFT.CONCAT(&quot;&quot;&quot;&quot;;[.$D$4]; &quot;&quot;&quot;: &quot;; [.D18])" office:value-type="string" office:string-value="&quot;12&quot;: 2" calcext:value-type="string">
            <text:p>"12": 2</text:p>
          </table:table-cell>
          <table:table-cell table:style-name="ce866" table:formula="of:=COM.MICROSOFT.CONCAT(&quot;&quot;&quot;&quot;;[.$E$4]; &quot;&quot;&quot;: &quot;; [.E18])" office:value-type="string" office:string-value="&quot;13&quot;: 3" calcext:value-type="string">
            <text:p>"13": 3</text:p>
          </table:table-cell>
          <table:table-cell table:style-name="ce866" table:formula="of:=COM.MICROSOFT.CONCAT(&quot;&quot;&quot;&quot;;[.$F$4]; &quot;&quot;&quot;: &quot;; [.F18])" office:value-type="string" office:string-value="&quot;14&quot;: 7" calcext:value-type="string">
            <text:p>"14": 7</text:p>
          </table:table-cell>
          <table:table-cell table:style-name="ce866"/>
          <table:table-cell table:style-name="ce866" table:formula="of:=COM.MICROSOFT.CONCAT(&quot;&quot;&quot;&quot;;[.$B$4]; &quot;&quot;&quot;: &quot;; [.H18])" office:value-type="string" office:string-value="&quot;10&quot;: 6" calcext:value-type="string">
            <text:p>"10": 6</text:p>
          </table:table-cell>
          <table:table-cell table:style-name="ce866" table:formula="of:=COM.MICROSOFT.CONCAT(&quot;&quot;&quot;&quot;;[.$C$4]; &quot;&quot;&quot;: &quot;; [.I18])" office:value-type="string" office:string-value="&quot;11&quot;: 10" calcext:value-type="string">
            <text:p>"11": 10</text:p>
          </table:table-cell>
          <table:table-cell table:style-name="ce866" table:formula="of:=COM.MICROSOFT.CONCAT(&quot;&quot;&quot;&quot;;[.$D$4]; &quot;&quot;&quot;: &quot;; [.J18])" office:value-type="string" office:string-value="&quot;12&quot;: 1" calcext:value-type="string">
            <text:p>"12": 1</text:p>
          </table:table-cell>
          <table:table-cell table:style-name="ce866" table:formula="of:=COM.MICROSOFT.CONCAT(&quot;&quot;&quot;&quot;;[.$E$4]; &quot;&quot;&quot;: &quot;; [.K18])" office:value-type="string" office:string-value="&quot;13&quot;: 2" calcext:value-type="string">
            <text:p>"13": 2</text:p>
          </table:table-cell>
          <table:table-cell table:style-name="ce866" table:formula="of:=COM.MICROSOFT.CONCAT(&quot;&quot;&quot;&quot;;[.$F$4]; &quot;&quot;&quot;: &quot;; [.L18])" office:value-type="string" office:string-value="&quot;14&quot;: 11" calcext:value-type="string">
            <text:p>"14": 11</text:p>
          </table:table-cell>
          <table:table-cell table:style-name="ce866"/>
          <table:table-cell table:style-name="ce866" table:formula="of:=COM.MICROSOFT.CONCAT(&quot;&quot;&quot;&quot;;[.$B$4]; &quot;&quot;&quot;: &quot;; [.N18])" office:value-type="string" office:string-value="&quot;10&quot;: 5" calcext:value-type="string">
            <text:p>"10": 5</text:p>
          </table:table-cell>
          <table:table-cell table:style-name="ce866" table:formula="of:=COM.MICROSOFT.CONCAT(&quot;&quot;&quot;&quot;;[.$C$4]; &quot;&quot;&quot;: &quot;; [.O18])" office:value-type="string" office:string-value="&quot;11&quot;: 2" calcext:value-type="string">
            <text:p>"11": 2</text:p>
          </table:table-cell>
          <table:table-cell table:style-name="ce866" table:formula="of:=COM.MICROSOFT.CONCAT(&quot;&quot;&quot;&quot;;[.$D$4]; &quot;&quot;&quot;: &quot;; [.P18])" office:value-type="string" office:string-value="&quot;12&quot;: 9" calcext:value-type="string">
            <text:p>"12": 9</text:p>
          </table:table-cell>
          <table:table-cell table:style-name="ce866" table:formula="of:=COM.MICROSOFT.CONCAT(&quot;&quot;&quot;&quot;;[.$E$4]; &quot;&quot;&quot;: &quot;; [.Q18])" office:value-type="string" office:string-value="&quot;13&quot;: 1" calcext:value-type="string">
            <text:p>"13": 1</text:p>
          </table:table-cell>
          <table:table-cell table:style-name="ce866" table:formula="of:=COM.MICROSOFT.CONCAT(&quot;&quot;&quot;&quot;;[.$F$4]; &quot;&quot;&quot;: &quot;; [.R18])" office:value-type="string" office:string-value="&quot;14&quot;: 11" calcext:value-type="string">
            <text:p>"14": 11</text:p>
          </table:table-cell>
          <table:table-cell table:style-name="ce866"/>
          <table:table-cell table:style-name="ce866" table:formula="of:=COM.MICROSOFT.CONCAT(&quot;&quot;&quot;&quot;;[.$B$4]; &quot;&quot;&quot;: &quot;; [.T18])" office:value-type="string" office:string-value="&quot;10&quot;: 5" calcext:value-type="string">
            <text:p>"10": 5</text:p>
          </table:table-cell>
          <table:table-cell table:style-name="ce866" table:formula="of:=COM.MICROSOFT.CONCAT(&quot;&quot;&quot;&quot;;[.$C$4]; &quot;&quot;&quot;: &quot;; [.U18])" office:value-type="string" office:string-value="&quot;11&quot;: 2" calcext:value-type="string">
            <text:p>"11": 2</text:p>
          </table:table-cell>
          <table:table-cell table:style-name="ce866" table:formula="of:=COM.MICROSOFT.CONCAT(&quot;&quot;&quot;&quot;;[.$D$4]; &quot;&quot;&quot;: &quot;; [.V18])" office:value-type="string" office:string-value="&quot;12&quot;: 1" calcext:value-type="string">
            <text:p>"12": 1</text:p>
          </table:table-cell>
          <table:table-cell table:style-name="ce866" table:formula="of:=COM.MICROSOFT.CONCAT(&quot;&quot;&quot;&quot;;[.$E$4]; &quot;&quot;&quot;: &quot;; [.W18])" office:value-type="string" office:string-value="&quot;13&quot;: 4" calcext:value-type="string">
            <text:p>"13": 4</text:p>
          </table:table-cell>
          <table:table-cell table:style-name="ce866" table:formula="of:=COM.MICROSOFT.CONCAT(&quot;&quot;&quot;&quot;;[.$F$4]; &quot;&quot;&quot;: &quot;; [.X18])" office:value-type="string" office:string-value="&quot;14&quot;: 10" calcext:value-type="string">
            <text:p>"14": 10</text:p>
          </table:table-cell>
          <table:table-cell table:style-name="ce866"/>
          <table:table-cell table:style-name="ce866" table:formula="of:=COM.MICROSOFT.CONCAT(&quot;&quot;&quot;&quot;;[.$B$4]; &quot;&quot;&quot;: &quot;; [.Z18])" office:value-type="string" office:string-value="&quot;10&quot;: 5" calcext:value-type="string">
            <text:p>"10": 5</text:p>
          </table:table-cell>
          <table:table-cell table:style-name="ce866" table:formula="of:=COM.MICROSOFT.CONCAT(&quot;&quot;&quot;&quot;;[.$C$4]; &quot;&quot;&quot;: &quot;; [.AA18])" office:value-type="string" office:string-value="&quot;11&quot;: 2" calcext:value-type="string">
            <text:p>"11": 2</text:p>
          </table:table-cell>
          <table:table-cell table:style-name="ce866" table:formula="of:=COM.MICROSOFT.CONCAT(&quot;&quot;&quot;&quot;;[.$D$4]; &quot;&quot;&quot;: &quot;; [.AB18])" office:value-type="string" office:string-value="&quot;12&quot;: 1" calcext:value-type="string">
            <text:p>"12": 1</text:p>
          </table:table-cell>
          <table:table-cell table:style-name="ce866" table:formula="of:=COM.MICROSOFT.CONCAT(&quot;&quot;&quot;&quot;;[.$E$4]; &quot;&quot;&quot;: &quot;; [.AC18])" office:value-type="string" office:string-value="&quot;13&quot;: 7" calcext:value-type="string">
            <text:p>"13": 7</text:p>
          </table:table-cell>
          <table:table-cell table:style-name="ce866" table:formula="of:=COM.MICROSOFT.CONCAT(&quot;&quot;&quot;&quot;;[.$F$4]; &quot;&quot;&quot;: &quot;; [.AD18])" office:value-type="string" office:string-value="&quot;14&quot;: 12" calcext:value-type="string">
            <text:p>"14": 12</text:p>
          </table:table-cell>
          <table:table-cell table:style-name="ce875" table:number-columns-repeated="2"/>
          <table:table-cell table:formula="of:=COM.MICROSOFT.CONCAT(&quot;&quot;&quot;7&quot;&quot;: { &quot;;COM.MICROSOFT.TEXTJOIN(&quot;, &quot;;TRUE();[.AR12:.AV14]);&quot;}&quot;)" office:value-type="string" office:string-value="&quot;7&quot;: { &quot;0&quot;: 14, &quot;1&quot;: 5, &quot;2&quot;: 6, &quot;3&quot;: 9, &quot;4&quot;: 13, &quot;5&quot;: 4, &quot;6&quot;: 2, &quot;7&quot;: 0, &quot;8&quot;: 1, &quot;9&quot;: 10, &quot;10&quot;: 11, &quot;11&quot;: 7, &quot;12&quot;: 8, &quot;13&quot;: 3, &quot;14&quot;: 12}" calcext:value-type="string">
            <text:p>"7": { "0": 14, "1": 5, "2": 6, "3": 9, "4": 13, "5": 4, "6": 2, "7": 0, "8": 1, "9": 10, "10": 11, "11": 7, "12": 8, "13": 3, "14": 12}</text:p>
          </table:table-cell>
          <table:table-cell table:number-columns-repeated="36"/>
        </table:table-row>
        <table:table-row table:style-name="ro2">
          <table:table-cell table:style-name="ce623"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ce802" office:value-type="string" calcext:value-type="string">
            <text:p><text:s text:c="43"/></text:p>
          </table:table-cell>
          <table:table-cell table:style-name="Default" table:number-columns-repeated="11"/>
          <table:table-cell/>
          <table:table-cell table:style-name="ce864" table:number-columns-repeated="29"/>
          <table:table-cell table:style-name="ce875" table:number-columns-repeated="2"/>
          <table:table-cell table:formula="of:=COM.MICROSOFT.CONCAT(&quot;&quot;&quot;8&quot;&quot;: { &quot;;COM.MICROSOFT.TEXTJOIN(&quot;, &quot;;TRUE();[.AX12:.BB14]);&quot;}&quot;)" office:value-type="string" office:string-value="&quot;8&quot;: { &quot;0&quot;: 12, &quot;1&quot;: 5, &quot;2&quot;: 3, &quot;3&quot;: 10, &quot;4&quot;: 14, &quot;5&quot;: 4, &quot;6&quot;: 2, &quot;7&quot;: 1, &quot;8&quot;: 1, &quot;9&quot;: 11, &quot;10&quot;: 8, &quot;11&quot;: 6, &quot;12&quot;: 7, &quot;13&quot;: 9, &quot;14&quot;: 13}" calcext:value-type="string">
            <text:p>"8": { "0": 12, "1": 5, "2": 3, "3": 10, "4": 14, "5": 4, "6": 2, "7": 1, "8": 1, "9": 11, "10": 8, "11": 6, "12": 7, "13": 9, "14": 13}</text:p>
          </table:table-cell>
          <table:table-cell table:number-columns-repeated="36"/>
        </table:table-row>
        <table:table-row table:style-name="ro2">
          <table:table-cell table:style-name="ce623"/>
          <table:table-cell table:style-name="ce633" table:number-columns-spanned="29" table:number-rows-spanned="3"/>
          <table:covered-table-cell table:number-columns-repeated="28" table:style-name="ce634"/>
          <table:table-cell table:style-name="ce861"/>
          <table:table-cell table:style-name="ce867" table:formula="of:=COM.MICROSOFT.CONCAT(&quot;{&quot;; COM.MICROSOFT.TEXTJOIN(&quot;, &quot;;TRUE();[.BK14]; [.BK22]; [.BK30]);&quot;}&quot;)" office:value-type="string" office:string-value="{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6, &quot;2&quot;: 1, &quot;3&quot;: 3, &quot;4&quot;: 6, &quot;5&quot;: 7, &quot;6&quot;: 8, &quot;7&quot;: 4, &quot;8&quot;: 2, &quot;9&quot;: 5, &quot;10&quot;: 13, &quot;11&quot;: 14, &quot;12&quot;: 12, &quot;13&quot;: 10, &quot;14&quot;: 11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5, &quot;4&quot;: 8, &quot;5&quot;: 5, &quot;6&quot;: 4, &quot;7&quot;: 6, &quot;8&quot;: 7, &quot;9&quot;: 9, &quot;10&quot;: 13, &quot;11&quot;: 11, &quot;12&quot;: 10, &quot;13&quot;: 12, &quot;14&quot;: 14}, &quot;4&quot;: { &quot;0&quot;: 6, &quot;1&quot;: 2, &quot;2&quot;: 1, &quot;3&quot;: 7, &quot;4&quot;: 13, &quot;5&quot;: 5, &quot;6&quot;: 4, &quot;7&quot;: 3, &quot;8&quot;: 9, &quot;9&quot;: 8, &quot;10&quot;: 12, &quot;11&quot;: 11, &quot;12&quot;: 10, &quot;13&quot;: 14, &quot;14&quot;: 13}, &quot;5&quot;: { &quot;0&quot;: 14, &quot;1&quot;: 9, &quot;2&quot;: 4, &quot;3&quot;: 6, &quot;4&quot;: 13, &quot;5&quot;: 7, &quot;6&quot;: 1, &quot;7&quot;: 2, &quot;8&quot;: 3, &quot;9&quot;: 8, &quot;10&quot;: 12, &quot;11&quot;: 10, &quot;12&quot;: 7, &quot;13&quot;: 5, &quot;14&quot;: 11}, 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, &quot;7&quot;: { &quot;0&quot;: 14, &quot;1&quot;: 5, &quot;2&quot;: 6, &quot;3&quot;: 9, &quot;4&quot;: 13, &quot;5&quot;: 4, &quot;6&quot;: 2, &quot;7&quot;: 0, &quot;8&quot;: 1, &quot;9&quot;: 10, &quot;10&quot;: 11, &quot;11&quot;: 7, &quot;12&quot;: 8, &quot;13&quot;: 3, &quot;14&quot;: 12}, &quot;8&quot;: { &quot;0&quot;: 12, &quot;1&quot;: 5, &quot;2&quot;: 3, &quot;3&quot;: 10, &quot;4&quot;: 14, &quot;5&quot;: 4, &quot;6&quot;: 2, &quot;7&quot;: 1, &quot;8&quot;: 1, &quot;9&quot;: 11, &quot;10&quot;: 8, &quot;11&quot;: 6, &quot;12&quot;: 7, &quot;13&quot;: 9, &quot;14&quot;: 13}, &quot;9&quot;: { &quot;0&quot;: 14, &quot;1&quot;: 6, &quot;2&quot;: 5, &quot;3&quot;: 10, &quot;4&quot;: 12, &quot;5&quot;: 3, &quot;6&quot;: 2, &quot;7&quot;: 1, &quot;8&quot;: 4, &quot;9&quot;: 8, &quot;10&quot;: 13, &quot;11&quot;: 7, &quot;12&quot;: 8, &quot;13&quot;: 9, &quot;14&quot;: 11}, &quot;10&quot;: { &quot;0&quot;: 14, &quot;1&quot;: 13, &quot;2&quot;: 10, &quot;3&quot;: 11, &quot;4&quot;: 12, &quot;5&quot;: 9, &quot;6&quot;: 6, &quot;7&quot;: 4, &quot;8&quot;: 5, &quot;9&quot;: 8, &quot;10&quot;: 11, &quot;11&quot;: 1, &quot;12&quot;: 2, &quot;13&quot;: 3, &quot;14&quot;: 7}, &quot;11&quot;: { &quot;0&quot;: 14, &quot;1&quot;: 13, &quot;2&quot;: 7, &quot;3&quot;: 8, &quot;4&quot;: 12, &quot;5&quot;: 9, &quot;6&quot;: 5, &quot;7&quot;: 3, &quot;8&quot;: 4, &quot;9&quot;: 10, &quot;10&quot;: 6, &quot;11&quot;: 10, &quot;12&quot;: 1, &quot;13&quot;: 2, &quot;14&quot;: 11}, &quot;12&quot;: { &quot;0&quot;: 14, &quot;1&quot;: 13, &quot;2&quot;: 10, &quot;3&quot;: 9, &quot;4&quot;: 12, &quot;5&quot;: 8, &quot;6&quot;: 6, &quot;7&quot;: 4, &quot;8&quot;: 3, &quot;9&quot;: 7, &quot;10&quot;: 5, &quot;11&quot;: 2, &quot;12&quot;: 9, &quot;13&quot;: 1, &quot;14&quot;: 11}, 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, &quot;14&quot;: { &quot;0&quot;: 14, &quot;1&quot;: 13, &quot;2&quot;: 10, &quot;3&quot;: 12, &quot;4&quot;: 11, &quot;5&quot;: 6, &quot;6&quot;: 4, &quot;7&quot;: 3, &quot;8&quot;: 8, &quot;9&quot;: 9, &quot;10&quot;: 5, &quot;11&quot;: 2, &quot;12&quot;: 1, &quot;13&quot;: 7, &quot;14&quot;: 12}}" calcext:value-type="string" table:number-columns-spanned="29" table:number-rows-spanned="4">
            <text:p>{"0": { "0": 14, "1": 1, "2": 2, "3": 3, "4": 5, "5": 9, "6": 8, "7": 7, "8": 4, "9": 6, "10": 12, "11": 14, "12": 13, "13": 10, "14": 11}, "1": { "0": 9, "1": 6, "2": 1, "3": 3, "4": 6, "5": 7, "6": 8, "7": 4, "8": 2, "9": 5, "10": 13, "11": 14, "12": 12, "13": 10, "14": 11}, "2": { "0": 9, "1": 3, "2": 3, "3": 1, "4": 8, "5": 7, "6": 4, "7": 5, "8": 2, "9": 6, "10": 12, "11": 11, "12": 13, "13": 10, "14": 14}, "3": { "0": 3, "1": 2, "2": 1, "3": 5, "4": 8, "5": 5, "6": 4, "7": 6, "8": 7, "9": 9, "10": 13, "11": 11, "12": 10, "13": 12, "14": 14}, "4": { "0": 6, "1": 2, "2": 1, "3": 7, "4": 13, "5": 5, "6": 4, "7": 3, "8": 9, "9": 8, "10": 12, "11": 11, "12": 10, "13": 14, "14": 13}, "5": { "0": 14, "1": 9, "2": 4, "3": 6, "4": 13, "5": 7, "6": 1, "7": 2, "8": 3, "9": 8, "10": 12, "11": 10, "12": 7, "13": 5, "14": 11}, "6": { "0": 14, "1": 8, "2": 3, "3": 5, "4": 13, "5": 6, "6": 2, "7": 1, "8": 2, "9": 7, "10": 11, "11": 9, "12": 10, "13": 4, "14": 12}, "7": { "0": 14, "1": 5, "2": 6, "3": 9, "4": 13, "5": 4, "6": 2, "7": 0, "8": 1, "9": 10, "10": 11, "11": 7, "12": 8, "13": 3, "14": 12}, "8": { "0": 12, "1": 5, "2": 3, "3": 10, "4": 14, "5": 4, "6": 2, "7": 1, "8": 1, "9": 11, "10": 8, "11": 6, "12": 7, "13": 9, "14": 13}, "9": { "0": 14, "1": 6, "2": 5, "3": 10, "4": 12, "5": 3, "6": 2, "7": 1, "8": 4, "9": 8, "10": 13, "11": 7, "12": 8, "13": 9, "14": 11}, "10": { "0": 14, "1": 13, "2": 10, "3": 11, "4": 12, "5": 9, "6": 6, "7": 4, "8": 5, "9": 8, "10": 11, "11": 1, "12": 2, "13": 3, "14": 7}, "11": { "0": 14, "1": 13, "2": 7, "3": 8, "4": 12, "5": 9, "6": 5, "7": 3, "8": 4, "9": 10, "10": 6, "11": 10, "12": 1, "13": 2, "14": 11}, "12": { "0": 14, "1": 13, "2": 10, "3": 9, "4": 12, "5": 8, "6": 6, "7": 4, "8": 3, "9": 7, "10": 5, "11": 2, "12": 9, "13": 1, "14": 11}, "13": { "0": 13, "1": 12, "2": 8, "3": 11, "4": 14, "5": 6, "6": 4, "7": 3, "8": 7, "9": 9, "10": 5, "11": 2, "12": 1, "13": 4, "14": 10}, "14": { "0": 14, "1": 13, "2": 10, "3": 12, "4": 11, "5": 6, "6": 4, "7": 3, "8": 8, "9": 9, "10": 5, "11": 2, "12": 1, "13": 7, "14": 12}}</text:p>
          </table:table-cell>
          <table:covered-table-cell table:number-columns-repeated="28" table:style-name="ce868"/>
          <table:table-cell table:style-name="ce875" table:number-columns-repeated="2"/>
          <table:table-cell table:formula="of:=COM.MICROSOFT.CONCAT(&quot;&quot;&quot;9&quot;&quot;: { &quot;;COM.MICROSOFT.TEXTJOIN(&quot;, &quot;;TRUE();[.BD12:.BH14]);&quot;}&quot;)" office:value-type="string" office:string-value="&quot;9&quot;: { &quot;0&quot;: 14, &quot;1&quot;: 6, &quot;2&quot;: 5, &quot;3&quot;: 10, &quot;4&quot;: 12, &quot;5&quot;: 3, &quot;6&quot;: 2, &quot;7&quot;: 1, &quot;8&quot;: 4, &quot;9&quot;: 8, &quot;10&quot;: 13, &quot;11&quot;: 7, &quot;12&quot;: 8, &quot;13&quot;: 9, &quot;14&quot;: 11}" calcext:value-type="string">
            <text:p>"9": { "0": 14, "1": 6, "2": 5, "3": 10, "4": 12, "5": 3, "6": 2, "7": 1, "8": 4, "9": 8, "10": 13, "11": 7, "12": 8, "13": 9, "14": 11}</text:p>
          </table:table-cell>
          <table:table-cell table:number-columns-repeated="36"/>
        </table:table-row>
        <table:table-row table:style-name="ro2">
          <table:table-cell table:style-name="ce623"/>
          <table:covered-table-cell table:number-columns-repeated="29" table:style-name="ce634"/>
          <table:table-cell table:style-name="ce861"/>
          <table:covered-table-cell table:number-columns-repeated="29" table:style-name="ce868"/>
          <table:table-cell table:style-name="ce875" table:number-columns-repeated="2"/>
          <table:table-cell table:style-name="ce864"/>
          <table:table-cell table:number-columns-repeated="36"/>
        </table:table-row>
        <table:table-row table:style-name="ro2">
          <table:table-cell table:style-name="ce623"/>
          <table:covered-table-cell table:number-columns-repeated="29" table:style-name="ce634"/>
          <table:table-cell table:style-name="ce861"/>
          <table:covered-table-cell table:number-columns-repeated="29" table:style-name="ce868"/>
          <table:table-cell table:style-name="ce875" table:number-columns-repeated="2"/>
          <table:table-cell table:formula="of:=COM.MICROSOFT.TEXTJOIN(&quot;, &quot;;TRUE();[.BK16:.BK20])" office:value-type="string" office:string-value="&quot;5&quot;: { &quot;0&quot;: 14, &quot;1&quot;: 9, &quot;2&quot;: 4, &quot;3&quot;: 6, &quot;4&quot;: 13, &quot;5&quot;: 7, &quot;6&quot;: 1, &quot;7&quot;: 2, &quot;8&quot;: 3, &quot;9&quot;: 8, &quot;10&quot;: 12, &quot;11&quot;: 10, &quot;12&quot;: 7, &quot;13&quot;: 5, &quot;14&quot;: 11}, 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, &quot;7&quot;: { &quot;0&quot;: 14, &quot;1&quot;: 5, &quot;2&quot;: 6, &quot;3&quot;: 9, &quot;4&quot;: 13, &quot;5&quot;: 4, &quot;6&quot;: 2, &quot;7&quot;: 0, &quot;8&quot;: 1, &quot;9&quot;: 10, &quot;10&quot;: 11, &quot;11&quot;: 7, &quot;12&quot;: 8, &quot;13&quot;: 3, &quot;14&quot;: 12}, &quot;8&quot;: { &quot;0&quot;: 12, &quot;1&quot;: 5, &quot;2&quot;: 3, &quot;3&quot;: 10, &quot;4&quot;: 14, &quot;5&quot;: 4, &quot;6&quot;: 2, &quot;7&quot;: 1, &quot;8&quot;: 1, &quot;9&quot;: 11, &quot;10&quot;: 8, &quot;11&quot;: 6, &quot;12&quot;: 7, &quot;13&quot;: 9, &quot;14&quot;: 13}, &quot;9&quot;: { &quot;0&quot;: 14, &quot;1&quot;: 6, &quot;2&quot;: 5, &quot;3&quot;: 10, &quot;4&quot;: 12, &quot;5&quot;: 3, &quot;6&quot;: 2, &quot;7&quot;: 1, &quot;8&quot;: 4, &quot;9&quot;: 8, &quot;10&quot;: 13, &quot;11&quot;: 7, &quot;12&quot;: 8, &quot;13&quot;: 9, &quot;14&quot;: 11}" calcext:value-type="string">
            <text:p>"5": { "0": 14, "1": 9, "2": 4, "3": 6, "4": 13, "5": 7, "6": 1, "7": 2, "8": 3, "9": 8, "10": 12, "11": 10, "12": 7, "13": 5, "14": 11}, "6": { "0": 14, "1": 8, "2": 3, "3": 5, "4": 13, "5": 6, "6": 2, "7": 1, "8": 2, "9": 7, "10": 11, "11": 9, "12": 10, "13": 4, "14": 12}, "7": { "0": 14, "1": 5, "2": 6, "3": 9, "4": 13, "5": 4, "6": 2, "7": 0, "8": 1, "9": 10, "10": 11, "11": 7, "12": 8, "13": 3, "14": 12}, "8": { "0": 12, "1": 5, "2": 3, "3": 10, "4": 14, "5": 4, "6": 2, "7": 1, "8": 1, "9": 11, "10": 8, "11": 6, "12": 7, "13": 9, "14": 13}, "9": { "0": 14, "1": 6, "2": 5, "3": 10, "4": 12, "5": 3, "6": 2, "7": 1, "8": 4, "9": 8, "10": 13, "11": 7, "12": 8, "13": 9, "14": 11}</text:p>
          </table:table-cell>
          <table:table-cell table:number-columns-repeated="36"/>
        </table:table-row>
        <table:table-row table:style-name="ro2">
          <table:table-cell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Default" table:number-columns-repeated="12"/>
          <table:table-cell/>
          <table:covered-table-cell table:number-columns-repeated="29" table:style-name="ce864"/>
          <table:table-cell table:style-name="ce875" table:number-columns-repeated="2"/>
          <table:table-cell table:style-name="ce864"/>
          <table:table-cell table:number-columns-repeated="36"/>
        </table:table-row>
        <table:table-row table:style-name="ro2">
          <table:table-cell/>
          <table:table-cell table:style-name="ce635" table:formula="of:=SUM([.B25:.F27])-[.B25]" office:value-type="float" office:value="37.7" calcext:value-type="float" table:number-columns-spanned="2" table:number-rows-spanned="1">
            <text:p>37.7</text:p>
          </table:table-cell>
          <table:covered-table-cell table:style-name="ce659"/>
          <table:table-cell table:style-name="ce659" table:number-columns-repeated="4"/>
          <table:table-cell table:style-name="ce691" table:formula="of:=SUM([.H25:.L27])-[.I25]" office:value-type="float" office:value="37.7" calcext:value-type="float" table:number-columns-spanned="2" table:number-rows-spanned="1">
            <text:p>37.7</text:p>
          </table:table-cell>
          <table:covered-table-cell table:style-name="ce659"/>
          <table:table-cell table:style-name="ce659" table:number-columns-repeated="4"/>
          <table:table-cell table:style-name="ce635" table:formula="of:=SUM([.N25:.R27])-[.P25]" office:value-type="float" office:value="37.7" calcext:value-type="float" table:number-columns-spanned="2" table:number-rows-spanned="1">
            <text:p>37.7</text:p>
          </table:table-cell>
          <table:covered-table-cell table:style-name="ce659"/>
          <table:table-cell table:style-name="ce659" table:number-columns-repeated="4"/>
          <table:table-cell table:style-name="ce691" table:formula="of:=SUM([.T25:.X27])-[.W25]" office:value-type="float" office:value="37.7" calcext:value-type="float" table:number-columns-spanned="2" table:number-rows-spanned="1">
            <text:p>37.7</text:p>
          </table:table-cell>
          <table:covered-table-cell table:style-name="ce659"/>
          <table:table-cell table:style-name="ce659" table:number-columns-repeated="4"/>
          <table:table-cell table:style-name="ce635" table:formula="of:=SUM([.Z25:.AD27])-[.AD25]" office:value-type="float" office:value="37.7" calcext:value-type="float" table:number-columns-spanned="2" table:number-rows-spanned="1">
            <text:p>37.7</text:p>
          </table:table-cell>
          <table:covered-table-cell table:style-name="ce659"/>
          <table:table-cell table:style-name="ce659" table:number-columns-repeated="3"/>
          <table:table-cell table:style-name="ce623"/>
          <table:table-cell table:number-columns-repeated="31"/>
          <table:table-cell table:formula="of:=COM.MICROSOFT.CONCAT(&quot;&quot;&quot;10&quot;&quot;: { &quot;;COM.MICROSOFT.TEXTJOIN(&quot;, &quot;;TRUE();[.AF16:.AJ18]);&quot;}&quot;)" office:value-type="string" office:string-value="&quot;10&quot;: { &quot;0&quot;: 14, &quot;1&quot;: 13, &quot;2&quot;: 10, &quot;3&quot;: 11, &quot;4&quot;: 12, &quot;5&quot;: 9, &quot;6&quot;: 6, &quot;7&quot;: 4, &quot;8&quot;: 5, &quot;9&quot;: 8, &quot;10&quot;: 11, &quot;11&quot;: 1, &quot;12&quot;: 2, &quot;13&quot;: 3, &quot;14&quot;: 7}" calcext:value-type="string">
            <text:p>"10": { "0": 14, "1": 13, "2": 10, "3": 11, "4": 12, "5": 9, "6": 6, "7": 4, "8": 5, "9": 8, "10": 11, "11": 1, "12": 2, "13": 3, "14": 7}</text:p>
          </table:table-cell>
          <table:table-cell table:number-columns-repeated="36"/>
        </table:table-row>
        <table:table-row table:style-name="ro1">
          <table:table-cell/>
          <table:table-cell table:style-name="ce996" table:formula="of:=HLOOKUP([.B8];[.$AF$25:.$AW$26];2;0)" office:value-type="float" office:value="4.4" calcext:value-type="float">
            <text:p>4.4</text:p>
          </table:table-cell>
          <table:table-cell table:style-name="ce1010" table:formula="of:=HLOOKUP([.C8];[.$AF$25:.$AW$26];2;0)" office:value-type="float" office:value="1.1" calcext:value-type="float">
            <text:p>1.1</text:p>
          </table:table-cell>
          <table:table-cell table:style-name="ce1015" table:formula="of:=HLOOKUP([.D8];[.$AF$25:.$AW$26];2;0)" office:value-type="float" office:value="1.2" calcext:value-type="float">
            <text:p>1.2</text:p>
          </table:table-cell>
          <table:table-cell table:style-name="ce1024" table:formula="of:=HLOOKUP([.E8];[.$AF$25:.$AW$26];2;0)" office:value-type="float" office:value="1.3" calcext:value-type="float">
            <text:p>1.3</text:p>
          </table:table-cell>
          <table:table-cell table:style-name="ce1024" table:formula="of:=HLOOKUP([.F8];[.$AF$25:.$AW$26];2;0)" office:value-type="float" office:value="2.1" calcext:value-type="float">
            <text:p>2.1</text:p>
          </table:table-cell>
          <table:table-cell/>
          <table:table-cell table:style-name="ce1035" table:formula="of:=HLOOKUP([.H8];[.$AF$25:.$AW$26];2;0)" office:value-type="float" office:value="3.1" calcext:value-type="float">
            <text:p>3.1</text:p>
          </table:table-cell>
          <table:table-cell table:style-name="ce1041" table:formula="of:=HLOOKUP([.I8];[.$AF$25:.$AW$26];2;0)" office:value-type="float" office:value="2.2" calcext:value-type="float">
            <text:p>2.2</text:p>
          </table:table-cell>
          <table:table-cell table:style-name="ce1047" table:formula="of:=HLOOKUP([.J8];[.$AF$25:.$AW$26];2;0)" office:value-type="float" office:value="1.1" calcext:value-type="float">
            <text:p>1.1</text:p>
          </table:table-cell>
          <table:table-cell table:style-name="ce1050" table:formula="of:=HLOOKUP([.K8];[.$AF$25:.$AW$26];2;0)" office:value-type="float" office:value="1.3" calcext:value-type="float">
            <text:p>1.3</text:p>
          </table:table-cell>
          <table:table-cell table:style-name="ce1050" table:formula="of:=HLOOKUP([.L8];[.$AF$25:.$AW$26];2;0)" office:value-type="float" office:value="2.2" calcext:value-type="float">
            <text:p>2.2</text:p>
          </table:table-cell>
          <table:table-cell/>
          <table:table-cell table:style-name="ce1053" table:formula="of:=HLOOKUP([.N8];[.$AF$25:.$AW$26];2;0)" office:value-type="float" office:value="3.1" calcext:value-type="float">
            <text:p>3.1</text:p>
          </table:table-cell>
          <table:table-cell table:style-name="ce1059" table:formula="of:=HLOOKUP([.O8];[.$AF$25:.$AW$26];2;0)" office:value-type="float" office:value="1.3" calcext:value-type="float">
            <text:p>1.3</text:p>
          </table:table-cell>
          <table:table-cell table:style-name="ce1062" table:formula="of:=HLOOKUP([.P8];[.$AF$25:.$AW$26];2;0)" office:value-type="float" office:value="1.3" calcext:value-type="float">
            <text:p>1.3</text:p>
          </table:table-cell>
          <table:table-cell table:style-name="ce1068" table:formula="of:=HLOOKUP([.Q8];[.$AF$25:.$AW$26];2;0)" office:value-type="float" office:value="1.1" calcext:value-type="float">
            <text:p>1.1</text:p>
          </table:table-cell>
          <table:table-cell table:style-name="ce1068" table:formula="of:=HLOOKUP([.R8];[.$AF$25:.$AW$26];2;0)" office:value-type="float" office:value="3" calcext:value-type="float">
            <text:p>3.0</text:p>
          </table:table-cell>
          <table:table-cell/>
          <table:table-cell table:style-name="ce1073" table:formula="of:=HLOOKUP([.T8];[.$AF$25:.$AW$26];2;0)" office:value-type="float" office:value="1.3" calcext:value-type="float">
            <text:p>1.3</text:p>
          </table:table-cell>
          <table:table-cell table:style-name="ce1079" table:formula="of:=HLOOKUP([.U8];[.$AF$25:.$AW$26];2;0)" office:value-type="float" office:value="1.2" calcext:value-type="float">
            <text:p>1.2</text:p>
          </table:table-cell>
          <table:table-cell table:style-name="ce1082" table:formula="of:=HLOOKUP([.V8];[.$AF$25:.$AW$26];2;0)" office:value-type="float" office:value="1.1" calcext:value-type="float">
            <text:p>1.1</text:p>
          </table:table-cell>
          <table:table-cell table:style-name="ce1085" table:formula="of:=HLOOKUP([.W8];[.$AF$25:.$AW$26];2;0)" office:value-type="float" office:value="2.1" calcext:value-type="float">
            <text:p>2.1</text:p>
          </table:table-cell>
          <table:table-cell table:style-name="ce1086" table:formula="of:=HLOOKUP([.X8];[.$AF$25:.$AW$26];2;0)" office:value-type="float" office:value="3" calcext:value-type="float">
            <text:p>3.0</text:p>
          </table:table-cell>
          <table:table-cell/>
          <table:table-cell table:style-name="ce1092" table:formula="of:=HLOOKUP([.Z8];[.$AF$25:.$AW$26];2;0)" office:value-type="float" office:value="2.2" calcext:value-type="float">
            <text:p>2.2</text:p>
          </table:table-cell>
          <table:table-cell table:style-name="ce1098" table:formula="of:=HLOOKUP([.AA8];[.$AF$25:.$AW$26];2;0)" office:value-type="float" office:value="1.2" calcext:value-type="float">
            <text:p>1.2</text:p>
          </table:table-cell>
          <table:table-cell table:style-name="ce1101" table:formula="of:=HLOOKUP([.AB8];[.$AF$25:.$AW$26];2;0)" office:value-type="float" office:value="1.1" calcext:value-type="float">
            <text:p>1.1</text:p>
          </table:table-cell>
          <table:table-cell table:style-name="ce1104" table:formula="of:=HLOOKUP([.AC8];[.$AF$25:.$AW$26];2;0)" office:value-type="float" office:value="2.3" calcext:value-type="float">
            <text:p>2.3</text:p>
          </table:table-cell>
          <table:table-cell table:style-name="ce1107" table:formula="of:=HLOOKUP([.AD8];[.$AF$25:.$AW$26];2;0)" office:value-type="float" office:value="4.2" calcext:value-type="float">
            <text:p>4.2</text:p>
          </table:table-cell>
          <table:table-cell table:style-name="ce623"/>
          <table:table-cell table:style-name="ce1110" office:value-type="float" office:value="0" calcext:value-type="float">
            <text:p>0</text:p>
          </table:table-cell>
          <table:table-cell table:style-name="ce1110" office:value-type="float" office:value="1" calcext:value-type="float">
            <text:p>1</text:p>
          </table:table-cell>
          <table:table-cell table:style-name="ce1110" office:value-type="float" office:value="2" calcext:value-type="float">
            <text:p>2</text:p>
          </table:table-cell>
          <table:table-cell table:style-name="ce1110" office:value-type="float" office:value="3" calcext:value-type="float">
            <text:p>3</text:p>
          </table:table-cell>
          <table:table-cell table:style-name="ce1110" office:value-type="float" office:value="4" calcext:value-type="float">
            <text:p>4</text:p>
          </table:table-cell>
          <table:table-cell table:style-name="ce1110" office:value-type="float" office:value="5" calcext:value-type="float">
            <text:p>5</text:p>
          </table:table-cell>
          <table:table-cell table:style-name="ce1110" office:value-type="float" office:value="6" calcext:value-type="float">
            <text:p>6</text:p>
          </table:table-cell>
          <table:table-cell table:style-name="ce1110" office:value-type="float" office:value="7" calcext:value-type="float">
            <text:p>7</text:p>
          </table:table-cell>
          <table:table-cell table:style-name="ce1110" office:value-type="float" office:value="8" calcext:value-type="float">
            <text:p>8</text:p>
          </table:table-cell>
          <table:table-cell table:style-name="ce1110" office:value-type="float" office:value="9" calcext:value-type="float">
            <text:p>9</text:p>
          </table:table-cell>
          <table:table-cell table:style-name="ce1110" office:value-type="float" office:value="10" calcext:value-type="float">
            <text:p>10</text:p>
          </table:table-cell>
          <table:table-cell table:style-name="ce1110" office:value-type="float" office:value="11" calcext:value-type="float">
            <text:p>11</text:p>
          </table:table-cell>
          <table:table-cell table:style-name="ce1110" office:value-type="float" office:value="12" calcext:value-type="float">
            <text:p>12</text:p>
          </table:table-cell>
          <table:table-cell table:style-name="ce1110" office:value-type="float" office:value="13" calcext:value-type="float">
            <text:p>13</text:p>
          </table:table-cell>
          <table:table-cell table:style-name="ce1110" office:value-type="float" office:value="14" calcext:value-type="float">
            <text:p>14</text:p>
          </table:table-cell>
          <table:table-cell table:number-columns-repeated="16"/>
          <table:table-cell table:formula="of:=COM.MICROSOFT.CONCAT(&quot;&quot;&quot;11&quot;&quot;: { &quot;;COM.MICROSOFT.TEXTJOIN(&quot;, &quot;;TRUE();[.AL16:.AP18]);&quot;}&quot;)" office:value-type="string" office:string-value="&quot;11&quot;: { &quot;0&quot;: 14, &quot;1&quot;: 13, &quot;2&quot;: 7, &quot;3&quot;: 8, &quot;4&quot;: 12, &quot;5&quot;: 9, &quot;6&quot;: 5, &quot;7&quot;: 3, &quot;8&quot;: 4, &quot;9&quot;: 10, &quot;10&quot;: 6, &quot;11&quot;: 10, &quot;12&quot;: 1, &quot;13&quot;: 2, &quot;14&quot;: 11}" calcext:value-type="string">
            <text:p>"11": { "0": 14, "1": 13, "2": 7, "3": 8, "4": 12, "5": 9, "6": 5, "7": 3, "8": 4, "9": 10, "10": 6, "11": 10, "12": 1, "13": 2, "14": 11}</text:p>
          </table:table-cell>
          <table:table-cell table:number-columns-repeated="36"/>
        </table:table-row>
        <table:table-row table:style-name="ro1">
          <table:table-cell/>
          <table:table-cell table:style-name="ce997" table:formula="of:=HLOOKUP([.B9];[.$AF$25:.$AW$26];2;0)" office:value-type="float" office:value="3.1" calcext:value-type="float">
            <text:p>3.1</text:p>
          </table:table-cell>
          <table:table-cell table:style-name="ce1010" table:formula="of:=HLOOKUP([.C9];[.$AF$25:.$AW$26];2;0)" office:value-type="float" office:value="3" calcext:value-type="float">
            <text:p>3.0</text:p>
          </table:table-cell>
          <table:table-cell table:style-name="ce1015" table:formula="of:=HLOOKUP([.D9];[.$AF$25:.$AW$26];2;0)" office:value-type="float" office:value="2.3" calcext:value-type="float">
            <text:p>2.3</text:p>
          </table:table-cell>
          <table:table-cell table:style-name="ce1024" table:formula="of:=HLOOKUP([.E9];[.$AF$25:.$AW$26];2;0)" office:value-type="float" office:value="2" calcext:value-type="float">
            <text:p>2.0</text:p>
          </table:table-cell>
          <table:table-cell table:style-name="ce1024" table:formula="of:=HLOOKUP([.F9];[.$AF$25:.$AW$26];2;0)" office:value-type="float" office:value="2.2" calcext:value-type="float">
            <text:p>2.2</text:p>
          </table:table-cell>
          <table:table-cell/>
          <table:table-cell table:style-name="ce1036" table:formula="of:=HLOOKUP([.H9];[.$AF$25:.$AW$26];2;0)" office:value-type="float" office:value="2.3" calcext:value-type="float">
            <text:p>2.3</text:p>
          </table:table-cell>
          <table:table-cell table:style-name="ce1042" table:formula="of:=HLOOKUP([.I9];[.$AF$25:.$AW$26];2;0)" office:value-type="float" office:value="3" calcext:value-type="float">
            <text:p>3.0</text:p>
          </table:table-cell>
          <table:table-cell table:style-name="ce1047" table:formula="of:=HLOOKUP([.J9];[.$AF$25:.$AW$26];2;0)" office:value-type="float" office:value="2" calcext:value-type="float">
            <text:p>2.0</text:p>
          </table:table-cell>
          <table:table-cell table:style-name="ce1050" table:formula="of:=HLOOKUP([.K9];[.$AF$25:.$AW$26];2;0)" office:value-type="float" office:value="1.2" calcext:value-type="float">
            <text:p>1.2</text:p>
          </table:table-cell>
          <table:table-cell table:style-name="ce1050" table:formula="of:=HLOOKUP([.L9];[.$AF$25:.$AW$26];2;0)" office:value-type="float" office:value="2.1" calcext:value-type="float">
            <text:p>2.1</text:p>
          </table:table-cell>
          <table:table-cell/>
          <table:table-cell table:style-name="ce1054" table:formula="of:=HLOOKUP([.N9];[.$AF$25:.$AW$26];2;0)" office:value-type="float" office:value="2.3" calcext:value-type="float">
            <text:p>2.3</text:p>
          </table:table-cell>
          <table:table-cell table:style-name="ce1059" table:formula="of:=HLOOKUP([.O9];[.$AF$25:.$AW$26];2;0)" office:value-type="float" office:value="2" calcext:value-type="float">
            <text:p>2.0</text:p>
          </table:table-cell>
          <table:table-cell table:style-name="ce1063" table:formula="of:=HLOOKUP([.P9];[.$AF$25:.$AW$26];2;0)" office:value-type="float" office:value="2.1" calcext:value-type="float">
            <text:p>2.1</text:p>
          </table:table-cell>
          <table:table-cell table:style-name="ce1068" table:formula="of:=HLOOKUP([.Q9];[.$AF$25:.$AW$26];2;0)" office:value-type="float" office:value="1.2" calcext:value-type="float">
            <text:p>1.2</text:p>
          </table:table-cell>
          <table:table-cell table:style-name="ce1068" table:formula="of:=HLOOKUP([.R9];[.$AF$25:.$AW$26];2;0)" office:value-type="float" office:value="2.2" calcext:value-type="float">
            <text:p>2.2</text:p>
          </table:table-cell>
          <table:table-cell/>
          <table:table-cell table:style-name="ce1074" table:formula="of:=HLOOKUP([.T9];[.$AF$25:.$AW$26];2;0)" office:value-type="float" office:value="2.1" calcext:value-type="float">
            <text:p>2.1</text:p>
          </table:table-cell>
          <table:table-cell table:style-name="ce1079" table:formula="of:=HLOOKUP([.U9];[.$AF$25:.$AW$26];2;0)" office:value-type="float" office:value="2" calcext:value-type="float">
            <text:p>2.0</text:p>
          </table:table-cell>
          <table:table-cell table:style-name="ce1082" table:formula="of:=HLOOKUP([.V9];[.$AF$25:.$AW$26];2;0)" office:value-type="float" office:value="2.2" calcext:value-type="float">
            <text:p>2.2</text:p>
          </table:table-cell>
          <table:table-cell table:style-name="ce1086" table:formula="of:=HLOOKUP([.W9];[.$AF$25:.$AW$26];2;0)" office:value-type="float" office:value="2.3" calcext:value-type="float">
            <text:p>2.3</text:p>
          </table:table-cell>
          <table:table-cell table:style-name="ce1086" table:formula="of:=HLOOKUP([.X9];[.$AF$25:.$AW$26];2;0)" office:value-type="float" office:value="3.1" calcext:value-type="float">
            <text:p>3.1</text:p>
          </table:table-cell>
          <table:table-cell/>
          <table:table-cell table:style-name="ce1093" table:formula="of:=HLOOKUP([.Z9];[.$AF$25:.$AW$26];2;0)" office:value-type="float" office:value="2.1" calcext:value-type="float">
            <text:p>2.1</text:p>
          </table:table-cell>
          <table:table-cell table:style-name="ce1098" table:formula="of:=HLOOKUP([.AA9];[.$AF$25:.$AW$26];2;0)" office:value-type="float" office:value="2" calcext:value-type="float">
            <text:p>2.0</text:p>
          </table:table-cell>
          <table:table-cell table:style-name="ce1101" table:formula="of:=HLOOKUP([.AB9];[.$AF$25:.$AW$26];2;0)" office:value-type="float" office:value="1.3" calcext:value-type="float">
            <text:p>1.3</text:p>
          </table:table-cell>
          <table:table-cell table:style-name="ce1104" table:formula="of:=HLOOKUP([.AC9];[.$AF$25:.$AW$26];2;0)" office:value-type="float" office:value="3.1" calcext:value-type="float">
            <text:p>3.1</text:p>
          </table:table-cell>
          <table:table-cell table:style-name="ce1104" table:formula="of:=HLOOKUP([.AD9];[.$AF$25:.$AW$26];2;0)" office:value-type="float" office:value="3" calcext:value-type="float">
            <text:p>3.0</text:p>
          </table:table-cell>
          <table:table-cell table:style-name="ce623"/>
          <table:table-cell table:style-name="ce1111" office:value-type="float" office:value="1" calcext:value-type="float">
            <text:p>1.0</text:p>
          </table:table-cell>
          <table:table-cell table:style-name="ce1111" office:value-type="float" office:value="1.1" calcext:value-type="float">
            <text:p>1.1</text:p>
          </table:table-cell>
          <table:table-cell table:style-name="ce1111" office:value-type="float" office:value="1.2" calcext:value-type="float">
            <text:p>1.2</text:p>
          </table:table-cell>
          <table:table-cell table:style-name="ce1111" office:value-type="float" office:value="1.3" calcext:value-type="float">
            <text:p>1.3</text:p>
          </table:table-cell>
          <table:table-cell table:style-name="ce1112" office:value-type="float" office:value="2" calcext:value-type="float">
            <text:p>2.0</text:p>
          </table:table-cell>
          <table:table-cell table:style-name="ce1112" office:value-type="float" office:value="2.1" calcext:value-type="float">
            <text:p>2.1</text:p>
          </table:table-cell>
          <table:table-cell table:style-name="ce1113" office:value-type="float" office:value="2.2" calcext:value-type="float">
            <text:p>2.2</text:p>
          </table:table-cell>
          <table:table-cell table:style-name="ce1113" office:value-type="float" office:value="2.3" calcext:value-type="float">
            <text:p>2.3</text:p>
          </table:table-cell>
          <table:table-cell table:style-name="ce1111" office:value-type="float" office:value="3" calcext:value-type="float">
            <text:p>3.0</text:p>
          </table:table-cell>
          <table:table-cell table:style-name="ce1111" office:value-type="float" office:value="3.1" calcext:value-type="float">
            <text:p>3.1</text:p>
          </table:table-cell>
          <table:table-cell table:style-name="ce1111" office:value-type="float" office:value="3.2" calcext:value-type="float">
            <text:p>3.2</text:p>
          </table:table-cell>
          <table:table-cell table:style-name="ce1111" office:value-type="float" office:value="3.6" calcext:value-type="float">
            <text:p>3.6</text:p>
          </table:table-cell>
          <table:table-cell table:style-name="ce1111" office:value-type="float" office:value="4" calcext:value-type="float">
            <text:p>4.0</text:p>
          </table:table-cell>
          <table:table-cell table:style-name="ce1111" office:value-type="float" office:value="4.2" calcext:value-type="float">
            <text:p>4.2</text:p>
          </table:table-cell>
          <table:table-cell table:style-name="ce1111" office:value-type="float" office:value="4.4" calcext:value-type="float">
            <text:p>4.4</text:p>
          </table:table-cell>
          <table:table-cell table:number-columns-repeated="16"/>
          <table:table-cell table:formula="of:=COM.MICROSOFT.CONCAT(&quot;&quot;&quot;12&quot;&quot;: { &quot;;COM.MICROSOFT.TEXTJOIN(&quot;, &quot;;TRUE();[.AR16:.AV18]);&quot;}&quot;)" office:value-type="string" office:string-value="&quot;12&quot;: { &quot;0&quot;: 14, &quot;1&quot;: 13, &quot;2&quot;: 10, &quot;3&quot;: 9, &quot;4&quot;: 12, &quot;5&quot;: 8, &quot;6&quot;: 6, &quot;7&quot;: 4, &quot;8&quot;: 3, &quot;9&quot;: 7, &quot;10&quot;: 5, &quot;11&quot;: 2, &quot;12&quot;: 9, &quot;13&quot;: 1, &quot;14&quot;: 11}" calcext:value-type="string">
            <text:p>"12": { "0": 14, "1": 13, "2": 10, "3": 9, "4": 12, "5": 8, "6": 6, "7": 4, "8": 3, "9": 7, "10": 5, "11": 2, "12": 9, "13": 1, "14": 11}</text:p>
          </table:table-cell>
          <table:table-cell table:number-columns-repeated="36"/>
        </table:table-row>
        <table:table-row table:style-name="ro1">
          <table:table-cell/>
          <table:table-cell table:style-name="ce997" table:formula="of:=HLOOKUP([.B10];[.$AF$25:.$AW$26];2;0)" office:value-type="float" office:value="4" calcext:value-type="float">
            <text:p>4.0</text:p>
          </table:table-cell>
          <table:table-cell table:style-name="ce1010" table:formula="of:=HLOOKUP([.C10];[.$AF$25:.$AW$26];2;0)" office:value-type="float" office:value="4.4" calcext:value-type="float">
            <text:p>4.4</text:p>
          </table:table-cell>
          <table:table-cell table:style-name="ce1015" table:formula="of:=HLOOKUP([.D10];[.$AF$25:.$AW$26];2;0)" office:value-type="float" office:value="4.2" calcext:value-type="float">
            <text:p>4.2</text:p>
          </table:table-cell>
          <table:table-cell table:style-name="ce1024" table:formula="of:=HLOOKUP([.E10];[.$AF$25:.$AW$26];2;0)" office:value-type="float" office:value="3.2" calcext:value-type="float">
            <text:p>3.2</text:p>
          </table:table-cell>
          <table:table-cell table:style-name="ce1024" table:formula="of:=HLOOKUP([.F10];[.$AF$25:.$AW$26];2;0)" office:value-type="float" office:value="3.6" calcext:value-type="float">
            <text:p>3.6</text:p>
          </table:table-cell>
          <table:table-cell/>
          <table:table-cell table:style-name="ce1036" table:formula="of:=HLOOKUP([.H10];[.$AF$25:.$AW$26];2;0)" office:value-type="float" office:value="4.2" calcext:value-type="float">
            <text:p>4.2</text:p>
          </table:table-cell>
          <table:table-cell table:style-name="ce1042" table:formula="of:=HLOOKUP([.I10];[.$AF$25:.$AW$26];2;0)" office:value-type="float" office:value="4.4" calcext:value-type="float">
            <text:p>4.4</text:p>
          </table:table-cell>
          <table:table-cell table:style-name="ce1047" table:formula="of:=HLOOKUP([.J10];[.$AF$25:.$AW$26];2;0)" office:value-type="float" office:value="4" calcext:value-type="float">
            <text:p>4.0</text:p>
          </table:table-cell>
          <table:table-cell table:style-name="ce1050" table:formula="of:=HLOOKUP([.K10];[.$AF$25:.$AW$26];2;0)" office:value-type="float" office:value="3.2" calcext:value-type="float">
            <text:p>3.2</text:p>
          </table:table-cell>
          <table:table-cell table:style-name="ce1050" table:formula="of:=HLOOKUP([.L10];[.$AF$25:.$AW$26];2;0)" office:value-type="float" office:value="3.6" calcext:value-type="float">
            <text:p>3.6</text:p>
          </table:table-cell>
          <table:table-cell/>
          <table:table-cell table:style-name="ce1054" table:formula="of:=HLOOKUP([.N10];[.$AF$25:.$AW$26];2;0)" office:value-type="float" office:value="4" calcext:value-type="float">
            <text:p>4.0</text:p>
          </table:table-cell>
          <table:table-cell table:style-name="ce1059" table:formula="of:=HLOOKUP([.O10];[.$AF$25:.$AW$26];2;0)" office:value-type="float" office:value="3.6" calcext:value-type="float">
            <text:p>3.6</text:p>
          </table:table-cell>
          <table:table-cell table:style-name="ce1063" table:formula="of:=HLOOKUP([.P10];[.$AF$25:.$AW$26];2;0)" office:value-type="float" office:value="4.2" calcext:value-type="float">
            <text:p>4.2</text:p>
          </table:table-cell>
          <table:table-cell table:style-name="ce1068" table:formula="of:=HLOOKUP([.Q10];[.$AF$25:.$AW$26];2;0)" office:value-type="float" office:value="3.2" calcext:value-type="float">
            <text:p>3.2</text:p>
          </table:table-cell>
          <table:table-cell table:style-name="ce1068" table:formula="of:=HLOOKUP([.R10];[.$AF$25:.$AW$26];2;0)" office:value-type="float" office:value="4.4" calcext:value-type="float">
            <text:p>4.4</text:p>
          </table:table-cell>
          <table:table-cell/>
          <table:table-cell table:style-name="ce1074" table:formula="of:=HLOOKUP([.T10];[.$AF$25:.$AW$26];2;0)" office:value-type="float" office:value="4.2" calcext:value-type="float">
            <text:p>4.2</text:p>
          </table:table-cell>
          <table:table-cell table:style-name="ce1079" table:formula="of:=HLOOKUP([.U10];[.$AF$25:.$AW$26];2;0)" office:value-type="float" office:value="3.6" calcext:value-type="float">
            <text:p>3.6</text:p>
          </table:table-cell>
          <table:table-cell table:style-name="ce1082" table:formula="of:=HLOOKUP([.V10];[.$AF$25:.$AW$26];2;0)" office:value-type="float" office:value="3.2" calcext:value-type="float">
            <text:p>3.2</text:p>
          </table:table-cell>
          <table:table-cell table:style-name="ce1086" table:formula="of:=HLOOKUP([.W10];[.$AF$25:.$AW$26];2;0)" office:value-type="float" office:value="4" calcext:value-type="float">
            <text:p>4.0</text:p>
          </table:table-cell>
          <table:table-cell table:style-name="ce1086" table:formula="of:=HLOOKUP([.X10];[.$AF$25:.$AW$26];2;0)" office:value-type="float" office:value="4.4" calcext:value-type="float">
            <text:p>4.4</text:p>
          </table:table-cell>
          <table:table-cell/>
          <table:table-cell table:style-name="ce1093" table:formula="of:=HLOOKUP([.Z10];[.$AF$25:.$AW$26];2;0)" office:value-type="float" office:value="4" calcext:value-type="float">
            <text:p>4.0</text:p>
          </table:table-cell>
          <table:table-cell table:style-name="ce1098" table:formula="of:=HLOOKUP([.AA10];[.$AF$25:.$AW$26];2;0)" office:value-type="float" office:value="3.6" calcext:value-type="float">
            <text:p>3.6</text:p>
          </table:table-cell>
          <table:table-cell table:style-name="ce1101" table:formula="of:=HLOOKUP([.AB10];[.$AF$25:.$AW$26];2;0)" office:value-type="float" office:value="3.2" calcext:value-type="float">
            <text:p>3.2</text:p>
          </table:table-cell>
          <table:table-cell table:style-name="ce1104" table:formula="of:=HLOOKUP([.AC10];[.$AF$25:.$AW$26];2;0)" office:value-type="float" office:value="4.4" calcext:value-type="float">
            <text:p>4.4</text:p>
          </table:table-cell>
          <table:table-cell table:style-name="ce1104" table:formula="of:=HLOOKUP([.AD10];[.$AF$25:.$AW$26];2;0)" office:value-type="float" office:value="4.2" calcext:value-type="float">
            <text:p>4.2</text:p>
          </table:table-cell>
          <table:table-cell table:style-name="ce623"/>
          <table:table-cell table:number-columns-repeated="31"/>
          <table:table-cell table:formula="of:=COM.MICROSOFT.CONCAT(&quot;&quot;&quot;13&quot;&quot;: { &quot;;COM.MICROSOFT.TEXTJOIN(&quot;, &quot;;TRUE();[.AX16:.BB18]);&quot;}&quot;)" office:value-type="string" office:string-value="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" calcext:value-type="string">
            <text:p>"13": { "0": 13, "1": 12, "2": 8, "3": 11, "4": 14, "5": 6, "6": 4, "7": 3, "8": 7, "9": 9, "10": 5, "11": 2, "12": 1, "13": 4, "14": 10}</text:p>
          </table:table-cell>
          <table:table-cell table:number-columns-repeated="36"/>
        </table:table-row>
        <table:table-row table:style-name="ro1">
          <table:table-cell/>
          <table:table-cell table:style-name="ce639" table:number-columns-repeated="29"/>
          <table:table-cell table:style-name="ce623"/>
          <table:table-cell table:style-name="ce864" table:formula="of:=COM.MICROSOFT.TEXTJOIN(&quot;, &quot;;TRUE();[.AF26:.AT26])" office:value-type="string" office:string-value="1, 1.1, 1.2, 1.3, 2, 2.1, 2.2, 2.3, 3, 3.1, 3.2, 3.6, 4, 4.2, 4.4" calcext:value-type="string">
            <text:p>1, 1.1, 1.2, 1.3, 2, 2.1, 2.2, 2.3, 3, 3.1, 3.2, 3.6, 4, 4.2, 4.4</text:p>
          </table:table-cell>
          <table:table-cell table:number-columns-repeated="30"/>
          <table:table-cell table:formula="of:=COM.MICROSOFT.CONCAT(&quot;&quot;&quot;14&quot;&quot;: { &quot;;COM.MICROSOFT.TEXTJOIN(&quot;, &quot;;TRUE();[.BD16:.BH18]);&quot;}&quot;)" office:value-type="string" office:string-value="&quot;14&quot;: { &quot;0&quot;: 14, &quot;1&quot;: 13, &quot;2&quot;: 10, &quot;3&quot;: 12, &quot;4&quot;: 11, &quot;5&quot;: 6, &quot;6&quot;: 4, &quot;7&quot;: 3, &quot;8&quot;: 8, &quot;9&quot;: 9, &quot;10&quot;: 5, &quot;11&quot;: 2, &quot;12&quot;: 1, &quot;13&quot;: 7, &quot;14&quot;: 12}" calcext:value-type="string">
            <text:p>"14": { "0": 14, "1": 13, "2": 10, "3": 12, "4": 11, "5": 6, "6": 4, "7": 3, "8": 8, "9": 9, "10": 5, "11": 2, "12": 1, "13": 7, "14": 12}</text:p>
          </table:table-cell>
          <table:table-cell table:number-columns-repeated="36"/>
        </table:table-row>
        <table:table-row table:style-name="ro1">
          <table:table-cell/>
          <table:table-cell table:style-name="ce640" table:formula="of:=SUM([.B30:.F32])-[.B31]" office:value-type="float" office:value="37.7" calcext:value-type="float" table:number-columns-spanned="2" table:number-rows-spanned="1">
            <text:p>37.7</text:p>
          </table:table-cell>
          <table:covered-table-cell table:style-name="ce647"/>
          <table:table-cell table:style-name="ce647" table:number-columns-repeated="3"/>
          <table:table-cell/>
          <table:table-cell table:style-name="ce640" table:formula="of:=SUM([.H30:.L32])-[.I31]" office:value-type="float" office:value="37.7" calcext:value-type="float" table:number-columns-spanned="2" table:number-rows-spanned="1">
            <text:p>37.7</text:p>
          </table:table-cell>
          <table:covered-table-cell table:style-name="ce647"/>
          <table:table-cell table:style-name="ce647" table:number-columns-repeated="3"/>
          <table:table-cell/>
          <table:table-cell table:style-name="ce640" table:formula="of:=SUM([.N30:.R32])-[.P31]" office:value-type="float" office:value="37.7" calcext:value-type="float" table:number-columns-spanned="2" table:number-rows-spanned="1">
            <text:p>37.7</text:p>
          </table:table-cell>
          <table:covered-table-cell table:style-name="ce647"/>
          <table:table-cell table:style-name="ce647" table:number-columns-repeated="3"/>
          <table:table-cell/>
          <table:table-cell table:style-name="ce640" table:formula="of:=SUM([.T30:.X32])-[.W31]" office:value-type="float" office:value="37.7" calcext:value-type="float" table:number-columns-spanned="2" table:number-rows-spanned="1">
            <text:p>37.7</text:p>
          </table:table-cell>
          <table:covered-table-cell table:style-name="ce647"/>
          <table:table-cell table:style-name="ce647" table:number-columns-repeated="3"/>
          <table:table-cell/>
          <table:table-cell table:style-name="ce640" table:formula="of:=SUM([.Z30:.AD32])-[.AD31]" office:value-type="float" office:value="37.7" calcext:value-type="float" table:number-columns-spanned="2" table:number-rows-spanned="1">
            <text:p>37.7</text:p>
          </table:table-cell>
          <table:covered-table-cell table:style-name="ce647"/>
          <table:table-cell table:style-name="ce647" table:number-columns-repeated="3"/>
          <table:table-cell table:style-name="ce623"/>
          <table:table-cell table:number-columns-repeated="68"/>
        </table:table-row>
        <table:table-row table:style-name="ro1">
          <table:table-cell/>
          <table:table-cell table:style-name="ce999" table:formula="of:=HLOOKUP([.B12];[.$AF$25:.$AW$26];2;0)" office:value-type="float" office:value="4.4" calcext:value-type="float">
            <text:p>4.4</text:p>
          </table:table-cell>
          <table:table-cell table:style-name="ce1012" table:formula="of:=HLOOKUP([.C12];[.$AF$25:.$AW$26];2;0)" office:value-type="float" office:value="3.1" calcext:value-type="float">
            <text:p>3.1</text:p>
          </table:table-cell>
          <table:table-cell table:style-name="ce1016" table:formula="of:=HLOOKUP([.D12];[.$AF$25:.$AW$26];2;0)" office:value-type="float" office:value="2" calcext:value-type="float">
            <text:p>2.0</text:p>
          </table:table-cell>
          <table:table-cell table:style-name="ce1033" table:formula="of:=HLOOKUP([.E12];[.$AF$25:.$AW$26];2;0)" office:value-type="float" office:value="2.2" calcext:value-type="float">
            <text:p>2.2</text:p>
          </table:table-cell>
          <table:table-cell table:style-name="ce1033" table:formula="of:=HLOOKUP([.F12];[.$AF$25:.$AW$26];2;0)" office:value-type="float" office:value="4.2" calcext:value-type="float">
            <text:p>4.2</text:p>
          </table:table-cell>
          <table:table-cell/>
          <table:table-cell table:style-name="ce1037" table:formula="of:=HLOOKUP([.H12];[.$AF$25:.$AW$26];2;0)" office:value-type="float" office:value="4.4" calcext:value-type="float">
            <text:p>4.4</text:p>
          </table:table-cell>
          <table:table-cell table:style-name="ce1043" table:formula="of:=HLOOKUP([.I12];[.$AF$25:.$AW$26];2;0)" office:value-type="float" office:value="3" calcext:value-type="float">
            <text:p>3.0</text:p>
          </table:table-cell>
          <table:table-cell table:style-name="ce1048" table:formula="of:=HLOOKUP([.J12];[.$AF$25:.$AW$26];2;0)" office:value-type="float" office:value="1.3" calcext:value-type="float">
            <text:p>1.3</text:p>
          </table:table-cell>
          <table:table-cell table:style-name="ce1051" table:formula="of:=HLOOKUP([.K12];[.$AF$25:.$AW$26];2;0)" office:value-type="float" office:value="2.1" calcext:value-type="float">
            <text:p>2.1</text:p>
          </table:table-cell>
          <table:table-cell table:style-name="ce1051" table:formula="of:=HLOOKUP([.L12];[.$AF$25:.$AW$26];2;0)" office:value-type="float" office:value="4.2" calcext:value-type="float">
            <text:p>4.2</text:p>
          </table:table-cell>
          <table:table-cell/>
          <table:table-cell table:style-name="ce1055" table:formula="of:=HLOOKUP([.N12];[.$AF$25:.$AW$26];2;0)" office:value-type="float" office:value="4.4" calcext:value-type="float">
            <text:p>4.4</text:p>
          </table:table-cell>
          <table:table-cell table:style-name="ce1060" table:formula="of:=HLOOKUP([.O12];[.$AF$25:.$AW$26];2;0)" office:value-type="float" office:value="2.1" calcext:value-type="float">
            <text:p>2.1</text:p>
          </table:table-cell>
          <table:table-cell table:style-name="ce1064" table:formula="of:=HLOOKUP([.P12];[.$AF$25:.$AW$26];2;0)" office:value-type="float" office:value="2.2" calcext:value-type="float">
            <text:p>2.2</text:p>
          </table:table-cell>
          <table:table-cell table:style-name="ce1069" table:formula="of:=HLOOKUP([.Q12];[.$AF$25:.$AW$26];2;0)" office:value-type="float" office:value="3.1" calcext:value-type="float">
            <text:p>3.1</text:p>
          </table:table-cell>
          <table:table-cell table:style-name="ce1069" table:formula="of:=HLOOKUP([.R12];[.$AF$25:.$AW$26];2;0)" office:value-type="float" office:value="4.2" calcext:value-type="float">
            <text:p>4.2</text:p>
          </table:table-cell>
          <table:table-cell/>
          <table:table-cell table:style-name="ce1075" table:formula="of:=HLOOKUP([.T12];[.$AF$25:.$AW$26];2;0)" office:value-type="float" office:value="4" calcext:value-type="float">
            <text:p>4.0</text:p>
          </table:table-cell>
          <table:table-cell table:style-name="ce1080" table:formula="of:=HLOOKUP([.U12];[.$AF$25:.$AW$26];2;0)" office:value-type="float" office:value="2.1" calcext:value-type="float">
            <text:p>2.1</text:p>
          </table:table-cell>
          <table:table-cell table:style-name="ce1083" table:formula="of:=HLOOKUP([.V12];[.$AF$25:.$AW$26];2;0)" office:value-type="float" office:value="1.3" calcext:value-type="float">
            <text:p>1.3</text:p>
          </table:table-cell>
          <table:table-cell table:style-name="ce1087" table:formula="of:=HLOOKUP([.W12];[.$AF$25:.$AW$26];2;0)" office:value-type="float" office:value="3.2" calcext:value-type="float">
            <text:p>3.2</text:p>
          </table:table-cell>
          <table:table-cell table:style-name="ce1087" table:formula="of:=HLOOKUP([.X12];[.$AF$25:.$AW$26];2;0)" office:value-type="float" office:value="4.4" calcext:value-type="float">
            <text:p>4.4</text:p>
          </table:table-cell>
          <table:table-cell/>
          <table:table-cell table:style-name="ce1094" table:formula="of:=HLOOKUP([.Z12];[.$AF$25:.$AW$26];2;0)" office:value-type="float" office:value="4.4" calcext:value-type="float">
            <text:p>4.4</text:p>
          </table:table-cell>
          <table:table-cell table:style-name="ce1099" table:formula="of:=HLOOKUP([.AA12];[.$AF$25:.$AW$26];2;0)" office:value-type="float" office:value="2.2" calcext:value-type="float">
            <text:p>2.2</text:p>
          </table:table-cell>
          <table:table-cell table:style-name="ce1102" table:formula="of:=HLOOKUP([.AB12];[.$AF$25:.$AW$26];2;0)" office:value-type="float" office:value="2.1" calcext:value-type="float">
            <text:p>2.1</text:p>
          </table:table-cell>
          <table:table-cell table:style-name="ce1105" table:formula="of:=HLOOKUP([.AC12];[.$AF$25:.$AW$26];2;0)" office:value-type="float" office:value="3.2" calcext:value-type="float">
            <text:p>3.2</text:p>
          </table:table-cell>
          <table:table-cell table:style-name="ce1105" table:formula="of:=HLOOKUP([.AD12];[.$AF$25:.$AW$26];2;0)" office:value-type="float" office:value="4" calcext:value-type="float">
            <text:p>4.0</text:p>
          </table:table-cell>
          <table:table-cell table:style-name="ce623"/>
          <table:table-cell table:number-columns-repeated="31"/>
          <table:table-cell table:formula="of:=COM.MICROSOFT.TEXTJOIN(&quot;, &quot;;TRUE();[.BK24:.BK28])" office:value-type="string" office:string-value="&quot;10&quot;: { &quot;0&quot;: 14, &quot;1&quot;: 13, &quot;2&quot;: 10, &quot;3&quot;: 11, &quot;4&quot;: 12, &quot;5&quot;: 9, &quot;6&quot;: 6, &quot;7&quot;: 4, &quot;8&quot;: 5, &quot;9&quot;: 8, &quot;10&quot;: 11, &quot;11&quot;: 1, &quot;12&quot;: 2, &quot;13&quot;: 3, &quot;14&quot;: 7}, &quot;11&quot;: { &quot;0&quot;: 14, &quot;1&quot;: 13, &quot;2&quot;: 7, &quot;3&quot;: 8, &quot;4&quot;: 12, &quot;5&quot;: 9, &quot;6&quot;: 5, &quot;7&quot;: 3, &quot;8&quot;: 4, &quot;9&quot;: 10, &quot;10&quot;: 6, &quot;11&quot;: 10, &quot;12&quot;: 1, &quot;13&quot;: 2, &quot;14&quot;: 11}, &quot;12&quot;: { &quot;0&quot;: 14, &quot;1&quot;: 13, &quot;2&quot;: 10, &quot;3&quot;: 9, &quot;4&quot;: 12, &quot;5&quot;: 8, &quot;6&quot;: 6, &quot;7&quot;: 4, &quot;8&quot;: 3, &quot;9&quot;: 7, &quot;10&quot;: 5, &quot;11&quot;: 2, &quot;12&quot;: 9, &quot;13&quot;: 1, &quot;14&quot;: 11}, 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, &quot;14&quot;: { &quot;0&quot;: 14, &quot;1&quot;: 13, &quot;2&quot;: 10, &quot;3&quot;: 12, &quot;4&quot;: 11, &quot;5&quot;: 6, &quot;6&quot;: 4, &quot;7&quot;: 3, &quot;8&quot;: 8, &quot;9&quot;: 9, &quot;10&quot;: 5, &quot;11&quot;: 2, &quot;12&quot;: 1, &quot;13&quot;: 7, &quot;14&quot;: 12}" calcext:value-type="string">
            <text:p>"10": { "0": 14, "1": 13, "2": 10, "3": 11, "4": 12, "5": 9, "6": 6, "7": 4, "8": 5, "9": 8, "10": 11, "11": 1, "12": 2, "13": 3, "14": 7}, "11": { "0": 14, "1": 13, "2": 7, "3": 8, "4": 12, "5": 9, "6": 5, "7": 3, "8": 4, "9": 10, "10": 6, "11": 10, "12": 1, "13": 2, "14": 11}, "12": { "0": 14, "1": 13, "2": 10, "3": 9, "4": 12, "5": 8, "6": 6, "7": 4, "8": 3, "9": 7, "10": 5, "11": 2, "12": 9, "13": 1, "14": 11}, "13": { "0": 13, "1": 12, "2": 8, "3": 11, "4": 14, "5": 6, "6": 4, "7": 3, "8": 7, "9": 9, "10": 5, "11": 2, "12": 1, "13": 4, "14": 10}, "14": { "0": 14, "1": 13, "2": 10, "3": 12, "4": 11, "5": 6, "6": 4, "7": 3, "8": 8, "9": 9, "10": 5, "11": 2, "12": 1, "13": 7, "14": 12}</text:p>
          </table:table-cell>
          <table:table-cell table:number-columns-repeated="36"/>
        </table:table-row>
        <table:table-row table:style-name="ro1">
          <table:table-cell/>
          <table:table-cell table:style-name="ce1000" table:formula="of:=HLOOKUP([.B13];[.$AF$25:.$AW$26];2;0)" office:value-type="float" office:value="2.3" calcext:value-type="float">
            <text:p>2.3</text:p>
          </table:table-cell>
          <table:table-cell table:style-name="ce1012" table:formula="of:=HLOOKUP([.C13];[.$AF$25:.$AW$26];2;0)" office:value-type="float" office:value="1.1" calcext:value-type="float">
            <text:p>1.1</text:p>
          </table:table-cell>
          <table:table-cell table:style-name="ce1016" table:formula="of:=HLOOKUP([.D13];[.$AF$25:.$AW$26];2;0)" office:value-type="float" office:value="1.2" calcext:value-type="float">
            <text:p>1.2</text:p>
          </table:table-cell>
          <table:table-cell table:style-name="ce1033" table:formula="of:=HLOOKUP([.E13];[.$AF$25:.$AW$26];2;0)" office:value-type="float" office:value="1.3" calcext:value-type="float">
            <text:p>1.3</text:p>
          </table:table-cell>
          <table:table-cell table:style-name="ce1033" table:formula="of:=HLOOKUP([.F13];[.$AF$25:.$AW$26];2;0)" office:value-type="float" office:value="3" calcext:value-type="float">
            <text:p>3.0</text:p>
          </table:table-cell>
          <table:table-cell/>
          <table:table-cell table:style-name="ce1038" table:formula="of:=HLOOKUP([.H13];[.$AF$25:.$AW$26];2;0)" office:value-type="float" office:value="2.2" calcext:value-type="float">
            <text:p>2.2</text:p>
          </table:table-cell>
          <table:table-cell table:style-name="ce1044" table:formula="of:=HLOOKUP([.I13];[.$AF$25:.$AW$26];2;0)" office:value-type="float" office:value="1.2" calcext:value-type="float">
            <text:p>1.2</text:p>
          </table:table-cell>
          <table:table-cell table:style-name="ce1048" table:formula="of:=HLOOKUP([.J13];[.$AF$25:.$AW$26];2;0)" office:value-type="float" office:value="1.1" calcext:value-type="float">
            <text:p>1.1</text:p>
          </table:table-cell>
          <table:table-cell table:style-name="ce1051" table:formula="of:=HLOOKUP([.K13];[.$AF$25:.$AW$26];2;0)" office:value-type="float" office:value="1.2" calcext:value-type="float">
            <text:p>1.2</text:p>
          </table:table-cell>
          <table:table-cell table:style-name="ce1051" table:formula="of:=HLOOKUP([.L13];[.$AF$25:.$AW$26];2;0)" office:value-type="float" office:value="2.3" calcext:value-type="float">
            <text:p>2.3</text:p>
          </table:table-cell>
          <table:table-cell/>
          <table:table-cell table:style-name="ce1056" table:formula="of:=HLOOKUP([.N13];[.$AF$25:.$AW$26];2;0)" office:value-type="float" office:value="2" calcext:value-type="float">
            <text:p>2.0</text:p>
          </table:table-cell>
          <table:table-cell table:style-name="ce1060" table:formula="of:=HLOOKUP([.O13];[.$AF$25:.$AW$26];2;0)" office:value-type="float" office:value="1.2" calcext:value-type="float">
            <text:p>1.2</text:p>
          </table:table-cell>
          <table:table-cell table:style-name="ce1065" table:formula="of:=HLOOKUP([.P13];[.$AF$25:.$AW$26];2;0)" office:value-type="float" office:value="1" calcext:value-type="float">
            <text:p>1.0</text:p>
          </table:table-cell>
          <table:table-cell table:style-name="ce1069" table:formula="of:=HLOOKUP([.Q13];[.$AF$25:.$AW$26];2;0)" office:value-type="float" office:value="1.1" calcext:value-type="float">
            <text:p>1.1</text:p>
          </table:table-cell>
          <table:table-cell table:style-name="ce1069" table:formula="of:=HLOOKUP([.R13];[.$AF$25:.$AW$26];2;0)" office:value-type="float" office:value="3.2" calcext:value-type="float">
            <text:p>3.2</text:p>
          </table:table-cell>
          <table:table-cell/>
          <table:table-cell table:style-name="ce1076" table:formula="of:=HLOOKUP([.T13];[.$AF$25:.$AW$26];2;0)" office:value-type="float" office:value="2" calcext:value-type="float">
            <text:p>2.0</text:p>
          </table:table-cell>
          <table:table-cell table:style-name="ce1080" table:formula="of:=HLOOKUP([.U13];[.$AF$25:.$AW$26];2;0)" office:value-type="float" office:value="1.2" calcext:value-type="float">
            <text:p>1.2</text:p>
          </table:table-cell>
          <table:table-cell table:style-name="ce1083" table:formula="of:=HLOOKUP([.V13];[.$AF$25:.$AW$26];2;0)" office:value-type="float" office:value="1.1" calcext:value-type="float">
            <text:p>1.1</text:p>
          </table:table-cell>
          <table:table-cell table:style-name="ce1088" table:formula="of:=HLOOKUP([.W13];[.$AF$25:.$AW$26];2;0)" office:value-type="float" office:value="1.1" calcext:value-type="float">
            <text:p>1.1</text:p>
          </table:table-cell>
          <table:table-cell table:style-name="ce1087" table:formula="of:=HLOOKUP([.X13];[.$AF$25:.$AW$26];2;0)" office:value-type="float" office:value="3.6" calcext:value-type="float">
            <text:p>3.6</text:p>
          </table:table-cell>
          <table:table-cell/>
          <table:table-cell table:style-name="ce1095" table:formula="of:=HLOOKUP([.Z13];[.$AF$25:.$AW$26];2;0)" office:value-type="float" office:value="1.3" calcext:value-type="float">
            <text:p>1.3</text:p>
          </table:table-cell>
          <table:table-cell table:style-name="ce1099" table:formula="of:=HLOOKUP([.AA13];[.$AF$25:.$AW$26];2;0)" office:value-type="float" office:value="1.2" calcext:value-type="float">
            <text:p>1.2</text:p>
          </table:table-cell>
          <table:table-cell table:style-name="ce1102" table:formula="of:=HLOOKUP([.AB13];[.$AF$25:.$AW$26];2;0)" office:value-type="float" office:value="1.1" calcext:value-type="float">
            <text:p>1.1</text:p>
          </table:table-cell>
          <table:table-cell table:style-name="ce1105" table:formula="of:=HLOOKUP([.AC13];[.$AF$25:.$AW$26];2;0)" office:value-type="float" office:value="2" calcext:value-type="float">
            <text:p>2.0</text:p>
          </table:table-cell>
          <table:table-cell table:style-name="ce1108" table:formula="of:=HLOOKUP([.AD13];[.$AF$25:.$AW$26];2;0)" office:value-type="float" office:value="3" calcext:value-type="float">
            <text:p>3.0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1004" table:formula="of:=HLOOKUP([.B14];[.$AF$25:.$AW$26];2;0)" office:value-type="float" office:value="4" calcext:value-type="float">
            <text:p>4.0</text:p>
          </table:table-cell>
          <table:table-cell table:style-name="ce1012" table:formula="of:=HLOOKUP([.C14];[.$AF$25:.$AW$26];2;0)" office:value-type="float" office:value="3.2" calcext:value-type="float">
            <text:p>3.2</text:p>
          </table:table-cell>
          <table:table-cell table:style-name="ce1016" table:formula="of:=HLOOKUP([.D14];[.$AF$25:.$AW$26];2;0)" office:value-type="float" office:value="2.3" calcext:value-type="float">
            <text:p>2.3</text:p>
          </table:table-cell>
          <table:table-cell table:style-name="ce1033" table:formula="of:=HLOOKUP([.E14];[.$AF$25:.$AW$26];2;0)" office:value-type="float" office:value="2.1" calcext:value-type="float">
            <text:p>2.1</text:p>
          </table:table-cell>
          <table:table-cell table:style-name="ce1033" table:formula="of:=HLOOKUP([.F14];[.$AF$25:.$AW$26];2;0)" office:value-type="float" office:value="3.6" calcext:value-type="float">
            <text:p>3.6</text:p>
          </table:table-cell>
          <table:table-cell/>
          <table:table-cell table:style-name="ce1038" table:formula="of:=HLOOKUP([.H14];[.$AF$25:.$AW$26];2;0)" office:value-type="float" office:value="3.6" calcext:value-type="float">
            <text:p>3.6</text:p>
          </table:table-cell>
          <table:table-cell table:style-name="ce1043" table:formula="of:=HLOOKUP([.I14];[.$AF$25:.$AW$26];2;0)" office:value-type="float" office:value="3.1" calcext:value-type="float">
            <text:p>3.1</text:p>
          </table:table-cell>
          <table:table-cell table:style-name="ce1048" table:formula="of:=HLOOKUP([.J14];[.$AF$25:.$AW$26];2;0)" office:value-type="float" office:value="3.2" calcext:value-type="float">
            <text:p>3.2</text:p>
          </table:table-cell>
          <table:table-cell table:style-name="ce1051" table:formula="of:=HLOOKUP([.K14];[.$AF$25:.$AW$26];2;0)" office:value-type="float" office:value="2" calcext:value-type="float">
            <text:p>2.0</text:p>
          </table:table-cell>
          <table:table-cell table:style-name="ce1051" table:formula="of:=HLOOKUP([.L14];[.$AF$25:.$AW$26];2;0)" office:value-type="float" office:value="4" calcext:value-type="float">
            <text:p>4.0</text:p>
          </table:table-cell>
          <table:table-cell/>
          <table:table-cell table:style-name="ce1056" table:formula="of:=HLOOKUP([.N14];[.$AF$25:.$AW$26];2;0)" office:value-type="float" office:value="3.6" calcext:value-type="float">
            <text:p>3.6</text:p>
          </table:table-cell>
          <table:table-cell table:style-name="ce1060" table:formula="of:=HLOOKUP([.O14];[.$AF$25:.$AW$26];2;0)" office:value-type="float" office:value="2.3" calcext:value-type="float">
            <text:p>2.3</text:p>
          </table:table-cell>
          <table:table-cell table:style-name="ce1064" table:formula="of:=HLOOKUP([.P14];[.$AF$25:.$AW$26];2;0)" office:value-type="float" office:value="3" calcext:value-type="float">
            <text:p>3.0</text:p>
          </table:table-cell>
          <table:table-cell table:style-name="ce1069" table:formula="of:=HLOOKUP([.Q14];[.$AF$25:.$AW$26];2;0)" office:value-type="float" office:value="1.3" calcext:value-type="float">
            <text:p>1.3</text:p>
          </table:table-cell>
          <table:table-cell table:style-name="ce1069" table:formula="of:=HLOOKUP([.R14];[.$AF$25:.$AW$26];2;0)" office:value-type="float" office:value="4" calcext:value-type="float">
            <text:p>4.0</text:p>
          </table:table-cell>
          <table:table-cell/>
          <table:table-cell table:style-name="ce1076" table:formula="of:=HLOOKUP([.T14];[.$AF$25:.$AW$26];2;0)" office:value-type="float" office:value="3" calcext:value-type="float">
            <text:p>3.0</text:p>
          </table:table-cell>
          <table:table-cell table:style-name="ce1080" table:formula="of:=HLOOKUP([.U14];[.$AF$25:.$AW$26];2;0)" office:value-type="float" office:value="2.2" calcext:value-type="float">
            <text:p>2.2</text:p>
          </table:table-cell>
          <table:table-cell table:style-name="ce1083" table:formula="of:=HLOOKUP([.V14];[.$AF$25:.$AW$26];2;0)" office:value-type="float" office:value="2.3" calcext:value-type="float">
            <text:p>2.3</text:p>
          </table:table-cell>
          <table:table-cell table:style-name="ce1087" table:formula="of:=HLOOKUP([.W14];[.$AF$25:.$AW$26];2;0)" office:value-type="float" office:value="3.1" calcext:value-type="float">
            <text:p>3.1</text:p>
          </table:table-cell>
          <table:table-cell table:style-name="ce1087" table:formula="of:=HLOOKUP([.X14];[.$AF$25:.$AW$26];2;0)" office:value-type="float" office:value="4.2" calcext:value-type="float">
            <text:p>4.2</text:p>
          </table:table-cell>
          <table:table-cell/>
          <table:table-cell table:style-name="ce1095" table:formula="of:=HLOOKUP([.Z14];[.$AF$25:.$AW$26];2;0)" office:value-type="float" office:value="4.2" calcext:value-type="float">
            <text:p>4.2</text:p>
          </table:table-cell>
          <table:table-cell table:style-name="ce1099" table:formula="of:=HLOOKUP([.AA14];[.$AF$25:.$AW$26];2;0)" office:value-type="float" office:value="2.3" calcext:value-type="float">
            <text:p>2.3</text:p>
          </table:table-cell>
          <table:table-cell table:style-name="ce1102" table:formula="of:=HLOOKUP([.AB14];[.$AF$25:.$AW$26];2;0)" office:value-type="float" office:value="3" calcext:value-type="float">
            <text:p>3.0</text:p>
          </table:table-cell>
          <table:table-cell table:style-name="ce1105" table:formula="of:=HLOOKUP([.AC14];[.$AF$25:.$AW$26];2;0)" office:value-type="float" office:value="3.1" calcext:value-type="float">
            <text:p>3.1</text:p>
          </table:table-cell>
          <table:table-cell table:style-name="ce1105" table:formula="of:=HLOOKUP([.AD14];[.$AF$25:.$AW$26];2;0)" office:value-type="float" office:value="3.6" calcext:value-type="float">
            <text:p>3.6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647" table:number-columns-repeated="5"/>
          <table:table-cell/>
          <table:table-cell table:style-name="ce647" table:number-columns-repeated="5"/>
          <table:table-cell/>
          <table:table-cell table:style-name="ce647" table:number-columns-repeated="5"/>
          <table:table-cell/>
          <table:table-cell table:style-name="ce647" table:number-columns-repeated="5"/>
          <table:table-cell/>
          <table:table-cell table:style-name="ce647" table:number-columns-repeated="5"/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640" table:formula="of:=SUM([.B35:.F37])-[.B37]" office:value-type="float" office:value="37.7" calcext:value-type="float" table:number-columns-spanned="2" table:number-rows-spanned="1">
            <text:p>37.7</text:p>
          </table:table-cell>
          <table:covered-table-cell table:style-name="ce647"/>
          <table:table-cell table:style-name="ce647" table:number-columns-repeated="3"/>
          <table:table-cell/>
          <table:table-cell table:style-name="ce640" table:formula="of:=SUM([.H35:.L37])-[.I37]" office:value-type="float" office:value="37.7" calcext:value-type="float" table:number-columns-spanned="2" table:number-rows-spanned="1">
            <text:p>37.7</text:p>
          </table:table-cell>
          <table:covered-table-cell table:style-name="ce647"/>
          <table:table-cell table:style-name="ce647" table:number-columns-repeated="3"/>
          <table:table-cell/>
          <table:table-cell table:style-name="ce640" table:formula="of:=SUM([.N35:.R37])-[.P37]" office:value-type="float" office:value="37.7" calcext:value-type="float" table:number-columns-spanned="2" table:number-rows-spanned="1">
            <text:p>37.7</text:p>
          </table:table-cell>
          <table:covered-table-cell table:style-name="ce647"/>
          <table:table-cell table:style-name="ce647" table:number-columns-repeated="3"/>
          <table:table-cell/>
          <table:table-cell table:style-name="ce640" table:formula="of:=SUM([.T35:.X37])-[.W37]" office:value-type="float" office:value="37.7" calcext:value-type="float" table:number-columns-spanned="2" table:number-rows-spanned="1">
            <text:p>37.7</text:p>
          </table:table-cell>
          <table:covered-table-cell table:style-name="ce647"/>
          <table:table-cell table:style-name="ce647" table:number-columns-repeated="3"/>
          <table:table-cell/>
          <table:table-cell table:style-name="ce640" table:formula="of:=SUM([.Z35:.AD37])-[.AD37]" office:value-type="float" office:value="37.7" calcext:value-type="float" table:number-columns-spanned="2" table:number-rows-spanned="1">
            <text:p>37.7</text:p>
          </table:table-cell>
          <table:covered-table-cell table:style-name="ce647"/>
          <table:table-cell table:style-name="ce647" table:number-columns-repeated="3"/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1005" table:formula="of:=HLOOKUP([.B16];[.$AF$25:.$AW$26];2;0)" office:value-type="float" office:value="4.4" calcext:value-type="float">
            <text:p>4.4</text:p>
          </table:table-cell>
          <table:table-cell table:style-name="ce1013" table:formula="of:=HLOOKUP([.C16];[.$AF$25:.$AW$26];2;0)" office:value-type="float" office:value="4.2" calcext:value-type="float">
            <text:p>4.2</text:p>
          </table:table-cell>
          <table:table-cell table:style-name="ce1018" table:formula="of:=HLOOKUP([.D16];[.$AF$25:.$AW$26];2;0)" office:value-type="float" office:value="3.2" calcext:value-type="float">
            <text:p>3.2</text:p>
          </table:table-cell>
          <table:table-cell table:style-name="ce1034" table:formula="of:=HLOOKUP([.E16];[.$AF$25:.$AW$26];2;0)" office:value-type="float" office:value="3.6" calcext:value-type="float">
            <text:p>3.6</text:p>
          </table:table-cell>
          <table:table-cell table:style-name="ce1034" table:formula="of:=HLOOKUP([.F16];[.$AF$25:.$AW$26];2;0)" office:value-type="float" office:value="4" calcext:value-type="float">
            <text:p>4.0</text:p>
          </table:table-cell>
          <table:table-cell/>
          <table:table-cell table:style-name="ce1039" table:formula="of:=HLOOKUP([.H16];[.$AF$25:.$AW$26];2;0)" office:value-type="float" office:value="4.4" calcext:value-type="float">
            <text:p>4.4</text:p>
          </table:table-cell>
          <table:table-cell table:style-name="ce1045" table:formula="of:=HLOOKUP([.I16];[.$AF$25:.$AW$26];2;0)" office:value-type="float" office:value="4.2" calcext:value-type="float">
            <text:p>4.2</text:p>
          </table:table-cell>
          <table:table-cell table:style-name="ce1049" table:formula="of:=HLOOKUP([.J16];[.$AF$25:.$AW$26];2;0)" office:value-type="float" office:value="2.3" calcext:value-type="float">
            <text:p>2.3</text:p>
          </table:table-cell>
          <table:table-cell table:style-name="ce1052" table:formula="of:=HLOOKUP([.K16];[.$AF$25:.$AW$26];2;0)" office:value-type="float" office:value="3" calcext:value-type="float">
            <text:p>3.0</text:p>
          </table:table-cell>
          <table:table-cell table:style-name="ce1052" table:formula="of:=HLOOKUP([.L16];[.$AF$25:.$AW$26];2;0)" office:value-type="float" office:value="4" calcext:value-type="float">
            <text:p>4.0</text:p>
          </table:table-cell>
          <table:table-cell/>
          <table:table-cell table:style-name="ce1057" table:formula="of:=HLOOKUP([.N16];[.$AF$25:.$AW$26];2;0)" office:value-type="float" office:value="4.4" calcext:value-type="float">
            <text:p>4.4</text:p>
          </table:table-cell>
          <table:table-cell table:style-name="ce1061" table:formula="of:=HLOOKUP([.O16];[.$AF$25:.$AW$26];2;0)" office:value-type="float" office:value="4.2" calcext:value-type="float">
            <text:p>4.2</text:p>
          </table:table-cell>
          <table:table-cell table:style-name="ce1066" table:formula="of:=HLOOKUP([.P16];[.$AF$25:.$AW$26];2;0)" office:value-type="float" office:value="3.2" calcext:value-type="float">
            <text:p>3.2</text:p>
          </table:table-cell>
          <table:table-cell table:style-name="ce1070" table:formula="of:=HLOOKUP([.Q16];[.$AF$25:.$AW$26];2;0)" office:value-type="float" office:value="3.1" calcext:value-type="float">
            <text:p>3.1</text:p>
          </table:table-cell>
          <table:table-cell table:style-name="ce1070" table:formula="of:=HLOOKUP([.R16];[.$AF$25:.$AW$26];2;0)" office:value-type="float" office:value="4" calcext:value-type="float">
            <text:p>4.0</text:p>
          </table:table-cell>
          <table:table-cell/>
          <table:table-cell table:style-name="ce1077" table:formula="of:=HLOOKUP([.T16];[.$AF$25:.$AW$26];2;0)" office:value-type="float" office:value="4.2" calcext:value-type="float">
            <text:p>4.2</text:p>
          </table:table-cell>
          <table:table-cell table:style-name="ce1081" table:formula="of:=HLOOKUP([.U16];[.$AF$25:.$AW$26];2;0)" office:value-type="float" office:value="4" calcext:value-type="float">
            <text:p>4.0</text:p>
          </table:table-cell>
          <table:table-cell table:style-name="ce1084" table:formula="of:=HLOOKUP([.V16];[.$AF$25:.$AW$26];2;0)" office:value-type="float" office:value="3" calcext:value-type="float">
            <text:p>3.0</text:p>
          </table:table-cell>
          <table:table-cell table:style-name="ce1089" table:formula="of:=HLOOKUP([.W16];[.$AF$25:.$AW$26];2;0)" office:value-type="float" office:value="3.6" calcext:value-type="float">
            <text:p>3.6</text:p>
          </table:table-cell>
          <table:table-cell table:style-name="ce1089" table:formula="of:=HLOOKUP([.X16];[.$AF$25:.$AW$26];2;0)" office:value-type="float" office:value="4.4" calcext:value-type="float">
            <text:p>4.4</text:p>
          </table:table-cell>
          <table:table-cell/>
          <table:table-cell table:style-name="ce1096" table:formula="of:=HLOOKUP([.Z16];[.$AF$25:.$AW$26];2;0)" office:value-type="float" office:value="4.4" calcext:value-type="float">
            <text:p>4.4</text:p>
          </table:table-cell>
          <table:table-cell table:style-name="ce1100" table:formula="of:=HLOOKUP([.AA16];[.$AF$25:.$AW$26];2;0)" office:value-type="float" office:value="4.2" calcext:value-type="float">
            <text:p>4.2</text:p>
          </table:table-cell>
          <table:table-cell table:style-name="ce1103" table:formula="of:=HLOOKUP([.AB16];[.$AF$25:.$AW$26];2;0)" office:value-type="float" office:value="3.2" calcext:value-type="float">
            <text:p>3.2</text:p>
          </table:table-cell>
          <table:table-cell table:style-name="ce1106" table:formula="of:=HLOOKUP([.AC16];[.$AF$25:.$AW$26];2;0)" office:value-type="float" office:value="4" calcext:value-type="float">
            <text:p>4.0</text:p>
          </table:table-cell>
          <table:table-cell table:style-name="ce1106" table:formula="of:=HLOOKUP([.AD16];[.$AF$25:.$AW$26];2;0)" office:value-type="float" office:value="3.6" calcext:value-type="float">
            <text:p>3.6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1007" table:formula="of:=HLOOKUP([.B17];[.$AF$25:.$AW$26];2;0)" office:value-type="float" office:value="3.1" calcext:value-type="float">
            <text:p>3.1</text:p>
          </table:table-cell>
          <table:table-cell table:style-name="ce1013" table:formula="of:=HLOOKUP([.C17];[.$AF$25:.$AW$26];2;0)" office:value-type="float" office:value="2.2" calcext:value-type="float">
            <text:p>2.2</text:p>
          </table:table-cell>
          <table:table-cell table:style-name="ce1018" table:formula="of:=HLOOKUP([.D17];[.$AF$25:.$AW$26];2;0)" office:value-type="float" office:value="2" calcext:value-type="float">
            <text:p>2.0</text:p>
          </table:table-cell>
          <table:table-cell table:style-name="ce1034" table:formula="of:=HLOOKUP([.E17];[.$AF$25:.$AW$26];2;0)" office:value-type="float" office:value="2.1" calcext:value-type="float">
            <text:p>2.1</text:p>
          </table:table-cell>
          <table:table-cell table:style-name="ce1034" table:formula="of:=HLOOKUP([.F17];[.$AF$25:.$AW$26];2;0)" office:value-type="float" office:value="3" calcext:value-type="float">
            <text:p>3.0</text:p>
          </table:table-cell>
          <table:table-cell/>
          <table:table-cell table:style-name="ce1040" table:formula="of:=HLOOKUP([.H17];[.$AF$25:.$AW$26];2;0)" office:value-type="float" office:value="3.1" calcext:value-type="float">
            <text:p>3.1</text:p>
          </table:table-cell>
          <table:table-cell table:style-name="ce1045" table:formula="of:=HLOOKUP([.I17];[.$AF$25:.$AW$26];2;0)" office:value-type="float" office:value="2.1" calcext:value-type="float">
            <text:p>2.1</text:p>
          </table:table-cell>
          <table:table-cell table:style-name="ce1049" table:formula="of:=HLOOKUP([.J17];[.$AF$25:.$AW$26];2;0)" office:value-type="float" office:value="1.3" calcext:value-type="float">
            <text:p>1.3</text:p>
          </table:table-cell>
          <table:table-cell table:style-name="ce1052" table:formula="of:=HLOOKUP([.K17];[.$AF$25:.$AW$26];2;0)" office:value-type="float" office:value="2" calcext:value-type="float">
            <text:p>2.0</text:p>
          </table:table-cell>
          <table:table-cell table:style-name="ce1052" table:formula="of:=HLOOKUP([.L17];[.$AF$25:.$AW$26];2;0)" office:value-type="float" office:value="3.2" calcext:value-type="float">
            <text:p>3.2</text:p>
          </table:table-cell>
          <table:table-cell/>
          <table:table-cell table:style-name="ce1058" table:formula="of:=HLOOKUP([.N17];[.$AF$25:.$AW$26];2;0)" office:value-type="float" office:value="3" calcext:value-type="float">
            <text:p>3.0</text:p>
          </table:table-cell>
          <table:table-cell table:style-name="ce1061" table:formula="of:=HLOOKUP([.O17];[.$AF$25:.$AW$26];2;0)" office:value-type="float" office:value="2.2" calcext:value-type="float">
            <text:p>2.2</text:p>
          </table:table-cell>
          <table:table-cell table:style-name="ce1066" table:formula="of:=HLOOKUP([.P17];[.$AF$25:.$AW$26];2;0)" office:value-type="float" office:value="2" calcext:value-type="float">
            <text:p>2.0</text:p>
          </table:table-cell>
          <table:table-cell table:style-name="ce1070" table:formula="of:=HLOOKUP([.Q17];[.$AF$25:.$AW$26];2;0)" office:value-type="float" office:value="1.3" calcext:value-type="float">
            <text:p>1.3</text:p>
          </table:table-cell>
          <table:table-cell table:style-name="ce1070" table:formula="of:=HLOOKUP([.R17];[.$AF$25:.$AW$26];2;0)" office:value-type="float" office:value="2.3" calcext:value-type="float">
            <text:p>2.3</text:p>
          </table:table-cell>
          <table:table-cell/>
          <table:table-cell table:style-name="ce1078" table:formula="of:=HLOOKUP([.T17];[.$AF$25:.$AW$26];2;0)" office:value-type="float" office:value="2.2" calcext:value-type="float">
            <text:p>2.2</text:p>
          </table:table-cell>
          <table:table-cell table:style-name="ce1081" table:formula="of:=HLOOKUP([.U17];[.$AF$25:.$AW$26];2;0)" office:value-type="float" office:value="2" calcext:value-type="float">
            <text:p>2.0</text:p>
          </table:table-cell>
          <table:table-cell table:style-name="ce1084" table:formula="of:=HLOOKUP([.V17];[.$AF$25:.$AW$26];2;0)" office:value-type="float" office:value="1.3" calcext:value-type="float">
            <text:p>1.3</text:p>
          </table:table-cell>
          <table:table-cell table:style-name="ce1089" table:formula="of:=HLOOKUP([.W17];[.$AF$25:.$AW$26];2;0)" office:value-type="float" office:value="2.3" calcext:value-type="float">
            <text:p>2.3</text:p>
          </table:table-cell>
          <table:table-cell table:style-name="ce1089" table:formula="of:=HLOOKUP([.X17];[.$AF$25:.$AW$26];2;0)" office:value-type="float" office:value="3.1" calcext:value-type="float">
            <text:p>3.1</text:p>
          </table:table-cell>
          <table:table-cell/>
          <table:table-cell table:style-name="ce1097" table:formula="of:=HLOOKUP([.Z17];[.$AF$25:.$AW$26];2;0)" office:value-type="float" office:value="2.2" calcext:value-type="float">
            <text:p>2.2</text:p>
          </table:table-cell>
          <table:table-cell table:style-name="ce1100" table:formula="of:=HLOOKUP([.AA17];[.$AF$25:.$AW$26];2;0)" office:value-type="float" office:value="2" calcext:value-type="float">
            <text:p>2.0</text:p>
          </table:table-cell>
          <table:table-cell table:style-name="ce1103" table:formula="of:=HLOOKUP([.AB17];[.$AF$25:.$AW$26];2;0)" office:value-type="float" office:value="1.3" calcext:value-type="float">
            <text:p>1.3</text:p>
          </table:table-cell>
          <table:table-cell table:style-name="ce1106" table:formula="of:=HLOOKUP([.AC17];[.$AF$25:.$AW$26];2;0)" office:value-type="float" office:value="3" calcext:value-type="float">
            <text:p>3.0</text:p>
          </table:table-cell>
          <table:table-cell table:style-name="ce1106" table:formula="of:=HLOOKUP([.AD17];[.$AF$25:.$AW$26];2;0)" office:value-type="float" office:value="3.1" calcext:value-type="float">
            <text:p>3.1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1009" table:formula="of:=HLOOKUP([.B18];[.$AF$25:.$AW$26];2;0)" office:value-type="float" office:value="3.6" calcext:value-type="float">
            <text:p>3.6</text:p>
          </table:table-cell>
          <table:table-cell table:style-name="ce1013" table:formula="of:=HLOOKUP([.C18];[.$AF$25:.$AW$26];2;0)" office:value-type="float" office:value="1.1" calcext:value-type="float">
            <text:p>1.1</text:p>
          </table:table-cell>
          <table:table-cell table:style-name="ce1018" table:formula="of:=HLOOKUP([.D18];[.$AF$25:.$AW$26];2;0)" office:value-type="float" office:value="1.2" calcext:value-type="float">
            <text:p>1.2</text:p>
          </table:table-cell>
          <table:table-cell table:style-name="ce1034" table:formula="of:=HLOOKUP([.E18];[.$AF$25:.$AW$26];2;0)" office:value-type="float" office:value="1.3" calcext:value-type="float">
            <text:p>1.3</text:p>
          </table:table-cell>
          <table:table-cell table:style-name="ce1034" table:formula="of:=HLOOKUP([.F18];[.$AF$25:.$AW$26];2;0)" office:value-type="float" office:value="2.3" calcext:value-type="float">
            <text:p>2.3</text:p>
          </table:table-cell>
          <table:table-cell/>
          <table:table-cell table:style-name="ce1040" table:formula="of:=HLOOKUP([.H18];[.$AF$25:.$AW$26];2;0)" office:value-type="float" office:value="2.2" calcext:value-type="float">
            <text:p>2.2</text:p>
          </table:table-cell>
          <table:table-cell table:style-name="ce1046" table:formula="of:=HLOOKUP([.I18];[.$AF$25:.$AW$26];2;0)" office:value-type="float" office:value="3.2" calcext:value-type="float">
            <text:p>3.2</text:p>
          </table:table-cell>
          <table:table-cell table:style-name="ce1049" table:formula="of:=HLOOKUP([.J18];[.$AF$25:.$AW$26];2;0)" office:value-type="float" office:value="1.1" calcext:value-type="float">
            <text:p>1.1</text:p>
          </table:table-cell>
          <table:table-cell table:style-name="ce1052" table:formula="of:=HLOOKUP([.K18];[.$AF$25:.$AW$26];2;0)" office:value-type="float" office:value="1.2" calcext:value-type="float">
            <text:p>1.2</text:p>
          </table:table-cell>
          <table:table-cell table:style-name="ce1052" table:formula="of:=HLOOKUP([.L18];[.$AF$25:.$AW$26];2;0)" office:value-type="float" office:value="3.6" calcext:value-type="float">
            <text:p>3.6</text:p>
          </table:table-cell>
          <table:table-cell/>
          <table:table-cell table:style-name="ce1058" table:formula="of:=HLOOKUP([.N18];[.$AF$25:.$AW$26];2;0)" office:value-type="float" office:value="2.1" calcext:value-type="float">
            <text:p>2.1</text:p>
          </table:table-cell>
          <table:table-cell table:style-name="ce1061" table:formula="of:=HLOOKUP([.O18];[.$AF$25:.$AW$26];2;0)" office:value-type="float" office:value="1.2" calcext:value-type="float">
            <text:p>1.2</text:p>
          </table:table-cell>
          <table:table-cell table:style-name="ce1067" table:formula="of:=HLOOKUP([.P18];[.$AF$25:.$AW$26];2;0)" office:value-type="float" office:value="3.1" calcext:value-type="float">
            <text:p>3.1</text:p>
          </table:table-cell>
          <table:table-cell table:style-name="ce1070" table:formula="of:=HLOOKUP([.Q18];[.$AF$25:.$AW$26];2;0)" office:value-type="float" office:value="1.1" calcext:value-type="float">
            <text:p>1.1</text:p>
          </table:table-cell>
          <table:table-cell table:style-name="ce1070" table:formula="of:=HLOOKUP([.R18];[.$AF$25:.$AW$26];2;0)" office:value-type="float" office:value="3.6" calcext:value-type="float">
            <text:p>3.6</text:p>
          </table:table-cell>
          <table:table-cell/>
          <table:table-cell table:style-name="ce1078" table:formula="of:=HLOOKUP([.T18];[.$AF$25:.$AW$26];2;0)" office:value-type="float" office:value="2.1" calcext:value-type="float">
            <text:p>2.1</text:p>
          </table:table-cell>
          <table:table-cell table:style-name="ce1081" table:formula="of:=HLOOKUP([.U18];[.$AF$25:.$AW$26];2;0)" office:value-type="float" office:value="1.2" calcext:value-type="float">
            <text:p>1.2</text:p>
          </table:table-cell>
          <table:table-cell table:style-name="ce1084" table:formula="of:=HLOOKUP([.V18];[.$AF$25:.$AW$26];2;0)" office:value-type="float" office:value="1.1" calcext:value-type="float">
            <text:p>1.1</text:p>
          </table:table-cell>
          <table:table-cell table:style-name="ce1090" table:formula="of:=HLOOKUP([.W18];[.$AF$25:.$AW$26];2;0)" office:value-type="float" office:value="2" calcext:value-type="float">
            <text:p>2.0</text:p>
          </table:table-cell>
          <table:table-cell table:style-name="ce1089" table:formula="of:=HLOOKUP([.X18];[.$AF$25:.$AW$26];2;0)" office:value-type="float" office:value="3.2" calcext:value-type="float">
            <text:p>3.2</text:p>
          </table:table-cell>
          <table:table-cell/>
          <table:table-cell table:style-name="ce1097" table:formula="of:=HLOOKUP([.Z18];[.$AF$25:.$AW$26];2;0)" office:value-type="float" office:value="2.1" calcext:value-type="float">
            <text:p>2.1</text:p>
          </table:table-cell>
          <table:table-cell table:style-name="ce1100" table:formula="of:=HLOOKUP([.AA18];[.$AF$25:.$AW$26];2;0)" office:value-type="float" office:value="1.2" calcext:value-type="float">
            <text:p>1.2</text:p>
          </table:table-cell>
          <table:table-cell table:style-name="ce1103" table:formula="of:=HLOOKUP([.AB18];[.$AF$25:.$AW$26];2;0)" office:value-type="float" office:value="1.1" calcext:value-type="float">
            <text:p>1.1</text:p>
          </table:table-cell>
          <table:table-cell table:style-name="ce1106" table:formula="of:=HLOOKUP([.AC18];[.$AF$25:.$AW$26];2;0)" office:value-type="float" office:value="2.3" calcext:value-type="float">
            <text:p>2.3</text:p>
          </table:table-cell>
          <table:table-cell table:style-name="ce1109" table:formula="of:=HLOOKUP([.AD18];[.$AF$25:.$AW$26];2;0)" office:value-type="float" office:value="4" calcext:value-type="float">
            <text:p>4.0</text:p>
          </table:table-cell>
          <table:table-cell table:number-columns-repeated="32"/>
          <table:table-cell table:style-name="Default"/>
          <table:table-cell table:number-columns-repeated="36"/>
        </table:table-row>
        <calcext:conditional-formats>
          <calcext:conditional-format calcext:target-range-address="'keys 5'.Z30:'keys 5'.AD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T30:'keys 5'.X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N30:'keys 5'.R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H30:'keys 5'.L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B30:'keys 5'.F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B35:'keys 5'.F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H35:'keys 5'.L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N35:'keys 5'.R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T35:'keys 5'.X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Z35:'keys 5'.AD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B25:'keys 5'.F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H25:'keys 5'.L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N25:'keys 5'.R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T25:'keys 5'.X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Z25:'keys 5'.AD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AF26:'keys 5'.AI26 'keys 5'.AL26:'keys 5'.AT26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  <calcext:conditional-format calcext:target-range-address="'keys 5'.AJ26:'keys 5'.AM26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  <calcext:conditional-format calcext:target-range-address="'keys 5'.T2:'keys 5'.X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Z2:'keys 5'.AD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AF25:'keys 5'.AT25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AF26:'keys 5'.AT26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</calcext:conditional-formats>
      </table:table>
      <table:table table:name="keys 4" table:style-name="ta1">
        <table:table-column table:style-name="co1" table:default-cell-style-name="Default"/>
        <table:table-column table:style-name="co1" table:default-cell-style-name="ce881"/>
        <table:table-column table:style-name="co1" table:default-cell-style-name="ce845"/>
        <table:table-column table:style-name="co1" table:default-cell-style-name="ce896"/>
        <table:table-column table:style-name="co1" table:number-columns-repeated="2" table:default-cell-style-name="ce852"/>
        <table:table-column table:style-name="co1" table:default-cell-style-name="ce647"/>
        <table:table-column table:style-name="co1" table:default-cell-style-name="ce881"/>
        <table:table-column table:style-name="co1" table:default-cell-style-name="Default"/>
        <table:table-column table:style-name="co1" table:default-cell-style-name="ce896"/>
        <table:table-column table:style-name="co1" table:number-columns-repeated="2" table:default-cell-style-name="ce852"/>
        <table:table-column table:style-name="co1" table:default-cell-style-name="ce647"/>
        <table:table-column table:style-name="co1" table:default-cell-style-name="ce881"/>
        <table:table-column table:style-name="co1" table:default-cell-style-name="ce845"/>
        <table:table-column table:style-name="co1" table:default-cell-style-name="ce896"/>
        <table:table-column table:style-name="co1" table:default-cell-style-name="ce852"/>
        <table:table-column table:style-name="co1" table:default-cell-style-name="Default"/>
        <table:table-column table:style-name="co1" table:default-cell-style-name="ce647"/>
        <table:table-column table:style-name="co1" table:default-cell-style-name="ce881"/>
        <table:table-column table:style-name="co1" table:default-cell-style-name="ce845"/>
        <table:table-column table:style-name="co1" table:default-cell-style-name="ce896"/>
        <table:table-column table:style-name="co1" table:number-columns-repeated="2" table:default-cell-style-name="ce852"/>
        <table:table-column table:style-name="co1" table:default-cell-style-name="ce647"/>
        <table:table-column table:style-name="co1" table:default-cell-style-name="ce881"/>
        <table:table-column table:style-name="co1" table:default-cell-style-name="ce845"/>
        <table:table-column table:style-name="co1" table:default-cell-style-name="ce896"/>
        <table:table-column table:style-name="co1" table:number-columns-repeated="2" table:default-cell-style-name="ce852"/>
        <table:table-column table:style-name="co1" table:number-columns-repeated="32" table:default-cell-style-name="Default"/>
        <table:table-column table:style-name="co1" table:default-cell-style-name="ce1223"/>
        <table:table-column table:style-name="co1" table:number-columns-repeated="36" table:default-cell-style-name="Default"/>
        <table:table-row table:style-name="ro1">
          <table:table-cell table:style-name="ce666" table:number-columns-repeated="4"/>
          <table:table-cell table:style-name="ce677" table:number-columns-repeated="3"/>
          <table:table-cell table:style-name="ce622" office:value-type="string" calcext:value-type="string">
            <text:p>L</text:p>
          </table:table-cell>
          <table:table-cell/>
          <table:table-cell table:style-name="Default" office:value-type="string" calcext:value-type="string">
            <text:p>R</text:p>
          </table:table-cell>
          <table:table-cell table:style-name="ce677" table:number-columns-repeated="2"/>
          <table:table-cell table:style-name="ce731"/>
          <table:table-cell table:style-name="ce666" table:number-columns-repeated="4"/>
          <table:table-cell/>
          <table:table-cell table:style-name="ce809" office:value-type="string" calcext:value-type="string">
            <text:p>start priorities</text:p>
          </table:table-cell>
          <table:table-cell table:style-name="Default" table:number-columns-repeated="11"/>
          <table:table-cell/>
          <table:table-cell table:style-name="ce809" office:value-type="string" calcext:value-type="string">
            <text:p>json</text:p>
          </table:table-cell>
          <table:table-cell table:number-columns-repeated="30"/>
          <table:table-cell table:style-name="Default"/>
          <table:table-cell table:number-columns-repeated="36"/>
        </table:table-row>
        <table:table-row table:style-name="ro1">
          <table:table-cell table:style-name="ce656"/>
          <table:table-cell table:style-name="ce620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666" office:value-type="float" office:value="2" calcext:value-type="float">
            <text:p>2</text:p>
          </table:table-cell>
          <table:table-cell table:style-name="ce677" office:value-type="float" office:value="3" calcext:value-type="float">
            <text:p>3</text:p>
          </table:table-cell>
          <table:table-cell table:style-name="ce677" office:value-type="float" office:value="4" calcext:value-type="float">
            <text:p>4</text:p>
          </table:table-cell>
          <table:table-cell table:style-name="ce677"/>
          <table:table-cell table:style-name="ce622"/>
          <table:table-cell/>
          <table:table-cell table:style-name="ce622"/>
          <table:table-cell table:style-name="ce677"/>
          <table:table-cell table:style-name="ce677" office:value-type="float" office:value="15" calcext:value-type="float">
            <text:p>15</text:p>
          </table:table-cell>
          <table:table-cell table:style-name="ce731" office:value-type="float" office:value="16" calcext:value-type="float">
            <text:p>16</text:p>
          </table:table-cell>
          <table:table-cell table:style-name="ce666" office:value-type="float" office:value="17" calcext:value-type="float">
            <text:p>17</text:p>
          </table:table-cell>
          <table:table-cell table:style-name="ce656" office:value-type="float" office:value="18" calcext:value-type="float">
            <text:p>18</text:p>
          </table:table-cell>
          <table:table-cell table:style-name="ce620" office:value-type="float" office:value="19" calcext:value-type="float">
            <text:p>19</text:p>
          </table:table-cell>
          <table:table-cell table:style-name="ce656"/>
          <table:table-cell/>
          <table:table-cell table:style-name="ce798" office:value-type="float" office:value="1" calcext:value-type="float">
            <text:p>1</text:p>
          </table:table-cell>
          <table:table-cell table:style-name="ce1173" office:value-type="float" office:value="14" calcext:value-type="float">
            <text:p>14</text:p>
          </table:table-cell>
          <table:table-cell table:style-name="ce1174" office:value-type="float" office:value="6" calcext:value-type="float">
            <text:p>6</text:p>
          </table:table-cell>
          <table:table-cell table:style-name="ce1173" office:value-type="float" office:value="3" calcext:value-type="float">
            <text:p>3</text:p>
          </table:table-cell>
          <table:table-cell table:style-name="ce1174" office:value-type="float" office:value="5" calcext:value-type="float">
            <text:p>5</text:p>
          </table:table-cell>
          <table:table-cell table:style-name="ce1173" office:value-type="float" office:value="13" calcext:value-type="float">
            <text:p>13</text:p>
          </table:table-cell>
          <table:table-cell table:style-name="Default"/>
          <table:table-cell table:style-name="ce1193" table:formula="of:=SUM([.B25];[.H25];[.N25];[.T25];[.Z25];[.Z30];[.T30];[.N30];[.H30];[.B30];[.B35];[.H35];[.N35];[.T35];[.Z35])/[.$Z$6]" office:value-type="float" office:value="57" calcext:value-type="float">
            <text:p>57.0</text:p>
          </table:table-cell>
          <table:table-cell table:style-name="ce1193" table:formula="of:=SUM([.C25];[.I25];[.O25];[.U25];[.AA25];[.AA30];[.U30];[.O30];[.I30];[.C30];[.C35];[.I35];[.O35];[.U35];[.AA35])/[.$Z$6]" office:value-type="float" office:value="38.8" calcext:value-type="float">
            <text:p>38.8</text:p>
          </table:table-cell>
          <table:table-cell table:style-name="ce1193" table:formula="of:=SUM([.D25];[.J25];[.P25];[.V25];[.AB25];[.AB30];[.V30];[.P30];[.J30];[.D30];[.D35];[.J35];[.P35];[.V35];[.AB35])/[.$Z$6]" office:value-type="float" office:value="27.6" calcext:value-type="float">
            <text:p>27.6</text:p>
          </table:table-cell>
          <table:table-cell table:style-name="ce1193" table:formula="of:=SUM([.E25];[.K25];[.Q25];[.W25];[.AC25];[.AC30];[.W30];[.Q30];[.K30];[.E30];[.E35];[.K35];[.Q35];[.W35];[.AC35])/[.$Z$6]" office:value-type="float" office:value="32.8" calcext:value-type="float">
            <text:p>32.8</text:p>
          </table:table-cell>
          <table:table-cell table:style-name="ce1193" table:formula="of:=SUM([.F25];[.L25];[.R25];[.X25];[.AD25];[.AD30];[.X30];[.R30];[.L30];[.F30];[.F35];[.L35];[.R35];[.X35];[.AD35])/[.$Z$6]" office:value-type="float" office:value="48.7" calcext:value-type="float">
            <text:p>48.7</text:p>
          </table:table-cell>
          <table:table-cell/>
          <table:table-cell table:style-name="ce862" table:formula="of:=COM.MICROSOFT.TEXTJOIN(&quot;&quot;; TRUE(); &quot;{ &quot;&quot;efforts&quot;&quot;: [&quot;; [.AF28]; &quot;], &quot;&quot;pairs&quot;&quot;: &quot;;[.AF20]; &quot;}&quot;)" office:value-type="string" office:string-value="{ &quot;efforts&quot;: [1, 1.1, 1.2, 1.3, 1.6, 2, 2.1, 2.2, 2.3, 3, 3.1, 3.2, 3.5, 4, 4.5], &quot;pairs&quot;: {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6, &quot;2&quot;: 1, &quot;3&quot;: 3, &quot;4&quot;: 4, &quot;5&quot;: 7, &quot;6&quot;: 8, &quot;7&quot;: 6, &quot;8&quot;: 2, &quot;9&quot;: 5, &quot;10&quot;: 13, &quot;11&quot;: 14, &quot;12&quot;: 12, &quot;13&quot;: 10, &quot;14&quot;: 11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5, &quot;4&quot;: 8, &quot;5&quot;: 5, &quot;6&quot;: 4, &quot;7&quot;: 6, &quot;8&quot;: 7, &quot;9&quot;: 9, &quot;10&quot;: 13, &quot;11&quot;: 14, &quot;12&quot;: 12, &quot;13&quot;: 10, &quot;14&quot;: 11}, &quot;4&quot;: { &quot;0&quot;: 7, &quot;1&quot;: 3, &quot;2&quot;: 2, &quot;3&quot;: 1, &quot;4&quot;: 13, &quot;5&quot;: 6, &quot;6&quot;: 4, &quot;7&quot;: 5, &quot;8&quot;: 9, &quot;9&quot;: 8, &quot;10&quot;: 10, &quot;11&quot;: 11, &quot;12&quot;: 12, &quot;13&quot;: 13, &quot;14&quot;: 14}, &quot;5&quot;: { &quot;0&quot;: 14, &quot;1&quot;: 9, &quot;2&quot;: 4, &quot;3&quot;: 5, &quot;4&quot;: 10, &quot;5&quot;: 7, &quot;6&quot;: 1, &quot;7&quot;: 2, &quot;8&quot;: 3, &quot;9&quot;: 7, &quot;10&quot;: 12, &quot;11&quot;: 13, &quot;12&quot;: 11, &quot;13&quot;: 6, &quot;14&quot;: 8}, 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, &quot;7&quot;: { &quot;0&quot;: 14, &quot;1&quot;: 8, &quot;2&quot;: 4, &quot;3&quot;: 9, &quot;4&quot;: 13, &quot;5&quot;: 5, &quot;6&quot;: 2, &quot;7&quot;: 0, &quot;8&quot;: 1, &quot;9&quot;: 10, &quot;10&quot;: 11, &quot;11&quot;: 6, &quot;12&quot;: 7, &quot;13&quot;: 3, &quot;14&quot;: 12}, &quot;8&quot;: { &quot;0&quot;: 13, &quot;1&quot;: 5, &quot;2&quot;: 3, &quot;3&quot;: 6, &quot;4&quot;: 14, &quot;5&quot;: 4, &quot;6&quot;: 2, &quot;7&quot;: 1, &quot;8&quot;: 1, &quot;9&quot;: 10, &quot;10&quot;: 8, &quot;11&quot;: 11, &quot;12&quot;: 7, &quot;13&quot;: 9, &quot;14&quot;: 12}, &quot;9&quot;: { &quot;0&quot;: 13, &quot;1&quot;: 7, &quot;2&quot;: 4, &quot;3&quot;: 3, &quot;4&quot;: 9, &quot;5&quot;: 6, &quot;6&quot;: 5, &quot;7&quot;: 2, &quot;8&quot;: 1, &quot;9&quot;: 8, &quot;10&quot;: 11, &quot;11&quot;: 12, &quot;12&quot;: 14, &quot;13&quot;: 10, &quot;14&quot;: 8}, &quot;10&quot;: { &quot;0&quot;: 13, &quot;1&quot;: 14, &quot;2&quot;: 10, &quot;3&quot;: 11, &quot;4&quot;: 12, &quot;5&quot;: 9, &quot;6&quot;: 8, &quot;7&quot;: 4, &quot;8&quot;: 5, &quot;9&quot;: 6, &quot;10&quot;: 11, &quot;11&quot;: 1, &quot;12&quot;: 2, &quot;13&quot;: 3, &quot;14&quot;: 7}, &quot;11&quot;: { &quot;0&quot;: 14, &quot;1&quot;: 13, &quot;2&quot;: 8, &quot;3&quot;: 10, &quot;4&quot;: 11, &quot;5&quot;: 12, &quot;6&quot;: 5, &quot;7&quot;: 3, &quot;8&quot;: 4, &quot;9&quot;: 6, &quot;10&quot;: 7, &quot;11&quot;: 10, &quot;12&quot;: 1, &quot;13&quot;: 2, &quot;14&quot;: 9}, &quot;12&quot;: { &quot;0&quot;: 14, &quot;1&quot;: 13, &quot;2&quot;: 10, &quot;3&quot;: 9, &quot;4&quot;: 12, &quot;5&quot;: 10, &quot;6&quot;: 6, &quot;7&quot;: 4, &quot;8&quot;: 3, &quot;9&quot;: 8, &quot;10&quot;: 5, &quot;11&quot;: 2, &quot;12&quot;: 9, &quot;13&quot;: 1, &quot;14&quot;: 11}, 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, &quot;14&quot;: { &quot;0&quot;: 14, &quot;1&quot;: 13, &quot;2&quot;: 12, &quot;3&quot;: 10, &quot;4&quot;: 11, &quot;5&quot;: 7, &quot;6&quot;: 5, &quot;7&quot;: 3, &quot;8&quot;: 2, &quot;9&quot;: 9, &quot;10&quot;: 8, &quot;11&quot;: 6, &quot;12&quot;: 4, &quot;13&quot;: 1, &quot;14&quot;: 12}}}" calcext:value-type="string" table:number-columns-spanned="29" table:number-rows-spanned="5">
            <text:p>{ "efforts": [1, 1.1, 1.2, 1.3, 1.6, 2, 2.1, 2.2, 2.3, 3, 3.1, 3.2, 3.5, 4, 4.5], "pairs": {"0": { "0": 14, "1": 1, "2": 2, "3": 3, "4": 5, "5": 9, "6": 8, "7": 7, "8": 4, "9": 6, "10": 12, "11": 14, "12": 13, "13": 10, "14": 11}, "1": { "0": 9, "1": 6, "2": 1, "3": 3, "4": 4, "5": 7, "6": 8, "7": 6, "8": 2, "9": 5, "10": 13, "11": 14, "12": 12, "13": 10, "14": 11}, "2": { "0": 9, "1": 3, "2": 3, "3": 1, "4": 8, "5": 7, "6": 4, "7": 5, "8": 2, "9": 6, "10": 12, "11": 11, "12": 13, "13": 10, "14": 14}, "3": { "0": 3, "1": 2, "2": 1, "3": 5, "4": 8, "5": 5, "6": 4, "7": 6, "8": 7, "9": 9, "10": 13, "11": 14, "12": 12, "13": 10, "14": 11}, "4": { "0": 7, "1": 3, "2": 2, "3": 1, "4": 13, "5": 6, "6": 4, "7": 5, "8": 9, "9": 8, "10": 10, "11": 11, "12": 12, "13": 13, "14": 14}, "5": { "0": 14, "1": 9, "2": 4, "3": 5, "4": 10, "5": 7, "6": 1, "7": 2, "8": 3, "9": 7, "10": 12, "11": 13, "12": 11, "13": 6, "14": 8}, "6": { "0": 14, "1": 8, "2": 3, "3": 5, "4": 13, "5": 6, "6": 2, "7": 1, "8": 2, "9": 7, "10": 11, "11": 9, "12": 10, "13": 4, "14": 12}, "7": { "0": 14, "1": 8, "2": 4, "3": 9, "4": 13, "5": 5, "6": 2, "7": 0, "8": 1, "9": 10, "10": 11, "11": 6, "12": 7, "13": 3, "14": 12}, "8": { "0": 13, "1": 5, "2": 3, "3": 6, "4": 14, "5": 4, "6": 2, "7": 1, "8": 1, "9": 10, "10": 8, "11": 11, "12": 7, "13": 9, "14": 12}, "9": { "0": 13, "1": 7, "2": 4, "3": 3, "4": 9, "5": 6, "6": 5, "7": 2, "8": 1, "9": 8, "10": 11, "11": 12, "12": 14, "13": 10, "14": 8}, "10": { "0": 13, "1": 14, "2": 10, "3": 11, "4": 12, "5": 9, "6": 8, "7": 4, "8": 5, "9": 6, "10": 11, "11": 1, "12": 2, "13": 3, "14": 7}, "11": { "0": 14, "1": 13, "2": 8, "3": 10, "4": 11, "5": 12, "6": 5, "7": 3, "8": 4, "9": 6, "10": 7, "11": 10, "12": 1, "13": 2, "14": 9}, "12": { "0": 14, "1": 13, "2": 10, "3": 9, "4": 12, "5": 10, "6": 6, "7": 4, "8": 3, "9": 8, "10": 5, "11": 2, "12": 9, "13": 1, "14": 11}, "13": { "0": 13, "1": 12, "2": 8, "3": 11, "4": 14, "5": 6, "6": 4, "7": 3, "8": 7, "9": 9, "10": 5, "11": 2, "12": 1, "13": 4, "14": 10}, "14": { "0": 14, "1": 13, "2": 12, "3": 10, "4": 11, "5": 7, "6": 5, "7": 3, "8": 2, "9": 9, "10": 8, "11": 6, "12": 4, "13": 1, "14": 12}}}</text:p>
          </table:table-cell>
          <table:covered-table-cell table:number-columns-repeated="28" table:style-name="ce861"/>
          <table:table-cell table:style-name="ce874"/>
          <table:table-cell table:style-name="ce861"/>
          <table:table-cell table:style-name="Default"/>
          <table:table-cell table:style-name="ce861" table:number-columns-repeated="27"/>
          <table:table-cell table:number-columns-repeated="9"/>
        </table:table-row>
        <table:table-row table:style-name="ro1">
          <table:table-cell table:style-name="ce620"/>
          <table:table-cell table:style-name="ce620" office:value-type="float" office:value="5" calcext:value-type="float">
            <text:p>5</text:p>
          </table:table-cell>
          <table:table-cell table:style-name="ce656" office:value-type="float" office:value="6" calcext:value-type="float">
            <text:p>6</text:p>
          </table:table-cell>
          <table:table-cell table:style-name="ce666" office:value-type="float" office:value="7" calcext:value-type="float">
            <text:p>7</text:p>
          </table:table-cell>
          <table:table-cell table:style-name="ce677" office:value-type="float" office:value="8" calcext:value-type="float">
            <text:p>8</text:p>
          </table:table-cell>
          <table:table-cell table:style-name="ce677" office:value-type="float" office:value="9" calcext:value-type="float">
            <text:p>9</text:p>
          </table:table-cell>
          <table:table-cell table:style-name="ce677"/>
          <table:table-cell table:style-name="ce622"/>
          <table:table-cell/>
          <table:table-cell table:style-name="ce708"/>
          <table:table-cell table:style-name="ce677"/>
          <table:table-cell table:style-name="ce677" office:value-type="float" office:value="20" calcext:value-type="float">
            <text:p>20</text:p>
          </table:table-cell>
          <table:table-cell table:style-name="ce731" office:value-type="float" office:value="21" calcext:value-type="float">
            <text:p>21</text:p>
          </table:table-cell>
          <table:table-cell table:style-name="ce666" office:value-type="float" office:value="22" calcext:value-type="float">
            <text:p>22</text:p>
          </table:table-cell>
          <table:table-cell table:style-name="ce656" office:value-type="float" office:value="23" calcext:value-type="float">
            <text:p>23</text:p>
          </table:table-cell>
          <table:table-cell table:style-name="ce620" office:value-type="float" office:value="24" calcext:value-type="float">
            <text:p>24</text:p>
          </table:table-cell>
          <table:table-cell table:style-name="ce620"/>
          <table:table-cell/>
          <table:table-cell table:style-name="ce798" office:value-type="float" office:value="2" calcext:value-type="float">
            <text:p>2</text:p>
          </table:table-cell>
          <table:table-cell table:style-name="ce1174" office:value-type="float" office:value="7" calcext:value-type="float">
            <text:p>7</text:p>
          </table:table-cell>
          <table:table-cell table:style-name="ce1173" office:value-type="float" office:value="2" calcext:value-type="float">
            <text:p>2</text:p>
          </table:table-cell>
          <table:table-cell table:style-name="ce1173" office:value-type="float" office:value="0" calcext:value-type="float">
            <text:p>0</text:p>
          </table:table-cell>
          <table:table-cell table:style-name="ce1173" office:value-type="float" office:value="1" calcext:value-type="float">
            <text:p>1</text:p>
          </table:table-cell>
          <table:table-cell table:style-name="ce1174" office:value-type="float" office:value="8" calcext:value-type="float">
            <text:p>8</text:p>
          </table:table-cell>
          <table:table-cell table:style-name="Default"/>
          <table:table-cell table:style-name="ce1193" table:formula="of:=SUM([.B26];[.H26];[.N26];[.T26];[.Z26];[.Z31];[.T31];[.N31];[.H31];[.B31];[.B36];[.H36];[.N36];[.T36];[.Z36])/[.$Z$6]" office:value-type="float" office:value="35.4" calcext:value-type="float">
            <text:p>35.4</text:p>
          </table:table-cell>
          <table:table-cell table:style-name="ce1193" table:formula="of:=SUM([.C26];[.I26];[.O26];[.U26];[.AA26];[.AA31];[.U31];[.O31];[.I31];[.C31];[.C36];[.I36];[.O36];[.U36];[.AA36])/[.$Z$6]" office:value-type="float" office:value="26.1" calcext:value-type="float">
            <text:p>26.1</text:p>
          </table:table-cell>
          <table:table-cell table:style-name="ce1193" table:formula="of:=SUM([.D26];[.J26];[.P26];[.V26];[.AB26];[.AB31];[.V31];[.P31];[.J31];[.D31];[.D36];[.J36];[.P36];[.V36];[.AB36])/[.$Z$6]" office:value-type="float" office:value="23.1" calcext:value-type="float">
            <text:p>23.1</text:p>
          </table:table-cell>
          <table:table-cell table:style-name="ce1193" table:formula="of:=SUM([.E26];[.K26];[.Q26];[.W26];[.AC26];[.AC31];[.W31];[.Q31];[.K31];[.E31];[.E36];[.K36];[.Q36];[.W36];[.AC36])/[.$Z$6]" office:value-type="float" office:value="23.3" calcext:value-type="float">
            <text:p>23.3</text:p>
          </table:table-cell>
          <table:table-cell table:style-name="ce1193" table:formula="of:=SUM([.F26];[.L26];[.R26];[.X26];[.AD26];[.AD31];[.X31];[.R31];[.L31];[.F31];[.F36];[.L36];[.R36];[.X36];[.AD36])/[.$Z$6]" office:value-type="float" office:value="36.9" calcext:value-type="float">
            <text:p>36.9</text:p>
          </table:table-cell>
          <table:table-cell/>
          <table:covered-table-cell table:number-columns-repeated="29" table:style-name="ce861"/>
          <table:table-cell table:style-name="ce861" table:number-columns-repeated="30"/>
          <table:table-cell table:number-columns-repeated="9"/>
        </table:table-row>
        <table:table-row table:style-name="ro1">
          <table:table-cell table:style-name="ce620"/>
          <table:table-cell table:style-name="ce620" office:value-type="float" office:value="10" calcext:value-type="float">
            <text:p>10</text:p>
          </table:table-cell>
          <table:table-cell table:style-name="ce656" office:value-type="float" office:value="11" calcext:value-type="float">
            <text:p>11</text:p>
          </table:table-cell>
          <table:table-cell table:style-name="ce666" office:value-type="float" office:value="12" calcext:value-type="float">
            <text:p>12</text:p>
          </table:table-cell>
          <table:table-cell table:style-name="ce677" office:value-type="float" office:value="13" calcext:value-type="float">
            <text:p>13</text:p>
          </table:table-cell>
          <table:table-cell table:style-name="ce687" office:value-type="float" office:value="14" calcext:value-type="float">
            <text:p>14</text:p>
          </table:table-cell>
          <table:table-cell table:style-name="ce677" table:number-columns-repeated="2"/>
          <table:table-cell/>
          <table:table-cell table:style-name="ce677" table:number-columns-repeated="2"/>
          <table:table-cell table:style-name="ce677" office:value-type="float" office:value="25" calcext:value-type="float">
            <text:p>25</text:p>
          </table:table-cell>
          <table:table-cell table:style-name="ce731" office:value-type="float" office:value="26" calcext:value-type="float">
            <text:p>26</text:p>
          </table:table-cell>
          <table:table-cell table:style-name="ce666" office:value-type="float" office:value="27" calcext:value-type="float">
            <text:p>27</text:p>
          </table:table-cell>
          <table:table-cell table:style-name="ce656" office:value-type="float" office:value="28" calcext:value-type="float">
            <text:p>28</text:p>
          </table:table-cell>
          <table:table-cell table:style-name="ce620" office:value-type="float" office:value="29" calcext:value-type="float">
            <text:p>29</text:p>
          </table:table-cell>
          <table:table-cell table:style-name="ce620"/>
          <table:table-cell/>
          <table:table-cell table:style-name="ce798" office:value-type="float" office:value="3" calcext:value-type="float">
            <text:p>3</text:p>
          </table:table-cell>
          <table:table-cell table:style-name="ce1173" office:value-type="float" office:value="11" calcext:value-type="float">
            <text:p>11</text:p>
          </table:table-cell>
          <table:table-cell table:style-name="ce1174" office:value-type="float" office:value="10" calcext:value-type="float">
            <text:p>10</text:p>
          </table:table-cell>
          <table:table-cell table:style-name="ce1174" office:value-type="float" office:value="9" calcext:value-type="float">
            <text:p>9</text:p>
          </table:table-cell>
          <table:table-cell table:style-name="ce1173" office:value-type="float" office:value="4" calcext:value-type="float">
            <text:p>4</text:p>
          </table:table-cell>
          <table:table-cell table:style-name="ce1173" office:value-type="float" office:value="12" calcext:value-type="float">
            <text:p>12</text:p>
          </table:table-cell>
          <table:table-cell table:style-name="Default"/>
          <table:table-cell table:style-name="ce1193" table:formula="of:=SUM([.B27];[.H27];[.N27];[.T27];[.Z27];[.Z32];[.T32];[.N32];[.H32];[.B32];[.B37];[.H37];[.N37];[.T37];[.Z37])/[.$Z$6]" office:value-type="float" office:value="45.2" calcext:value-type="float">
            <text:p>45.2</text:p>
          </table:table-cell>
          <table:table-cell table:style-name="ce1193" table:formula="of:=SUM([.C27];[.I27];[.O27];[.U27];[.AA27];[.AA32];[.U32];[.O32];[.I32];[.C32];[.C37];[.I37];[.O37];[.U37];[.AA37])/[.$Z$6]" office:value-type="float" office:value="44.4" calcext:value-type="float">
            <text:p>44.4</text:p>
          </table:table-cell>
          <table:table-cell table:style-name="ce1193" table:formula="of:=SUM([.D27];[.J27];[.P27];[.V27];[.AB27];[.AB32];[.V32];[.P32];[.J32];[.D32];[.D37];[.J37];[.P37];[.V37];[.AB37])/[.$Z$6]" office:value-type="float" office:value="41.7" calcext:value-type="float">
            <text:p>41.7</text:p>
          </table:table-cell>
          <table:table-cell table:style-name="ce1193" table:formula="of:=SUM([.E27];[.K27];[.Q27];[.W27];[.AC27];[.AC32];[.W32];[.Q32];[.K32];[.E32];[.E37];[.K37];[.Q37];[.W37];[.AC37])/[.$Z$6]" office:value-type="float" office:value="33.8" calcext:value-type="float">
            <text:p>33.8</text:p>
          </table:table-cell>
          <table:table-cell table:style-name="ce1193" table:formula="of:=SUM([.F27];[.L27];[.R27];[.X27];[.AD27];[.AD32];[.X32];[.R32];[.L32];[.F32];[.F37];[.L37];[.R37];[.X37];[.AD37])/[.$Z$6]" office:value-type="float" office:value="48.7" calcext:value-type="float">
            <text:p>48.7</text:p>
          </table:table-cell>
          <table:table-cell table:style-name="ce856"/>
          <table:covered-table-cell table:number-columns-repeated="29" table:style-name="ce861"/>
          <table:table-cell table:style-name="ce874"/>
          <table:table-cell table:style-name="ce861" table:number-columns-repeated="29"/>
          <table:table-cell table:number-columns-repeated="9"/>
        </table:table-row>
        <table:table-row table:style-name="ro1">
          <table:table-cell table:style-name="ce620"/>
          <table:table-cell table:style-name="ce879"/>
          <table:table-cell table:style-name="ce656"/>
          <table:table-cell table:style-name="ce666"/>
          <table:table-cell table:style-name="ce679" table:number-columns-spanned="1" table:number-rows-spanned="2"/>
          <table:table-cell table:style-name="ce679" table:number-columns-spanned="1" table:number-rows-spanned="2"/>
          <table:table-cell table:style-name="ce679" table:number-columns-spanned="1" table:number-rows-spanned="2"/>
          <table:table-cell table:style-name="ce679" table:number-columns-spanned="1" table:number-rows-spanned="2"/>
          <table:table-cell/>
          <table:table-cell table:style-name="ce679" table:number-columns-spanned="1" table:number-rows-spanned="2"/>
          <table:table-cell table:style-name="ce679" table:number-columns-spanned="1" table:number-rows-spanned="2"/>
          <table:table-cell table:style-name="ce679" table:number-columns-spanned="1" table:number-rows-spanned="2"/>
          <table:table-cell table:style-name="ce732" table:number-columns-spanned="1" table:number-rows-spanned="2"/>
          <table:table-cell table:style-name="ce666"/>
          <table:table-cell table:style-name="ce656"/>
          <table:table-cell table:style-name="ce939"/>
          <table:table-cell table:style-name="ce620"/>
          <table:table-cell/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798" office:value-type="float" office:value="2" calcext:value-type="float">
            <text:p>2</text:p>
          </table:table-cell>
          <table:table-cell table:style-name="ce798" office:value-type="float" office:value="3" calcext:value-type="float">
            <text:p>3</text:p>
          </table:table-cell>
          <table:table-cell table:style-name="ce798" office:value-type="float" office:value="4" calcext:value-type="float">
            <text:p>4</text:p>
          </table:table-cell>
          <table:table-cell table:style-name="ce798" office:value-type="float" office:value="5" calcext:value-type="float">
            <text:p>5</text:p>
          </table:table-cell>
          <table:table-cell table:style-name="Default"/>
          <table:table-cell table:style-name="ce836"/>
          <table:table-cell table:style-name="ce844"/>
          <table:table-cell table:style-name="ce836"/>
          <table:table-cell table:style-name="Default"/>
          <table:table-cell table:style-name="ce856" table:number-columns-repeated="2"/>
          <table:covered-table-cell table:style-name="ce856"/>
          <table:covered-table-cell table:number-columns-repeated="28"/>
          <table:table-cell table:number-columns-repeated="2"/>
          <table:table-cell table:style-name="Default"/>
          <table:table-cell table:number-columns-repeated="36"/>
        </table:table-row>
        <table:table-row table:style-name="ro1">
          <table:table-cell table:style-name="ce622" table:number-columns-repeated="4"/>
          <table:covered-table-cell table:style-name="ce622"/>
          <table:covered-table-cell table:number-columns-repeated="2" table:style-name="ce903"/>
          <table:covered-table-cell table:style-name="ce679"/>
          <table:table-cell/>
          <table:covered-table-cell table:style-name="ce679"/>
          <table:covered-table-cell table:number-columns-repeated="2" table:style-name="ce903"/>
          <table:covered-table-cell table:style-name="ce732"/>
          <table:table-cell table:style-name="ce622" table:number-columns-repeated="4"/>
          <table:table-cell/>
          <table:table-cell table:style-name="Default"/>
          <table:table-cell table:style-name="ce812" office:value-type="string" calcext:value-type="string">
            <text:p>p</text:p>
          </table:table-cell>
          <table:table-cell table:style-name="ce812" office:value-type="string" calcext:value-type="string">
            <text:p>r</text:p>
          </table:table-cell>
          <table:table-cell table:style-name="ce812" office:value-type="string" calcext:value-type="string">
            <text:p>m</text:p>
          </table:table-cell>
          <table:table-cell table:number-columns-repeated="2" table:style-name="ce812" office:value-type="string" calcext:value-type="string">
            <text:p>i</text:p>
          </table:table-cell>
          <table:table-cell table:style-name="Default"/>
          <table:table-cell table:style-name="ce837" office:value-type="float" office:value="1" calcext:value-type="float">
            <text:p>1.0</text:p>
          </table:table-cell>
          <table:table-cell table:style-name="Default" table:number-columns-repeated="4"/>
          <table:table-cell/>
          <table:covered-table-cell table:number-columns-repeated="13"/>
          <table:covered-table-cell table:number-columns-repeated="3" table:style-name="ce856"/>
          <table:covered-table-cell table:number-columns-repeated="13"/>
          <table:table-cell table:number-columns-repeated="2"/>
          <table:table-cell table:style-name="Default"/>
          <table:table-cell table:number-columns-repeated="36"/>
        </table:table-row>
        <table:table-row table:style-name="ro2">
          <table:table-cell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Default" table:number-columns-repeated="12"/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 table:style-name="ce623"/>
          <table:table-cell table:style-name="ce880" table:formula="of:=[.$T$2]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690"/>
          <table:table-cell office:value-type="float" office:value="9" calcext:value-type="float">
            <text:p>9</text:p>
          </table:table-cell>
          <table:table-cell table:style-name="ce880" table:formula="of:=[.$U$2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690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880" table:formula="of:=[.$V$2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852" office:value-type="float" office:value="8" calcext:value-type="float">
            <text:p>8</text:p>
          </table:table-cell>
          <table:table-cell table:style-name="ce690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0" table:formula="of:=[.$W$2]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690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0" table:formula="of:=[.$X$2]" office:value-type="float" office:value="13" calcext:value-type="float">
            <text:p>13</text:p>
          </table:table-cell>
          <table:table-cell/>
          <table:table-cell table:style-name="ce1212" table:formula="of:=COM.MICROSOFT.CONCAT(&quot;&quot;&quot;&quot;;[.$B$2]; &quot;&quot;&quot;: &quot;; [.B8])" office:value-type="string" office:string-value="&quot;0&quot;: 14" calcext:value-type="string">
            <text:p>"0": 14</text:p>
          </table:table-cell>
          <table:table-cell table:style-name="ce1212" table:formula="of:=COM.MICROSOFT.CONCAT(&quot;&quot;&quot;&quot;;[.$C$2]; &quot;&quot;&quot;: &quot;; [.C8])" office:value-type="string" office:string-value="&quot;1&quot;: 1" calcext:value-type="string">
            <text:p>"1": 1</text:p>
          </table:table-cell>
          <table:table-cell table:style-name="ce1212" table:formula="of:=COM.MICROSOFT.CONCAT(&quot;&quot;&quot;&quot;;[.$D$2]; &quot;&quot;&quot;: &quot;; [.D8])" office:value-type="string" office:string-value="&quot;2&quot;: 2" calcext:value-type="string">
            <text:p>"2": 2</text:p>
          </table:table-cell>
          <table:table-cell table:style-name="ce1212" table:formula="of:=COM.MICROSOFT.CONCAT(&quot;&quot;&quot;&quot;;[.$E$2]; &quot;&quot;&quot;: &quot;; [.E8])" office:value-type="string" office:string-value="&quot;3&quot;: 3" calcext:value-type="string">
            <text:p>"3": 3</text:p>
          </table:table-cell>
          <table:table-cell table:style-name="ce1212" table:formula="of:=COM.MICROSOFT.CONCAT(&quot;&quot;&quot;&quot;;[.$F$2]; &quot;&quot;&quot;: &quot;; [.F8])" office:value-type="string" office:string-value="&quot;4&quot;: 5" calcext:value-type="string">
            <text:p>"4": 5</text:p>
          </table:table-cell>
          <table:table-cell table:style-name="ce1212"/>
          <table:table-cell table:style-name="ce1212" table:formula="of:=COM.MICROSOFT.CONCAT(&quot;&quot;&quot;&quot;;[.$B$2]; &quot;&quot;&quot;: &quot;; [.H8])" office:value-type="string" office:string-value="&quot;0&quot;: 9" calcext:value-type="string">
            <text:p>"0": 9</text:p>
          </table:table-cell>
          <table:table-cell table:style-name="ce1212" table:formula="of:=COM.MICROSOFT.CONCAT(&quot;&quot;&quot;&quot;;[.$C$2]; &quot;&quot;&quot;: &quot;; [.I8])" office:value-type="string" office:string-value="&quot;1&quot;: 6" calcext:value-type="string">
            <text:p>"1": 6</text:p>
          </table:table-cell>
          <table:table-cell table:style-name="ce1212" table:formula="of:=COM.MICROSOFT.CONCAT(&quot;&quot;&quot;&quot;;[.$D$2]; &quot;&quot;&quot;: &quot;; [.J8])" office:value-type="string" office:string-value="&quot;2&quot;: 1" calcext:value-type="string">
            <text:p>"2": 1</text:p>
          </table:table-cell>
          <table:table-cell table:style-name="ce1212" table:formula="of:=COM.MICROSOFT.CONCAT(&quot;&quot;&quot;&quot;;[.$E$2]; &quot;&quot;&quot;: &quot;; [.K8])" office:value-type="string" office:string-value="&quot;3&quot;: 3" calcext:value-type="string">
            <text:p>"3": 3</text:p>
          </table:table-cell>
          <table:table-cell table:style-name="ce1212" table:formula="of:=COM.MICROSOFT.CONCAT(&quot;&quot;&quot;&quot;;[.$F$2]; &quot;&quot;&quot;: &quot;; [.L8])" office:value-type="string" office:string-value="&quot;4&quot;: 4" calcext:value-type="string">
            <text:p>"4": 4</text:p>
          </table:table-cell>
          <table:table-cell table:style-name="ce1212"/>
          <table:table-cell table:style-name="ce1212" table:formula="of:=COM.MICROSOFT.CONCAT(&quot;&quot;&quot;&quot;;[.$B$2]; &quot;&quot;&quot;: &quot;; [.N8])" office:value-type="string" office:string-value="&quot;0&quot;: 9" calcext:value-type="string">
            <text:p>"0": 9</text:p>
          </table:table-cell>
          <table:table-cell table:style-name="ce1212" table:formula="of:=COM.MICROSOFT.CONCAT(&quot;&quot;&quot;&quot;;[.$C$2]; &quot;&quot;&quot;: &quot;; [.O8])" office:value-type="string" office:string-value="&quot;1&quot;: 3" calcext:value-type="string">
            <text:p>"1": 3</text:p>
          </table:table-cell>
          <table:table-cell table:style-name="ce1212" table:formula="of:=COM.MICROSOFT.CONCAT(&quot;&quot;&quot;&quot;;[.$D$2]; &quot;&quot;&quot;: &quot;; [.P8])" office:value-type="string" office:string-value="&quot;2&quot;: 3" calcext:value-type="string">
            <text:p>"2": 3</text:p>
          </table:table-cell>
          <table:table-cell table:style-name="ce1212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1212" table:formula="of:=COM.MICROSOFT.CONCAT(&quot;&quot;&quot;&quot;;[.$F$2]; &quot;&quot;&quot;: &quot;; [.R8])" office:value-type="string" office:string-value="&quot;4&quot;: 8" calcext:value-type="string">
            <text:p>"4": 8</text:p>
          </table:table-cell>
          <table:table-cell table:style-name="ce1212"/>
          <table:table-cell table:style-name="ce1212" table:formula="of:=COM.MICROSOFT.CONCAT(&quot;&quot;&quot;&quot;;[.$B$2]; &quot;&quot;&quot;: &quot;; [.T8])" office:value-type="string" office:string-value="&quot;0&quot;: 3" calcext:value-type="string">
            <text:p>"0": 3</text:p>
          </table:table-cell>
          <table:table-cell table:style-name="ce1212" table:formula="of:=COM.MICROSOFT.CONCAT(&quot;&quot;&quot;&quot;;[.$C$2]; &quot;&quot;&quot;: &quot;; [.U8])" office:value-type="string" office:string-value="&quot;1&quot;: 2" calcext:value-type="string">
            <text:p>"1": 2</text:p>
          </table:table-cell>
          <table:table-cell table:style-name="ce1212" table:formula="of:=COM.MICROSOFT.CONCAT(&quot;&quot;&quot;&quot;;[.$D$2]; &quot;&quot;&quot;: &quot;; [.V8])" office:value-type="string" office:string-value="&quot;2&quot;: 1" calcext:value-type="string">
            <text:p>"2": 1</text:p>
          </table:table-cell>
          <table:table-cell table:style-name="ce1212" table:formula="of:=COM.MICROSOFT.CONCAT(&quot;&quot;&quot;&quot;;[.$E$2]; &quot;&quot;&quot;: &quot;; [.W8])" office:value-type="string" office:string-value="&quot;3&quot;: 5" calcext:value-type="string">
            <text:p>"3": 5</text:p>
          </table:table-cell>
          <table:table-cell table:style-name="ce1212" table:formula="of:=COM.MICROSOFT.CONCAT(&quot;&quot;&quot;&quot;;[.$F$2]; &quot;&quot;&quot;: &quot;; [.X8])" office:value-type="string" office:string-value="&quot;4&quot;: 8" calcext:value-type="string">
            <text:p>"4": 8</text:p>
          </table:table-cell>
          <table:table-cell table:style-name="ce1212"/>
          <table:table-cell table:style-name="ce1212" table:formula="of:=COM.MICROSOFT.CONCAT(&quot;&quot;&quot;&quot;;[.$B$2]; &quot;&quot;&quot;: &quot;; [.Z8])" office:value-type="string" office:string-value="&quot;0&quot;: 7" calcext:value-type="string">
            <text:p>"0": 7</text:p>
          </table:table-cell>
          <table:table-cell table:style-name="ce1212" table:formula="of:=COM.MICROSOFT.CONCAT(&quot;&quot;&quot;&quot;;[.$C$2]; &quot;&quot;&quot;: &quot;; [.AA8])" office:value-type="string" office:string-value="&quot;1&quot;: 3" calcext:value-type="string">
            <text:p>"1": 3</text:p>
          </table:table-cell>
          <table:table-cell table:style-name="ce1212" table:formula="of:=COM.MICROSOFT.CONCAT(&quot;&quot;&quot;&quot;;[.$D$2]; &quot;&quot;&quot;: &quot;; [.AB8])" office:value-type="string" office:string-value="&quot;2&quot;: 2" calcext:value-type="string">
            <text:p>"2": 2</text:p>
          </table:table-cell>
          <table:table-cell table:style-name="ce1212" table:formula="of:=COM.MICROSOFT.CONCAT(&quot;&quot;&quot;&quot;;[.$E$2]; &quot;&quot;&quot;: &quot;; [.AC8])" office:value-type="string" office:string-value="&quot;3&quot;: 1" calcext:value-type="string">
            <text:p>"3": 1</text:p>
          </table:table-cell>
          <table:table-cell table:style-name="ce1212" table:formula="of:=COM.MICROSOFT.CONCAT(&quot;&quot;&quot;&quot;;[.$F$2]; &quot;&quot;&quot;: &quot;; [.AD8])" office:value-type="string" office:string-value="&quot;4&quot;: 13" calcext:value-type="string">
            <text:p>"4": 13</text:p>
          </table:table-cell>
          <table:table-cell table:style-name="ce875" table:number-columns-repeated="2"/>
          <table:table-cell table:style-name="ce875" table:formula="of:=COM.MICROSOFT.CONCAT(&quot;&quot;&quot;0&quot;&quot;: { &quot;;COM.MICROSOFT.TEXTJOIN(&quot;, &quot;;TRUE();[.AF8:.AJ10]);&quot;}&quot;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" calcext:value-type="string">
            <text:p>"0": { "0": 14, "1": 1, "2": 2, "3": 3, "4": 5, "5": 9, "6": 8, "7": 7, "8": 4, "9": 6, "10": 12, "11": 14, "12": 13, "13": 10, "14": 11}</text:p>
          </table:table-cell>
          <table:table-cell table:number-columns-repeated="3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690"/>
          <table:table-cell office:value-type="float" office:value="7" calcext:value-type="float">
            <text:p>7</text:p>
          </table:table-cell>
          <table:table-cell table:style-name="ce845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690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852" office:value-type="float" office:value="6" calcext:value-type="float">
            <text:p>6</text:p>
          </table:table-cell>
          <table:table-cell table:style-name="ce690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690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style-name="ce1212" table:formula="of:=COM.MICROSOFT.CONCAT(&quot;&quot;&quot;&quot;;[.$B$3]; &quot;&quot;&quot;: &quot;; [.B9])" office:value-type="string" office:string-value="&quot;5&quot;: 9" calcext:value-type="string">
            <text:p>"5": 9</text:p>
          </table:table-cell>
          <table:table-cell table:style-name="ce1212" table:formula="of:=COM.MICROSOFT.CONCAT(&quot;&quot;&quot;&quot;;[.$C$3]; &quot;&quot;&quot;: &quot;; [.C9])" office:value-type="string" office:string-value="&quot;6&quot;: 8" calcext:value-type="string">
            <text:p>"6": 8</text:p>
          </table:table-cell>
          <table:table-cell table:style-name="ce1212" table:formula="of:=COM.MICROSOFT.CONCAT(&quot;&quot;&quot;&quot;;[.$D$3]; &quot;&quot;&quot;: &quot;; [.D9])" office:value-type="string" office:string-value="&quot;7&quot;: 7" calcext:value-type="string">
            <text:p>"7": 7</text:p>
          </table:table-cell>
          <table:table-cell table:style-name="ce1212" table:formula="of:=COM.MICROSOFT.CONCAT(&quot;&quot;&quot;&quot;;[.$E$3]; &quot;&quot;&quot;: &quot;; [.E9])" office:value-type="string" office:string-value="&quot;8&quot;: 4" calcext:value-type="string">
            <text:p>"8": 4</text:p>
          </table:table-cell>
          <table:table-cell table:style-name="ce1212" table:formula="of:=COM.MICROSOFT.CONCAT(&quot;&quot;&quot;&quot;;[.$F$3]; &quot;&quot;&quot;: &quot;; [.F9])" office:value-type="string" office:string-value="&quot;9&quot;: 6" calcext:value-type="string">
            <text:p>"9": 6</text:p>
          </table:table-cell>
          <table:table-cell table:style-name="ce1212"/>
          <table:table-cell table:style-name="ce1212" table:formula="of:=COM.MICROSOFT.CONCAT(&quot;&quot;&quot;&quot;;[.$B$3]; &quot;&quot;&quot;: &quot;; [.H9])" office:value-type="string" office:string-value="&quot;5&quot;: 7" calcext:value-type="string">
            <text:p>"5": 7</text:p>
          </table:table-cell>
          <table:table-cell table:style-name="ce1212" table:formula="of:=COM.MICROSOFT.CONCAT(&quot;&quot;&quot;&quot;;[.$C$3]; &quot;&quot;&quot;: &quot;; [.I9])" office:value-type="string" office:string-value="&quot;6&quot;: 8" calcext:value-type="string">
            <text:p>"6": 8</text:p>
          </table:table-cell>
          <table:table-cell table:style-name="ce1212" table:formula="of:=COM.MICROSOFT.CONCAT(&quot;&quot;&quot;&quot;;[.$D$3]; &quot;&quot;&quot;: &quot;; [.J9])" office:value-type="string" office:string-value="&quot;7&quot;: 6" calcext:value-type="string">
            <text:p>"7": 6</text:p>
          </table:table-cell>
          <table:table-cell table:style-name="ce1212" table:formula="of:=COM.MICROSOFT.CONCAT(&quot;&quot;&quot;&quot;;[.$E$3]; &quot;&quot;&quot;: &quot;; [.K9])" office:value-type="string" office:string-value="&quot;8&quot;: 2" calcext:value-type="string">
            <text:p>"8": 2</text:p>
          </table:table-cell>
          <table:table-cell table:style-name="ce1212" table:formula="of:=COM.MICROSOFT.CONCAT(&quot;&quot;&quot;&quot;;[.$F$3]; &quot;&quot;&quot;: &quot;; [.L9])" office:value-type="string" office:string-value="&quot;9&quot;: 5" calcext:value-type="string">
            <text:p>"9": 5</text:p>
          </table:table-cell>
          <table:table-cell table:style-name="ce1212"/>
          <table:table-cell table:style-name="ce1212" table:formula="of:=COM.MICROSOFT.CONCAT(&quot;&quot;&quot;&quot;;[.$B$3]; &quot;&quot;&quot;: &quot;; [.N9])" office:value-type="string" office:string-value="&quot;5&quot;: 7" calcext:value-type="string">
            <text:p>"5": 7</text:p>
          </table:table-cell>
          <table:table-cell table:style-name="ce1212" table:formula="of:=COM.MICROSOFT.CONCAT(&quot;&quot;&quot;&quot;;[.$C$3]; &quot;&quot;&quot;: &quot;; [.O9])" office:value-type="string" office:string-value="&quot;6&quot;: 4" calcext:value-type="string">
            <text:p>"6": 4</text:p>
          </table:table-cell>
          <table:table-cell table:style-name="ce1212" table:formula="of:=COM.MICROSOFT.CONCAT(&quot;&quot;&quot;&quot;;[.$D$3]; &quot;&quot;&quot;: &quot;; [.P9])" office:value-type="string" office:string-value="&quot;7&quot;: 5" calcext:value-type="string">
            <text:p>"7": 5</text:p>
          </table:table-cell>
          <table:table-cell table:style-name="ce1212" table:formula="of:=COM.MICROSOFT.CONCAT(&quot;&quot;&quot;&quot;;[.$E$3]; &quot;&quot;&quot;: &quot;; [.Q9])" office:value-type="string" office:string-value="&quot;8&quot;: 2" calcext:value-type="string">
            <text:p>"8": 2</text:p>
          </table:table-cell>
          <table:table-cell table:style-name="ce1212" table:formula="of:=COM.MICROSOFT.CONCAT(&quot;&quot;&quot;&quot;;[.$F$3]; &quot;&quot;&quot;: &quot;; [.R9])" office:value-type="string" office:string-value="&quot;9&quot;: 6" calcext:value-type="string">
            <text:p>"9": 6</text:p>
          </table:table-cell>
          <table:table-cell table:style-name="ce1212"/>
          <table:table-cell table:style-name="ce1212" table:formula="of:=COM.MICROSOFT.CONCAT(&quot;&quot;&quot;&quot;;[.$B$3]; &quot;&quot;&quot;: &quot;; [.T9])" office:value-type="string" office:string-value="&quot;5&quot;: 5" calcext:value-type="string">
            <text:p>"5": 5</text:p>
          </table:table-cell>
          <table:table-cell table:style-name="ce1212" table:formula="of:=COM.MICROSOFT.CONCAT(&quot;&quot;&quot;&quot;;[.$C$3]; &quot;&quot;&quot;: &quot;; [.U9])" office:value-type="string" office:string-value="&quot;6&quot;: 4" calcext:value-type="string">
            <text:p>"6": 4</text:p>
          </table:table-cell>
          <table:table-cell table:style-name="ce1212" table:formula="of:=COM.MICROSOFT.CONCAT(&quot;&quot;&quot;&quot;;[.$D$3]; &quot;&quot;&quot;: &quot;; [.V9])" office:value-type="string" office:string-value="&quot;7&quot;: 6" calcext:value-type="string">
            <text:p>"7": 6</text:p>
          </table:table-cell>
          <table:table-cell table:style-name="ce1212" table:formula="of:=COM.MICROSOFT.CONCAT(&quot;&quot;&quot;&quot;;[.$E$3]; &quot;&quot;&quot;: &quot;; [.W9])" office:value-type="string" office:string-value="&quot;8&quot;: 7" calcext:value-type="string">
            <text:p>"8": 7</text:p>
          </table:table-cell>
          <table:table-cell table:style-name="ce1212" table:formula="of:=COM.MICROSOFT.CONCAT(&quot;&quot;&quot;&quot;;[.$F$3]; &quot;&quot;&quot;: &quot;; [.X9])" office:value-type="string" office:string-value="&quot;9&quot;: 9" calcext:value-type="string">
            <text:p>"9": 9</text:p>
          </table:table-cell>
          <table:table-cell table:style-name="ce1212"/>
          <table:table-cell table:style-name="ce1212" table:formula="of:=COM.MICROSOFT.CONCAT(&quot;&quot;&quot;&quot;;[.$B$3]; &quot;&quot;&quot;: &quot;; [.Z9])" office:value-type="string" office:string-value="&quot;5&quot;: 6" calcext:value-type="string">
            <text:p>"5": 6</text:p>
          </table:table-cell>
          <table:table-cell table:style-name="ce1212" table:formula="of:=COM.MICROSOFT.CONCAT(&quot;&quot;&quot;&quot;;[.$C$3]; &quot;&quot;&quot;: &quot;; [.AA9])" office:value-type="string" office:string-value="&quot;6&quot;: 4" calcext:value-type="string">
            <text:p>"6": 4</text:p>
          </table:table-cell>
          <table:table-cell table:style-name="ce1212" table:formula="of:=COM.MICROSOFT.CONCAT(&quot;&quot;&quot;&quot;;[.$D$3]; &quot;&quot;&quot;: &quot;; [.AB9])" office:value-type="string" office:string-value="&quot;7&quot;: 5" calcext:value-type="string">
            <text:p>"7": 5</text:p>
          </table:table-cell>
          <table:table-cell table:style-name="ce1212" table:formula="of:=COM.MICROSOFT.CONCAT(&quot;&quot;&quot;&quot;;[.$E$3]; &quot;&quot;&quot;: &quot;; [.AC9])" office:value-type="string" office:string-value="&quot;8&quot;: 9" calcext:value-type="string">
            <text:p>"8": 9</text:p>
          </table:table-cell>
          <table:table-cell table:style-name="ce1212" table:formula="of:=COM.MICROSOFT.CONCAT(&quot;&quot;&quot;&quot;;[.$F$3]; &quot;&quot;&quot;: &quot;; [.AD9])" office:value-type="string" office:string-value="&quot;9&quot;: 8" calcext:value-type="string">
            <text:p>"9": 8</text:p>
          </table:table-cell>
          <table:table-cell table:style-name="ce875" table:number-columns-repeated="2"/>
          <table:table-cell table:formula="of:=COM.MICROSOFT.CONCAT(&quot;&quot;&quot;1&quot;&quot;: { &quot;;COM.MICROSOFT.TEXTJOIN(&quot;, &quot;;TRUE();[.AL8:.AP10]);&quot;}&quot;)" office:value-type="string" office:string-value="&quot;1&quot;: { &quot;0&quot;: 9, &quot;1&quot;: 6, &quot;2&quot;: 1, &quot;3&quot;: 3, &quot;4&quot;: 4, &quot;5&quot;: 7, &quot;6&quot;: 8, &quot;7&quot;: 6, &quot;8&quot;: 2, &quot;9&quot;: 5, &quot;10&quot;: 13, &quot;11&quot;: 14, &quot;12&quot;: 12, &quot;13&quot;: 10, &quot;14&quot;: 11}" calcext:value-type="string">
            <text:p>"1": { "0": 9, "1": 6, "2": 1, "3": 3, "4": 4, "5": 7, "6": 8, "7": 6, "8": 2, "9": 5, "10": 13, "11": 14, "12": 12, "13": 10, "14": 11}</text:p>
          </table:table-cell>
          <table:table-cell table:number-columns-repeated="3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690"/>
          <table:table-cell office:value-type="float" office:value="13" calcext:value-type="float">
            <text:p>13</text:p>
          </table:table-cell>
          <table:table-cell table:style-name="ce845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690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style-name="ce852" office:value-type="float" office:value="14" calcext:value-type="float">
            <text:p>14</text:p>
          </table:table-cell>
          <table:table-cell table:style-name="ce690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690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212" table:formula="of:=COM.MICROSOFT.CONCAT(&quot;&quot;&quot;&quot;;[.$B$4]; &quot;&quot;&quot;: &quot;; [.B10])" office:value-type="string" office:string-value="&quot;10&quot;: 12" calcext:value-type="string">
            <text:p>"10": 12</text:p>
          </table:table-cell>
          <table:table-cell table:style-name="ce1212" table:formula="of:=COM.MICROSOFT.CONCAT(&quot;&quot;&quot;&quot;;[.$C$4]; &quot;&quot;&quot;: &quot;; [.C10])" office:value-type="string" office:string-value="&quot;11&quot;: 14" calcext:value-type="string">
            <text:p>"11": 14</text:p>
          </table:table-cell>
          <table:table-cell table:style-name="ce1212" table:formula="of:=COM.MICROSOFT.CONCAT(&quot;&quot;&quot;&quot;;[.$D$4]; &quot;&quot;&quot;: &quot;; [.D10])" office:value-type="string" office:string-value="&quot;12&quot;: 13" calcext:value-type="string">
            <text:p>"12": 13</text:p>
          </table:table-cell>
          <table:table-cell table:style-name="ce1212" table:formula="of:=COM.MICROSOFT.CONCAT(&quot;&quot;&quot;&quot;;[.$E$4]; &quot;&quot;&quot;: &quot;; [.E10])" office:value-type="string" office:string-value="&quot;13&quot;: 10" calcext:value-type="string">
            <text:p>"13": 10</text:p>
          </table:table-cell>
          <table:table-cell table:style-name="ce1212" table:formula="of:=COM.MICROSOFT.CONCAT(&quot;&quot;&quot;&quot;;[.$F$4]; &quot;&quot;&quot;: &quot;; [.F10])" office:value-type="string" office:string-value="&quot;14&quot;: 11" calcext:value-type="string">
            <text:p>"14": 11</text:p>
          </table:table-cell>
          <table:table-cell table:style-name="ce1212"/>
          <table:table-cell table:style-name="ce1212" table:formula="of:=COM.MICROSOFT.CONCAT(&quot;&quot;&quot;&quot;;[.$B$4]; &quot;&quot;&quot;: &quot;; [.H10])" office:value-type="string" office:string-value="&quot;10&quot;: 13" calcext:value-type="string">
            <text:p>"10": 13</text:p>
          </table:table-cell>
          <table:table-cell table:style-name="ce1212" table:formula="of:=COM.MICROSOFT.CONCAT(&quot;&quot;&quot;&quot;;[.$C$4]; &quot;&quot;&quot;: &quot;; [.I10])" office:value-type="string" office:string-value="&quot;11&quot;: 14" calcext:value-type="string">
            <text:p>"11": 14</text:p>
          </table:table-cell>
          <table:table-cell table:style-name="ce1212" table:formula="of:=COM.MICROSOFT.CONCAT(&quot;&quot;&quot;&quot;;[.$D$4]; &quot;&quot;&quot;: &quot;; [.J10])" office:value-type="string" office:string-value="&quot;12&quot;: 12" calcext:value-type="string">
            <text:p>"12": 12</text:p>
          </table:table-cell>
          <table:table-cell table:style-name="ce1212" table:formula="of:=COM.MICROSOFT.CONCAT(&quot;&quot;&quot;&quot;;[.$E$4]; &quot;&quot;&quot;: &quot;; [.K10])" office:value-type="string" office:string-value="&quot;13&quot;: 10" calcext:value-type="string">
            <text:p>"13": 10</text:p>
          </table:table-cell>
          <table:table-cell table:style-name="ce1212" table:formula="of:=COM.MICROSOFT.CONCAT(&quot;&quot;&quot;&quot;;[.$F$4]; &quot;&quot;&quot;: &quot;; [.L10])" office:value-type="string" office:string-value="&quot;14&quot;: 11" calcext:value-type="string">
            <text:p>"14": 11</text:p>
          </table:table-cell>
          <table:table-cell table:style-name="ce1212"/>
          <table:table-cell table:style-name="ce1212" table:formula="of:=COM.MICROSOFT.CONCAT(&quot;&quot;&quot;&quot;;[.$B$4]; &quot;&quot;&quot;: &quot;; [.N10])" office:value-type="string" office:string-value="&quot;10&quot;: 12" calcext:value-type="string">
            <text:p>"10": 12</text:p>
          </table:table-cell>
          <table:table-cell table:style-name="ce1212" table:formula="of:=COM.MICROSOFT.CONCAT(&quot;&quot;&quot;&quot;;[.$C$4]; &quot;&quot;&quot;: &quot;; [.O10])" office:value-type="string" office:string-value="&quot;11&quot;: 11" calcext:value-type="string">
            <text:p>"11": 11</text:p>
          </table:table-cell>
          <table:table-cell table:style-name="ce1212" table:formula="of:=COM.MICROSOFT.CONCAT(&quot;&quot;&quot;&quot;;[.$D$4]; &quot;&quot;&quot;: &quot;; [.P10])" office:value-type="string" office:string-value="&quot;12&quot;: 13" calcext:value-type="string">
            <text:p>"12": 13</text:p>
          </table:table-cell>
          <table:table-cell table:style-name="ce1212" table:formula="of:=COM.MICROSOFT.CONCAT(&quot;&quot;&quot;&quot;;[.$E$4]; &quot;&quot;&quot;: &quot;; [.Q10])" office:value-type="string" office:string-value="&quot;13&quot;: 10" calcext:value-type="string">
            <text:p>"13": 10</text:p>
          </table:table-cell>
          <table:table-cell table:style-name="ce1212" table:formula="of:=COM.MICROSOFT.CONCAT(&quot;&quot;&quot;&quot;;[.$F$4]; &quot;&quot;&quot;: &quot;; [.R10])" office:value-type="string" office:string-value="&quot;14&quot;: 14" calcext:value-type="string">
            <text:p>"14": 14</text:p>
          </table:table-cell>
          <table:table-cell table:style-name="ce1212"/>
          <table:table-cell table:style-name="ce1212" table:formula="of:=COM.MICROSOFT.CONCAT(&quot;&quot;&quot;&quot;;[.$B$4]; &quot;&quot;&quot;: &quot;; [.T10])" office:value-type="string" office:string-value="&quot;10&quot;: 13" calcext:value-type="string">
            <text:p>"10": 13</text:p>
          </table:table-cell>
          <table:table-cell table:style-name="ce1212" table:formula="of:=COM.MICROSOFT.CONCAT(&quot;&quot;&quot;&quot;;[.$C$4]; &quot;&quot;&quot;: &quot;; [.U10])" office:value-type="string" office:string-value="&quot;11&quot;: 14" calcext:value-type="string">
            <text:p>"11": 14</text:p>
          </table:table-cell>
          <table:table-cell table:style-name="ce1212" table:formula="of:=COM.MICROSOFT.CONCAT(&quot;&quot;&quot;&quot;;[.$D$4]; &quot;&quot;&quot;: &quot;; [.V10])" office:value-type="string" office:string-value="&quot;12&quot;: 12" calcext:value-type="string">
            <text:p>"12": 12</text:p>
          </table:table-cell>
          <table:table-cell table:style-name="ce1212" table:formula="of:=COM.MICROSOFT.CONCAT(&quot;&quot;&quot;&quot;;[.$E$4]; &quot;&quot;&quot;: &quot;; [.W10])" office:value-type="string" office:string-value="&quot;13&quot;: 10" calcext:value-type="string">
            <text:p>"13": 10</text:p>
          </table:table-cell>
          <table:table-cell table:style-name="ce1212" table:formula="of:=COM.MICROSOFT.CONCAT(&quot;&quot;&quot;&quot;;[.$F$4]; &quot;&quot;&quot;: &quot;; [.X10])" office:value-type="string" office:string-value="&quot;14&quot;: 11" calcext:value-type="string">
            <text:p>"14": 11</text:p>
          </table:table-cell>
          <table:table-cell table:style-name="ce1212"/>
          <table:table-cell table:style-name="ce1212" table:formula="of:=COM.MICROSOFT.CONCAT(&quot;&quot;&quot;&quot;;[.$B$4]; &quot;&quot;&quot;: &quot;; [.Z10])" office:value-type="string" office:string-value="&quot;10&quot;: 10" calcext:value-type="string">
            <text:p>"10": 10</text:p>
          </table:table-cell>
          <table:table-cell table:style-name="ce1212" table:formula="of:=COM.MICROSOFT.CONCAT(&quot;&quot;&quot;&quot;;[.$C$4]; &quot;&quot;&quot;: &quot;; [.AA10])" office:value-type="string" office:string-value="&quot;11&quot;: 11" calcext:value-type="string">
            <text:p>"11": 11</text:p>
          </table:table-cell>
          <table:table-cell table:style-name="ce1212" table:formula="of:=COM.MICROSOFT.CONCAT(&quot;&quot;&quot;&quot;;[.$D$4]; &quot;&quot;&quot;: &quot;; [.AB10])" office:value-type="string" office:string-value="&quot;12&quot;: 12" calcext:value-type="string">
            <text:p>"12": 12</text:p>
          </table:table-cell>
          <table:table-cell table:style-name="ce1212" table:formula="of:=COM.MICROSOFT.CONCAT(&quot;&quot;&quot;&quot;;[.$E$4]; &quot;&quot;&quot;: &quot;; [.AC10])" office:value-type="string" office:string-value="&quot;13&quot;: 13" calcext:value-type="string">
            <text:p>"13": 13</text:p>
          </table:table-cell>
          <table:table-cell table:style-name="ce1212" table:formula="of:=COM.MICROSOFT.CONCAT(&quot;&quot;&quot;&quot;;[.$F$4]; &quot;&quot;&quot;: &quot;; [.AD10])" office:value-type="string" office:string-value="&quot;14&quot;: 14" calcext:value-type="string">
            <text:p>"14": 14</text:p>
          </table:table-cell>
          <table:table-cell table:style-name="ce875" table:number-columns-repeated="2"/>
          <table:table-cell table:formula="of:=COM.MICROSOFT.CONCAT(&quot;&quot;&quot;2&quot;&quot;: { &quot;;COM.MICROSOFT.TEXTJOIN(&quot;, &quot;;TRUE();[.AR8:.AV10]);&quot;}&quot;)" office:value-type="string" office:string-value="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" calcext:value-type="string">
            <text:p>"2": { "0": 9, "1": 3, "2": 3, "3": 1, "4": 8, "5": 7, "6": 4, "7": 5, "8": 2, "9": 6, "10": 12, "11": 11, "12": 13, "13": 10, "14": 14}</text:p>
          </table:table-cell>
          <table:table-cell table:number-columns-repeated="36"/>
        </table:table-row>
        <table:table-row table:style-name="ro2">
          <table:table-cell table:style-name="ce623"/>
          <table:table-cell table:style-name="ce882" table:number-columns-repeated="29"/>
          <table:table-cell table:style-name="ce860"/>
          <table:table-cell table:style-name="ce875" table:number-columns-repeated="27"/>
          <table:table-cell table:style-name="ce876" table:number-columns-repeated="2"/>
          <table:table-cell table:style-name="ce875" table:number-columns-repeated="2"/>
          <table:table-cell table:formula="of:=COM.MICROSOFT.CONCAT(&quot;&quot;&quot;3&quot;&quot;: { &quot;;COM.MICROSOFT.TEXTJOIN(&quot;, &quot;;TRUE();[.AX8:.BB10]);&quot;}&quot;)" office:value-type="string" office:string-value="&quot;3&quot;: { &quot;0&quot;: 3, &quot;1&quot;: 2, &quot;2&quot;: 1, &quot;3&quot;: 5, &quot;4&quot;: 8, &quot;5&quot;: 5, &quot;6&quot;: 4, &quot;7&quot;: 6, &quot;8&quot;: 7, &quot;9&quot;: 9, &quot;10&quot;: 13, &quot;11&quot;: 14, &quot;12&quot;: 12, &quot;13&quot;: 10, &quot;14&quot;: 11}" calcext:value-type="string">
            <text:p>"3": { "0": 3, "1": 2, "2": 1, "3": 5, "4": 8, "5": 5, "6": 4, "7": 6, "8": 7, "9": 9, "10": 13, "11": 14, "12": 12, "13": 10, "14": 11}</text:p>
          </table:table-cell>
          <table:table-cell table:number-columns-repeated="36"/>
        </table:table-row>
        <table:table-row table:style-name="ro1">
          <table:table-cell table:style-name="ce624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690"/>
          <table:table-cell office:value-type="float" office:value="14" calcext:value-type="float">
            <text:p>14</text:p>
          </table:table-cell>
          <table:table-cell table:style-name="ce845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690"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852" office:value-type="float" office:value="13" calcext:value-type="float">
            <text:p>13</text:p>
          </table:table-cell>
          <table:table-cell table:style-name="ce690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style-name="ce690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table:style-name="ce1213" table:formula="of:=COM.MICROSOFT.CONCAT(&quot;&quot;&quot;&quot;;[.$B$2]; &quot;&quot;&quot;: &quot;; [.B12])" office:value-type="string" office:string-value="&quot;0&quot;: 14" calcext:value-type="string">
            <text:p>"0": 14</text:p>
          </table:table-cell>
          <table:table-cell table:style-name="ce1213" table:formula="of:=COM.MICROSOFT.CONCAT(&quot;&quot;&quot;&quot;;[.$C$2]; &quot;&quot;&quot;: &quot;; [.C12])" office:value-type="string" office:string-value="&quot;1&quot;: 9" calcext:value-type="string">
            <text:p>"1": 9</text:p>
          </table:table-cell>
          <table:table-cell table:style-name="ce1213" table:formula="of:=COM.MICROSOFT.CONCAT(&quot;&quot;&quot;&quot;;[.$D$2]; &quot;&quot;&quot;: &quot;; [.D12])" office:value-type="string" office:string-value="&quot;2&quot;: 4" calcext:value-type="string">
            <text:p>"2": 4</text:p>
          </table:table-cell>
          <table:table-cell table:style-name="ce1213" table:formula="of:=COM.MICROSOFT.CONCAT(&quot;&quot;&quot;&quot;;[.$E$2]; &quot;&quot;&quot;: &quot;; [.E12])" office:value-type="string" office:string-value="&quot;3&quot;: 5" calcext:value-type="string">
            <text:p>"3": 5</text:p>
          </table:table-cell>
          <table:table-cell table:style-name="ce1213" table:formula="of:=COM.MICROSOFT.CONCAT(&quot;&quot;&quot;&quot;;[.$F$2]; &quot;&quot;&quot;: &quot;; [.F12])" office:value-type="string" office:string-value="&quot;4&quot;: 10" calcext:value-type="string">
            <text:p>"4": 10</text:p>
          </table:table-cell>
          <table:table-cell table:style-name="ce1213"/>
          <table:table-cell table:style-name="ce1213" table:formula="of:=COM.MICROSOFT.CONCAT(&quot;&quot;&quot;&quot;;[.$B$2]; &quot;&quot;&quot;: &quot;; [.H12])" office:value-type="string" office:string-value="&quot;0&quot;: 14" calcext:value-type="string">
            <text:p>"0": 14</text:p>
          </table:table-cell>
          <table:table-cell table:style-name="ce1213" table:formula="of:=COM.MICROSOFT.CONCAT(&quot;&quot;&quot;&quot;;[.$C$2]; &quot;&quot;&quot;: &quot;; [.I12])" office:value-type="string" office:string-value="&quot;1&quot;: 8" calcext:value-type="string">
            <text:p>"1": 8</text:p>
          </table:table-cell>
          <table:table-cell table:style-name="ce1213" table:formula="of:=COM.MICROSOFT.CONCAT(&quot;&quot;&quot;&quot;;[.$D$2]; &quot;&quot;&quot;: &quot;; [.J12])" office:value-type="string" office:string-value="&quot;2&quot;: 3" calcext:value-type="string">
            <text:p>"2": 3</text:p>
          </table:table-cell>
          <table:table-cell table:style-name="ce1213" table:formula="of:=COM.MICROSOFT.CONCAT(&quot;&quot;&quot;&quot;;[.$E$2]; &quot;&quot;&quot;: &quot;; [.K12])" office:value-type="string" office:string-value="&quot;3&quot;: 5" calcext:value-type="string">
            <text:p>"3": 5</text:p>
          </table:table-cell>
          <table:table-cell table:style-name="ce1213" table:formula="of:=COM.MICROSOFT.CONCAT(&quot;&quot;&quot;&quot;;[.$F$2]; &quot;&quot;&quot;: &quot;; [.L12])" office:value-type="string" office:string-value="&quot;4&quot;: 13" calcext:value-type="string">
            <text:p>"4": 13</text:p>
          </table:table-cell>
          <table:table-cell table:style-name="ce1213"/>
          <table:table-cell table:style-name="ce1213" table:formula="of:=COM.MICROSOFT.CONCAT(&quot;&quot;&quot;&quot;;[.$B$2]; &quot;&quot;&quot;: &quot;; [.N12])" office:value-type="string" office:string-value="&quot;0&quot;: 14" calcext:value-type="string">
            <text:p>"0": 14</text:p>
          </table:table-cell>
          <table:table-cell table:style-name="ce1213" table:formula="of:=COM.MICROSOFT.CONCAT(&quot;&quot;&quot;&quot;;[.$C$2]; &quot;&quot;&quot;: &quot;; [.O12])" office:value-type="string" office:string-value="&quot;1&quot;: 8" calcext:value-type="string">
            <text:p>"1": 8</text:p>
          </table:table-cell>
          <table:table-cell table:style-name="ce1213" table:formula="of:=COM.MICROSOFT.CONCAT(&quot;&quot;&quot;&quot;;[.$D$2]; &quot;&quot;&quot;: &quot;; [.P12])" office:value-type="string" office:string-value="&quot;2&quot;: 4" calcext:value-type="string">
            <text:p>"2": 4</text:p>
          </table:table-cell>
          <table:table-cell table:style-name="ce1213" table:formula="of:=COM.MICROSOFT.CONCAT(&quot;&quot;&quot;&quot;;[.$E$2]; &quot;&quot;&quot;: &quot;; [.Q12])" office:value-type="string" office:string-value="&quot;3&quot;: 9" calcext:value-type="string">
            <text:p>"3": 9</text:p>
          </table:table-cell>
          <table:table-cell table:style-name="ce1213" table:formula="of:=COM.MICROSOFT.CONCAT(&quot;&quot;&quot;&quot;;[.$F$2]; &quot;&quot;&quot;: &quot;; [.R12])" office:value-type="string" office:string-value="&quot;4&quot;: 13" calcext:value-type="string">
            <text:p>"4": 13</text:p>
          </table:table-cell>
          <table:table-cell table:style-name="ce1213"/>
          <table:table-cell table:style-name="ce1213" table:formula="of:=COM.MICROSOFT.CONCAT(&quot;&quot;&quot;&quot;;[.$B$2]; &quot;&quot;&quot;: &quot;; [.T12])" office:value-type="string" office:string-value="&quot;0&quot;: 13" calcext:value-type="string">
            <text:p>"0": 13</text:p>
          </table:table-cell>
          <table:table-cell table:style-name="ce1213" table:formula="of:=COM.MICROSOFT.CONCAT(&quot;&quot;&quot;&quot;;[.$C$2]; &quot;&quot;&quot;: &quot;; [.U12])" office:value-type="string" office:string-value="&quot;1&quot;: 5" calcext:value-type="string">
            <text:p>"1": 5</text:p>
          </table:table-cell>
          <table:table-cell table:style-name="ce1213" table:formula="of:=COM.MICROSOFT.CONCAT(&quot;&quot;&quot;&quot;;[.$D$2]; &quot;&quot;&quot;: &quot;; [.V12])" office:value-type="string" office:string-value="&quot;2&quot;: 3" calcext:value-type="string">
            <text:p>"2": 3</text:p>
          </table:table-cell>
          <table:table-cell table:style-name="ce1213" table:formula="of:=COM.MICROSOFT.CONCAT(&quot;&quot;&quot;&quot;;[.$E$2]; &quot;&quot;&quot;: &quot;; [.W12])" office:value-type="string" office:string-value="&quot;3&quot;: 6" calcext:value-type="string">
            <text:p>"3": 6</text:p>
          </table:table-cell>
          <table:table-cell table:style-name="ce1213" table:formula="of:=COM.MICROSOFT.CONCAT(&quot;&quot;&quot;&quot;;[.$F$2]; &quot;&quot;&quot;: &quot;; [.X12])" office:value-type="string" office:string-value="&quot;4&quot;: 14" calcext:value-type="string">
            <text:p>"4": 14</text:p>
          </table:table-cell>
          <table:table-cell table:style-name="ce1213"/>
          <table:table-cell table:style-name="ce1213" table:formula="of:=COM.MICROSOFT.CONCAT(&quot;&quot;&quot;&quot;;[.$B$2]; &quot;&quot;&quot;: &quot;; [.Z12])" office:value-type="string" office:string-value="&quot;0&quot;: 13" calcext:value-type="string">
            <text:p>"0": 13</text:p>
          </table:table-cell>
          <table:table-cell table:style-name="ce1213" table:formula="of:=COM.MICROSOFT.CONCAT(&quot;&quot;&quot;&quot;;[.$C$2]; &quot;&quot;&quot;: &quot;; [.AA12])" office:value-type="string" office:string-value="&quot;1&quot;: 7" calcext:value-type="string">
            <text:p>"1": 7</text:p>
          </table:table-cell>
          <table:table-cell table:style-name="ce1222" table:formula="of:=COM.MICROSOFT.CONCAT(&quot;&quot;&quot;&quot;;[.$D$2]; &quot;&quot;&quot;: &quot;; [.AB12])" office:value-type="string" office:string-value="&quot;2&quot;: 4" calcext:value-type="string">
            <text:p>"2": 4</text:p>
          </table:table-cell>
          <table:table-cell table:style-name="ce1213" table:formula="of:=COM.MICROSOFT.CONCAT(&quot;&quot;&quot;&quot;;[.$E$2]; &quot;&quot;&quot;: &quot;; [.AC12])" office:value-type="string" office:string-value="&quot;3&quot;: 3" calcext:value-type="string">
            <text:p>"3": 3</text:p>
          </table:table-cell>
          <table:table-cell table:style-name="ce1213" table:formula="of:=COM.MICROSOFT.CONCAT(&quot;&quot;&quot;&quot;;[.$F$2]; &quot;&quot;&quot;: &quot;; [.AD12])" office:value-type="string" office:string-value="&quot;4&quot;: 9" calcext:value-type="string">
            <text:p>"4": 9</text:p>
          </table:table-cell>
          <table:table-cell table:style-name="ce876" table:number-columns-repeated="2"/>
          <table:table-cell table:style-name="ce1224" table:formula="of:=COM.MICROSOFT.CONCAT(&quot;&quot;&quot;4&quot;&quot;: { &quot;;COM.MICROSOFT.TEXTJOIN(&quot;, &quot;;TRUE();[.BD8:.BH10]);&quot;}&quot;)" office:value-type="string" office:string-value="&quot;4&quot;: { &quot;0&quot;: 7, &quot;1&quot;: 3, &quot;2&quot;: 2, &quot;3&quot;: 1, &quot;4&quot;: 13, &quot;5&quot;: 6, &quot;6&quot;: 4, &quot;7&quot;: 5, &quot;8&quot;: 9, &quot;9&quot;: 8, &quot;10&quot;: 10, &quot;11&quot;: 11, &quot;12&quot;: 12, &quot;13&quot;: 13, &quot;14&quot;: 14}" calcext:value-type="string">
            <text:p>"4": { "0": 7, "1": 3, "2": 2, "3": 1, "4": 13, "5": 6, "6": 4, "7": 5, "8": 9, "9": 8, "10": 10, "11": 11, "12": 12, "13": 13, "14": 14}</text:p>
          </table:table-cell>
          <table:table-cell table:style-name="ce860" table:number-columns-repeated="26"/>
          <table:table-cell table:number-columns-repeated="10"/>
        </table:table-row>
        <table:table-row table:style-name="ro1">
          <table:table-cell table:style-name="ce623"/>
          <table:table-cell table:style-name="ce880" table:formula="of:=[.$T$3]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690"/>
          <table:table-cell office:value-type="float" office:value="6" calcext:value-type="float">
            <text:p>6</text:p>
          </table:table-cell>
          <table:table-cell table:style-name="ce880" table:formula="of:=[.$U$3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690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880" table:formula="of:=[.$V$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52" office:value-type="float" office:value="10" calcext:value-type="float">
            <text:p>10</text:p>
          </table:table-cell>
          <table:table-cell table:style-name="ce690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0" table:formula="of:=[.$W$3]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690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0" table:formula="of:=[.$X$3]" office:value-type="float" office:value="8" calcext:value-type="float">
            <text:p>8</text:p>
          </table:table-cell>
          <table:table-cell/>
          <table:table-cell table:style-name="ce1213" table:formula="of:=COM.MICROSOFT.CONCAT(&quot;&quot;&quot;&quot;;[.$B$3]; &quot;&quot;&quot;: &quot;; [.B13])" office:value-type="string" office:string-value="&quot;5&quot;: 7" calcext:value-type="string">
            <text:p>"5": 7</text:p>
          </table:table-cell>
          <table:table-cell table:style-name="ce1213" table:formula="of:=COM.MICROSOFT.CONCAT(&quot;&quot;&quot;&quot;;[.$C$3]; &quot;&quot;&quot;: &quot;; [.C13])" office:value-type="string" office:string-value="&quot;6&quot;: 1" calcext:value-type="string">
            <text:p>"6": 1</text:p>
          </table:table-cell>
          <table:table-cell table:style-name="ce1213" table:formula="of:=COM.MICROSOFT.CONCAT(&quot;&quot;&quot;&quot;;[.$D$3]; &quot;&quot;&quot;: &quot;; [.D13])" office:value-type="string" office:string-value="&quot;7&quot;: 2" calcext:value-type="string">
            <text:p>"7": 2</text:p>
          </table:table-cell>
          <table:table-cell table:style-name="ce1213" table:formula="of:=COM.MICROSOFT.CONCAT(&quot;&quot;&quot;&quot;;[.$E$3]; &quot;&quot;&quot;: &quot;; [.E13])" office:value-type="string" office:string-value="&quot;8&quot;: 3" calcext:value-type="string">
            <text:p>"8": 3</text:p>
          </table:table-cell>
          <table:table-cell table:style-name="ce1213" table:formula="of:=COM.MICROSOFT.CONCAT(&quot;&quot;&quot;&quot;;[.$F$3]; &quot;&quot;&quot;: &quot;; [.F13])" office:value-type="string" office:string-value="&quot;9&quot;: 7" calcext:value-type="string">
            <text:p>"9": 7</text:p>
          </table:table-cell>
          <table:table-cell table:style-name="ce1213"/>
          <table:table-cell table:style-name="ce1213" table:formula="of:=COM.MICROSOFT.CONCAT(&quot;&quot;&quot;&quot;;[.$B$3]; &quot;&quot;&quot;: &quot;; [.H13])" office:value-type="string" office:string-value="&quot;5&quot;: 6" calcext:value-type="string">
            <text:p>"5": 6</text:p>
          </table:table-cell>
          <table:table-cell table:style-name="ce1213" table:formula="of:=COM.MICROSOFT.CONCAT(&quot;&quot;&quot;&quot;;[.$C$3]; &quot;&quot;&quot;: &quot;; [.I13])" office:value-type="string" office:string-value="&quot;6&quot;: 2" calcext:value-type="string">
            <text:p>"6": 2</text:p>
          </table:table-cell>
          <table:table-cell table:style-name="ce1213" table:formula="of:=COM.MICROSOFT.CONCAT(&quot;&quot;&quot;&quot;;[.$D$3]; &quot;&quot;&quot;: &quot;; [.J13])" office:value-type="string" office:string-value="&quot;7&quot;: 1" calcext:value-type="string">
            <text:p>"7": 1</text:p>
          </table:table-cell>
          <table:table-cell table:style-name="ce1213" table:formula="of:=COM.MICROSOFT.CONCAT(&quot;&quot;&quot;&quot;;[.$E$3]; &quot;&quot;&quot;: &quot;; [.K13])" office:value-type="string" office:string-value="&quot;8&quot;: 2" calcext:value-type="string">
            <text:p>"8": 2</text:p>
          </table:table-cell>
          <table:table-cell table:style-name="ce1213" table:formula="of:=COM.MICROSOFT.CONCAT(&quot;&quot;&quot;&quot;;[.$F$3]; &quot;&quot;&quot;: &quot;; [.L13])" office:value-type="string" office:string-value="&quot;9&quot;: 7" calcext:value-type="string">
            <text:p>"9": 7</text:p>
          </table:table-cell>
          <table:table-cell table:style-name="ce1213"/>
          <table:table-cell table:style-name="ce1213" table:formula="of:=COM.MICROSOFT.CONCAT(&quot;&quot;&quot;&quot;;[.$B$3]; &quot;&quot;&quot;: &quot;; [.N13])" office:value-type="string" office:string-value="&quot;5&quot;: 5" calcext:value-type="string">
            <text:p>"5": 5</text:p>
          </table:table-cell>
          <table:table-cell table:style-name="ce1213" table:formula="of:=COM.MICROSOFT.CONCAT(&quot;&quot;&quot;&quot;;[.$C$3]; &quot;&quot;&quot;: &quot;; [.O13])" office:value-type="string" office:string-value="&quot;6&quot;: 2" calcext:value-type="string">
            <text:p>"6": 2</text:p>
          </table:table-cell>
          <table:table-cell table:style-name="ce1213" table:formula="of:=COM.MICROSOFT.CONCAT(&quot;&quot;&quot;&quot;;[.$D$3]; &quot;&quot;&quot;: &quot;; [.P13])" office:value-type="string" office:string-value="&quot;7&quot;: 0" calcext:value-type="string">
            <text:p>"7": 0</text:p>
          </table:table-cell>
          <table:table-cell table:style-name="ce1213" table:formula="of:=COM.MICROSOFT.CONCAT(&quot;&quot;&quot;&quot;;[.$E$3]; &quot;&quot;&quot;: &quot;; [.Q13])" office:value-type="string" office:string-value="&quot;8&quot;: 1" calcext:value-type="string">
            <text:p>"8": 1</text:p>
          </table:table-cell>
          <table:table-cell table:style-name="ce1213" table:formula="of:=COM.MICROSOFT.CONCAT(&quot;&quot;&quot;&quot;;[.$F$3]; &quot;&quot;&quot;: &quot;; [.R13])" office:value-type="string" office:string-value="&quot;9&quot;: 10" calcext:value-type="string">
            <text:p>"9": 10</text:p>
          </table:table-cell>
          <table:table-cell table:style-name="ce1213"/>
          <table:table-cell table:style-name="ce1213" table:formula="of:=COM.MICROSOFT.CONCAT(&quot;&quot;&quot;&quot;;[.$B$3]; &quot;&quot;&quot;: &quot;; [.T13])" office:value-type="string" office:string-value="&quot;5&quot;: 4" calcext:value-type="string">
            <text:p>"5": 4</text:p>
          </table:table-cell>
          <table:table-cell table:style-name="ce1213" table:formula="of:=COM.MICROSOFT.CONCAT(&quot;&quot;&quot;&quot;;[.$C$3]; &quot;&quot;&quot;: &quot;; [.U13])" office:value-type="string" office:string-value="&quot;6&quot;: 2" calcext:value-type="string">
            <text:p>"6": 2</text:p>
          </table:table-cell>
          <table:table-cell table:style-name="ce1213" table:formula="of:=COM.MICROSOFT.CONCAT(&quot;&quot;&quot;&quot;;[.$D$3]; &quot;&quot;&quot;: &quot;; [.V13])" office:value-type="string" office:string-value="&quot;7&quot;: 1" calcext:value-type="string">
            <text:p>"7": 1</text:p>
          </table:table-cell>
          <table:table-cell table:style-name="ce1213" table:formula="of:=COM.MICROSOFT.CONCAT(&quot;&quot;&quot;&quot;;[.$E$3]; &quot;&quot;&quot;: &quot;; [.W13])" office:value-type="string" office:string-value="&quot;8&quot;: 1" calcext:value-type="string">
            <text:p>"8": 1</text:p>
          </table:table-cell>
          <table:table-cell table:style-name="ce1213" table:formula="of:=COM.MICROSOFT.CONCAT(&quot;&quot;&quot;&quot;;[.$F$3]; &quot;&quot;&quot;: &quot;; [.X13])" office:value-type="string" office:string-value="&quot;9&quot;: 10" calcext:value-type="string">
            <text:p>"9": 10</text:p>
          </table:table-cell>
          <table:table-cell table:style-name="ce1213"/>
          <table:table-cell table:style-name="ce1213" table:formula="of:=COM.MICROSOFT.CONCAT(&quot;&quot;&quot;&quot;;[.$B$3]; &quot;&quot;&quot;: &quot;; [.Z13])" office:value-type="string" office:string-value="&quot;5&quot;: 6" calcext:value-type="string">
            <text:p>"5": 6</text:p>
          </table:table-cell>
          <table:table-cell table:style-name="ce1213" table:formula="of:=COM.MICROSOFT.CONCAT(&quot;&quot;&quot;&quot;;[.$C$3]; &quot;&quot;&quot;: &quot;; [.AA13])" office:value-type="string" office:string-value="&quot;6&quot;: 5" calcext:value-type="string">
            <text:p>"6": 5</text:p>
          </table:table-cell>
          <table:table-cell table:style-name="ce1213" table:formula="of:=COM.MICROSOFT.CONCAT(&quot;&quot;&quot;&quot;;[.$D$3]; &quot;&quot;&quot;: &quot;; [.AB13])" office:value-type="string" office:string-value="&quot;7&quot;: 2" calcext:value-type="string">
            <text:p>"7": 2</text:p>
          </table:table-cell>
          <table:table-cell table:style-name="ce1213" table:formula="of:=COM.MICROSOFT.CONCAT(&quot;&quot;&quot;&quot;;[.$E$3]; &quot;&quot;&quot;: &quot;; [.AC13])" office:value-type="string" office:string-value="&quot;8&quot;: 1" calcext:value-type="string">
            <text:p>"8": 1</text:p>
          </table:table-cell>
          <table:table-cell table:style-name="ce1213" table:formula="of:=COM.MICROSOFT.CONCAT(&quot;&quot;&quot;&quot;;[.$F$3]; &quot;&quot;&quot;: &quot;; [.AD13])" office:value-type="string" office:string-value="&quot;9&quot;: 8" calcext:value-type="string">
            <text:p>"9": 8</text:p>
          </table:table-cell>
          <table:table-cell table:style-name="ce875" table:number-columns-repeated="3"/>
          <table:table-cell table:number-columns-repeated="36"/>
        </table:table-row>
        <table:table-row table:style-name="ro1">
          <table:table-cell table:style-name="ce623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690"/>
          <table:table-cell office:value-type="float" office:value="11" calcext:value-type="float">
            <text:p>11</text:p>
          </table:table-cell>
          <table:table-cell table:style-name="ce845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690"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852" office:value-type="float" office:value="12" calcext:value-type="float">
            <text:p>12</text:p>
          </table:table-cell>
          <table:table-cell table:style-name="ce690"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690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table:style-name="ce1213" table:formula="of:=COM.MICROSOFT.CONCAT(&quot;&quot;&quot;&quot;;[.$B$4]; &quot;&quot;&quot;: &quot;; [.B14])" office:value-type="string" office:string-value="&quot;10&quot;: 12" calcext:value-type="string">
            <text:p>"10": 12</text:p>
          </table:table-cell>
          <table:table-cell table:style-name="ce1213" table:formula="of:=COM.MICROSOFT.CONCAT(&quot;&quot;&quot;&quot;;[.$C$4]; &quot;&quot;&quot;: &quot;; [.C14])" office:value-type="string" office:string-value="&quot;11&quot;: 13" calcext:value-type="string">
            <text:p>"11": 13</text:p>
          </table:table-cell>
          <table:table-cell table:style-name="ce1213" table:formula="of:=COM.MICROSOFT.CONCAT(&quot;&quot;&quot;&quot;;[.$D$4]; &quot;&quot;&quot;: &quot;; [.D14])" office:value-type="string" office:string-value="&quot;12&quot;: 11" calcext:value-type="string">
            <text:p>"12": 11</text:p>
          </table:table-cell>
          <table:table-cell table:style-name="ce1213" table:formula="of:=COM.MICROSOFT.CONCAT(&quot;&quot;&quot;&quot;;[.$E$4]; &quot;&quot;&quot;: &quot;; [.E14])" office:value-type="string" office:string-value="&quot;13&quot;: 6" calcext:value-type="string">
            <text:p>"13": 6</text:p>
          </table:table-cell>
          <table:table-cell table:style-name="ce1213" table:formula="of:=COM.MICROSOFT.CONCAT(&quot;&quot;&quot;&quot;;[.$F$4]; &quot;&quot;&quot;: &quot;; [.F14])" office:value-type="string" office:string-value="&quot;14&quot;: 8" calcext:value-type="string">
            <text:p>"14": 8</text:p>
          </table:table-cell>
          <table:table-cell table:style-name="ce1213"/>
          <table:table-cell table:style-name="ce1213" table:formula="of:=COM.MICROSOFT.CONCAT(&quot;&quot;&quot;&quot;;[.$B$4]; &quot;&quot;&quot;: &quot;; [.H14])" office:value-type="string" office:string-value="&quot;10&quot;: 11" calcext:value-type="string">
            <text:p>"10": 11</text:p>
          </table:table-cell>
          <table:table-cell table:style-name="ce1213" table:formula="of:=COM.MICROSOFT.CONCAT(&quot;&quot;&quot;&quot;;[.$C$4]; &quot;&quot;&quot;: &quot;; [.I14])" office:value-type="string" office:string-value="&quot;11&quot;: 9" calcext:value-type="string">
            <text:p>"11": 9</text:p>
          </table:table-cell>
          <table:table-cell table:style-name="ce1213" table:formula="of:=COM.MICROSOFT.CONCAT(&quot;&quot;&quot;&quot;;[.$D$4]; &quot;&quot;&quot;: &quot;; [.J14])" office:value-type="string" office:string-value="&quot;12&quot;: 10" calcext:value-type="string">
            <text:p>"12": 10</text:p>
          </table:table-cell>
          <table:table-cell table:style-name="ce1213" table:formula="of:=COM.MICROSOFT.CONCAT(&quot;&quot;&quot;&quot;;[.$E$4]; &quot;&quot;&quot;: &quot;; [.K14])" office:value-type="string" office:string-value="&quot;13&quot;: 4" calcext:value-type="string">
            <text:p>"13": 4</text:p>
          </table:table-cell>
          <table:table-cell table:style-name="ce1213" table:formula="of:=COM.MICROSOFT.CONCAT(&quot;&quot;&quot;&quot;;[.$F$4]; &quot;&quot;&quot;: &quot;; [.L14])" office:value-type="string" office:string-value="&quot;14&quot;: 12" calcext:value-type="string">
            <text:p>"14": 12</text:p>
          </table:table-cell>
          <table:table-cell table:style-name="ce1213"/>
          <table:table-cell table:style-name="ce1213" table:formula="of:=COM.MICROSOFT.CONCAT(&quot;&quot;&quot;&quot;;[.$B$4]; &quot;&quot;&quot;: &quot;; [.N14])" office:value-type="string" office:string-value="&quot;10&quot;: 11" calcext:value-type="string">
            <text:p>"10": 11</text:p>
          </table:table-cell>
          <table:table-cell table:style-name="ce1213" table:formula="of:=COM.MICROSOFT.CONCAT(&quot;&quot;&quot;&quot;;[.$C$4]; &quot;&quot;&quot;: &quot;; [.O14])" office:value-type="string" office:string-value="&quot;11&quot;: 6" calcext:value-type="string">
            <text:p>"11": 6</text:p>
          </table:table-cell>
          <table:table-cell table:style-name="ce1213" table:formula="of:=COM.MICROSOFT.CONCAT(&quot;&quot;&quot;&quot;;[.$D$4]; &quot;&quot;&quot;: &quot;; [.P14])" office:value-type="string" office:string-value="&quot;12&quot;: 7" calcext:value-type="string">
            <text:p>"12": 7</text:p>
          </table:table-cell>
          <table:table-cell table:style-name="ce1213" table:formula="of:=COM.MICROSOFT.CONCAT(&quot;&quot;&quot;&quot;;[.$E$4]; &quot;&quot;&quot;: &quot;; [.Q14])" office:value-type="string" office:string-value="&quot;13&quot;: 3" calcext:value-type="string">
            <text:p>"13": 3</text:p>
          </table:table-cell>
          <table:table-cell table:style-name="ce1213" table:formula="of:=COM.MICROSOFT.CONCAT(&quot;&quot;&quot;&quot;;[.$F$4]; &quot;&quot;&quot;: &quot;; [.R14])" office:value-type="string" office:string-value="&quot;14&quot;: 12" calcext:value-type="string">
            <text:p>"14": 12</text:p>
          </table:table-cell>
          <table:table-cell table:style-name="ce1213"/>
          <table:table-cell table:style-name="ce1213" table:formula="of:=COM.MICROSOFT.CONCAT(&quot;&quot;&quot;&quot;;[.$B$4]; &quot;&quot;&quot;: &quot;; [.T14])" office:value-type="string" office:string-value="&quot;10&quot;: 8" calcext:value-type="string">
            <text:p>"10": 8</text:p>
          </table:table-cell>
          <table:table-cell table:style-name="ce1213" table:formula="of:=COM.MICROSOFT.CONCAT(&quot;&quot;&quot;&quot;;[.$C$4]; &quot;&quot;&quot;: &quot;; [.U14])" office:value-type="string" office:string-value="&quot;11&quot;: 11" calcext:value-type="string">
            <text:p>"11": 11</text:p>
          </table:table-cell>
          <table:table-cell table:style-name="ce1213" table:formula="of:=COM.MICROSOFT.CONCAT(&quot;&quot;&quot;&quot;;[.$D$4]; &quot;&quot;&quot;: &quot;; [.V14])" office:value-type="string" office:string-value="&quot;12&quot;: 7" calcext:value-type="string">
            <text:p>"12": 7</text:p>
          </table:table-cell>
          <table:table-cell table:style-name="ce1213" table:formula="of:=COM.MICROSOFT.CONCAT(&quot;&quot;&quot;&quot;;[.$E$4]; &quot;&quot;&quot;: &quot;; [.W14])" office:value-type="string" office:string-value="&quot;13&quot;: 9" calcext:value-type="string">
            <text:p>"13": 9</text:p>
          </table:table-cell>
          <table:table-cell table:style-name="ce1213" table:formula="of:=COM.MICROSOFT.CONCAT(&quot;&quot;&quot;&quot;;[.$F$4]; &quot;&quot;&quot;: &quot;; [.X14])" office:value-type="string" office:string-value="&quot;14&quot;: 12" calcext:value-type="string">
            <text:p>"14": 12</text:p>
          </table:table-cell>
          <table:table-cell table:style-name="ce1213"/>
          <table:table-cell table:style-name="ce1213" table:formula="of:=COM.MICROSOFT.CONCAT(&quot;&quot;&quot;&quot;;[.$B$4]; &quot;&quot;&quot;: &quot;; [.Z14])" office:value-type="string" office:string-value="&quot;10&quot;: 11" calcext:value-type="string">
            <text:p>"10": 11</text:p>
          </table:table-cell>
          <table:table-cell table:style-name="ce1213" table:formula="of:=COM.MICROSOFT.CONCAT(&quot;&quot;&quot;&quot;;[.$C$4]; &quot;&quot;&quot;: &quot;; [.AA14])" office:value-type="string" office:string-value="&quot;11&quot;: 12" calcext:value-type="string">
            <text:p>"11": 12</text:p>
          </table:table-cell>
          <table:table-cell table:style-name="ce1213" table:formula="of:=COM.MICROSOFT.CONCAT(&quot;&quot;&quot;&quot;;[.$D$4]; &quot;&quot;&quot;: &quot;; [.AB14])" office:value-type="string" office:string-value="&quot;12&quot;: 14" calcext:value-type="string">
            <text:p>"12": 14</text:p>
          </table:table-cell>
          <table:table-cell table:style-name="ce1213" table:formula="of:=COM.MICROSOFT.CONCAT(&quot;&quot;&quot;&quot;;[.$E$4]; &quot;&quot;&quot;: &quot;; [.AC14])" office:value-type="string" office:string-value="&quot;13&quot;: 10" calcext:value-type="string">
            <text:p>"13": 10</text:p>
          </table:table-cell>
          <table:table-cell table:style-name="ce1213" table:formula="of:=COM.MICROSOFT.CONCAT(&quot;&quot;&quot;&quot;;[.$F$4]; &quot;&quot;&quot;: &quot;; [.AD14])" office:value-type="string" office:string-value="&quot;14&quot;: 8" calcext:value-type="string">
            <text:p>"14": 8</text:p>
          </table:table-cell>
          <table:table-cell table:style-name="ce875" table:number-columns-repeated="2"/>
          <table:table-cell table:style-name="ce875" table:formula="of:=COM.MICROSOFT.TEXTJOIN(&quot;, &quot;;TRUE();[.BK8:.BK12]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6, &quot;2&quot;: 1, &quot;3&quot;: 3, &quot;4&quot;: 4, &quot;5&quot;: 7, &quot;6&quot;: 8, &quot;7&quot;: 6, &quot;8&quot;: 2, &quot;9&quot;: 5, &quot;10&quot;: 13, &quot;11&quot;: 14, &quot;12&quot;: 12, &quot;13&quot;: 10, &quot;14&quot;: 11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5, &quot;4&quot;: 8, &quot;5&quot;: 5, &quot;6&quot;: 4, &quot;7&quot;: 6, &quot;8&quot;: 7, &quot;9&quot;: 9, &quot;10&quot;: 13, &quot;11&quot;: 14, &quot;12&quot;: 12, &quot;13&quot;: 10, &quot;14&quot;: 11}, &quot;4&quot;: { &quot;0&quot;: 7, &quot;1&quot;: 3, &quot;2&quot;: 2, &quot;3&quot;: 1, &quot;4&quot;: 13, &quot;5&quot;: 6, &quot;6&quot;: 4, &quot;7&quot;: 5, &quot;8&quot;: 9, &quot;9&quot;: 8, &quot;10&quot;: 10, &quot;11&quot;: 11, &quot;12&quot;: 12, &quot;13&quot;: 13, &quot;14&quot;: 14}" calcext:value-type="string">
            <text:p>"0": { "0": 14, "1": 1, "2": 2, "3": 3, "4": 5, "5": 9, "6": 8, "7": 7, "8": 4, "9": 6, "10": 12, "11": 14, "12": 13, "13": 10, "14": 11}, "1": { "0": 9, "1": 6, "2": 1, "3": 3, "4": 4, "5": 7, "6": 8, "7": 6, "8": 2, "9": 5, "10": 13, "11": 14, "12": 12, "13": 10, "14": 11}, "2": { "0": 9, "1": 3, "2": 3, "3": 1, "4": 8, "5": 7, "6": 4, "7": 5, "8": 2, "9": 6, "10": 12, "11": 11, "12": 13, "13": 10, "14": 14}, "3": { "0": 3, "1": 2, "2": 1, "3": 5, "4": 8, "5": 5, "6": 4, "7": 6, "8": 7, "9": 9, "10": 13, "11": 14, "12": 12, "13": 10, "14": 11}, "4": { "0": 7, "1": 3, "2": 2, "3": 1, "4": 13, "5": 6, "6": 4, "7": 5, "8": 9, "9": 8, "10": 10, "11": 11, "12": 12, "13": 13, "14": 14}</text:p>
          </table:table-cell>
          <table:table-cell table:number-columns-repeated="36"/>
        </table:table-row>
        <table:table-row table:style-name="ro2">
          <table:table-cell table:style-name="ce623"/>
          <table:table-cell table:style-name="ce882" table:number-columns-repeated="29"/>
          <table:table-cell/>
          <table:table-cell table:style-name="ce875" table:number-columns-repeated="32"/>
          <table:table-cell table:number-columns-repeated="36"/>
        </table:table-row>
        <table:table-row table:style-name="ro1">
          <table:table-cell table:style-name="ce623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690"/>
          <table:table-cell office:value-type="float" office:value="14" calcext:value-type="float">
            <text:p>14</text:p>
          </table:table-cell>
          <table:table-cell table:style-name="ce845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690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852" office:value-type="float" office:value="12" calcext:value-type="float">
            <text:p>12</text:p>
          </table:table-cell>
          <table:table-cell table:style-name="ce690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style-name="ce690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623"/>
          <table:table-cell table:style-name="ce1214" table:formula="of:=COM.MICROSOFT.CONCAT(&quot;&quot;&quot;&quot;;[.$B$2]; &quot;&quot;&quot;: &quot;; [.B16])" office:value-type="string" office:string-value="&quot;0&quot;: 13" calcext:value-type="string">
            <text:p>"0": 13</text:p>
          </table:table-cell>
          <table:table-cell table:style-name="ce1214" table:formula="of:=COM.MICROSOFT.CONCAT(&quot;&quot;&quot;&quot;;[.$C$2]; &quot;&quot;&quot;: &quot;; [.C16])" office:value-type="string" office:string-value="&quot;1&quot;: 14" calcext:value-type="string">
            <text:p>"1": 14</text:p>
          </table:table-cell>
          <table:table-cell table:style-name="ce1214" table:formula="of:=COM.MICROSOFT.CONCAT(&quot;&quot;&quot;&quot;;[.$D$2]; &quot;&quot;&quot;: &quot;; [.D16])" office:value-type="string" office:string-value="&quot;2&quot;: 10" calcext:value-type="string">
            <text:p>"2": 10</text:p>
          </table:table-cell>
          <table:table-cell table:style-name="ce1214" table:formula="of:=COM.MICROSOFT.CONCAT(&quot;&quot;&quot;&quot;;[.$E$2]; &quot;&quot;&quot;: &quot;; [.E16])" office:value-type="string" office:string-value="&quot;3&quot;: 11" calcext:value-type="string">
            <text:p>"3": 11</text:p>
          </table:table-cell>
          <table:table-cell table:style-name="ce1214" table:formula="of:=COM.MICROSOFT.CONCAT(&quot;&quot;&quot;&quot;;[.$F$2]; &quot;&quot;&quot;: &quot;; [.F16])" office:value-type="string" office:string-value="&quot;4&quot;: 12" calcext:value-type="string">
            <text:p>"4": 12</text:p>
          </table:table-cell>
          <table:table-cell table:style-name="ce1214"/>
          <table:table-cell table:style-name="ce1214" table:formula="of:=COM.MICROSOFT.CONCAT(&quot;&quot;&quot;&quot;;[.$B$2]; &quot;&quot;&quot;: &quot;; [.H16])" office:value-type="string" office:string-value="&quot;0&quot;: 14" calcext:value-type="string">
            <text:p>"0": 14</text:p>
          </table:table-cell>
          <table:table-cell table:style-name="ce1214" table:formula="of:=COM.MICROSOFT.CONCAT(&quot;&quot;&quot;&quot;;[.$C$2]; &quot;&quot;&quot;: &quot;; [.I16])" office:value-type="string" office:string-value="&quot;1&quot;: 13" calcext:value-type="string">
            <text:p>"1": 13</text:p>
          </table:table-cell>
          <table:table-cell table:style-name="ce1214" table:formula="of:=COM.MICROSOFT.CONCAT(&quot;&quot;&quot;&quot;;[.$D$2]; &quot;&quot;&quot;: &quot;; [.J16])" office:value-type="string" office:string-value="&quot;2&quot;: 8" calcext:value-type="string">
            <text:p>"2": 8</text:p>
          </table:table-cell>
          <table:table-cell table:style-name="ce1214" table:formula="of:=COM.MICROSOFT.CONCAT(&quot;&quot;&quot;&quot;;[.$E$2]; &quot;&quot;&quot;: &quot;; [.K16])" office:value-type="string" office:string-value="&quot;3&quot;: 10" calcext:value-type="string">
            <text:p>"3": 10</text:p>
          </table:table-cell>
          <table:table-cell table:style-name="ce1214" table:formula="of:=COM.MICROSOFT.CONCAT(&quot;&quot;&quot;&quot;;[.$F$2]; &quot;&quot;&quot;: &quot;; [.L16])" office:value-type="string" office:string-value="&quot;4&quot;: 11" calcext:value-type="string">
            <text:p>"4": 11</text:p>
          </table:table-cell>
          <table:table-cell table:style-name="ce1214"/>
          <table:table-cell table:style-name="ce1214" table:formula="of:=COM.MICROSOFT.CONCAT(&quot;&quot;&quot;&quot;;[.$B$2]; &quot;&quot;&quot;: &quot;; [.N16])" office:value-type="string" office:string-value="&quot;0&quot;: 14" calcext:value-type="string">
            <text:p>"0": 14</text:p>
          </table:table-cell>
          <table:table-cell table:style-name="ce1214" table:formula="of:=COM.MICROSOFT.CONCAT(&quot;&quot;&quot;&quot;;[.$C$2]; &quot;&quot;&quot;: &quot;; [.O16])" office:value-type="string" office:string-value="&quot;1&quot;: 13" calcext:value-type="string">
            <text:p>"1": 13</text:p>
          </table:table-cell>
          <table:table-cell table:style-name="ce1214" table:formula="of:=COM.MICROSOFT.CONCAT(&quot;&quot;&quot;&quot;;[.$D$2]; &quot;&quot;&quot;: &quot;; [.P16])" office:value-type="string" office:string-value="&quot;2&quot;: 10" calcext:value-type="string">
            <text:p>"2": 10</text:p>
          </table:table-cell>
          <table:table-cell table:style-name="ce1214" table:formula="of:=COM.MICROSOFT.CONCAT(&quot;&quot;&quot;&quot;;[.$E$2]; &quot;&quot;&quot;: &quot;; [.Q16])" office:value-type="string" office:string-value="&quot;3&quot;: 9" calcext:value-type="string">
            <text:p>"3": 9</text:p>
          </table:table-cell>
          <table:table-cell table:style-name="ce1214" table:formula="of:=COM.MICROSOFT.CONCAT(&quot;&quot;&quot;&quot;;[.$F$2]; &quot;&quot;&quot;: &quot;; [.R16])" office:value-type="string" office:string-value="&quot;4&quot;: 12" calcext:value-type="string">
            <text:p>"4": 12</text:p>
          </table:table-cell>
          <table:table-cell table:style-name="ce1214"/>
          <table:table-cell table:style-name="ce1214" table:formula="of:=COM.MICROSOFT.CONCAT(&quot;&quot;&quot;&quot;;[.$B$2]; &quot;&quot;&quot;: &quot;; [.T16])" office:value-type="string" office:string-value="&quot;0&quot;: 13" calcext:value-type="string">
            <text:p>"0": 13</text:p>
          </table:table-cell>
          <table:table-cell table:style-name="ce1214" table:formula="of:=COM.MICROSOFT.CONCAT(&quot;&quot;&quot;&quot;;[.$C$2]; &quot;&quot;&quot;: &quot;; [.U16])" office:value-type="string" office:string-value="&quot;1&quot;: 12" calcext:value-type="string">
            <text:p>"1": 12</text:p>
          </table:table-cell>
          <table:table-cell table:style-name="ce1214" table:formula="of:=COM.MICROSOFT.CONCAT(&quot;&quot;&quot;&quot;;[.$D$2]; &quot;&quot;&quot;: &quot;; [.V16])" office:value-type="string" office:string-value="&quot;2&quot;: 8" calcext:value-type="string">
            <text:p>"2": 8</text:p>
          </table:table-cell>
          <table:table-cell table:style-name="ce1214" table:formula="of:=COM.MICROSOFT.CONCAT(&quot;&quot;&quot;&quot;;[.$E$2]; &quot;&quot;&quot;: &quot;; [.W16])" office:value-type="string" office:string-value="&quot;3&quot;: 11" calcext:value-type="string">
            <text:p>"3": 11</text:p>
          </table:table-cell>
          <table:table-cell table:style-name="ce1214" table:formula="of:=COM.MICROSOFT.CONCAT(&quot;&quot;&quot;&quot;;[.$F$2]; &quot;&quot;&quot;: &quot;; [.X16])" office:value-type="string" office:string-value="&quot;4&quot;: 14" calcext:value-type="string">
            <text:p>"4": 14</text:p>
          </table:table-cell>
          <table:table-cell table:style-name="ce1214"/>
          <table:table-cell table:style-name="ce1214" table:formula="of:=COM.MICROSOFT.CONCAT(&quot;&quot;&quot;&quot;;[.$B$2]; &quot;&quot;&quot;: &quot;; [.Z16])" office:value-type="string" office:string-value="&quot;0&quot;: 14" calcext:value-type="string">
            <text:p>"0": 14</text:p>
          </table:table-cell>
          <table:table-cell table:style-name="ce1214" table:formula="of:=COM.MICROSOFT.CONCAT(&quot;&quot;&quot;&quot;;[.$C$2]; &quot;&quot;&quot;: &quot;; [.AA16])" office:value-type="string" office:string-value="&quot;1&quot;: 13" calcext:value-type="string">
            <text:p>"1": 13</text:p>
          </table:table-cell>
          <table:table-cell table:style-name="ce1214" table:formula="of:=COM.MICROSOFT.CONCAT(&quot;&quot;&quot;&quot;;[.$D$2]; &quot;&quot;&quot;: &quot;; [.AB16])" office:value-type="string" office:string-value="&quot;2&quot;: 12" calcext:value-type="string">
            <text:p>"2": 12</text:p>
          </table:table-cell>
          <table:table-cell table:style-name="ce1214" table:formula="of:=COM.MICROSOFT.CONCAT(&quot;&quot;&quot;&quot;;[.$E$2]; &quot;&quot;&quot;: &quot;; [.AC16])" office:value-type="string" office:string-value="&quot;3&quot;: 10" calcext:value-type="string">
            <text:p>"3": 10</text:p>
          </table:table-cell>
          <table:table-cell table:style-name="ce1214" table:formula="of:=COM.MICROSOFT.CONCAT(&quot;&quot;&quot;&quot;;[.$F$2]; &quot;&quot;&quot;: &quot;; [.AD16])" office:value-type="string" office:string-value="&quot;4&quot;: 11" calcext:value-type="string">
            <text:p>"4": 11</text:p>
          </table:table-cell>
          <table:table-cell table:style-name="ce875" table:number-columns-repeated="2"/>
          <table:table-cell table:formula="of:=COM.MICROSOFT.CONCAT(&quot;&quot;&quot;5&quot;&quot;: { &quot;;COM.MICROSOFT.TEXTJOIN(&quot;, &quot;;TRUE();[.AF12:.AJ14]);&quot;}&quot;)" office:value-type="string" office:string-value="&quot;5&quot;: { &quot;0&quot;: 14, &quot;1&quot;: 9, &quot;2&quot;: 4, &quot;3&quot;: 5, &quot;4&quot;: 10, &quot;5&quot;: 7, &quot;6&quot;: 1, &quot;7&quot;: 2, &quot;8&quot;: 3, &quot;9&quot;: 7, &quot;10&quot;: 12, &quot;11&quot;: 13, &quot;12&quot;: 11, &quot;13&quot;: 6, &quot;14&quot;: 8}" calcext:value-type="string">
            <text:p>"5": { "0": 14, "1": 9, "2": 4, "3": 5, "4": 10, "5": 7, "6": 1, "7": 2, "8": 3, "9": 7, "10": 12, "11": 13, "12": 11, "13": 6, "14": 8}</text:p>
          </table:table-cell>
          <table:table-cell table:number-columns-repeated="36"/>
        </table:table-row>
        <table:table-row table:style-name="ro1">
          <table:table-cell table:style-name="ce623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690"/>
          <table:table-cell office:value-type="float" office:value="12" calcext:value-type="float">
            <text:p>12</text:p>
          </table:table-cell>
          <table:table-cell table:style-name="ce845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690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852" office:value-type="float" office:value="8" calcext:value-type="float">
            <text:p>8</text:p>
          </table:table-cell>
          <table:table-cell table:style-name="ce690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690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623"/>
          <table:table-cell table:style-name="ce1214" table:formula="of:=COM.MICROSOFT.CONCAT(&quot;&quot;&quot;&quot;;[.$B$3]; &quot;&quot;&quot;: &quot;; [.B17])" office:value-type="string" office:string-value="&quot;5&quot;: 9" calcext:value-type="string">
            <text:p>"5": 9</text:p>
          </table:table-cell>
          <table:table-cell table:style-name="ce1214" table:formula="of:=COM.MICROSOFT.CONCAT(&quot;&quot;&quot;&quot;;[.$C$3]; &quot;&quot;&quot;: &quot;; [.C17])" office:value-type="string" office:string-value="&quot;6&quot;: 8" calcext:value-type="string">
            <text:p>"6": 8</text:p>
          </table:table-cell>
          <table:table-cell table:style-name="ce1214" table:formula="of:=COM.MICROSOFT.CONCAT(&quot;&quot;&quot;&quot;;[.$D$3]; &quot;&quot;&quot;: &quot;; [.D17])" office:value-type="string" office:string-value="&quot;7&quot;: 4" calcext:value-type="string">
            <text:p>"7": 4</text:p>
          </table:table-cell>
          <table:table-cell table:style-name="ce1214" table:formula="of:=COM.MICROSOFT.CONCAT(&quot;&quot;&quot;&quot;;[.$E$3]; &quot;&quot;&quot;: &quot;; [.E17])" office:value-type="string" office:string-value="&quot;8&quot;: 5" calcext:value-type="string">
            <text:p>"8": 5</text:p>
          </table:table-cell>
          <table:table-cell table:style-name="ce1214" table:formula="of:=COM.MICROSOFT.CONCAT(&quot;&quot;&quot;&quot;;[.$F$3]; &quot;&quot;&quot;: &quot;; [.F17])" office:value-type="string" office:string-value="&quot;9&quot;: 6" calcext:value-type="string">
            <text:p>"9": 6</text:p>
          </table:table-cell>
          <table:table-cell table:style-name="ce1214"/>
          <table:table-cell table:style-name="ce1214" table:formula="of:=COM.MICROSOFT.CONCAT(&quot;&quot;&quot;&quot;;[.$B$3]; &quot;&quot;&quot;: &quot;; [.H17])" office:value-type="string" office:string-value="&quot;5&quot;: 12" calcext:value-type="string">
            <text:p>"5": 12</text:p>
          </table:table-cell>
          <table:table-cell table:style-name="ce1214" table:formula="of:=COM.MICROSOFT.CONCAT(&quot;&quot;&quot;&quot;;[.$C$3]; &quot;&quot;&quot;: &quot;; [.I17])" office:value-type="string" office:string-value="&quot;6&quot;: 5" calcext:value-type="string">
            <text:p>"6": 5</text:p>
          </table:table-cell>
          <table:table-cell table:style-name="ce1214" table:formula="of:=COM.MICROSOFT.CONCAT(&quot;&quot;&quot;&quot;;[.$D$3]; &quot;&quot;&quot;: &quot;; [.J17])" office:value-type="string" office:string-value="&quot;7&quot;: 3" calcext:value-type="string">
            <text:p>"7": 3</text:p>
          </table:table-cell>
          <table:table-cell table:style-name="ce1214" table:formula="of:=COM.MICROSOFT.CONCAT(&quot;&quot;&quot;&quot;;[.$E$3]; &quot;&quot;&quot;: &quot;; [.K17])" office:value-type="string" office:string-value="&quot;8&quot;: 4" calcext:value-type="string">
            <text:p>"8": 4</text:p>
          </table:table-cell>
          <table:table-cell table:style-name="ce1214" table:formula="of:=COM.MICROSOFT.CONCAT(&quot;&quot;&quot;&quot;;[.$F$3]; &quot;&quot;&quot;: &quot;; [.L17])" office:value-type="string" office:string-value="&quot;9&quot;: 6" calcext:value-type="string">
            <text:p>"9": 6</text:p>
          </table:table-cell>
          <table:table-cell table:style-name="ce1214"/>
          <table:table-cell table:style-name="ce1214" table:formula="of:=COM.MICROSOFT.CONCAT(&quot;&quot;&quot;&quot;;[.$B$3]; &quot;&quot;&quot;: &quot;; [.N17])" office:value-type="string" office:string-value="&quot;5&quot;: 10" calcext:value-type="string">
            <text:p>"5": 10</text:p>
          </table:table-cell>
          <table:table-cell table:style-name="ce1214" table:formula="of:=COM.MICROSOFT.CONCAT(&quot;&quot;&quot;&quot;;[.$C$3]; &quot;&quot;&quot;: &quot;; [.O17])" office:value-type="string" office:string-value="&quot;6&quot;: 6" calcext:value-type="string">
            <text:p>"6": 6</text:p>
          </table:table-cell>
          <table:table-cell table:style-name="ce1214" table:formula="of:=COM.MICROSOFT.CONCAT(&quot;&quot;&quot;&quot;;[.$D$3]; &quot;&quot;&quot;: &quot;; [.P17])" office:value-type="string" office:string-value="&quot;7&quot;: 4" calcext:value-type="string">
            <text:p>"7": 4</text:p>
          </table:table-cell>
          <table:table-cell table:style-name="ce1214" table:formula="of:=COM.MICROSOFT.CONCAT(&quot;&quot;&quot;&quot;;[.$E$3]; &quot;&quot;&quot;: &quot;; [.Q17])" office:value-type="string" office:string-value="&quot;8&quot;: 3" calcext:value-type="string">
            <text:p>"8": 3</text:p>
          </table:table-cell>
          <table:table-cell table:style-name="ce1214" table:formula="of:=COM.MICROSOFT.CONCAT(&quot;&quot;&quot;&quot;;[.$F$3]; &quot;&quot;&quot;: &quot;; [.R17])" office:value-type="string" office:string-value="&quot;9&quot;: 8" calcext:value-type="string">
            <text:p>"9": 8</text:p>
          </table:table-cell>
          <table:table-cell table:style-name="ce1214"/>
          <table:table-cell table:style-name="ce1214" table:formula="of:=COM.MICROSOFT.CONCAT(&quot;&quot;&quot;&quot;;[.$B$3]; &quot;&quot;&quot;: &quot;; [.T17])" office:value-type="string" office:string-value="&quot;5&quot;: 6" calcext:value-type="string">
            <text:p>"5": 6</text:p>
          </table:table-cell>
          <table:table-cell table:style-name="ce1214" table:formula="of:=COM.MICROSOFT.CONCAT(&quot;&quot;&quot;&quot;;[.$C$3]; &quot;&quot;&quot;: &quot;; [.U17])" office:value-type="string" office:string-value="&quot;6&quot;: 4" calcext:value-type="string">
            <text:p>"6": 4</text:p>
          </table:table-cell>
          <table:table-cell table:style-name="ce1214" table:formula="of:=COM.MICROSOFT.CONCAT(&quot;&quot;&quot;&quot;;[.$D$3]; &quot;&quot;&quot;: &quot;; [.V17])" office:value-type="string" office:string-value="&quot;7&quot;: 3" calcext:value-type="string">
            <text:p>"7": 3</text:p>
          </table:table-cell>
          <table:table-cell table:style-name="ce1214" table:formula="of:=COM.MICROSOFT.CONCAT(&quot;&quot;&quot;&quot;;[.$E$3]; &quot;&quot;&quot;: &quot;; [.W17])" office:value-type="string" office:string-value="&quot;8&quot;: 7" calcext:value-type="string">
            <text:p>"8": 7</text:p>
          </table:table-cell>
          <table:table-cell table:style-name="ce1214" table:formula="of:=COM.MICROSOFT.CONCAT(&quot;&quot;&quot;&quot;;[.$F$3]; &quot;&quot;&quot;: &quot;; [.X17])" office:value-type="string" office:string-value="&quot;9&quot;: 9" calcext:value-type="string">
            <text:p>"9": 9</text:p>
          </table:table-cell>
          <table:table-cell table:style-name="ce1214"/>
          <table:table-cell table:style-name="ce1214" table:formula="of:=COM.MICROSOFT.CONCAT(&quot;&quot;&quot;&quot;;[.$B$3]; &quot;&quot;&quot;: &quot;; [.Z17])" office:value-type="string" office:string-value="&quot;5&quot;: 7" calcext:value-type="string">
            <text:p>"5": 7</text:p>
          </table:table-cell>
          <table:table-cell table:style-name="ce1214" table:formula="of:=COM.MICROSOFT.CONCAT(&quot;&quot;&quot;&quot;;[.$C$3]; &quot;&quot;&quot;: &quot;; [.AA17])" office:value-type="string" office:string-value="&quot;6&quot;: 5" calcext:value-type="string">
            <text:p>"6": 5</text:p>
          </table:table-cell>
          <table:table-cell table:style-name="ce1214" table:formula="of:=COM.MICROSOFT.CONCAT(&quot;&quot;&quot;&quot;;[.$D$3]; &quot;&quot;&quot;: &quot;; [.AB17])" office:value-type="string" office:string-value="&quot;7&quot;: 3" calcext:value-type="string">
            <text:p>"7": 3</text:p>
          </table:table-cell>
          <table:table-cell table:style-name="ce1214" table:formula="of:=COM.MICROSOFT.CONCAT(&quot;&quot;&quot;&quot;;[.$E$3]; &quot;&quot;&quot;: &quot;; [.AC17])" office:value-type="string" office:string-value="&quot;8&quot;: 2" calcext:value-type="string">
            <text:p>"8": 2</text:p>
          </table:table-cell>
          <table:table-cell table:style-name="ce1214" table:formula="of:=COM.MICROSOFT.CONCAT(&quot;&quot;&quot;&quot;;[.$F$3]; &quot;&quot;&quot;: &quot;; [.AD17])" office:value-type="string" office:string-value="&quot;9&quot;: 9" calcext:value-type="string">
            <text:p>"9": 9</text:p>
          </table:table-cell>
          <table:table-cell table:style-name="ce875" table:number-columns-repeated="2"/>
          <table:table-cell table:formula="of:=COM.MICROSOFT.CONCAT(&quot;&quot;&quot;6&quot;&quot;: { &quot;;COM.MICROSOFT.TEXTJOIN(&quot;, &quot;;TRUE();[.AL12:.AP14]);&quot;}&quot;)" office:value-type="string" office:string-value="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" calcext:value-type="string">
            <text:p>"6": { "0": 14, "1": 8, "2": 3, "3": 5, "4": 13, "5": 6, "6": 2, "7": 1, "8": 2, "9": 7, "10": 11, "11": 9, "12": 10, "13": 4, "14": 12}</text:p>
          </table:table-cell>
          <table:table-cell table:number-columns-repeated="36"/>
        </table:table-row>
        <table:table-row table:style-name="ro1">
          <table:table-cell table:style-name="ce623"/>
          <table:table-cell table:style-name="ce880" table:formula="of:=[.$T$4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690"/>
          <table:table-cell office:value-type="float" office:value="7" calcext:value-type="float">
            <text:p>7</text:p>
          </table:table-cell>
          <table:table-cell table:style-name="ce880" table:formula="of:=[.$U$4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690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880" table:formula="of:=[.$V$4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852" office:value-type="float" office:value="11" calcext:value-type="float">
            <text:p>11</text:p>
          </table:table-cell>
          <table:table-cell table:style-name="ce690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0" table:formula="of:=[.$W$4]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690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880" table:formula="of:=[.$X$4]" office:value-type="float" office:value="12" calcext:value-type="float">
            <text:p>12</text:p>
          </table:table-cell>
          <table:table-cell table:style-name="ce623"/>
          <table:table-cell table:style-name="ce1214" table:formula="of:=COM.MICROSOFT.CONCAT(&quot;&quot;&quot;&quot;;[.$B$4]; &quot;&quot;&quot;: &quot;; [.B18])" office:value-type="string" office:string-value="&quot;10&quot;: 11" calcext:value-type="string">
            <text:p>"10": 11</text:p>
          </table:table-cell>
          <table:table-cell table:style-name="ce1214" table:formula="of:=COM.MICROSOFT.CONCAT(&quot;&quot;&quot;&quot;;[.$C$4]; &quot;&quot;&quot;: &quot;; [.C18])" office:value-type="string" office:string-value="&quot;11&quot;: 1" calcext:value-type="string">
            <text:p>"11": 1</text:p>
          </table:table-cell>
          <table:table-cell table:style-name="ce1214" table:formula="of:=COM.MICROSOFT.CONCAT(&quot;&quot;&quot;&quot;;[.$D$4]; &quot;&quot;&quot;: &quot;; [.D18])" office:value-type="string" office:string-value="&quot;12&quot;: 2" calcext:value-type="string">
            <text:p>"12": 2</text:p>
          </table:table-cell>
          <table:table-cell table:style-name="ce1214" table:formula="of:=COM.MICROSOFT.CONCAT(&quot;&quot;&quot;&quot;;[.$E$4]; &quot;&quot;&quot;: &quot;; [.E18])" office:value-type="string" office:string-value="&quot;13&quot;: 3" calcext:value-type="string">
            <text:p>"13": 3</text:p>
          </table:table-cell>
          <table:table-cell table:style-name="ce1214" table:formula="of:=COM.MICROSOFT.CONCAT(&quot;&quot;&quot;&quot;;[.$F$4]; &quot;&quot;&quot;: &quot;; [.F18])" office:value-type="string" office:string-value="&quot;14&quot;: 7" calcext:value-type="string">
            <text:p>"14": 7</text:p>
          </table:table-cell>
          <table:table-cell table:style-name="ce1214"/>
          <table:table-cell table:style-name="ce1214" table:formula="of:=COM.MICROSOFT.CONCAT(&quot;&quot;&quot;&quot;;[.$B$4]; &quot;&quot;&quot;: &quot;; [.H18])" office:value-type="string" office:string-value="&quot;10&quot;: 7" calcext:value-type="string">
            <text:p>"10": 7</text:p>
          </table:table-cell>
          <table:table-cell table:style-name="ce1214" table:formula="of:=COM.MICROSOFT.CONCAT(&quot;&quot;&quot;&quot;;[.$C$4]; &quot;&quot;&quot;: &quot;; [.I18])" office:value-type="string" office:string-value="&quot;11&quot;: 10" calcext:value-type="string">
            <text:p>"11": 10</text:p>
          </table:table-cell>
          <table:table-cell table:style-name="ce1214" table:formula="of:=COM.MICROSOFT.CONCAT(&quot;&quot;&quot;&quot;;[.$D$4]; &quot;&quot;&quot;: &quot;; [.J18])" office:value-type="string" office:string-value="&quot;12&quot;: 1" calcext:value-type="string">
            <text:p>"12": 1</text:p>
          </table:table-cell>
          <table:table-cell table:style-name="ce1214" table:formula="of:=COM.MICROSOFT.CONCAT(&quot;&quot;&quot;&quot;;[.$E$4]; &quot;&quot;&quot;: &quot;; [.K18])" office:value-type="string" office:string-value="&quot;13&quot;: 2" calcext:value-type="string">
            <text:p>"13": 2</text:p>
          </table:table-cell>
          <table:table-cell table:style-name="ce1214" table:formula="of:=COM.MICROSOFT.CONCAT(&quot;&quot;&quot;&quot;;[.$F$4]; &quot;&quot;&quot;: &quot;; [.L18])" office:value-type="string" office:string-value="&quot;14&quot;: 9" calcext:value-type="string">
            <text:p>"14": 9</text:p>
          </table:table-cell>
          <table:table-cell table:style-name="ce1214"/>
          <table:table-cell table:style-name="ce1214" table:formula="of:=COM.MICROSOFT.CONCAT(&quot;&quot;&quot;&quot;;[.$B$4]; &quot;&quot;&quot;: &quot;; [.N18])" office:value-type="string" office:string-value="&quot;10&quot;: 5" calcext:value-type="string">
            <text:p>"10": 5</text:p>
          </table:table-cell>
          <table:table-cell table:style-name="ce1214" table:formula="of:=COM.MICROSOFT.CONCAT(&quot;&quot;&quot;&quot;;[.$C$4]; &quot;&quot;&quot;: &quot;; [.O18])" office:value-type="string" office:string-value="&quot;11&quot;: 2" calcext:value-type="string">
            <text:p>"11": 2</text:p>
          </table:table-cell>
          <table:table-cell table:style-name="ce1214" table:formula="of:=COM.MICROSOFT.CONCAT(&quot;&quot;&quot;&quot;;[.$D$4]; &quot;&quot;&quot;: &quot;; [.P18])" office:value-type="string" office:string-value="&quot;12&quot;: 9" calcext:value-type="string">
            <text:p>"12": 9</text:p>
          </table:table-cell>
          <table:table-cell table:style-name="ce1214" table:formula="of:=COM.MICROSOFT.CONCAT(&quot;&quot;&quot;&quot;;[.$E$4]; &quot;&quot;&quot;: &quot;; [.Q18])" office:value-type="string" office:string-value="&quot;13&quot;: 1" calcext:value-type="string">
            <text:p>"13": 1</text:p>
          </table:table-cell>
          <table:table-cell table:style-name="ce1214" table:formula="of:=COM.MICROSOFT.CONCAT(&quot;&quot;&quot;&quot;;[.$F$4]; &quot;&quot;&quot;: &quot;; [.R18])" office:value-type="string" office:string-value="&quot;14&quot;: 11" calcext:value-type="string">
            <text:p>"14": 11</text:p>
          </table:table-cell>
          <table:table-cell table:style-name="ce1214"/>
          <table:table-cell table:style-name="ce1214" table:formula="of:=COM.MICROSOFT.CONCAT(&quot;&quot;&quot;&quot;;[.$B$4]; &quot;&quot;&quot;: &quot;; [.T18])" office:value-type="string" office:string-value="&quot;10&quot;: 5" calcext:value-type="string">
            <text:p>"10": 5</text:p>
          </table:table-cell>
          <table:table-cell table:style-name="ce1214" table:formula="of:=COM.MICROSOFT.CONCAT(&quot;&quot;&quot;&quot;;[.$C$4]; &quot;&quot;&quot;: &quot;; [.U18])" office:value-type="string" office:string-value="&quot;11&quot;: 2" calcext:value-type="string">
            <text:p>"11": 2</text:p>
          </table:table-cell>
          <table:table-cell table:style-name="ce1214" table:formula="of:=COM.MICROSOFT.CONCAT(&quot;&quot;&quot;&quot;;[.$D$4]; &quot;&quot;&quot;: &quot;; [.V18])" office:value-type="string" office:string-value="&quot;12&quot;: 1" calcext:value-type="string">
            <text:p>"12": 1</text:p>
          </table:table-cell>
          <table:table-cell table:style-name="ce1214" table:formula="of:=COM.MICROSOFT.CONCAT(&quot;&quot;&quot;&quot;;[.$E$4]; &quot;&quot;&quot;: &quot;; [.W18])" office:value-type="string" office:string-value="&quot;13&quot;: 4" calcext:value-type="string">
            <text:p>"13": 4</text:p>
          </table:table-cell>
          <table:table-cell table:style-name="ce1214" table:formula="of:=COM.MICROSOFT.CONCAT(&quot;&quot;&quot;&quot;;[.$F$4]; &quot;&quot;&quot;: &quot;; [.X18])" office:value-type="string" office:string-value="&quot;14&quot;: 10" calcext:value-type="string">
            <text:p>"14": 10</text:p>
          </table:table-cell>
          <table:table-cell table:style-name="ce1214"/>
          <table:table-cell table:style-name="ce1214" table:formula="of:=COM.MICROSOFT.CONCAT(&quot;&quot;&quot;&quot;;[.$B$4]; &quot;&quot;&quot;: &quot;; [.Z18])" office:value-type="string" office:string-value="&quot;10&quot;: 8" calcext:value-type="string">
            <text:p>"10": 8</text:p>
          </table:table-cell>
          <table:table-cell table:style-name="ce1214" table:formula="of:=COM.MICROSOFT.CONCAT(&quot;&quot;&quot;&quot;;[.$C$4]; &quot;&quot;&quot;: &quot;; [.AA18])" office:value-type="string" office:string-value="&quot;11&quot;: 6" calcext:value-type="string">
            <text:p>"11": 6</text:p>
          </table:table-cell>
          <table:table-cell table:style-name="ce1214" table:formula="of:=COM.MICROSOFT.CONCAT(&quot;&quot;&quot;&quot;;[.$D$4]; &quot;&quot;&quot;: &quot;; [.AB18])" office:value-type="string" office:string-value="&quot;12&quot;: 4" calcext:value-type="string">
            <text:p>"12": 4</text:p>
          </table:table-cell>
          <table:table-cell table:style-name="ce1214" table:formula="of:=COM.MICROSOFT.CONCAT(&quot;&quot;&quot;&quot;;[.$E$4]; &quot;&quot;&quot;: &quot;; [.AC18])" office:value-type="string" office:string-value="&quot;13&quot;: 1" calcext:value-type="string">
            <text:p>"13": 1</text:p>
          </table:table-cell>
          <table:table-cell table:style-name="ce1214" table:formula="of:=COM.MICROSOFT.CONCAT(&quot;&quot;&quot;&quot;;[.$F$4]; &quot;&quot;&quot;: &quot;; [.AD18])" office:value-type="string" office:string-value="&quot;14&quot;: 12" calcext:value-type="string">
            <text:p>"14": 12</text:p>
          </table:table-cell>
          <table:table-cell table:style-name="ce875" table:number-columns-repeated="2"/>
          <table:table-cell table:formula="of:=COM.MICROSOFT.CONCAT(&quot;&quot;&quot;7&quot;&quot;: { &quot;;COM.MICROSOFT.TEXTJOIN(&quot;, &quot;;TRUE();[.AR12:.AV14]);&quot;}&quot;)" office:value-type="string" office:string-value="&quot;7&quot;: { &quot;0&quot;: 14, &quot;1&quot;: 8, &quot;2&quot;: 4, &quot;3&quot;: 9, &quot;4&quot;: 13, &quot;5&quot;: 5, &quot;6&quot;: 2, &quot;7&quot;: 0, &quot;8&quot;: 1, &quot;9&quot;: 10, &quot;10&quot;: 11, &quot;11&quot;: 6, &quot;12&quot;: 7, &quot;13&quot;: 3, &quot;14&quot;: 12}" calcext:value-type="string">
            <text:p>"7": { "0": 14, "1": 8, "2": 4, "3": 9, "4": 13, "5": 5, "6": 2, "7": 0, "8": 1, "9": 10, "10": 11, "11": 6, "12": 7, "13": 3, "14": 12}</text:p>
          </table:table-cell>
          <table:table-cell table:number-columns-repeated="36"/>
        </table:table-row>
        <table:table-row table:style-name="ro2">
          <table:table-cell table:style-name="ce623"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ce802" office:value-type="string" calcext:value-type="string">
            <text:p><text:s text:c="43"/></text:p>
          </table:table-cell>
          <table:table-cell table:style-name="Default" table:number-columns-repeated="11"/>
          <table:table-cell/>
          <table:table-cell table:style-name="ce875" table:number-columns-repeated="31"/>
          <table:table-cell table:formula="of:=COM.MICROSOFT.CONCAT(&quot;&quot;&quot;8&quot;&quot;: { &quot;;COM.MICROSOFT.TEXTJOIN(&quot;, &quot;;TRUE();[.AX12:.BB14]);&quot;}&quot;)" office:value-type="string" office:string-value="&quot;8&quot;: { &quot;0&quot;: 13, &quot;1&quot;: 5, &quot;2&quot;: 3, &quot;3&quot;: 6, &quot;4&quot;: 14, &quot;5&quot;: 4, &quot;6&quot;: 2, &quot;7&quot;: 1, &quot;8&quot;: 1, &quot;9&quot;: 10, &quot;10&quot;: 8, &quot;11&quot;: 11, &quot;12&quot;: 7, &quot;13&quot;: 9, &quot;14&quot;: 12}" calcext:value-type="string">
            <text:p>"8": { "0": 13, "1": 5, "2": 3, "3": 6, "4": 14, "5": 4, "6": 2, "7": 1, "8": 1, "9": 10, "10": 8, "11": 11, "12": 7, "13": 9, "14": 12}</text:p>
          </table:table-cell>
          <table:table-cell table:number-columns-repeated="36"/>
        </table:table-row>
        <table:table-row table:style-name="ro2">
          <table:table-cell table:style-name="ce623"/>
          <table:table-cell table:style-name="ce1114" table:number-columns-spanned="29" table:number-rows-spanned="3"/>
          <table:covered-table-cell table:number-columns-repeated="28" table:style-name="ce634"/>
          <table:table-cell table:style-name="ce861"/>
          <table:table-cell table:style-name="ce1215" table:formula="of:=COM.MICROSOFT.CONCAT(&quot;{&quot;; COM.MICROSOFT.TEXTJOIN(&quot;, &quot;;TRUE();[.BK14]; [.BK22]; [.BK30]);&quot;}&quot;)" office:value-type="string" office:string-value="{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6, &quot;2&quot;: 1, &quot;3&quot;: 3, &quot;4&quot;: 4, &quot;5&quot;: 7, &quot;6&quot;: 8, &quot;7&quot;: 6, &quot;8&quot;: 2, &quot;9&quot;: 5, &quot;10&quot;: 13, &quot;11&quot;: 14, &quot;12&quot;: 12, &quot;13&quot;: 10, &quot;14&quot;: 11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5, &quot;4&quot;: 8, &quot;5&quot;: 5, &quot;6&quot;: 4, &quot;7&quot;: 6, &quot;8&quot;: 7, &quot;9&quot;: 9, &quot;10&quot;: 13, &quot;11&quot;: 14, &quot;12&quot;: 12, &quot;13&quot;: 10, &quot;14&quot;: 11}, &quot;4&quot;: { &quot;0&quot;: 7, &quot;1&quot;: 3, &quot;2&quot;: 2, &quot;3&quot;: 1, &quot;4&quot;: 13, &quot;5&quot;: 6, &quot;6&quot;: 4, &quot;7&quot;: 5, &quot;8&quot;: 9, &quot;9&quot;: 8, &quot;10&quot;: 10, &quot;11&quot;: 11, &quot;12&quot;: 12, &quot;13&quot;: 13, &quot;14&quot;: 14}, &quot;5&quot;: { &quot;0&quot;: 14, &quot;1&quot;: 9, &quot;2&quot;: 4, &quot;3&quot;: 5, &quot;4&quot;: 10, &quot;5&quot;: 7, &quot;6&quot;: 1, &quot;7&quot;: 2, &quot;8&quot;: 3, &quot;9&quot;: 7, &quot;10&quot;: 12, &quot;11&quot;: 13, &quot;12&quot;: 11, &quot;13&quot;: 6, &quot;14&quot;: 8}, 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, &quot;7&quot;: { &quot;0&quot;: 14, &quot;1&quot;: 8, &quot;2&quot;: 4, &quot;3&quot;: 9, &quot;4&quot;: 13, &quot;5&quot;: 5, &quot;6&quot;: 2, &quot;7&quot;: 0, &quot;8&quot;: 1, &quot;9&quot;: 10, &quot;10&quot;: 11, &quot;11&quot;: 6, &quot;12&quot;: 7, &quot;13&quot;: 3, &quot;14&quot;: 12}, &quot;8&quot;: { &quot;0&quot;: 13, &quot;1&quot;: 5, &quot;2&quot;: 3, &quot;3&quot;: 6, &quot;4&quot;: 14, &quot;5&quot;: 4, &quot;6&quot;: 2, &quot;7&quot;: 1, &quot;8&quot;: 1, &quot;9&quot;: 10, &quot;10&quot;: 8, &quot;11&quot;: 11, &quot;12&quot;: 7, &quot;13&quot;: 9, &quot;14&quot;: 12}, &quot;9&quot;: { &quot;0&quot;: 13, &quot;1&quot;: 7, &quot;2&quot;: 4, &quot;3&quot;: 3, &quot;4&quot;: 9, &quot;5&quot;: 6, &quot;6&quot;: 5, &quot;7&quot;: 2, &quot;8&quot;: 1, &quot;9&quot;: 8, &quot;10&quot;: 11, &quot;11&quot;: 12, &quot;12&quot;: 14, &quot;13&quot;: 10, &quot;14&quot;: 8}, &quot;10&quot;: { &quot;0&quot;: 13, &quot;1&quot;: 14, &quot;2&quot;: 10, &quot;3&quot;: 11, &quot;4&quot;: 12, &quot;5&quot;: 9, &quot;6&quot;: 8, &quot;7&quot;: 4, &quot;8&quot;: 5, &quot;9&quot;: 6, &quot;10&quot;: 11, &quot;11&quot;: 1, &quot;12&quot;: 2, &quot;13&quot;: 3, &quot;14&quot;: 7}, &quot;11&quot;: { &quot;0&quot;: 14, &quot;1&quot;: 13, &quot;2&quot;: 8, &quot;3&quot;: 10, &quot;4&quot;: 11, &quot;5&quot;: 12, &quot;6&quot;: 5, &quot;7&quot;: 3, &quot;8&quot;: 4, &quot;9&quot;: 6, &quot;10&quot;: 7, &quot;11&quot;: 10, &quot;12&quot;: 1, &quot;13&quot;: 2, &quot;14&quot;: 9}, &quot;12&quot;: { &quot;0&quot;: 14, &quot;1&quot;: 13, &quot;2&quot;: 10, &quot;3&quot;: 9, &quot;4&quot;: 12, &quot;5&quot;: 10, &quot;6&quot;: 6, &quot;7&quot;: 4, &quot;8&quot;: 3, &quot;9&quot;: 8, &quot;10&quot;: 5, &quot;11&quot;: 2, &quot;12&quot;: 9, &quot;13&quot;: 1, &quot;14&quot;: 11}, 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, &quot;14&quot;: { &quot;0&quot;: 14, &quot;1&quot;: 13, &quot;2&quot;: 12, &quot;3&quot;: 10, &quot;4&quot;: 11, &quot;5&quot;: 7, &quot;6&quot;: 5, &quot;7&quot;: 3, &quot;8&quot;: 2, &quot;9&quot;: 9, &quot;10&quot;: 8, &quot;11&quot;: 6, &quot;12&quot;: 4, &quot;13&quot;: 1, &quot;14&quot;: 12}}" calcext:value-type="string" table:number-columns-spanned="29" table:number-rows-spanned="4">
            <text:p>{"0": { "0": 14, "1": 1, "2": 2, "3": 3, "4": 5, "5": 9, "6": 8, "7": 7, "8": 4, "9": 6, "10": 12, "11": 14, "12": 13, "13": 10, "14": 11}, "1": { "0": 9, "1": 6, "2": 1, "3": 3, "4": 4, "5": 7, "6": 8, "7": 6, "8": 2, "9": 5, "10": 13, "11": 14, "12": 12, "13": 10, "14": 11}, "2": { "0": 9, "1": 3, "2": 3, "3": 1, "4": 8, "5": 7, "6": 4, "7": 5, "8": 2, "9": 6, "10": 12, "11": 11, "12": 13, "13": 10, "14": 14}, "3": { "0": 3, "1": 2, "2": 1, "3": 5, "4": 8, "5": 5, "6": 4, "7": 6, "8": 7, "9": 9, "10": 13, "11": 14, "12": 12, "13": 10, "14": 11}, "4": { "0": 7, "1": 3, "2": 2, "3": 1, "4": 13, "5": 6, "6": 4, "7": 5, "8": 9, "9": 8, "10": 10, "11": 11, "12": 12, "13": 13, "14": 14}, "5": { "0": 14, "1": 9, "2": 4, "3": 5, "4": 10, "5": 7, "6": 1, "7": 2, "8": 3, "9": 7, "10": 12, "11": 13, "12": 11, "13": 6, "14": 8}, "6": { "0": 14, "1": 8, "2": 3, "3": 5, "4": 13, "5": 6, "6": 2, "7": 1, "8": 2, "9": 7, "10": 11, "11": 9, "12": 10, "13": 4, "14": 12}, "7": { "0": 14, "1": 8, "2": 4, "3": 9, "4": 13, "5": 5, "6": 2, "7": 0, "8": 1, "9": 10, "10": 11, "11": 6, "12": 7, "13": 3, "14": 12}, "8": { "0": 13, "1": 5, "2": 3, "3": 6, "4": 14, "5": 4, "6": 2, "7": 1, "8": 1, "9": 10, "10": 8, "11": 11, "12": 7, "13": 9, "14": 12}, "9": { "0": 13, "1": 7, "2": 4, "3": 3, "4": 9, "5": 6, "6": 5, "7": 2, "8": 1, "9": 8, "10": 11, "11": 12, "12": 14, "13": 10, "14": 8}, "10": { "0": 13, "1": 14, "2": 10, "3": 11, "4": 12, "5": 9, "6": 8, "7": 4, "8": 5, "9": 6, "10": 11, "11": 1, "12": 2, "13": 3, "14": 7}, "11": { "0": 14, "1": 13, "2": 8, "3": 10, "4": 11, "5": 12, "6": 5, "7": 3, "8": 4, "9": 6, "10": 7, "11": 10, "12": 1, "13": 2, "14": 9}, "12": { "0": 14, "1": 13, "2": 10, "3": 9, "4": 12, "5": 10, "6": 6, "7": 4, "8": 3, "9": 8, "10": 5, "11": 2, "12": 9, "13": 1, "14": 11}, "13": { "0": 13, "1": 12, "2": 8, "3": 11, "4": 14, "5": 6, "6": 4, "7": 3, "8": 7, "9": 9, "10": 5, "11": 2, "12": 1, "13": 4, "14": 10}, "14": { "0": 14, "1": 13, "2": 12, "3": 10, "4": 11, "5": 7, "6": 5, "7": 3, "8": 2, "9": 9, "10": 8, "11": 6, "12": 4, "13": 1, "14": 12}}</text:p>
          </table:table-cell>
          <table:covered-table-cell table:number-columns-repeated="28" table:style-name="ce1216"/>
          <table:table-cell table:style-name="ce875" table:number-columns-repeated="2"/>
          <table:table-cell table:formula="of:=COM.MICROSOFT.CONCAT(&quot;&quot;&quot;9&quot;&quot;: { &quot;;COM.MICROSOFT.TEXTJOIN(&quot;, &quot;;TRUE();[.BD12:.BH14]);&quot;}&quot;)" office:value-type="string" office:string-value="&quot;9&quot;: { &quot;0&quot;: 13, &quot;1&quot;: 7, &quot;2&quot;: 4, &quot;3&quot;: 3, &quot;4&quot;: 9, &quot;5&quot;: 6, &quot;6&quot;: 5, &quot;7&quot;: 2, &quot;8&quot;: 1, &quot;9&quot;: 8, &quot;10&quot;: 11, &quot;11&quot;: 12, &quot;12&quot;: 14, &quot;13&quot;: 10, &quot;14&quot;: 8}" calcext:value-type="string">
            <text:p>"9": { "0": 13, "1": 7, "2": 4, "3": 3, "4": 9, "5": 6, "6": 5, "7": 2, "8": 1, "9": 8, "10": 11, "11": 12, "12": 14, "13": 10, "14": 8}</text:p>
          </table:table-cell>
          <table:table-cell table:number-columns-repeated="36"/>
        </table:table-row>
        <table:table-row table:style-name="ro2">
          <table:table-cell table:style-name="ce623"/>
          <table:covered-table-cell table:number-columns-repeated="29" table:style-name="ce634"/>
          <table:table-cell table:style-name="ce861"/>
          <table:covered-table-cell table:number-columns-repeated="29" table:style-name="ce1216"/>
          <table:table-cell table:style-name="ce875" table:number-columns-repeated="3"/>
          <table:table-cell table:number-columns-repeated="36"/>
        </table:table-row>
        <table:table-row table:style-name="ro2">
          <table:table-cell table:style-name="ce623"/>
          <table:covered-table-cell table:number-columns-repeated="29" table:style-name="ce634"/>
          <table:table-cell table:style-name="ce861"/>
          <table:covered-table-cell table:number-columns-repeated="29" table:style-name="ce1216"/>
          <table:table-cell table:style-name="ce875" table:number-columns-repeated="2"/>
          <table:table-cell table:formula="of:=COM.MICROSOFT.TEXTJOIN(&quot;, &quot;;TRUE();[.BK16:.BK20])" office:value-type="string" office:string-value="&quot;5&quot;: { &quot;0&quot;: 14, &quot;1&quot;: 9, &quot;2&quot;: 4, &quot;3&quot;: 5, &quot;4&quot;: 10, &quot;5&quot;: 7, &quot;6&quot;: 1, &quot;7&quot;: 2, &quot;8&quot;: 3, &quot;9&quot;: 7, &quot;10&quot;: 12, &quot;11&quot;: 13, &quot;12&quot;: 11, &quot;13&quot;: 6, &quot;14&quot;: 8}, 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, &quot;7&quot;: { &quot;0&quot;: 14, &quot;1&quot;: 8, &quot;2&quot;: 4, &quot;3&quot;: 9, &quot;4&quot;: 13, &quot;5&quot;: 5, &quot;6&quot;: 2, &quot;7&quot;: 0, &quot;8&quot;: 1, &quot;9&quot;: 10, &quot;10&quot;: 11, &quot;11&quot;: 6, &quot;12&quot;: 7, &quot;13&quot;: 3, &quot;14&quot;: 12}, &quot;8&quot;: { &quot;0&quot;: 13, &quot;1&quot;: 5, &quot;2&quot;: 3, &quot;3&quot;: 6, &quot;4&quot;: 14, &quot;5&quot;: 4, &quot;6&quot;: 2, &quot;7&quot;: 1, &quot;8&quot;: 1, &quot;9&quot;: 10, &quot;10&quot;: 8, &quot;11&quot;: 11, &quot;12&quot;: 7, &quot;13&quot;: 9, &quot;14&quot;: 12}, &quot;9&quot;: { &quot;0&quot;: 13, &quot;1&quot;: 7, &quot;2&quot;: 4, &quot;3&quot;: 3, &quot;4&quot;: 9, &quot;5&quot;: 6, &quot;6&quot;: 5, &quot;7&quot;: 2, &quot;8&quot;: 1, &quot;9&quot;: 8, &quot;10&quot;: 11, &quot;11&quot;: 12, &quot;12&quot;: 14, &quot;13&quot;: 10, &quot;14&quot;: 8}" calcext:value-type="string">
            <text:p>"5": { "0": 14, "1": 9, "2": 4, "3": 5, "4": 10, "5": 7, "6": 1, "7": 2, "8": 3, "9": 7, "10": 12, "11": 13, "12": 11, "13": 6, "14": 8}, "6": { "0": 14, "1": 8, "2": 3, "3": 5, "4": 13, "5": 6, "6": 2, "7": 1, "8": 2, "9": 7, "10": 11, "11": 9, "12": 10, "13": 4, "14": 12}, "7": { "0": 14, "1": 8, "2": 4, "3": 9, "4": 13, "5": 5, "6": 2, "7": 0, "8": 1, "9": 10, "10": 11, "11": 6, "12": 7, "13": 3, "14": 12}, "8": { "0": 13, "1": 5, "2": 3, "3": 6, "4": 14, "5": 4, "6": 2, "7": 1, "8": 1, "9": 10, "10": 8, "11": 11, "12": 7, "13": 9, "14": 12}, "9": { "0": 13, "1": 7, "2": 4, "3": 3, "4": 9, "5": 6, "6": 5, "7": 2, "8": 1, "9": 8, "10": 11, "11": 12, "12": 14, "13": 10, "14": 8}</text:p>
          </table:table-cell>
          <table:table-cell table:number-columns-repeated="36"/>
        </table:table-row>
        <table:table-row table:style-name="ro2">
          <table:table-cell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Default" table:number-columns-repeated="12"/>
          <table:table-cell/>
          <table:covered-table-cell table:number-columns-repeated="29" table:style-name="ce875"/>
          <table:table-cell table:style-name="ce875" table:number-columns-repeated="3"/>
          <table:table-cell table:number-columns-repeated="36"/>
        </table:table-row>
        <table:table-row table:style-name="ro2">
          <table:table-cell/>
          <table:table-cell table:style-name="ce635" table:formula="of:=SUM([.B25:.F27])-[.B25]" office:value-type="float" office:value="35.1" calcext:value-type="float" table:number-columns-spanned="2" table:number-rows-spanned="1">
            <text:p>35.1</text:p>
          </table:table-cell>
          <table:covered-table-cell table:style-name="ce659"/>
          <table:table-cell table:style-name="ce659" table:number-columns-repeated="4"/>
          <table:table-cell table:style-name="ce691" table:formula="of:=SUM([.H25:.L27])-[.I25]" office:value-type="float" office:value="35.1" calcext:value-type="float" table:number-columns-spanned="2" table:number-rows-spanned="1">
            <text:p>35.1</text:p>
          </table:table-cell>
          <table:covered-table-cell table:style-name="ce659"/>
          <table:table-cell table:style-name="ce659" table:number-columns-repeated="4"/>
          <table:table-cell table:style-name="ce635" table:formula="of:=SUM([.N25:.R27])-[.P25]" office:value-type="float" office:value="35.1" calcext:value-type="float" table:number-columns-spanned="2" table:number-rows-spanned="1">
            <text:p>35.1</text:p>
          </table:table-cell>
          <table:covered-table-cell table:style-name="ce659"/>
          <table:table-cell table:style-name="ce659" table:number-columns-repeated="4"/>
          <table:table-cell table:style-name="ce691" table:formula="of:=SUM([.T25:.X27])-[.W25]" office:value-type="float" office:value="35.1" calcext:value-type="float" table:number-columns-spanned="2" table:number-rows-spanned="1">
            <text:p>35.1</text:p>
          </table:table-cell>
          <table:covered-table-cell table:style-name="ce659"/>
          <table:table-cell table:style-name="ce659" table:number-columns-repeated="4"/>
          <table:table-cell table:style-name="ce635" table:formula="of:=SUM([.Z25:.AD27])-[.AD25]" office:value-type="float" office:value="35.1" calcext:value-type="float" table:number-columns-spanned="2" table:number-rows-spanned="1">
            <text:p>35.1</text:p>
          </table:table-cell>
          <table:covered-table-cell table:style-name="ce659"/>
          <table:table-cell table:style-name="ce659" table:number-columns-repeated="3"/>
          <table:table-cell table:style-name="ce623"/>
          <table:table-cell table:number-columns-repeated="31"/>
          <table:table-cell table:formula="of:=COM.MICROSOFT.CONCAT(&quot;&quot;&quot;10&quot;&quot;: { &quot;;COM.MICROSOFT.TEXTJOIN(&quot;, &quot;;TRUE();[.AF16:.AJ18]);&quot;}&quot;)" office:value-type="string" office:string-value="&quot;10&quot;: { &quot;0&quot;: 13, &quot;1&quot;: 14, &quot;2&quot;: 10, &quot;3&quot;: 11, &quot;4&quot;: 12, &quot;5&quot;: 9, &quot;6&quot;: 8, &quot;7&quot;: 4, &quot;8&quot;: 5, &quot;9&quot;: 6, &quot;10&quot;: 11, &quot;11&quot;: 1, &quot;12&quot;: 2, &quot;13&quot;: 3, &quot;14&quot;: 7}" calcext:value-type="string">
            <text:p>"10": { "0": 13, "1": 14, "2": 10, "3": 11, "4": 12, "5": 9, "6": 8, "7": 4, "8": 5, "9": 6, "10": 11, "11": 1, "12": 2, "13": 3, "14": 7}</text:p>
          </table:table-cell>
          <table:table-cell table:number-columns-repeated="36"/>
        </table:table-row>
        <table:table-row table:style-name="ro1">
          <table:table-cell/>
          <table:table-cell table:style-name="ce1115" table:formula="of:=HLOOKUP([.B8];[.$AF$25:.$AW$26];2;0)" office:value-type="float" office:value="4.5" calcext:value-type="float">
            <text:p>4.5</text:p>
          </table:table-cell>
          <table:table-cell table:style-name="ce1123" table:formula="of:=HLOOKUP([.C8];[.$AF$25:.$AW$26];2;0)" office:value-type="float" office:value="1.1" calcext:value-type="float">
            <text:p>1.1</text:p>
          </table:table-cell>
          <table:table-cell table:style-name="ce1130" table:formula="of:=HLOOKUP([.D8];[.$AF$25:.$AW$26];2;0)" office:value-type="float" office:value="1.2" calcext:value-type="float">
            <text:p>1.2</text:p>
          </table:table-cell>
          <table:table-cell table:style-name="ce1133" table:formula="of:=HLOOKUP([.E8];[.$AF$25:.$AW$26];2;0)" office:value-type="float" office:value="1.3" calcext:value-type="float">
            <text:p>1.3</text:p>
          </table:table-cell>
          <table:table-cell table:style-name="ce1133" table:formula="of:=HLOOKUP([.F8];[.$AF$25:.$AW$26];2;0)" office:value-type="float" office:value="2" calcext:value-type="float">
            <text:p>2.0</text:p>
          </table:table-cell>
          <table:table-cell/>
          <table:table-cell table:style-name="ce1137" table:formula="of:=HLOOKUP([.H8];[.$AF$25:.$AW$26];2;0)" office:value-type="float" office:value="3" calcext:value-type="float">
            <text:p>3.0</text:p>
          </table:table-cell>
          <table:table-cell table:style-name="ce1143" table:formula="of:=HLOOKUP([.I8];[.$AF$25:.$AW$26];2;0)" office:value-type="float" office:value="2.1" calcext:value-type="float">
            <text:p>2.1</text:p>
          </table:table-cell>
          <table:table-cell table:style-name="ce1149" table:formula="of:=HLOOKUP([.J8];[.$AF$25:.$AW$26];2;0)" office:value-type="float" office:value="1.1" calcext:value-type="float">
            <text:p>1.1</text:p>
          </table:table-cell>
          <table:table-cell table:style-name="ce1152" table:formula="of:=HLOOKUP([.K8];[.$AF$25:.$AW$26];2;0)" office:value-type="float" office:value="1.3" calcext:value-type="float">
            <text:p>1.3</text:p>
          </table:table-cell>
          <table:table-cell table:style-name="ce1152" table:formula="of:=HLOOKUP([.L8];[.$AF$25:.$AW$26];2;0)" office:value-type="float" office:value="1.6" calcext:value-type="float">
            <text:p>1.6</text:p>
          </table:table-cell>
          <table:table-cell/>
          <table:table-cell table:style-name="ce1155" table:formula="of:=HLOOKUP([.N8];[.$AF$25:.$AW$26];2;0)" office:value-type="float" office:value="3" calcext:value-type="float">
            <text:p>3.0</text:p>
          </table:table-cell>
          <table:table-cell table:style-name="ce1161" table:formula="of:=HLOOKUP([.O8];[.$AF$25:.$AW$26];2;0)" office:value-type="float" office:value="1.3" calcext:value-type="float">
            <text:p>1.3</text:p>
          </table:table-cell>
          <table:table-cell table:style-name="ce1164" table:formula="of:=HLOOKUP([.P8];[.$AF$25:.$AW$26];2;0)" office:value-type="float" office:value="1.3" calcext:value-type="float">
            <text:p>1.3</text:p>
          </table:table-cell>
          <table:table-cell table:style-name="ce1170" table:formula="of:=HLOOKUP([.Q8];[.$AF$25:.$AW$26];2;0)" office:value-type="float" office:value="1.1" calcext:value-type="float">
            <text:p>1.1</text:p>
          </table:table-cell>
          <table:table-cell table:style-name="ce1170" table:formula="of:=HLOOKUP([.R8];[.$AF$25:.$AW$26];2;0)" office:value-type="float" office:value="2.3" calcext:value-type="float">
            <text:p>2.3</text:p>
          </table:table-cell>
          <table:table-cell/>
          <table:table-cell table:style-name="ce1175" table:formula="of:=HLOOKUP([.T8];[.$AF$25:.$AW$26];2;0)" office:value-type="float" office:value="1.3" calcext:value-type="float">
            <text:p>1.3</text:p>
          </table:table-cell>
          <table:table-cell table:style-name="ce1181" table:formula="of:=HLOOKUP([.U8];[.$AF$25:.$AW$26];2;0)" office:value-type="float" office:value="1.2" calcext:value-type="float">
            <text:p>1.2</text:p>
          </table:table-cell>
          <table:table-cell table:style-name="ce1184" table:formula="of:=HLOOKUP([.V8];[.$AF$25:.$AW$26];2;0)" office:value-type="float" office:value="1.1" calcext:value-type="float">
            <text:p>1.1</text:p>
          </table:table-cell>
          <table:table-cell table:style-name="ce1187" table:formula="of:=HLOOKUP([.W8];[.$AF$25:.$AW$26];2;0)" office:value-type="float" office:value="2" calcext:value-type="float">
            <text:p>2.0</text:p>
          </table:table-cell>
          <table:table-cell table:style-name="ce1188" table:formula="of:=HLOOKUP([.X8];[.$AF$25:.$AW$26];2;0)" office:value-type="float" office:value="2.3" calcext:value-type="float">
            <text:p>2.3</text:p>
          </table:table-cell>
          <table:table-cell/>
          <table:table-cell table:style-name="ce1194" table:formula="of:=HLOOKUP([.Z8];[.$AF$25:.$AW$26];2;0)" office:value-type="float" office:value="2.2" calcext:value-type="float">
            <text:p>2.2</text:p>
          </table:table-cell>
          <table:table-cell table:style-name="ce1200" table:formula="of:=HLOOKUP([.AA8];[.$AF$25:.$AW$26];2;0)" office:value-type="float" office:value="1.3" calcext:value-type="float">
            <text:p>1.3</text:p>
          </table:table-cell>
          <table:table-cell table:style-name="ce1203" table:formula="of:=HLOOKUP([.AB8];[.$AF$25:.$AW$26];2;0)" office:value-type="float" office:value="1.2" calcext:value-type="float">
            <text:p>1.2</text:p>
          </table:table-cell>
          <table:table-cell table:style-name="ce1206" table:formula="of:=HLOOKUP([.AC8];[.$AF$25:.$AW$26];2;0)" office:value-type="float" office:value="1.1" calcext:value-type="float">
            <text:p>1.1</text:p>
          </table:table-cell>
          <table:table-cell table:style-name="ce1209" table:formula="of:=HLOOKUP([.AD8];[.$AF$25:.$AW$26];2;0)" office:value-type="float" office:value="4" calcext:value-type="float">
            <text:p>4.0</text:p>
          </table:table-cell>
          <table:table-cell table:style-name="ce623"/>
          <table:table-cell table:style-name="ce1217" office:value-type="float" office:value="0" calcext:value-type="float">
            <text:p>0</text:p>
          </table:table-cell>
          <table:table-cell table:style-name="ce1217" office:value-type="float" office:value="1" calcext:value-type="float">
            <text:p>1</text:p>
          </table:table-cell>
          <table:table-cell table:style-name="ce1217" office:value-type="float" office:value="2" calcext:value-type="float">
            <text:p>2</text:p>
          </table:table-cell>
          <table:table-cell table:style-name="ce1217" office:value-type="float" office:value="3" calcext:value-type="float">
            <text:p>3</text:p>
          </table:table-cell>
          <table:table-cell table:style-name="ce1219" office:value-type="float" office:value="4" calcext:value-type="float">
            <text:p>4</text:p>
          </table:table-cell>
          <table:table-cell table:style-name="ce1219" office:value-type="float" office:value="5" calcext:value-type="float">
            <text:p>5</text:p>
          </table:table-cell>
          <table:table-cell table:style-name="ce1219" office:value-type="float" office:value="6" calcext:value-type="float">
            <text:p>6</text:p>
          </table:table-cell>
          <table:table-cell table:style-name="ce1219" office:value-type="float" office:value="7" calcext:value-type="float">
            <text:p>7</text:p>
          </table:table-cell>
          <table:table-cell table:style-name="ce1219" office:value-type="float" office:value="8" calcext:value-type="float">
            <text:p>8</text:p>
          </table:table-cell>
          <table:table-cell table:style-name="ce1220" office:value-type="float" office:value="9" calcext:value-type="float">
            <text:p>9</text:p>
          </table:table-cell>
          <table:table-cell table:style-name="ce1220" office:value-type="float" office:value="10" calcext:value-type="float">
            <text:p>10</text:p>
          </table:table-cell>
          <table:table-cell table:style-name="ce1221" office:value-type="float" office:value="11" calcext:value-type="float">
            <text:p>11</text:p>
          </table:table-cell>
          <table:table-cell table:style-name="ce1221" office:value-type="float" office:value="12" calcext:value-type="float">
            <text:p>12</text:p>
          </table:table-cell>
          <table:table-cell table:style-name="ce1221" office:value-type="float" office:value="13" calcext:value-type="float">
            <text:p>13</text:p>
          </table:table-cell>
          <table:table-cell table:style-name="ce1221" office:value-type="float" office:value="14" calcext:value-type="float">
            <text:p>14</text:p>
          </table:table-cell>
          <table:table-cell table:number-columns-repeated="16"/>
          <table:table-cell table:formula="of:=COM.MICROSOFT.CONCAT(&quot;&quot;&quot;11&quot;&quot;: { &quot;;COM.MICROSOFT.TEXTJOIN(&quot;, &quot;;TRUE();[.AL16:.AP18]);&quot;}&quot;)" office:value-type="string" office:string-value="&quot;11&quot;: { &quot;0&quot;: 14, &quot;1&quot;: 13, &quot;2&quot;: 8, &quot;3&quot;: 10, &quot;4&quot;: 11, &quot;5&quot;: 12, &quot;6&quot;: 5, &quot;7&quot;: 3, &quot;8&quot;: 4, &quot;9&quot;: 6, &quot;10&quot;: 7, &quot;11&quot;: 10, &quot;12&quot;: 1, &quot;13&quot;: 2, &quot;14&quot;: 9}" calcext:value-type="string">
            <text:p>"11": { "0": 14, "1": 13, "2": 8, "3": 10, "4": 11, "5": 12, "6": 5, "7": 3, "8": 4, "9": 6, "10": 7, "11": 10, "12": 1, "13": 2, "14": 9}</text:p>
          </table:table-cell>
          <table:table-cell table:number-columns-repeated="36"/>
        </table:table-row>
        <table:table-row table:style-name="ro1">
          <table:table-cell/>
          <table:table-cell table:style-name="ce1116" table:formula="of:=HLOOKUP([.B9];[.$AF$25:.$AW$26];2;0)" office:value-type="float" office:value="3" calcext:value-type="float">
            <text:p>3.0</text:p>
          </table:table-cell>
          <table:table-cell table:style-name="ce1123" table:formula="of:=HLOOKUP([.C9];[.$AF$25:.$AW$26];2;0)" office:value-type="float" office:value="2.3" calcext:value-type="float">
            <text:p>2.3</text:p>
          </table:table-cell>
          <table:table-cell table:style-name="ce1130" table:formula="of:=HLOOKUP([.D9];[.$AF$25:.$AW$26];2;0)" office:value-type="float" office:value="2.2" calcext:value-type="float">
            <text:p>2.2</text:p>
          </table:table-cell>
          <table:table-cell table:style-name="ce1133" table:formula="of:=HLOOKUP([.E9];[.$AF$25:.$AW$26];2;0)" office:value-type="float" office:value="1.6" calcext:value-type="float">
            <text:p>1.6</text:p>
          </table:table-cell>
          <table:table-cell table:style-name="ce1133" table:formula="of:=HLOOKUP([.F9];[.$AF$25:.$AW$26];2;0)" office:value-type="float" office:value="2.1" calcext:value-type="float">
            <text:p>2.1</text:p>
          </table:table-cell>
          <table:table-cell/>
          <table:table-cell table:style-name="ce1138" table:formula="of:=HLOOKUP([.H9];[.$AF$25:.$AW$26];2;0)" office:value-type="float" office:value="2.2" calcext:value-type="float">
            <text:p>2.2</text:p>
          </table:table-cell>
          <table:table-cell table:style-name="ce1144" table:formula="of:=HLOOKUP([.I9];[.$AF$25:.$AW$26];2;0)" office:value-type="float" office:value="2.3" calcext:value-type="float">
            <text:p>2.3</text:p>
          </table:table-cell>
          <table:table-cell table:style-name="ce1149" table:formula="of:=HLOOKUP([.J9];[.$AF$25:.$AW$26];2;0)" office:value-type="float" office:value="2.1" calcext:value-type="float">
            <text:p>2.1</text:p>
          </table:table-cell>
          <table:table-cell table:style-name="ce1152" table:formula="of:=HLOOKUP([.K9];[.$AF$25:.$AW$26];2;0)" office:value-type="float" office:value="1.2" calcext:value-type="float">
            <text:p>1.2</text:p>
          </table:table-cell>
          <table:table-cell table:style-name="ce1152" table:formula="of:=HLOOKUP([.L9];[.$AF$25:.$AW$26];2;0)" office:value-type="float" office:value="2" calcext:value-type="float">
            <text:p>2.0</text:p>
          </table:table-cell>
          <table:table-cell/>
          <table:table-cell table:style-name="ce1156" table:formula="of:=HLOOKUP([.N9];[.$AF$25:.$AW$26];2;0)" office:value-type="float" office:value="2.2" calcext:value-type="float">
            <text:p>2.2</text:p>
          </table:table-cell>
          <table:table-cell table:style-name="ce1161" table:formula="of:=HLOOKUP([.O9];[.$AF$25:.$AW$26];2;0)" office:value-type="float" office:value="1.6" calcext:value-type="float">
            <text:p>1.6</text:p>
          </table:table-cell>
          <table:table-cell table:style-name="ce1165" table:formula="of:=HLOOKUP([.P9];[.$AF$25:.$AW$26];2;0)" office:value-type="float" office:value="2" calcext:value-type="float">
            <text:p>2.0</text:p>
          </table:table-cell>
          <table:table-cell table:style-name="ce1170" table:formula="of:=HLOOKUP([.Q9];[.$AF$25:.$AW$26];2;0)" office:value-type="float" office:value="1.2" calcext:value-type="float">
            <text:p>1.2</text:p>
          </table:table-cell>
          <table:table-cell table:style-name="ce1170" table:formula="of:=HLOOKUP([.R9];[.$AF$25:.$AW$26];2;0)" office:value-type="float" office:value="2.1" calcext:value-type="float">
            <text:p>2.1</text:p>
          </table:table-cell>
          <table:table-cell/>
          <table:table-cell table:style-name="ce1176" table:formula="of:=HLOOKUP([.T9];[.$AF$25:.$AW$26];2;0)" office:value-type="float" office:value="2" calcext:value-type="float">
            <text:p>2.0</text:p>
          </table:table-cell>
          <table:table-cell table:style-name="ce1181" table:formula="of:=HLOOKUP([.U9];[.$AF$25:.$AW$26];2;0)" office:value-type="float" office:value="1.6" calcext:value-type="float">
            <text:p>1.6</text:p>
          </table:table-cell>
          <table:table-cell table:style-name="ce1184" table:formula="of:=HLOOKUP([.V9];[.$AF$25:.$AW$26];2;0)" office:value-type="float" office:value="2.1" calcext:value-type="float">
            <text:p>2.1</text:p>
          </table:table-cell>
          <table:table-cell table:style-name="ce1188" table:formula="of:=HLOOKUP([.W9];[.$AF$25:.$AW$26];2;0)" office:value-type="float" office:value="2.2" calcext:value-type="float">
            <text:p>2.2</text:p>
          </table:table-cell>
          <table:table-cell table:style-name="ce1188" table:formula="of:=HLOOKUP([.X9];[.$AF$25:.$AW$26];2;0)" office:value-type="float" office:value="3" calcext:value-type="float">
            <text:p>3.0</text:p>
          </table:table-cell>
          <table:table-cell/>
          <table:table-cell table:style-name="ce1195" table:formula="of:=HLOOKUP([.Z9];[.$AF$25:.$AW$26];2;0)" office:value-type="float" office:value="2.1" calcext:value-type="float">
            <text:p>2.1</text:p>
          </table:table-cell>
          <table:table-cell table:style-name="ce1200" table:formula="of:=HLOOKUP([.AA9];[.$AF$25:.$AW$26];2;0)" office:value-type="float" office:value="1.6" calcext:value-type="float">
            <text:p>1.6</text:p>
          </table:table-cell>
          <table:table-cell table:style-name="ce1203" table:formula="of:=HLOOKUP([.AB9];[.$AF$25:.$AW$26];2;0)" office:value-type="float" office:value="2" calcext:value-type="float">
            <text:p>2.0</text:p>
          </table:table-cell>
          <table:table-cell table:style-name="ce1206" table:formula="of:=HLOOKUP([.AC9];[.$AF$25:.$AW$26];2;0)" office:value-type="float" office:value="3" calcext:value-type="float">
            <text:p>3.0</text:p>
          </table:table-cell>
          <table:table-cell table:style-name="ce1206" table:formula="of:=HLOOKUP([.AD9];[.$AF$25:.$AW$26];2;0)" office:value-type="float" office:value="2.3" calcext:value-type="float">
            <text:p>2.3</text:p>
          </table:table-cell>
          <table:table-cell table:style-name="ce623"/>
          <table:table-cell table:style-name="ce1218" office:value-type="float" office:value="1" calcext:value-type="float">
            <text:p>1.0</text:p>
          </table:table-cell>
          <table:table-cell table:style-name="ce1218" office:value-type="float" office:value="1.1" calcext:value-type="float">
            <text:p>1.1</text:p>
          </table:table-cell>
          <table:table-cell table:style-name="ce1218" office:value-type="float" office:value="1.2" calcext:value-type="float">
            <text:p>1.2</text:p>
          </table:table-cell>
          <table:table-cell table:style-name="ce1218" office:value-type="float" office:value="1.3" calcext:value-type="float">
            <text:p>1.3</text:p>
          </table:table-cell>
          <table:table-cell table:style-name="ce1218" office:value-type="float" office:value="1.6" calcext:value-type="float">
            <text:p>1.6</text:p>
          </table:table-cell>
          <table:table-cell table:style-name="ce1218" office:value-type="float" office:value="2" calcext:value-type="float">
            <text:p>2.0</text:p>
          </table:table-cell>
          <table:table-cell table:style-name="ce1218" office:value-type="float" office:value="2.1" calcext:value-type="float">
            <text:p>2.1</text:p>
          </table:table-cell>
          <table:table-cell table:style-name="ce1218" office:value-type="float" office:value="2.2" calcext:value-type="float">
            <text:p>2.2</text:p>
          </table:table-cell>
          <table:table-cell table:style-name="ce1218" office:value-type="float" office:value="2.3" calcext:value-type="float">
            <text:p>2.3</text:p>
          </table:table-cell>
          <table:table-cell table:style-name="ce1218" office:value-type="float" office:value="3" calcext:value-type="float">
            <text:p>3.0</text:p>
          </table:table-cell>
          <table:table-cell table:style-name="ce1218" office:value-type="float" office:value="3.1" calcext:value-type="float">
            <text:p>3.1</text:p>
          </table:table-cell>
          <table:table-cell table:style-name="ce1218" office:value-type="float" office:value="3.2" calcext:value-type="float">
            <text:p>3.2</text:p>
          </table:table-cell>
          <table:table-cell table:style-name="ce1218" office:value-type="float" office:value="3.5" calcext:value-type="float">
            <text:p>3.5</text:p>
          </table:table-cell>
          <table:table-cell table:style-name="ce1218" office:value-type="float" office:value="4" calcext:value-type="float">
            <text:p>4.0</text:p>
          </table:table-cell>
          <table:table-cell table:style-name="ce1218" office:value-type="float" office:value="4.5" calcext:value-type="float">
            <text:p>4.5</text:p>
          </table:table-cell>
          <table:table-cell table:number-columns-repeated="16"/>
          <table:table-cell table:formula="of:=COM.MICROSOFT.CONCAT(&quot;&quot;&quot;12&quot;&quot;: { &quot;;COM.MICROSOFT.TEXTJOIN(&quot;, &quot;;TRUE();[.AR16:.AV18]);&quot;}&quot;)" office:value-type="string" office:string-value="&quot;12&quot;: { &quot;0&quot;: 14, &quot;1&quot;: 13, &quot;2&quot;: 10, &quot;3&quot;: 9, &quot;4&quot;: 12, &quot;5&quot;: 10, &quot;6&quot;: 6, &quot;7&quot;: 4, &quot;8&quot;: 3, &quot;9&quot;: 8, &quot;10&quot;: 5, &quot;11&quot;: 2, &quot;12&quot;: 9, &quot;13&quot;: 1, &quot;14&quot;: 11}" calcext:value-type="string">
            <text:p>"12": { "0": 14, "1": 13, "2": 10, "3": 9, "4": 12, "5": 10, "6": 6, "7": 4, "8": 3, "9": 8, "10": 5, "11": 2, "12": 9, "13": 1, "14": 11}</text:p>
          </table:table-cell>
          <table:table-cell table:number-columns-repeated="36"/>
        </table:table-row>
        <table:table-row table:style-name="ro1">
          <table:table-cell/>
          <table:table-cell table:style-name="ce1116" table:formula="of:=HLOOKUP([.B10];[.$AF$25:.$AW$26];2;0)" office:value-type="float" office:value="3.5" calcext:value-type="float">
            <text:p>3.5</text:p>
          </table:table-cell>
          <table:table-cell table:style-name="ce1123" table:formula="of:=HLOOKUP([.C10];[.$AF$25:.$AW$26];2;0)" office:value-type="float" office:value="4.5" calcext:value-type="float">
            <text:p>4.5</text:p>
          </table:table-cell>
          <table:table-cell table:style-name="ce1130" table:formula="of:=HLOOKUP([.D10];[.$AF$25:.$AW$26];2;0)" office:value-type="float" office:value="4" calcext:value-type="float">
            <text:p>4.0</text:p>
          </table:table-cell>
          <table:table-cell table:style-name="ce1133" table:formula="of:=HLOOKUP([.E10];[.$AF$25:.$AW$26];2;0)" office:value-type="float" office:value="3.1" calcext:value-type="float">
            <text:p>3.1</text:p>
          </table:table-cell>
          <table:table-cell table:style-name="ce1133" table:formula="of:=HLOOKUP([.F10];[.$AF$25:.$AW$26];2;0)" office:value-type="float" office:value="3.2" calcext:value-type="float">
            <text:p>3.2</text:p>
          </table:table-cell>
          <table:table-cell/>
          <table:table-cell table:style-name="ce1138" table:formula="of:=HLOOKUP([.H10];[.$AF$25:.$AW$26];2;0)" office:value-type="float" office:value="4" calcext:value-type="float">
            <text:p>4.0</text:p>
          </table:table-cell>
          <table:table-cell table:style-name="ce1144" table:formula="of:=HLOOKUP([.I10];[.$AF$25:.$AW$26];2;0)" office:value-type="float" office:value="4.5" calcext:value-type="float">
            <text:p>4.5</text:p>
          </table:table-cell>
          <table:table-cell table:style-name="ce1149" table:formula="of:=HLOOKUP([.J10];[.$AF$25:.$AW$26];2;0)" office:value-type="float" office:value="3.5" calcext:value-type="float">
            <text:p>3.5</text:p>
          </table:table-cell>
          <table:table-cell table:style-name="ce1152" table:formula="of:=HLOOKUP([.K10];[.$AF$25:.$AW$26];2;0)" office:value-type="float" office:value="3.1" calcext:value-type="float">
            <text:p>3.1</text:p>
          </table:table-cell>
          <table:table-cell table:style-name="ce1152" table:formula="of:=HLOOKUP([.L10];[.$AF$25:.$AW$26];2;0)" office:value-type="float" office:value="3.2" calcext:value-type="float">
            <text:p>3.2</text:p>
          </table:table-cell>
          <table:table-cell/>
          <table:table-cell table:style-name="ce1156" table:formula="of:=HLOOKUP([.N10];[.$AF$25:.$AW$26];2;0)" office:value-type="float" office:value="3.5" calcext:value-type="float">
            <text:p>3.5</text:p>
          </table:table-cell>
          <table:table-cell table:style-name="ce1161" table:formula="of:=HLOOKUP([.O10];[.$AF$25:.$AW$26];2;0)" office:value-type="float" office:value="3.2" calcext:value-type="float">
            <text:p>3.2</text:p>
          </table:table-cell>
          <table:table-cell table:style-name="ce1165" table:formula="of:=HLOOKUP([.P10];[.$AF$25:.$AW$26];2;0)" office:value-type="float" office:value="4" calcext:value-type="float">
            <text:p>4.0</text:p>
          </table:table-cell>
          <table:table-cell table:style-name="ce1170" table:formula="of:=HLOOKUP([.Q10];[.$AF$25:.$AW$26];2;0)" office:value-type="float" office:value="3.1" calcext:value-type="float">
            <text:p>3.1</text:p>
          </table:table-cell>
          <table:table-cell table:style-name="ce1170" table:formula="of:=HLOOKUP([.R10];[.$AF$25:.$AW$26];2;0)" office:value-type="float" office:value="4.5" calcext:value-type="float">
            <text:p>4.5</text:p>
          </table:table-cell>
          <table:table-cell/>
          <table:table-cell table:style-name="ce1176" table:formula="of:=HLOOKUP([.T10];[.$AF$25:.$AW$26];2;0)" office:value-type="float" office:value="4" calcext:value-type="float">
            <text:p>4.0</text:p>
          </table:table-cell>
          <table:table-cell table:style-name="ce1181" table:formula="of:=HLOOKUP([.U10];[.$AF$25:.$AW$26];2;0)" office:value-type="float" office:value="4.5" calcext:value-type="float">
            <text:p>4.5</text:p>
          </table:table-cell>
          <table:table-cell table:style-name="ce1184" table:formula="of:=HLOOKUP([.V10];[.$AF$25:.$AW$26];2;0)" office:value-type="float" office:value="3.5" calcext:value-type="float">
            <text:p>3.5</text:p>
          </table:table-cell>
          <table:table-cell table:style-name="ce1188" table:formula="of:=HLOOKUP([.W10];[.$AF$25:.$AW$26];2;0)" office:value-type="float" office:value="3.1" calcext:value-type="float">
            <text:p>3.1</text:p>
          </table:table-cell>
          <table:table-cell table:style-name="ce1188" table:formula="of:=HLOOKUP([.X10];[.$AF$25:.$AW$26];2;0)" office:value-type="float" office:value="3.2" calcext:value-type="float">
            <text:p>3.2</text:p>
          </table:table-cell>
          <table:table-cell/>
          <table:table-cell table:style-name="ce1195" table:formula="of:=HLOOKUP([.Z10];[.$AF$25:.$AW$26];2;0)" office:value-type="float" office:value="3.1" calcext:value-type="float">
            <text:p>3.1</text:p>
          </table:table-cell>
          <table:table-cell table:style-name="ce1200" table:formula="of:=HLOOKUP([.AA10];[.$AF$25:.$AW$26];2;0)" office:value-type="float" office:value="3.2" calcext:value-type="float">
            <text:p>3.2</text:p>
          </table:table-cell>
          <table:table-cell table:style-name="ce1203" table:formula="of:=HLOOKUP([.AB10];[.$AF$25:.$AW$26];2;0)" office:value-type="float" office:value="3.5" calcext:value-type="float">
            <text:p>3.5</text:p>
          </table:table-cell>
          <table:table-cell table:style-name="ce1206" table:formula="of:=HLOOKUP([.AC10];[.$AF$25:.$AW$26];2;0)" office:value-type="float" office:value="4" calcext:value-type="float">
            <text:p>4.0</text:p>
          </table:table-cell>
          <table:table-cell table:style-name="ce1206" table:formula="of:=HLOOKUP([.AD10];[.$AF$25:.$AW$26];2;0)" office:value-type="float" office:value="4.5" calcext:value-type="float">
            <text:p>4.5</text:p>
          </table:table-cell>
          <table:table-cell table:style-name="ce623"/>
          <table:table-cell table:number-columns-repeated="31"/>
          <table:table-cell table:formula="of:=COM.MICROSOFT.CONCAT(&quot;&quot;&quot;13&quot;&quot;: { &quot;;COM.MICROSOFT.TEXTJOIN(&quot;, &quot;;TRUE();[.AX16:.BB18]);&quot;}&quot;)" office:value-type="string" office:string-value="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" calcext:value-type="string">
            <text:p>"13": { "0": 13, "1": 12, "2": 8, "3": 11, "4": 14, "5": 6, "6": 4, "7": 3, "8": 7, "9": 9, "10": 5, "11": 2, "12": 1, "13": 4, "14": 10}</text:p>
          </table:table-cell>
          <table:table-cell table:number-columns-repeated="36"/>
        </table:table-row>
        <table:table-row table:style-name="ro1">
          <table:table-cell/>
          <table:table-cell table:style-name="ce639" table:number-columns-repeated="29"/>
          <table:table-cell table:style-name="ce623"/>
          <table:table-cell table:style-name="ce875" table:formula="of:=COM.MICROSOFT.TEXTJOIN(&quot;, &quot;;TRUE();[.AF26:.AT26])" office:value-type="string" office:string-value="1, 1.1, 1.2, 1.3, 1.6, 2, 2.1, 2.2, 2.3, 3, 3.1, 3.2, 3.5, 4, 4.5" calcext:value-type="string">
            <text:p>1, 1.1, 1.2, 1.3, 1.6, 2, 2.1, 2.2, 2.3, 3, 3.1, 3.2, 3.5, 4, 4.5</text:p>
          </table:table-cell>
          <table:table-cell table:style-name="ce875" table:number-columns-repeated="17"/>
          <table:table-cell table:number-columns-repeated="13"/>
          <table:table-cell table:formula="of:=COM.MICROSOFT.CONCAT(&quot;&quot;&quot;14&quot;&quot;: { &quot;;COM.MICROSOFT.TEXTJOIN(&quot;, &quot;;TRUE();[.BD16:.BH18]);&quot;}&quot;)" office:value-type="string" office:string-value="&quot;14&quot;: { &quot;0&quot;: 14, &quot;1&quot;: 13, &quot;2&quot;: 12, &quot;3&quot;: 10, &quot;4&quot;: 11, &quot;5&quot;: 7, &quot;6&quot;: 5, &quot;7&quot;: 3, &quot;8&quot;: 2, &quot;9&quot;: 9, &quot;10&quot;: 8, &quot;11&quot;: 6, &quot;12&quot;: 4, &quot;13&quot;: 1, &quot;14&quot;: 12}" calcext:value-type="string">
            <text:p>"14": { "0": 14, "1": 13, "2": 12, "3": 10, "4": 11, "5": 7, "6": 5, "7": 3, "8": 2, "9": 9, "10": 8, "11": 6, "12": 4, "13": 1, "14": 12}</text:p>
          </table:table-cell>
          <table:table-cell table:number-columns-repeated="36"/>
        </table:table-row>
        <table:table-row table:style-name="ro1">
          <table:table-cell/>
          <table:table-cell table:style-name="ce640" table:formula="of:=SUM([.B30:.F32])-[.B31]" office:value-type="float" office:value="35.1" calcext:value-type="float" table:number-columns-spanned="2" table:number-rows-spanned="1">
            <text:p>35.1</text:p>
          </table:table-cell>
          <table:covered-table-cell table:style-name="ce647"/>
          <table:table-cell table:style-name="ce647" table:number-columns-repeated="3"/>
          <table:table-cell/>
          <table:table-cell table:style-name="ce640" table:formula="of:=SUM([.H30:.L32])-[.I31]" office:value-type="float" office:value="35.1" calcext:value-type="float" table:number-columns-spanned="2" table:number-rows-spanned="1">
            <text:p>35.1</text:p>
          </table:table-cell>
          <table:covered-table-cell table:style-name="ce647"/>
          <table:table-cell table:style-name="ce647" table:number-columns-repeated="3"/>
          <table:table-cell/>
          <table:table-cell table:style-name="ce640" table:formula="of:=SUM([.N30:.R32])-[.P31]" office:value-type="float" office:value="35.1" calcext:value-type="float" table:number-columns-spanned="2" table:number-rows-spanned="1">
            <text:p>35.1</text:p>
          </table:table-cell>
          <table:covered-table-cell table:style-name="ce647"/>
          <table:table-cell table:style-name="ce647" table:number-columns-repeated="3"/>
          <table:table-cell/>
          <table:table-cell table:style-name="ce640" table:formula="of:=SUM([.T30:.X32])-[.W31]" office:value-type="float" office:value="35.1" calcext:value-type="float" table:number-columns-spanned="2" table:number-rows-spanned="1">
            <text:p>35.1</text:p>
          </table:table-cell>
          <table:covered-table-cell table:style-name="ce647"/>
          <table:table-cell table:style-name="ce647" table:number-columns-repeated="3"/>
          <table:table-cell/>
          <table:table-cell table:style-name="ce640" table:formula="of:=SUM([.Z30:.AD32])-[.AD31]" office:value-type="float" office:value="35.1" calcext:value-type="float" table:number-columns-spanned="2" table:number-rows-spanned="1">
            <text:p>35.1</text:p>
          </table:table-cell>
          <table:covered-table-cell table:style-name="ce647"/>
          <table:table-cell table:style-name="ce647" table:number-columns-repeated="3"/>
          <table:table-cell table:style-name="ce623"/>
          <table:table-cell table:number-columns-repeated="68"/>
        </table:table-row>
        <table:table-row table:style-name="ro1">
          <table:table-cell/>
          <table:table-cell table:style-name="ce1117" table:formula="of:=HLOOKUP([.B12];[.$AF$25:.$AW$26];2;0)" office:value-type="float" office:value="4.5" calcext:value-type="float">
            <text:p>4.5</text:p>
          </table:table-cell>
          <table:table-cell table:style-name="ce1124" table:formula="of:=HLOOKUP([.C12];[.$AF$25:.$AW$26];2;0)" office:value-type="float" office:value="3" calcext:value-type="float">
            <text:p>3.0</text:p>
          </table:table-cell>
          <table:table-cell table:style-name="ce1131" table:formula="of:=HLOOKUP([.D12];[.$AF$25:.$AW$26];2;0)" office:value-type="float" office:value="1.6" calcext:value-type="float">
            <text:p>1.6</text:p>
          </table:table-cell>
          <table:table-cell table:style-name="ce1134" table:formula="of:=HLOOKUP([.E12];[.$AF$25:.$AW$26];2;0)" office:value-type="float" office:value="2" calcext:value-type="float">
            <text:p>2.0</text:p>
          </table:table-cell>
          <table:table-cell table:style-name="ce1134" table:formula="of:=HLOOKUP([.F12];[.$AF$25:.$AW$26];2;0)" office:value-type="float" office:value="3.1" calcext:value-type="float">
            <text:p>3.1</text:p>
          </table:table-cell>
          <table:table-cell/>
          <table:table-cell table:style-name="ce1139" table:formula="of:=HLOOKUP([.H12];[.$AF$25:.$AW$26];2;0)" office:value-type="float" office:value="4.5" calcext:value-type="float">
            <text:p>4.5</text:p>
          </table:table-cell>
          <table:table-cell table:style-name="ce1145" table:formula="of:=HLOOKUP([.I12];[.$AF$25:.$AW$26];2;0)" office:value-type="float" office:value="2.3" calcext:value-type="float">
            <text:p>2.3</text:p>
          </table:table-cell>
          <table:table-cell table:style-name="ce1150" table:formula="of:=HLOOKUP([.J12];[.$AF$25:.$AW$26];2;0)" office:value-type="float" office:value="1.3" calcext:value-type="float">
            <text:p>1.3</text:p>
          </table:table-cell>
          <table:table-cell table:style-name="ce1153" table:formula="of:=HLOOKUP([.K12];[.$AF$25:.$AW$26];2;0)" office:value-type="float" office:value="2" calcext:value-type="float">
            <text:p>2.0</text:p>
          </table:table-cell>
          <table:table-cell table:style-name="ce1153" table:formula="of:=HLOOKUP([.L12];[.$AF$25:.$AW$26];2;0)" office:value-type="float" office:value="4" calcext:value-type="float">
            <text:p>4.0</text:p>
          </table:table-cell>
          <table:table-cell/>
          <table:table-cell table:style-name="ce1157" table:formula="of:=HLOOKUP([.N12];[.$AF$25:.$AW$26];2;0)" office:value-type="float" office:value="4.5" calcext:value-type="float">
            <text:p>4.5</text:p>
          </table:table-cell>
          <table:table-cell table:style-name="ce1162" table:formula="of:=HLOOKUP([.O12];[.$AF$25:.$AW$26];2;0)" office:value-type="float" office:value="2.3" calcext:value-type="float">
            <text:p>2.3</text:p>
          </table:table-cell>
          <table:table-cell table:style-name="ce1166" table:formula="of:=HLOOKUP([.P12];[.$AF$25:.$AW$26];2;0)" office:value-type="float" office:value="1.6" calcext:value-type="float">
            <text:p>1.6</text:p>
          </table:table-cell>
          <table:table-cell table:style-name="ce1171" table:formula="of:=HLOOKUP([.Q12];[.$AF$25:.$AW$26];2;0)" office:value-type="float" office:value="3" calcext:value-type="float">
            <text:p>3.0</text:p>
          </table:table-cell>
          <table:table-cell table:style-name="ce1171" table:formula="of:=HLOOKUP([.R12];[.$AF$25:.$AW$26];2;0)" office:value-type="float" office:value="4" calcext:value-type="float">
            <text:p>4.0</text:p>
          </table:table-cell>
          <table:table-cell/>
          <table:table-cell table:style-name="ce1177" table:formula="of:=HLOOKUP([.T12];[.$AF$25:.$AW$26];2;0)" office:value-type="float" office:value="4" calcext:value-type="float">
            <text:p>4.0</text:p>
          </table:table-cell>
          <table:table-cell table:style-name="ce1182" table:formula="of:=HLOOKUP([.U12];[.$AF$25:.$AW$26];2;0)" office:value-type="float" office:value="2" calcext:value-type="float">
            <text:p>2.0</text:p>
          </table:table-cell>
          <table:table-cell table:style-name="ce1185" table:formula="of:=HLOOKUP([.V12];[.$AF$25:.$AW$26];2;0)" office:value-type="float" office:value="1.3" calcext:value-type="float">
            <text:p>1.3</text:p>
          </table:table-cell>
          <table:table-cell table:style-name="ce1189" table:formula="of:=HLOOKUP([.W12];[.$AF$25:.$AW$26];2;0)" office:value-type="float" office:value="2.1" calcext:value-type="float">
            <text:p>2.1</text:p>
          </table:table-cell>
          <table:table-cell table:style-name="ce1189" table:formula="of:=HLOOKUP([.X12];[.$AF$25:.$AW$26];2;0)" office:value-type="float" office:value="4.5" calcext:value-type="float">
            <text:p>4.5</text:p>
          </table:table-cell>
          <table:table-cell/>
          <table:table-cell table:style-name="ce1196" table:formula="of:=HLOOKUP([.Z12];[.$AF$25:.$AW$26];2;0)" office:value-type="float" office:value="4" calcext:value-type="float">
            <text:p>4.0</text:p>
          </table:table-cell>
          <table:table-cell table:style-name="ce1201" table:formula="of:=HLOOKUP([.AA12];[.$AF$25:.$AW$26];2;0)" office:value-type="float" office:value="2.2" calcext:value-type="float">
            <text:p>2.2</text:p>
          </table:table-cell>
          <table:table-cell table:style-name="ce1204" table:formula="of:=HLOOKUP([.AB12];[.$AF$25:.$AW$26];2;0)" office:value-type="float" office:value="1.6" calcext:value-type="float">
            <text:p>1.6</text:p>
          </table:table-cell>
          <table:table-cell table:style-name="ce1207" table:formula="of:=HLOOKUP([.AC12];[.$AF$25:.$AW$26];2;0)" office:value-type="float" office:value="1.3" calcext:value-type="float">
            <text:p>1.3</text:p>
          </table:table-cell>
          <table:table-cell table:style-name="ce1207" table:formula="of:=HLOOKUP([.AD12];[.$AF$25:.$AW$26];2;0)" office:value-type="float" office:value="3" calcext:value-type="float">
            <text:p>3.0</text:p>
          </table:table-cell>
          <table:table-cell table:style-name="ce623"/>
          <table:table-cell table:number-columns-repeated="31"/>
          <table:table-cell table:formula="of:=COM.MICROSOFT.TEXTJOIN(&quot;, &quot;;TRUE();[.BK24:.BK28])" office:value-type="string" office:string-value="&quot;10&quot;: { &quot;0&quot;: 13, &quot;1&quot;: 14, &quot;2&quot;: 10, &quot;3&quot;: 11, &quot;4&quot;: 12, &quot;5&quot;: 9, &quot;6&quot;: 8, &quot;7&quot;: 4, &quot;8&quot;: 5, &quot;9&quot;: 6, &quot;10&quot;: 11, &quot;11&quot;: 1, &quot;12&quot;: 2, &quot;13&quot;: 3, &quot;14&quot;: 7}, &quot;11&quot;: { &quot;0&quot;: 14, &quot;1&quot;: 13, &quot;2&quot;: 8, &quot;3&quot;: 10, &quot;4&quot;: 11, &quot;5&quot;: 12, &quot;6&quot;: 5, &quot;7&quot;: 3, &quot;8&quot;: 4, &quot;9&quot;: 6, &quot;10&quot;: 7, &quot;11&quot;: 10, &quot;12&quot;: 1, &quot;13&quot;: 2, &quot;14&quot;: 9}, &quot;12&quot;: { &quot;0&quot;: 14, &quot;1&quot;: 13, &quot;2&quot;: 10, &quot;3&quot;: 9, &quot;4&quot;: 12, &quot;5&quot;: 10, &quot;6&quot;: 6, &quot;7&quot;: 4, &quot;8&quot;: 3, &quot;9&quot;: 8, &quot;10&quot;: 5, &quot;11&quot;: 2, &quot;12&quot;: 9, &quot;13&quot;: 1, &quot;14&quot;: 11}, 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, &quot;14&quot;: { &quot;0&quot;: 14, &quot;1&quot;: 13, &quot;2&quot;: 12, &quot;3&quot;: 10, &quot;4&quot;: 11, &quot;5&quot;: 7, &quot;6&quot;: 5, &quot;7&quot;: 3, &quot;8&quot;: 2, &quot;9&quot;: 9, &quot;10&quot;: 8, &quot;11&quot;: 6, &quot;12&quot;: 4, &quot;13&quot;: 1, &quot;14&quot;: 12}" calcext:value-type="string">
            <text:p>"10": { "0": 13, "1": 14, "2": 10, "3": 11, "4": 12, "5": 9, "6": 8, "7": 4, "8": 5, "9": 6, "10": 11, "11": 1, "12": 2, "13": 3, "14": 7}, "11": { "0": 14, "1": 13, "2": 8, "3": 10, "4": 11, "5": 12, "6": 5, "7": 3, "8": 4, "9": 6, "10": 7, "11": 10, "12": 1, "13": 2, "14": 9}, "12": { "0": 14, "1": 13, "2": 10, "3": 9, "4": 12, "5": 10, "6": 6, "7": 4, "8": 3, "9": 8, "10": 5, "11": 2, "12": 9, "13": 1, "14": 11}, "13": { "0": 13, "1": 12, "2": 8, "3": 11, "4": 14, "5": 6, "6": 4, "7": 3, "8": 7, "9": 9, "10": 5, "11": 2, "12": 1, "13": 4, "14": 10}, "14": { "0": 14, "1": 13, "2": 12, "3": 10, "4": 11, "5": 7, "6": 5, "7": 3, "8": 2, "9": 9, "10": 8, "11": 6, "12": 4, "13": 1, "14": 12}</text:p>
          </table:table-cell>
          <table:table-cell table:number-columns-repeated="36"/>
        </table:table-row>
        <table:table-row table:style-name="ro1">
          <table:table-cell/>
          <table:table-cell table:style-name="ce1118" table:formula="of:=HLOOKUP([.B13];[.$AF$25:.$AW$26];2;0)" office:value-type="float" office:value="2.2" calcext:value-type="float">
            <text:p>2.2</text:p>
          </table:table-cell>
          <table:table-cell table:style-name="ce1124" table:formula="of:=HLOOKUP([.C13];[.$AF$25:.$AW$26];2;0)" office:value-type="float" office:value="1.1" calcext:value-type="float">
            <text:p>1.1</text:p>
          </table:table-cell>
          <table:table-cell table:style-name="ce1131" table:formula="of:=HLOOKUP([.D13];[.$AF$25:.$AW$26];2;0)" office:value-type="float" office:value="1.2" calcext:value-type="float">
            <text:p>1.2</text:p>
          </table:table-cell>
          <table:table-cell table:style-name="ce1134" table:formula="of:=HLOOKUP([.E13];[.$AF$25:.$AW$26];2;0)" office:value-type="float" office:value="1.3" calcext:value-type="float">
            <text:p>1.3</text:p>
          </table:table-cell>
          <table:table-cell table:style-name="ce1134" table:formula="of:=HLOOKUP([.F13];[.$AF$25:.$AW$26];2;0)" office:value-type="float" office:value="2.2" calcext:value-type="float">
            <text:p>2.2</text:p>
          </table:table-cell>
          <table:table-cell/>
          <table:table-cell table:style-name="ce1140" table:formula="of:=HLOOKUP([.H13];[.$AF$25:.$AW$26];2;0)" office:value-type="float" office:value="2.1" calcext:value-type="float">
            <text:p>2.1</text:p>
          </table:table-cell>
          <table:table-cell table:style-name="ce1146" table:formula="of:=HLOOKUP([.I13];[.$AF$25:.$AW$26];2;0)" office:value-type="float" office:value="1.2" calcext:value-type="float">
            <text:p>1.2</text:p>
          </table:table-cell>
          <table:table-cell table:style-name="ce1150" table:formula="of:=HLOOKUP([.J13];[.$AF$25:.$AW$26];2;0)" office:value-type="float" office:value="1.1" calcext:value-type="float">
            <text:p>1.1</text:p>
          </table:table-cell>
          <table:table-cell table:style-name="ce1153" table:formula="of:=HLOOKUP([.K13];[.$AF$25:.$AW$26];2;0)" office:value-type="float" office:value="1.2" calcext:value-type="float">
            <text:p>1.2</text:p>
          </table:table-cell>
          <table:table-cell table:style-name="ce1153" table:formula="of:=HLOOKUP([.L13];[.$AF$25:.$AW$26];2;0)" office:value-type="float" office:value="2.2" calcext:value-type="float">
            <text:p>2.2</text:p>
          </table:table-cell>
          <table:table-cell/>
          <table:table-cell table:style-name="ce1158" table:formula="of:=HLOOKUP([.N13];[.$AF$25:.$AW$26];2;0)" office:value-type="float" office:value="2" calcext:value-type="float">
            <text:p>2.0</text:p>
          </table:table-cell>
          <table:table-cell table:style-name="ce1162" table:formula="of:=HLOOKUP([.O13];[.$AF$25:.$AW$26];2;0)" office:value-type="float" office:value="1.2" calcext:value-type="float">
            <text:p>1.2</text:p>
          </table:table-cell>
          <table:table-cell table:style-name="ce1167" table:formula="of:=HLOOKUP([.P13];[.$AF$25:.$AW$26];2;0)" office:value-type="float" office:value="1" calcext:value-type="float">
            <text:p>1.0</text:p>
          </table:table-cell>
          <table:table-cell table:style-name="ce1171" table:formula="of:=HLOOKUP([.Q13];[.$AF$25:.$AW$26];2;0)" office:value-type="float" office:value="1.1" calcext:value-type="float">
            <text:p>1.1</text:p>
          </table:table-cell>
          <table:table-cell table:style-name="ce1171" table:formula="of:=HLOOKUP([.R13];[.$AF$25:.$AW$26];2;0)" office:value-type="float" office:value="3.1" calcext:value-type="float">
            <text:p>3.1</text:p>
          </table:table-cell>
          <table:table-cell/>
          <table:table-cell table:style-name="ce1178" table:formula="of:=HLOOKUP([.T13];[.$AF$25:.$AW$26];2;0)" office:value-type="float" office:value="1.6" calcext:value-type="float">
            <text:p>1.6</text:p>
          </table:table-cell>
          <table:table-cell table:style-name="ce1182" table:formula="of:=HLOOKUP([.U13];[.$AF$25:.$AW$26];2;0)" office:value-type="float" office:value="1.2" calcext:value-type="float">
            <text:p>1.2</text:p>
          </table:table-cell>
          <table:table-cell table:style-name="ce1185" table:formula="of:=HLOOKUP([.V13];[.$AF$25:.$AW$26];2;0)" office:value-type="float" office:value="1.1" calcext:value-type="float">
            <text:p>1.1</text:p>
          </table:table-cell>
          <table:table-cell table:style-name="ce1190" table:formula="of:=HLOOKUP([.W13];[.$AF$25:.$AW$26];2;0)" office:value-type="float" office:value="1.1" calcext:value-type="float">
            <text:p>1.1</text:p>
          </table:table-cell>
          <table:table-cell table:style-name="ce1189" table:formula="of:=HLOOKUP([.X13];[.$AF$25:.$AW$26];2;0)" office:value-type="float" office:value="3.1" calcext:value-type="float">
            <text:p>3.1</text:p>
          </table:table-cell>
          <table:table-cell/>
          <table:table-cell table:style-name="ce1197" table:formula="of:=HLOOKUP([.Z13];[.$AF$25:.$AW$26];2;0)" office:value-type="float" office:value="2.1" calcext:value-type="float">
            <text:p>2.1</text:p>
          </table:table-cell>
          <table:table-cell table:style-name="ce1201" table:formula="of:=HLOOKUP([.AA13];[.$AF$25:.$AW$26];2;0)" office:value-type="float" office:value="2" calcext:value-type="float">
            <text:p>2.0</text:p>
          </table:table-cell>
          <table:table-cell table:style-name="ce1204" table:formula="of:=HLOOKUP([.AB13];[.$AF$25:.$AW$26];2;0)" office:value-type="float" office:value="1.2" calcext:value-type="float">
            <text:p>1.2</text:p>
          </table:table-cell>
          <table:table-cell table:style-name="ce1207" table:formula="of:=HLOOKUP([.AC13];[.$AF$25:.$AW$26];2;0)" office:value-type="float" office:value="1.1" calcext:value-type="float">
            <text:p>1.1</text:p>
          </table:table-cell>
          <table:table-cell table:style-name="ce1210" table:formula="of:=HLOOKUP([.AD13];[.$AF$25:.$AW$26];2;0)" office:value-type="float" office:value="2.3" calcext:value-type="float">
            <text:p>2.3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1119" table:formula="of:=HLOOKUP([.B14];[.$AF$25:.$AW$26];2;0)" office:value-type="float" office:value="3.5" calcext:value-type="float">
            <text:p>3.5</text:p>
          </table:table-cell>
          <table:table-cell table:style-name="ce1124" table:formula="of:=HLOOKUP([.C14];[.$AF$25:.$AW$26];2;0)" office:value-type="float" office:value="4" calcext:value-type="float">
            <text:p>4.0</text:p>
          </table:table-cell>
          <table:table-cell table:style-name="ce1131" table:formula="of:=HLOOKUP([.D14];[.$AF$25:.$AW$26];2;0)" office:value-type="float" office:value="3.2" calcext:value-type="float">
            <text:p>3.2</text:p>
          </table:table-cell>
          <table:table-cell table:style-name="ce1134" table:formula="of:=HLOOKUP([.E14];[.$AF$25:.$AW$26];2;0)" office:value-type="float" office:value="2.1" calcext:value-type="float">
            <text:p>2.1</text:p>
          </table:table-cell>
          <table:table-cell table:style-name="ce1134" table:formula="of:=HLOOKUP([.F14];[.$AF$25:.$AW$26];2;0)" office:value-type="float" office:value="2.3" calcext:value-type="float">
            <text:p>2.3</text:p>
          </table:table-cell>
          <table:table-cell/>
          <table:table-cell table:style-name="ce1140" table:formula="of:=HLOOKUP([.H14];[.$AF$25:.$AW$26];2;0)" office:value-type="float" office:value="3.2" calcext:value-type="float">
            <text:p>3.2</text:p>
          </table:table-cell>
          <table:table-cell table:style-name="ce1145" table:formula="of:=HLOOKUP([.I14];[.$AF$25:.$AW$26];2;0)" office:value-type="float" office:value="3" calcext:value-type="float">
            <text:p>3.0</text:p>
          </table:table-cell>
          <table:table-cell table:style-name="ce1150" table:formula="of:=HLOOKUP([.J14];[.$AF$25:.$AW$26];2;0)" office:value-type="float" office:value="3.1" calcext:value-type="float">
            <text:p>3.1</text:p>
          </table:table-cell>
          <table:table-cell table:style-name="ce1153" table:formula="of:=HLOOKUP([.K14];[.$AF$25:.$AW$26];2;0)" office:value-type="float" office:value="1.6" calcext:value-type="float">
            <text:p>1.6</text:p>
          </table:table-cell>
          <table:table-cell table:style-name="ce1153" table:formula="of:=HLOOKUP([.L14];[.$AF$25:.$AW$26];2;0)" office:value-type="float" office:value="3.5" calcext:value-type="float">
            <text:p>3.5</text:p>
          </table:table-cell>
          <table:table-cell/>
          <table:table-cell table:style-name="ce1158" table:formula="of:=HLOOKUP([.N14];[.$AF$25:.$AW$26];2;0)" office:value-type="float" office:value="3.2" calcext:value-type="float">
            <text:p>3.2</text:p>
          </table:table-cell>
          <table:table-cell table:style-name="ce1162" table:formula="of:=HLOOKUP([.O14];[.$AF$25:.$AW$26];2;0)" office:value-type="float" office:value="2.1" calcext:value-type="float">
            <text:p>2.1</text:p>
          </table:table-cell>
          <table:table-cell table:style-name="ce1166" table:formula="of:=HLOOKUP([.P14];[.$AF$25:.$AW$26];2;0)" office:value-type="float" office:value="2.2" calcext:value-type="float">
            <text:p>2.2</text:p>
          </table:table-cell>
          <table:table-cell table:style-name="ce1171" table:formula="of:=HLOOKUP([.Q14];[.$AF$25:.$AW$26];2;0)" office:value-type="float" office:value="1.3" calcext:value-type="float">
            <text:p>1.3</text:p>
          </table:table-cell>
          <table:table-cell table:style-name="ce1171" table:formula="of:=HLOOKUP([.R14];[.$AF$25:.$AW$26];2;0)" office:value-type="float" office:value="3.5" calcext:value-type="float">
            <text:p>3.5</text:p>
          </table:table-cell>
          <table:table-cell/>
          <table:table-cell table:style-name="ce1178" table:formula="of:=HLOOKUP([.T14];[.$AF$25:.$AW$26];2;0)" office:value-type="float" office:value="2.3" calcext:value-type="float">
            <text:p>2.3</text:p>
          </table:table-cell>
          <table:table-cell table:style-name="ce1182" table:formula="of:=HLOOKUP([.U14];[.$AF$25:.$AW$26];2;0)" office:value-type="float" office:value="3.2" calcext:value-type="float">
            <text:p>3.2</text:p>
          </table:table-cell>
          <table:table-cell table:style-name="ce1185" table:formula="of:=HLOOKUP([.V14];[.$AF$25:.$AW$26];2;0)" office:value-type="float" office:value="2.2" calcext:value-type="float">
            <text:p>2.2</text:p>
          </table:table-cell>
          <table:table-cell table:style-name="ce1189" table:formula="of:=HLOOKUP([.W14];[.$AF$25:.$AW$26];2;0)" office:value-type="float" office:value="3" calcext:value-type="float">
            <text:p>3.0</text:p>
          </table:table-cell>
          <table:table-cell table:style-name="ce1189" table:formula="of:=HLOOKUP([.X14];[.$AF$25:.$AW$26];2;0)" office:value-type="float" office:value="3.5" calcext:value-type="float">
            <text:p>3.5</text:p>
          </table:table-cell>
          <table:table-cell/>
          <table:table-cell table:style-name="ce1197" table:formula="of:=HLOOKUP([.Z14];[.$AF$25:.$AW$26];2;0)" office:value-type="float" office:value="3.2" calcext:value-type="float">
            <text:p>3.2</text:p>
          </table:table-cell>
          <table:table-cell table:style-name="ce1201" table:formula="of:=HLOOKUP([.AA14];[.$AF$25:.$AW$26];2;0)" office:value-type="float" office:value="3.5" calcext:value-type="float">
            <text:p>3.5</text:p>
          </table:table-cell>
          <table:table-cell table:style-name="ce1204" table:formula="of:=HLOOKUP([.AB14];[.$AF$25:.$AW$26];2;0)" office:value-type="float" office:value="4.5" calcext:value-type="float">
            <text:p>4.5</text:p>
          </table:table-cell>
          <table:table-cell table:style-name="ce1207" table:formula="of:=HLOOKUP([.AC14];[.$AF$25:.$AW$26];2;0)" office:value-type="float" office:value="3.1" calcext:value-type="float">
            <text:p>3.1</text:p>
          </table:table-cell>
          <table:table-cell table:style-name="ce1207" table:formula="of:=HLOOKUP([.AD14];[.$AF$25:.$AW$26];2;0)" office:value-type="float" office:value="2.3" calcext:value-type="float">
            <text:p>2.3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647" table:number-columns-repeated="5"/>
          <table:table-cell/>
          <table:table-cell table:style-name="ce647" table:number-columns-repeated="5"/>
          <table:table-cell/>
          <table:table-cell table:style-name="ce647" table:number-columns-repeated="5"/>
          <table:table-cell/>
          <table:table-cell table:style-name="ce647" table:number-columns-repeated="5"/>
          <table:table-cell/>
          <table:table-cell table:style-name="ce647" table:number-columns-repeated="5"/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640" table:formula="of:=SUM([.B35:.F37])-[.B37]" office:value-type="float" office:value="35.1" calcext:value-type="float" table:number-columns-spanned="2" table:number-rows-spanned="1">
            <text:p>35.1</text:p>
          </table:table-cell>
          <table:covered-table-cell table:style-name="ce647"/>
          <table:table-cell table:style-name="ce647" table:number-columns-repeated="3"/>
          <table:table-cell/>
          <table:table-cell table:style-name="ce640" table:formula="of:=SUM([.H35:.L37])-[.I37]" office:value-type="float" office:value="35.1" calcext:value-type="float" table:number-columns-spanned="2" table:number-rows-spanned="1">
            <text:p>35.1</text:p>
          </table:table-cell>
          <table:covered-table-cell table:style-name="ce647"/>
          <table:table-cell table:style-name="ce647" table:number-columns-repeated="3"/>
          <table:table-cell/>
          <table:table-cell table:style-name="ce640" table:formula="of:=SUM([.N35:.R37])-[.P37]" office:value-type="float" office:value="36" calcext:value-type="float" table:number-columns-spanned="2" table:number-rows-spanned="1">
            <text:p>36.0</text:p>
          </table:table-cell>
          <table:covered-table-cell table:style-name="ce647"/>
          <table:table-cell table:style-name="ce647" table:number-columns-repeated="3"/>
          <table:table-cell/>
          <table:table-cell table:style-name="ce640" table:formula="of:=SUM([.T35:.X37])-[.W37]" office:value-type="float" office:value="35.1" calcext:value-type="float" table:number-columns-spanned="2" table:number-rows-spanned="1">
            <text:p>35.1</text:p>
          </table:table-cell>
          <table:covered-table-cell table:style-name="ce647"/>
          <table:table-cell table:style-name="ce647" table:number-columns-repeated="3"/>
          <table:table-cell/>
          <table:table-cell table:style-name="ce640" table:formula="of:=SUM([.Z35:.AD37])-[.AD37]" office:value-type="float" office:value="35.1" calcext:value-type="float" table:number-columns-spanned="2" table:number-rows-spanned="1">
            <text:p>35.1</text:p>
          </table:table-cell>
          <table:covered-table-cell table:style-name="ce647"/>
          <table:table-cell table:style-name="ce647" table:number-columns-repeated="3"/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1120" table:formula="of:=HLOOKUP([.B16];[.$AF$25:.$AW$26];2;0)" office:value-type="float" office:value="4" calcext:value-type="float">
            <text:p>4.0</text:p>
          </table:table-cell>
          <table:table-cell table:style-name="ce1125" table:formula="of:=HLOOKUP([.C16];[.$AF$25:.$AW$26];2;0)" office:value-type="float" office:value="4.5" calcext:value-type="float">
            <text:p>4.5</text:p>
          </table:table-cell>
          <table:table-cell table:style-name="ce1132" table:formula="of:=HLOOKUP([.D16];[.$AF$25:.$AW$26];2;0)" office:value-type="float" office:value="3.1" calcext:value-type="float">
            <text:p>3.1</text:p>
          </table:table-cell>
          <table:table-cell table:style-name="ce1136" table:formula="of:=HLOOKUP([.E16];[.$AF$25:.$AW$26];2;0)" office:value-type="float" office:value="3.2" calcext:value-type="float">
            <text:p>3.2</text:p>
          </table:table-cell>
          <table:table-cell table:style-name="ce1136" table:formula="of:=HLOOKUP([.F16];[.$AF$25:.$AW$26];2;0)" office:value-type="float" office:value="3.5" calcext:value-type="float">
            <text:p>3.5</text:p>
          </table:table-cell>
          <table:table-cell/>
          <table:table-cell table:style-name="ce1141" table:formula="of:=HLOOKUP([.H16];[.$AF$25:.$AW$26];2;0)" office:value-type="float" office:value="4.5" calcext:value-type="float">
            <text:p>4.5</text:p>
          </table:table-cell>
          <table:table-cell table:style-name="ce1147" table:formula="of:=HLOOKUP([.I16];[.$AF$25:.$AW$26];2;0)" office:value-type="float" office:value="4" calcext:value-type="float">
            <text:p>4.0</text:p>
          </table:table-cell>
          <table:table-cell table:style-name="ce1151" table:formula="of:=HLOOKUP([.J16];[.$AF$25:.$AW$26];2;0)" office:value-type="float" office:value="2.3" calcext:value-type="float">
            <text:p>2.3</text:p>
          </table:table-cell>
          <table:table-cell table:style-name="ce1154" table:formula="of:=HLOOKUP([.K16];[.$AF$25:.$AW$26];2;0)" office:value-type="float" office:value="3.1" calcext:value-type="float">
            <text:p>3.1</text:p>
          </table:table-cell>
          <table:table-cell table:style-name="ce1154" table:formula="of:=HLOOKUP([.L16];[.$AF$25:.$AW$26];2;0)" office:value-type="float" office:value="3.2" calcext:value-type="float">
            <text:p>3.2</text:p>
          </table:table-cell>
          <table:table-cell/>
          <table:table-cell table:style-name="ce1159" table:formula="of:=HLOOKUP([.N16];[.$AF$25:.$AW$26];2;0)" office:value-type="float" office:value="4.5" calcext:value-type="float">
            <text:p>4.5</text:p>
          </table:table-cell>
          <table:table-cell table:style-name="ce1163" table:formula="of:=HLOOKUP([.O16];[.$AF$25:.$AW$26];2;0)" office:value-type="float" office:value="4" calcext:value-type="float">
            <text:p>4.0</text:p>
          </table:table-cell>
          <table:table-cell table:style-name="ce1168" table:formula="of:=HLOOKUP([.P16];[.$AF$25:.$AW$26];2;0)" office:value-type="float" office:value="3.1" calcext:value-type="float">
            <text:p>3.1</text:p>
          </table:table-cell>
          <table:table-cell table:style-name="ce1172" table:formula="of:=HLOOKUP([.Q16];[.$AF$25:.$AW$26];2;0)" office:value-type="float" office:value="3" calcext:value-type="float">
            <text:p>3.0</text:p>
          </table:table-cell>
          <table:table-cell table:style-name="ce1172" table:formula="of:=HLOOKUP([.R16];[.$AF$25:.$AW$26];2;0)" office:value-type="float" office:value="3.5" calcext:value-type="float">
            <text:p>3.5</text:p>
          </table:table-cell>
          <table:table-cell/>
          <table:table-cell table:style-name="ce1179" table:formula="of:=HLOOKUP([.T16];[.$AF$25:.$AW$26];2;0)" office:value-type="float" office:value="4" calcext:value-type="float">
            <text:p>4.0</text:p>
          </table:table-cell>
          <table:table-cell table:style-name="ce1183" table:formula="of:=HLOOKUP([.U16];[.$AF$25:.$AW$26];2;0)" office:value-type="float" office:value="3.5" calcext:value-type="float">
            <text:p>3.5</text:p>
          </table:table-cell>
          <table:table-cell table:style-name="ce1186" table:formula="of:=HLOOKUP([.V16];[.$AF$25:.$AW$26];2;0)" office:value-type="float" office:value="2.3" calcext:value-type="float">
            <text:p>2.3</text:p>
          </table:table-cell>
          <table:table-cell table:style-name="ce1191" table:formula="of:=HLOOKUP([.W16];[.$AF$25:.$AW$26];2;0)" office:value-type="float" office:value="3.2" calcext:value-type="float">
            <text:p>3.2</text:p>
          </table:table-cell>
          <table:table-cell table:style-name="ce1191" table:formula="of:=HLOOKUP([.X16];[.$AF$25:.$AW$26];2;0)" office:value-type="float" office:value="4.5" calcext:value-type="float">
            <text:p>4.5</text:p>
          </table:table-cell>
          <table:table-cell/>
          <table:table-cell table:style-name="ce1198" table:formula="of:=HLOOKUP([.Z16];[.$AF$25:.$AW$26];2;0)" office:value-type="float" office:value="4.5" calcext:value-type="float">
            <text:p>4.5</text:p>
          </table:table-cell>
          <table:table-cell table:style-name="ce1202" table:formula="of:=HLOOKUP([.AA16];[.$AF$25:.$AW$26];2;0)" office:value-type="float" office:value="4" calcext:value-type="float">
            <text:p>4.0</text:p>
          </table:table-cell>
          <table:table-cell table:style-name="ce1205" table:formula="of:=HLOOKUP([.AB16];[.$AF$25:.$AW$26];2;0)" office:value-type="float" office:value="3.5" calcext:value-type="float">
            <text:p>3.5</text:p>
          </table:table-cell>
          <table:table-cell table:style-name="ce1208" table:formula="of:=HLOOKUP([.AC16];[.$AF$25:.$AW$26];2;0)" office:value-type="float" office:value="3.1" calcext:value-type="float">
            <text:p>3.1</text:p>
          </table:table-cell>
          <table:table-cell table:style-name="ce1208" table:formula="of:=HLOOKUP([.AD16];[.$AF$25:.$AW$26];2;0)" office:value-type="float" office:value="3.2" calcext:value-type="float">
            <text:p>3.2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1121" table:formula="of:=HLOOKUP([.B17];[.$AF$25:.$AW$26];2;0)" office:value-type="float" office:value="3" calcext:value-type="float">
            <text:p>3.0</text:p>
          </table:table-cell>
          <table:table-cell table:style-name="ce1125" table:formula="of:=HLOOKUP([.C17];[.$AF$25:.$AW$26];2;0)" office:value-type="float" office:value="2.3" calcext:value-type="float">
            <text:p>2.3</text:p>
          </table:table-cell>
          <table:table-cell table:style-name="ce1132" table:formula="of:=HLOOKUP([.D17];[.$AF$25:.$AW$26];2;0)" office:value-type="float" office:value="1.6" calcext:value-type="float">
            <text:p>1.6</text:p>
          </table:table-cell>
          <table:table-cell table:style-name="ce1136" table:formula="of:=HLOOKUP([.E17];[.$AF$25:.$AW$26];2;0)" office:value-type="float" office:value="2" calcext:value-type="float">
            <text:p>2.0</text:p>
          </table:table-cell>
          <table:table-cell table:style-name="ce1136" table:formula="of:=HLOOKUP([.F17];[.$AF$25:.$AW$26];2;0)" office:value-type="float" office:value="2.1" calcext:value-type="float">
            <text:p>2.1</text:p>
          </table:table-cell>
          <table:table-cell/>
          <table:table-cell table:style-name="ce1142" table:formula="of:=HLOOKUP([.H17];[.$AF$25:.$AW$26];2;0)" office:value-type="float" office:value="3.5" calcext:value-type="float">
            <text:p>3.5</text:p>
          </table:table-cell>
          <table:table-cell table:style-name="ce1147" table:formula="of:=HLOOKUP([.I17];[.$AF$25:.$AW$26];2;0)" office:value-type="float" office:value="2" calcext:value-type="float">
            <text:p>2.0</text:p>
          </table:table-cell>
          <table:table-cell table:style-name="ce1151" table:formula="of:=HLOOKUP([.J17];[.$AF$25:.$AW$26];2;0)" office:value-type="float" office:value="1.3" calcext:value-type="float">
            <text:p>1.3</text:p>
          </table:table-cell>
          <table:table-cell table:style-name="ce1154" table:formula="of:=HLOOKUP([.K17];[.$AF$25:.$AW$26];2;0)" office:value-type="float" office:value="1.6" calcext:value-type="float">
            <text:p>1.6</text:p>
          </table:table-cell>
          <table:table-cell table:style-name="ce1154" table:formula="of:=HLOOKUP([.L17];[.$AF$25:.$AW$26];2;0)" office:value-type="float" office:value="2.1" calcext:value-type="float">
            <text:p>2.1</text:p>
          </table:table-cell>
          <table:table-cell/>
          <table:table-cell table:style-name="ce1160" table:formula="of:=HLOOKUP([.N17];[.$AF$25:.$AW$26];2;0)" office:value-type="float" office:value="3.1" calcext:value-type="float">
            <text:p>3.1</text:p>
          </table:table-cell>
          <table:table-cell table:style-name="ce1163" table:formula="of:=HLOOKUP([.O17];[.$AF$25:.$AW$26];2;0)" office:value-type="float" office:value="2.1" calcext:value-type="float">
            <text:p>2.1</text:p>
          </table:table-cell>
          <table:table-cell table:style-name="ce1168" table:formula="of:=HLOOKUP([.P17];[.$AF$25:.$AW$26];2;0)" office:value-type="float" office:value="1.6" calcext:value-type="float">
            <text:p>1.6</text:p>
          </table:table-cell>
          <table:table-cell table:style-name="ce1172" table:formula="of:=HLOOKUP([.Q17];[.$AF$25:.$AW$26];2;0)" office:value-type="float" office:value="1.3" calcext:value-type="float">
            <text:p>1.3</text:p>
          </table:table-cell>
          <table:table-cell table:style-name="ce1172" table:formula="of:=HLOOKUP([.R17];[.$AF$25:.$AW$26];2;0)" office:value-type="float" office:value="2.3" calcext:value-type="float">
            <text:p>2.3</text:p>
          </table:table-cell>
          <table:table-cell/>
          <table:table-cell table:style-name="ce1180" table:formula="of:=HLOOKUP([.T17];[.$AF$25:.$AW$26];2;0)" office:value-type="float" office:value="2.1" calcext:value-type="float">
            <text:p>2.1</text:p>
          </table:table-cell>
          <table:table-cell table:style-name="ce1183" table:formula="of:=HLOOKUP([.U17];[.$AF$25:.$AW$26];2;0)" office:value-type="float" office:value="1.6" calcext:value-type="float">
            <text:p>1.6</text:p>
          </table:table-cell>
          <table:table-cell table:style-name="ce1186" table:formula="of:=HLOOKUP([.V17];[.$AF$25:.$AW$26];2;0)" office:value-type="float" office:value="1.3" calcext:value-type="float">
            <text:p>1.3</text:p>
          </table:table-cell>
          <table:table-cell table:style-name="ce1191" table:formula="of:=HLOOKUP([.W17];[.$AF$25:.$AW$26];2;0)" office:value-type="float" office:value="2.2" calcext:value-type="float">
            <text:p>2.2</text:p>
          </table:table-cell>
          <table:table-cell table:style-name="ce1191" table:formula="of:=HLOOKUP([.X17];[.$AF$25:.$AW$26];2;0)" office:value-type="float" office:value="3" calcext:value-type="float">
            <text:p>3.0</text:p>
          </table:table-cell>
          <table:table-cell/>
          <table:table-cell table:style-name="ce1199" table:formula="of:=HLOOKUP([.Z17];[.$AF$25:.$AW$26];2;0)" office:value-type="float" office:value="2.2" calcext:value-type="float">
            <text:p>2.2</text:p>
          </table:table-cell>
          <table:table-cell table:style-name="ce1202" table:formula="of:=HLOOKUP([.AA17];[.$AF$25:.$AW$26];2;0)" office:value-type="float" office:value="2" calcext:value-type="float">
            <text:p>2.0</text:p>
          </table:table-cell>
          <table:table-cell table:style-name="ce1205" table:formula="of:=HLOOKUP([.AB17];[.$AF$25:.$AW$26];2;0)" office:value-type="float" office:value="1.3" calcext:value-type="float">
            <text:p>1.3</text:p>
          </table:table-cell>
          <table:table-cell table:style-name="ce1208" table:formula="of:=HLOOKUP([.AC17];[.$AF$25:.$AW$26];2;0)" office:value-type="float" office:value="1.2" calcext:value-type="float">
            <text:p>1.2</text:p>
          </table:table-cell>
          <table:table-cell table:style-name="ce1208" table:formula="of:=HLOOKUP([.AD17];[.$AF$25:.$AW$26];2;0)" office:value-type="float" office:value="3" calcext:value-type="float">
            <text:p>3.0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1122" table:formula="of:=HLOOKUP([.B18];[.$AF$25:.$AW$26];2;0)" office:value-type="float" office:value="3.2" calcext:value-type="float">
            <text:p>3.2</text:p>
          </table:table-cell>
          <table:table-cell table:style-name="ce1125" table:formula="of:=HLOOKUP([.C18];[.$AF$25:.$AW$26];2;0)" office:value-type="float" office:value="1.1" calcext:value-type="float">
            <text:p>1.1</text:p>
          </table:table-cell>
          <table:table-cell table:style-name="ce1132" table:formula="of:=HLOOKUP([.D18];[.$AF$25:.$AW$26];2;0)" office:value-type="float" office:value="1.2" calcext:value-type="float">
            <text:p>1.2</text:p>
          </table:table-cell>
          <table:table-cell table:style-name="ce1136" table:formula="of:=HLOOKUP([.E18];[.$AF$25:.$AW$26];2;0)" office:value-type="float" office:value="1.3" calcext:value-type="float">
            <text:p>1.3</text:p>
          </table:table-cell>
          <table:table-cell table:style-name="ce1136" table:formula="of:=HLOOKUP([.F18];[.$AF$25:.$AW$26];2;0)" office:value-type="float" office:value="2.2" calcext:value-type="float">
            <text:p>2.2</text:p>
          </table:table-cell>
          <table:table-cell/>
          <table:table-cell table:style-name="ce1142" table:formula="of:=HLOOKUP([.H18];[.$AF$25:.$AW$26];2;0)" office:value-type="float" office:value="2.2" calcext:value-type="float">
            <text:p>2.2</text:p>
          </table:table-cell>
          <table:table-cell table:style-name="ce1148" table:formula="of:=HLOOKUP([.I18];[.$AF$25:.$AW$26];2;0)" office:value-type="float" office:value="3.1" calcext:value-type="float">
            <text:p>3.1</text:p>
          </table:table-cell>
          <table:table-cell table:style-name="ce1151" table:formula="of:=HLOOKUP([.J18];[.$AF$25:.$AW$26];2;0)" office:value-type="float" office:value="1.1" calcext:value-type="float">
            <text:p>1.1</text:p>
          </table:table-cell>
          <table:table-cell table:style-name="ce1154" table:formula="of:=HLOOKUP([.K18];[.$AF$25:.$AW$26];2;0)" office:value-type="float" office:value="1.2" calcext:value-type="float">
            <text:p>1.2</text:p>
          </table:table-cell>
          <table:table-cell table:style-name="ce1154" table:formula="of:=HLOOKUP([.L18];[.$AF$25:.$AW$26];2;0)" office:value-type="float" office:value="3" calcext:value-type="float">
            <text:p>3.0</text:p>
          </table:table-cell>
          <table:table-cell/>
          <table:table-cell table:style-name="ce1160" table:formula="of:=HLOOKUP([.N18];[.$AF$25:.$AW$26];2;0)" office:value-type="float" office:value="2" calcext:value-type="float">
            <text:p>2.0</text:p>
          </table:table-cell>
          <table:table-cell table:style-name="ce1163" table:formula="of:=HLOOKUP([.O18];[.$AF$25:.$AW$26];2;0)" office:value-type="float" office:value="1.2" calcext:value-type="float">
            <text:p>1.2</text:p>
          </table:table-cell>
          <table:table-cell table:style-name="ce1169" table:formula="of:=HLOOKUP([.P18];[.$AF$25:.$AW$26];2;0)" office:value-type="float" office:value="3" calcext:value-type="float">
            <text:p>3.0</text:p>
          </table:table-cell>
          <table:table-cell table:style-name="ce1172" table:formula="of:=HLOOKUP([.Q18];[.$AF$25:.$AW$26];2;0)" office:value-type="float" office:value="1.1" calcext:value-type="float">
            <text:p>1.1</text:p>
          </table:table-cell>
          <table:table-cell table:style-name="ce1172" table:formula="of:=HLOOKUP([.R18];[.$AF$25:.$AW$26];2;0)" office:value-type="float" office:value="3.2" calcext:value-type="float">
            <text:p>3.2</text:p>
          </table:table-cell>
          <table:table-cell/>
          <table:table-cell table:style-name="ce1180" table:formula="of:=HLOOKUP([.T18];[.$AF$25:.$AW$26];2;0)" office:value-type="float" office:value="2" calcext:value-type="float">
            <text:p>2.0</text:p>
          </table:table-cell>
          <table:table-cell table:style-name="ce1183" table:formula="of:=HLOOKUP([.U18];[.$AF$25:.$AW$26];2;0)" office:value-type="float" office:value="1.2" calcext:value-type="float">
            <text:p>1.2</text:p>
          </table:table-cell>
          <table:table-cell table:style-name="ce1186" table:formula="of:=HLOOKUP([.V18];[.$AF$25:.$AW$26];2;0)" office:value-type="float" office:value="1.1" calcext:value-type="float">
            <text:p>1.1</text:p>
          </table:table-cell>
          <table:table-cell table:style-name="ce1192" table:formula="of:=HLOOKUP([.W18];[.$AF$25:.$AW$26];2;0)" office:value-type="float" office:value="1.6" calcext:value-type="float">
            <text:p>1.6</text:p>
          </table:table-cell>
          <table:table-cell table:style-name="ce1191" table:formula="of:=HLOOKUP([.X18];[.$AF$25:.$AW$26];2;0)" office:value-type="float" office:value="3.1" calcext:value-type="float">
            <text:p>3.1</text:p>
          </table:table-cell>
          <table:table-cell/>
          <table:table-cell table:style-name="ce1199" table:formula="of:=HLOOKUP([.Z18];[.$AF$25:.$AW$26];2;0)" office:value-type="float" office:value="2.3" calcext:value-type="float">
            <text:p>2.3</text:p>
          </table:table-cell>
          <table:table-cell table:style-name="ce1202" table:formula="of:=HLOOKUP([.AA18];[.$AF$25:.$AW$26];2;0)" office:value-type="float" office:value="2.1" calcext:value-type="float">
            <text:p>2.1</text:p>
          </table:table-cell>
          <table:table-cell table:style-name="ce1205" table:formula="of:=HLOOKUP([.AB18];[.$AF$25:.$AW$26];2;0)" office:value-type="float" office:value="1.6" calcext:value-type="float">
            <text:p>1.6</text:p>
          </table:table-cell>
          <table:table-cell table:style-name="ce1208" table:formula="of:=HLOOKUP([.AC18];[.$AF$25:.$AW$26];2;0)" office:value-type="float" office:value="1.1" calcext:value-type="float">
            <text:p>1.1</text:p>
          </table:table-cell>
          <table:table-cell table:style-name="ce1211" table:formula="of:=HLOOKUP([.AD18];[.$AF$25:.$AW$26];2;0)" office:value-type="float" office:value="3.5" calcext:value-type="float">
            <text:p>3.5</text:p>
          </table:table-cell>
          <table:table-cell table:number-columns-repeated="32"/>
          <table:table-cell table:style-name="Default"/>
          <table:table-cell table:number-columns-repeated="36"/>
        </table:table-row>
        <calcext:conditional-formats>
          <calcext:conditional-format calcext:target-range-address="'keys 4'.Z2:'keys 4'.AD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Z30:'keys 4'.AD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T30:'keys 4'.X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N30:'keys 4'.R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H30:'keys 4'.L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B30:'keys 4'.F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B35:'keys 4'.F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H35:'keys 4'.L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N35:'keys 4'.R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T35:'keys 4'.X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Z35:'keys 4'.AD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B25:'keys 4'.F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H25:'keys 4'.L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N25:'keys 4'.R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T25:'keys 4'.X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Z25:'keys 4'.AD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AF25:'keys 4'.AT25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T2:'keys 4'.X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AF26:'keys 4'.AT26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</calcext:conditional-formats>
      </table:table>
      <table:table table:name="keys 3" table:style-name="ta1">
        <table:table-column table:style-name="co1" table:default-cell-style-name="Default"/>
        <table:table-column table:style-name="co1" table:default-cell-style-name="ce881"/>
        <table:table-column table:style-name="co1" table:default-cell-style-name="ce845"/>
        <table:table-column table:style-name="co1" table:default-cell-style-name="ce896"/>
        <table:table-column table:style-name="co1" table:number-columns-repeated="2" table:default-cell-style-name="ce852"/>
        <table:table-column table:style-name="co1" table:default-cell-style-name="ce647"/>
        <table:table-column table:style-name="co1" table:default-cell-style-name="ce881"/>
        <table:table-column table:style-name="co1" table:default-cell-style-name="Default"/>
        <table:table-column table:style-name="co1" table:default-cell-style-name="ce896"/>
        <table:table-column table:style-name="co1" table:number-columns-repeated="2" table:default-cell-style-name="ce852"/>
        <table:table-column table:style-name="co1" table:default-cell-style-name="ce647"/>
        <table:table-column table:style-name="co1" table:default-cell-style-name="ce881"/>
        <table:table-column table:style-name="co1" table:default-cell-style-name="ce845"/>
        <table:table-column table:style-name="co1" table:default-cell-style-name="ce896"/>
        <table:table-column table:style-name="co1" table:default-cell-style-name="ce852"/>
        <table:table-column table:style-name="co1" table:default-cell-style-name="Default"/>
        <table:table-column table:style-name="co1" table:default-cell-style-name="ce647"/>
        <table:table-column table:style-name="co1" table:default-cell-style-name="ce881"/>
        <table:table-column table:style-name="co1" table:default-cell-style-name="ce845"/>
        <table:table-column table:style-name="co1" table:default-cell-style-name="ce896"/>
        <table:table-column table:style-name="co1" table:number-columns-repeated="2" table:default-cell-style-name="ce852"/>
        <table:table-column table:style-name="co1" table:default-cell-style-name="ce647"/>
        <table:table-column table:style-name="co1" table:default-cell-style-name="ce881"/>
        <table:table-column table:style-name="co1" table:default-cell-style-name="ce845"/>
        <table:table-column table:style-name="co1" table:default-cell-style-name="ce896"/>
        <table:table-column table:style-name="co1" table:default-cell-style-name="ce852"/>
        <table:table-column table:style-name="co1" table:number-columns-repeated="70" table:default-cell-style-name="Default"/>
        <table:table-column table:style-name="co1" table:number-columns-repeated="16285"/>
        <table:table-row table:style-name="ro1">
          <table:table-cell table:style-name="ce666" table:number-columns-repeated="4"/>
          <table:table-cell table:style-name="ce677" table:number-columns-repeated="3"/>
          <table:table-cell table:style-name="ce622" office:value-type="string" calcext:value-type="string">
            <text:p>L</text:p>
          </table:table-cell>
          <table:table-cell/>
          <table:table-cell table:style-name="Default" office:value-type="string" calcext:value-type="string">
            <text:p>R</text:p>
          </table:table-cell>
          <table:table-cell table:style-name="ce677" table:number-columns-repeated="2"/>
          <table:table-cell table:style-name="ce731"/>
          <table:table-cell table:style-name="ce666" table:number-columns-repeated="4"/>
          <table:table-cell/>
          <table:table-cell table:style-name="ce809" office:value-type="string" calcext:value-type="string">
            <text:p>start priorities</text:p>
          </table:table-cell>
          <table:table-cell table:style-name="Default" table:number-columns-repeated="10"/>
          <table:table-cell table:number-columns-repeated="2"/>
          <table:table-cell table:style-name="ce809" office:value-type="string" calcext:value-type="string">
            <text:p>json</text:p>
          </table:table-cell>
          <table:table-cell table:number-columns-repeated="67"/>
          <table:table-cell table:style-name="Default" table:number-columns-repeated="16285"/>
        </table:table-row>
        <table:table-row table:style-name="ro1">
          <table:table-cell table:style-name="ce656"/>
          <table:table-cell table:style-name="ce620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666" office:value-type="float" office:value="2" calcext:value-type="float">
            <text:p>2</text:p>
          </table:table-cell>
          <table:table-cell table:style-name="ce677" office:value-type="float" office:value="3" calcext:value-type="float">
            <text:p>3</text:p>
          </table:table-cell>
          <table:table-cell table:style-name="ce677" office:value-type="float" office:value="4" calcext:value-type="float">
            <text:p>4</text:p>
          </table:table-cell>
          <table:table-cell table:style-name="ce677"/>
          <table:table-cell table:style-name="ce622"/>
          <table:table-cell/>
          <table:table-cell table:style-name="ce622"/>
          <table:table-cell table:style-name="ce677"/>
          <table:table-cell table:style-name="ce677" office:value-type="float" office:value="15" calcext:value-type="float">
            <text:p>15</text:p>
          </table:table-cell>
          <table:table-cell table:style-name="ce731" office:value-type="float" office:value="16" calcext:value-type="float">
            <text:p>16</text:p>
          </table:table-cell>
          <table:table-cell table:style-name="ce666" office:value-type="float" office:value="17" calcext:value-type="float">
            <text:p>17</text:p>
          </table:table-cell>
          <table:table-cell table:style-name="ce656" office:value-type="float" office:value="18" calcext:value-type="float">
            <text:p>18</text:p>
          </table:table-cell>
          <table:table-cell table:style-name="ce620" office:value-type="float" office:value="19" calcext:value-type="float">
            <text:p>19</text:p>
          </table:table-cell>
          <table:table-cell table:style-name="ce656"/>
          <table:table-cell/>
          <table:table-cell table:style-name="ce798" office:value-type="float" office:value="1" calcext:value-type="float">
            <text:p>1</text:p>
          </table:table-cell>
          <table:table-cell table:style-name="ce1279" office:value-type="float" office:value="14" calcext:value-type="float">
            <text:p>14</text:p>
          </table:table-cell>
          <table:table-cell table:style-name="ce1280" office:value-type="float" office:value="6" calcext:value-type="float">
            <text:p>6</text:p>
          </table:table-cell>
          <table:table-cell table:style-name="ce1279" office:value-type="float" office:value="3" calcext:value-type="float">
            <text:p>3</text:p>
          </table:table-cell>
          <table:table-cell table:style-name="ce1280" office:value-type="float" office:value="5" calcext:value-type="float">
            <text:p>5</text:p>
          </table:table-cell>
          <table:table-cell table:style-name="ce1279" office:value-type="float" office:value="13" calcext:value-type="float">
            <text:p>13</text:p>
          </table:table-cell>
          <table:table-cell table:style-name="Default"/>
          <table:table-cell table:style-name="ce1299" table:formula="of:=SUM([.B25];[.H25];[.N25];[.T25];[.Z25];[.Z30];[.T30];[.N30];[.H30];[.B30];[.B35];[.H35];[.N35];[.T35];[.Z35])/[.$Z$6]" office:value-type="float" office:value="54.4" calcext:value-type="float">
            <text:p>54.4</text:p>
          </table:table-cell>
          <table:table-cell table:style-name="ce1299" table:formula="of:=SUM([.C25];[.I25];[.O25];[.U25];[.AA25];[.AA30];[.U30];[.O30];[.I30];[.C30];[.C35];[.I35];[.O35];[.U35];[.AA35])/[.$Z$6]" office:value-type="float" office:value="38" calcext:value-type="float">
            <text:p>38.0</text:p>
          </table:table-cell>
          <table:table-cell table:style-name="ce1299" table:formula="of:=SUM([.D25];[.J25];[.P25];[.V25];[.AB25];[.AB30];[.V30];[.P30];[.J30];[.D30];[.D35];[.J35];[.P35];[.V35];[.AB35])/[.$Z$6]" office:value-type="float" office:value="29.4" calcext:value-type="float">
            <text:p>29.4</text:p>
          </table:table-cell>
          <table:table-cell table:style-name="ce1299" table:formula="of:=SUM([.E25];[.K25];[.Q25];[.W25];[.AC25];[.AC30];[.W30];[.Q30];[.K30];[.E30];[.E35];[.K35];[.Q35];[.W35];[.AC35])/[.$Z$6]" office:value-type="float" office:value="32.3" calcext:value-type="float">
            <text:p>32.3</text:p>
          </table:table-cell>
          <table:table-cell table:style-name="ce1299" table:formula="of:=SUM([.F25];[.L25];[.R25];[.X25];[.AD25];[.AD30];[.X30];[.R30];[.L30];[.F30];[.F35];[.L35];[.R35];[.X35];[.AD35])/[.$Z$6]" office:value-type="float" office:value="46" calcext:value-type="float">
            <text:p>46.0</text:p>
          </table:table-cell>
          <table:table-cell/>
          <table:table-cell table:style-name="ce862" table:formula="of:=COM.MICROSOFT.TEXTJOIN(&quot;&quot;; TRUE(); &quot;{ &quot;&quot;efforts&quot;&quot;: [&quot;; [.AF28]; &quot;], &quot;&quot;pairs&quot;&quot;: &quot;;[.AF20]; &quot;}&quot;)" office:value-type="string" office:string-value="{ &quot;efforts&quot;: [1, 1.1, 1.2, 1.3, 1.6, 2, 2.1, 2.2, 2.3, 3, 3.1, 3.2, 3.5, 4, 4.5], &quot;pairs&quot;: {&quot;0&quot;: { &quot;0&quot;: 14, &quot;1&quot;: 1, &quot;2&quot;: 2, &quot;3&quot;: 3, &quot;4&quot;: 5, &quot;5&quot;: 9, &quot;6&quot;: 8, &quot;7&quot;: 7, &quot;8&quot;: 4, &quot;9&quot;: 6, &quot;10&quot;: 12, &quot;11&quot;: 13, &quot;12&quot;: 14, &quot;13&quot;: 10, &quot;14&quot;: 11}, &quot;1&quot;: { &quot;0&quot;: 9, &quot;1&quot;: 6, &quot;2&quot;: 1, &quot;3&quot;: 2, &quot;4&quot;: 4, &quot;5&quot;: 8, &quot;6&quot;: 7, &quot;7&quot;: 6, &quot;8&quot;: 3, &quot;9&quot;: 5, &quot;10&quot;: 13, &quot;11&quot;: 14, &quot;12&quot;: 12, &quot;13&quot;: 10, &quot;14&quot;: 11}, &quot;2&quot;: { &quot;0&quot;: 8, &quot;1&quot;: 2, &quot;2&quot;: 3, &quot;3&quot;: 1, &quot;4&quot;: 7, &quot;5&quot;: 6, &quot;6&quot;: 4, &quot;7&quot;: 5, &quot;8&quot;: 3, &quot;9&quot;: 9, &quot;10&quot;: 14, &quot;11&quot;: 12, &quot;12&quot;: 10, &quot;13&quot;: 11, &quot;14&quot;: 13}, &quot;3&quot;: { &quot;0&quot;: 3, &quot;1&quot;: 2, &quot;2&quot;: 1, &quot;3&quot;: 5, &quot;4&quot;: 7, &quot;5&quot;: 5, &quot;6&quot;: 6, &quot;7&quot;: 8, &quot;8&quot;: 4, &quot;9&quot;: 9, &quot;10&quot;: 14, &quot;11&quot;: 13, &quot;12&quot;: 12, &quot;13&quot;: 10, &quot;14&quot;: 11}, &quot;4&quot;: { &quot;0&quot;: 7, &quot;1&quot;: 3, &quot;2&quot;: 2, &quot;3&quot;: 1, &quot;4&quot;: 13, &quot;5&quot;: 6, &quot;6&quot;: 5, &quot;7&quot;: 4, &quot;8&quot;: 9, &quot;9&quot;: 8, &quot;10&quot;: 10, &quot;11&quot;: 11, &quot;12&quot;: 12, &quot;13&quot;: 13, &quot;14&quot;: 14}, &quot;5&quot;: { &quot;0&quot;: 12, &quot;1&quot;: 10, &quot;2&quot;: 6, &quot;3&quot;: 5, &quot;4&quot;: 9, &quot;5&quot;: 8, &quot;6&quot;: 1, &quot;7&quot;: 2, &quot;8&quot;: 3, &quot;9&quot;: 4, &quot;10&quot;: 13, &quot;11&quot;: 14, &quot;12&quot;: 11, &quot;13&quot;: 7, &quot;14&quot;: 8}, &quot;6&quot;: { &quot;0&quot;: 14, &quot;1&quot;: 7, &quot;2&quot;: 4, &quot;3&quot;: 5, &quot;4&quot;: 13, &quot;5&quot;: 10, &quot;6&quot;: 2, &quot;7&quot;: 1, &quot;8&quot;: 2, &quot;9&quot;: 9, &quot;10&quot;: 12, &quot;11&quot;: 8, &quot;12&quot;: 6, &quot;13&quot;: 3, &quot;14&quot;: 11}, &quot;7&quot;: { &quot;0&quot;: 14, &quot;1&quot;: 5, &quot;2&quot;: 4, &quot;3&quot;: 6, &quot;4&quot;: 13, &quot;5&quot;: 10, &quot;6&quot;: 2, &quot;7&quot;: 0, &quot;8&quot;: 1, &quot;9&quot;: 9, &quot;10&quot;: 11, &quot;11&quot;: 7, &quot;12&quot;: 8, &quot;13&quot;: 3, &quot;14&quot;: 12}, &quot;8&quot;: { &quot;0&quot;: 13, &quot;1&quot;: 5, &quot;2&quot;: 3, &quot;3&quot;: 6, &quot;4&quot;: 10, &quot;5&quot;: 4, &quot;6&quot;: 2, &quot;7&quot;: 1, &quot;8&quot;: 1, &quot;9&quot;: 8, &quot;10&quot;: 12, &quot;11&quot;: 14, &quot;12&quot;: 11, &quot;13&quot;: 7, &quot;14&quot;: 9}, &quot;9&quot;: { &quot;0&quot;: 10, &quot;1&quot;: 7, &quot;2&quot;: 4, &quot;3&quot;: 3, &quot;4&quot;: 9, &quot;5&quot;: 6, &quot;6&quot;: 5, &quot;7&quot;: 2, &quot;8&quot;: 1, &quot;9&quot;: 7, &quot;10&quot;: 12, &quot;11&quot;: 13, &quot;12&quot;: 14, &quot;13&quot;: 11, &quot;14&quot;: 8}, &quot;10&quot;: { &quot;0&quot;: 13, &quot;1&quot;: 14, &quot;2&quot;: 12, &quot;3&quot;: 11, &quot;4&quot;: 10, &quot;5&quot;: 9, &quot;6&quot;: 8, &quot;7&quot;: 4, &quot;8&quot;: 5, &quot;9&quot;: 6, &quot;10&quot;: 12, &quot;11&quot;: 1, &quot;12&quot;: 2, &quot;13&quot;: 3, &quot;14&quot;: 7}, &quot;11&quot;: { &quot;0&quot;: 14, &quot;1&quot;: 12, &quot;2&quot;: 9, &quot;3&quot;: 10, &quot;4&quot;: 11, &quot;5&quot;: 13, &quot;6&quot;: 6, &quot;7&quot;: 3, &quot;8&quot;: 4, &quot;9&quot;: 5, &quot;10&quot;: 7, &quot;11&quot;: 10, &quot;12&quot;: 1, &quot;13&quot;: 2, &quot;14&quot;: 8}, &quot;12&quot;: { &quot;0&quot;: 14, &quot;1&quot;: 13, &quot;2&quot;: 9, &quot;3&quot;: 10, &quot;4&quot;: 12, &quot;5&quot;: 11, &quot;6&quot;: 6, &quot;7&quot;: 4, &quot;8&quot;: 3, &quot;9&quot;: 8, &quot;10&quot;: 5, &quot;11&quot;: 2, &quot;12&quot;: 9, &quot;13&quot;: 1, &quot;14&quot;: 7}, &quot;13&quot;: { &quot;0&quot;: 14, &quot;1&quot;: 10, &quot;2&quot;: 8, &quot;3&quot;: 12, &quot;4&quot;: 13, &quot;5&quot;: 5, &quot;6&quot;: 4, &quot;7&quot;: 3, &quot;8&quot;: 7, &quot;9&quot;: 11, &quot;10&quot;: 6, &quot;11&quot;: 2, &quot;12&quot;: 1, &quot;13&quot;: 4, &quot;14&quot;: 9}, &quot;14&quot;: { &quot;0&quot;: 13, &quot;1&quot;: 14, &quot;2&quot;: 12, &quot;3&quot;: 11, &quot;4&quot;: 10, &quot;5&quot;: 7, &quot;6&quot;: 5, &quot;7&quot;: 3, &quot;8&quot;: 2, &quot;9&quot;: 9, &quot;10&quot;: 8, &quot;11&quot;: 6, &quot;12&quot;: 4, &quot;13&quot;: 1, &quot;14&quot;: 11}}}" calcext:value-type="string" table:number-columns-spanned="29" table:number-rows-spanned="5">
            <text:p>{ "efforts": [1, 1.1, 1.2, 1.3, 1.6, 2, 2.1, 2.2, 2.3, 3, 3.1, 3.2, 3.5, 4, 4.5], "pairs": {"0": { "0": 14, "1": 1, "2": 2, "3": 3, "4": 5, "5": 9, "6": 8, "7": 7, "8": 4, "9": 6, "10": 12, "11": 13, "12": 14, "13": 10, "14": 11}, "1": { "0": 9, "1": 6, "2": 1, "3": 2, "4": 4, "5": 8, "6": 7, "7": 6, "8": 3, "9": 5, "10": 13, "11": 14, "12": 12, "13": 10, "14": 11}, "2": { "0": 8, "1": 2, "2": 3, "3": 1, "4": 7, "5": 6, "6": 4, "7": 5, "8": 3, "9": 9, "10": 14, "11": 12, "12": 10, "13": 11, "14": 13}, "3": { "0": 3, "1": 2, "2": 1, "3": 5, "4": 7, "5": 5, "6": 6, "7": 8, "8": 4, "9": 9, "10": 14, "11": 13, "12": 12, "13": 10, "14": 11}, "4": { "0": 7, "1": 3, "2": 2, "3": 1, "4": 13, "5": 6, "6": 5, "7": 4, "8": 9, "9": 8, "10": 10, "11": 11, "12": 12, "13": 13, "14": 14}, "5": { "0": 12, "1": 10, "2": 6, "3": 5, "4": 9, "5": 8, "6": 1, "7": 2, "8": 3, "9": 4, "10": 13, "11": 14, "12": 11, "13": 7, "14": 8}, "6": { "0": 14, "1": 7, "2": 4, "3": 5, "4": 13, "5": 10, "6": 2, "7": 1, "8": 2, "9": 9, "10": 12, "11": 8, "12": 6, "13": 3, "14": 11}, "7": { "0": 14, "1": 5, "2": 4, "3": 6, "4": 13, "5": 10, "6": 2, "7": 0, "8": 1, "9": 9, "10": 11, "11": 7, "12": 8, "13": 3, "14": 12}, "8": { "0": 13, "1": 5, "2": 3, "3": 6, "4": 10, "5": 4, "6": 2, "7": 1, "8": 1, "9": 8, "10": 12, "11": 14, "12": 11, "13": 7, "14": 9}, "9": { "0": 10, "1": 7, "2": 4, "3": 3, "4": 9, "5": 6, "6": 5, "7": 2, "8": 1, "9": 7, "10": 12, "11": 13, "12": 14, "13": 11, "14": 8}, "10": { "0": 13, "1": 14, "2": 12, "3": 11, "4": 10, "5": 9, "6": 8, "7": 4, "8": 5, "9": 6, "10": 12, "11": 1, "12": 2, "13": 3, "14": 7}, "11": { "0": 14, "1": 12, "2": 9, "3": 10, "4": 11, "5": 13, "6": 6, "7": 3, "8": 4, "9": 5, "10": 7, "11": 10, "12": 1, "13": 2, "14": 8}, "12": { "0": 14, "1": 13, "2": 9, "3": 10, "4": 12, "5": 11, "6": 6, "7": 4, "8": 3, "9": 8, "10": 5, "11": 2, "12": 9, "13": 1, "14": 7}, "13": { "0": 14, "1": 10, "2": 8, "3": 12, "4": 13, "5": 5, "6": 4, "7": 3, "8": 7, "9": 11, "10": 6, "11": 2, "12": 1, "13": 4, "14": 9}, "14": { "0": 13, "1": 14, "2": 12, "3": 11, "4": 10, "5": 7, "6": 5, "7": 3, "8": 2, "9": 9, "10": 8, "11": 6, "12": 4, "13": 1, "14": 11}}}</text:p>
          </table:table-cell>
          <table:covered-table-cell table:number-columns-repeated="28" table:style-name="ce861"/>
          <table:table-cell table:style-name="ce874"/>
          <table:table-cell table:style-name="ce861"/>
          <table:table-cell/>
          <table:table-cell table:style-name="ce861" table:number-columns-repeated="27"/>
          <table:table-cell table:number-columns-repeated="9"/>
          <table:table-cell table:style-name="Default" table:number-columns-repeated="16285"/>
        </table:table-row>
        <table:table-row table:style-name="ro1">
          <table:table-cell table:style-name="ce620"/>
          <table:table-cell table:style-name="ce620" office:value-type="float" office:value="5" calcext:value-type="float">
            <text:p>5</text:p>
          </table:table-cell>
          <table:table-cell table:style-name="ce656" office:value-type="float" office:value="6" calcext:value-type="float">
            <text:p>6</text:p>
          </table:table-cell>
          <table:table-cell table:style-name="ce666" office:value-type="float" office:value="7" calcext:value-type="float">
            <text:p>7</text:p>
          </table:table-cell>
          <table:table-cell table:style-name="ce677" office:value-type="float" office:value="8" calcext:value-type="float">
            <text:p>8</text:p>
          </table:table-cell>
          <table:table-cell table:style-name="ce677" office:value-type="float" office:value="9" calcext:value-type="float">
            <text:p>9</text:p>
          </table:table-cell>
          <table:table-cell table:style-name="ce677"/>
          <table:table-cell table:style-name="ce622"/>
          <table:table-cell/>
          <table:table-cell table:style-name="ce708"/>
          <table:table-cell table:style-name="ce677"/>
          <table:table-cell table:style-name="ce677" office:value-type="float" office:value="20" calcext:value-type="float">
            <text:p>20</text:p>
          </table:table-cell>
          <table:table-cell table:style-name="ce731" office:value-type="float" office:value="21" calcext:value-type="float">
            <text:p>21</text:p>
          </table:table-cell>
          <table:table-cell table:style-name="ce666" office:value-type="float" office:value="22" calcext:value-type="float">
            <text:p>22</text:p>
          </table:table-cell>
          <table:table-cell table:style-name="ce656" office:value-type="float" office:value="23" calcext:value-type="float">
            <text:p>23</text:p>
          </table:table-cell>
          <table:table-cell table:style-name="ce620" office:value-type="float" office:value="24" calcext:value-type="float">
            <text:p>24</text:p>
          </table:table-cell>
          <table:table-cell table:style-name="ce620"/>
          <table:table-cell/>
          <table:table-cell table:style-name="ce798" office:value-type="float" office:value="2" calcext:value-type="float">
            <text:p>2</text:p>
          </table:table-cell>
          <table:table-cell table:style-name="ce1280" office:value-type="float" office:value="8" calcext:value-type="float">
            <text:p>8</text:p>
          </table:table-cell>
          <table:table-cell table:style-name="ce1279" office:value-type="float" office:value="2" calcext:value-type="float">
            <text:p>2</text:p>
          </table:table-cell>
          <table:table-cell table:style-name="ce1279" office:value-type="float" office:value="0" calcext:value-type="float">
            <text:p>0</text:p>
          </table:table-cell>
          <table:table-cell table:style-name="ce1279" office:value-type="float" office:value="1" calcext:value-type="float">
            <text:p>1</text:p>
          </table:table-cell>
          <table:table-cell table:style-name="ce1280" office:value-type="float" office:value="7" calcext:value-type="float">
            <text:p>7</text:p>
          </table:table-cell>
          <table:table-cell table:style-name="Default"/>
          <table:table-cell table:style-name="ce1299" table:formula="of:=SUM([.B26];[.H26];[.N26];[.T26];[.Z26];[.Z31];[.T31];[.N31];[.H31];[.B31];[.B36];[.H36];[.N36];[.T36];[.Z36])/[.$Z$6]" office:value-type="float" office:value="38.1" calcext:value-type="float">
            <text:p>38.1</text:p>
          </table:table-cell>
          <table:table-cell table:style-name="ce1299" table:formula="of:=SUM([.C26];[.I26];[.O26];[.U26];[.AA26];[.AA31];[.U31];[.O31];[.I31];[.C31];[.C36];[.I36];[.O36];[.U36];[.AA36])/[.$Z$6]" office:value-type="float" office:value="27" calcext:value-type="float">
            <text:p>27.0</text:p>
          </table:table-cell>
          <table:table-cell table:style-name="ce1299" table:formula="of:=SUM([.D26];[.J26];[.P26];[.V26];[.AB26];[.AB31];[.V31];[.P31];[.J31];[.D31];[.D36];[.J36];[.P36];[.V36];[.AB36])/[.$Z$6]" office:value-type="float" office:value="22.9" calcext:value-type="float">
            <text:p>22.9</text:p>
          </table:table-cell>
          <table:table-cell table:style-name="ce1299" table:formula="of:=SUM([.E26];[.K26];[.Q26];[.W26];[.AC26];[.AC31];[.W31];[.Q31];[.K31];[.E31];[.E36];[.K36];[.Q36];[.W36];[.AC36])/[.$Z$6]" office:value-type="float" office:value="22.9" calcext:value-type="float">
            <text:p>22.9</text:p>
          </table:table-cell>
          <table:table-cell table:style-name="ce1299" table:formula="of:=SUM([.F26];[.L26];[.R26];[.X26];[.AD26];[.AD31];[.X31];[.R31];[.L31];[.F31];[.F36];[.L36];[.R36];[.X36];[.AD36])/[.$Z$6]" office:value-type="float" office:value="37.1" calcext:value-type="float">
            <text:p>37.1</text:p>
          </table:table-cell>
          <table:table-cell/>
          <table:covered-table-cell table:number-columns-repeated="29" table:style-name="ce861"/>
          <table:table-cell table:style-name="ce861" table:number-columns-repeated="30"/>
          <table:table-cell table:number-columns-repeated="9"/>
          <table:table-cell table:style-name="Default" table:number-columns-repeated="16285"/>
        </table:table-row>
        <table:table-row table:style-name="ro1">
          <table:table-cell table:style-name="ce620"/>
          <table:table-cell table:style-name="ce620" office:value-type="float" office:value="10" calcext:value-type="float">
            <text:p>10</text:p>
          </table:table-cell>
          <table:table-cell table:style-name="ce656" office:value-type="float" office:value="11" calcext:value-type="float">
            <text:p>11</text:p>
          </table:table-cell>
          <table:table-cell table:style-name="ce666" office:value-type="float" office:value="12" calcext:value-type="float">
            <text:p>12</text:p>
          </table:table-cell>
          <table:table-cell table:style-name="ce677" office:value-type="float" office:value="13" calcext:value-type="float">
            <text:p>13</text:p>
          </table:table-cell>
          <table:table-cell table:style-name="ce687" office:value-type="float" office:value="14" calcext:value-type="float">
            <text:p>14</text:p>
          </table:table-cell>
          <table:table-cell table:style-name="ce677" table:number-columns-repeated="2"/>
          <table:table-cell/>
          <table:table-cell table:style-name="ce677" table:number-columns-repeated="2"/>
          <table:table-cell table:style-name="ce677" office:value-type="float" office:value="25" calcext:value-type="float">
            <text:p>25</text:p>
          </table:table-cell>
          <table:table-cell table:style-name="ce731" office:value-type="float" office:value="26" calcext:value-type="float">
            <text:p>26</text:p>
          </table:table-cell>
          <table:table-cell table:style-name="ce666" office:value-type="float" office:value="27" calcext:value-type="float">
            <text:p>27</text:p>
          </table:table-cell>
          <table:table-cell table:style-name="ce656" office:value-type="float" office:value="28" calcext:value-type="float">
            <text:p>28</text:p>
          </table:table-cell>
          <table:table-cell table:style-name="ce620" office:value-type="float" office:value="29" calcext:value-type="float">
            <text:p>29</text:p>
          </table:table-cell>
          <table:table-cell table:style-name="ce620"/>
          <table:table-cell/>
          <table:table-cell table:style-name="ce798" office:value-type="float" office:value="3" calcext:value-type="float">
            <text:p>3</text:p>
          </table:table-cell>
          <table:table-cell table:style-name="ce1279" office:value-type="float" office:value="12" calcext:value-type="float">
            <text:p>12</text:p>
          </table:table-cell>
          <table:table-cell table:style-name="ce1280" office:value-type="float" office:value="10" calcext:value-type="float">
            <text:p>10</text:p>
          </table:table-cell>
          <table:table-cell table:style-name="ce1280" office:value-type="float" office:value="9" calcext:value-type="float">
            <text:p>9</text:p>
          </table:table-cell>
          <table:table-cell table:style-name="ce1279" office:value-type="float" office:value="4" calcext:value-type="float">
            <text:p>4</text:p>
          </table:table-cell>
          <table:table-cell table:style-name="ce1279" office:value-type="float" office:value="11" calcext:value-type="float">
            <text:p>11</text:p>
          </table:table-cell>
          <table:table-cell table:style-name="Default"/>
          <table:table-cell table:style-name="ce1299" table:formula="of:=SUM([.B27];[.H27];[.N27];[.T27];[.Z27];[.Z32];[.T32];[.N32];[.H32];[.B32];[.B37];[.H37];[.N37];[.T37];[.Z37])/[.$Z$6]" office:value-type="float" office:value="49.4" calcext:value-type="float">
            <text:p>49.4</text:p>
          </table:table-cell>
          <table:table-cell table:style-name="ce1299" table:formula="of:=SUM([.C27];[.I27];[.O27];[.U27];[.AA27];[.AA32];[.U32];[.O32];[.I32];[.C32];[.C37];[.I37];[.O37];[.U37];[.AA37])/[.$Z$6]" office:value-type="float" office:value="45.4" calcext:value-type="float">
            <text:p>45.4</text:p>
          </table:table-cell>
          <table:table-cell table:style-name="ce1299" table:formula="of:=SUM([.D27];[.J27];[.P27];[.V27];[.AB27];[.AB32];[.V32];[.P32];[.J32];[.D32];[.D37];[.J37];[.P37];[.V37];[.AB37])/[.$Z$6]" office:value-type="float" office:value="41.4" calcext:value-type="float">
            <text:p>41.4</text:p>
          </table:table-cell>
          <table:table-cell table:style-name="ce1299" table:formula="of:=SUM([.E27];[.K27];[.Q27];[.W27];[.AC27];[.AC32];[.W32];[.Q32];[.K32];[.E32];[.E37];[.K37];[.Q37];[.W37];[.AC37])/[.$Z$6]" office:value-type="float" office:value="33" calcext:value-type="float">
            <text:p>33.0</text:p>
          </table:table-cell>
          <table:table-cell table:style-name="ce1299" table:formula="of:=SUM([.F27];[.L27];[.R27];[.X27];[.AD27];[.AD32];[.X32];[.R32];[.L32];[.F32];[.F37];[.L37];[.R37];[.X37];[.AD37])/[.$Z$6]" office:value-type="float" office:value="45.3" calcext:value-type="float">
            <text:p>45.3</text:p>
          </table:table-cell>
          <table:table-cell table:style-name="ce856"/>
          <table:covered-table-cell table:number-columns-repeated="29" table:style-name="ce861"/>
          <table:table-cell table:style-name="ce874"/>
          <table:table-cell table:style-name="ce861" table:number-columns-repeated="29"/>
          <table:table-cell table:number-columns-repeated="9"/>
          <table:table-cell table:style-name="Default" table:number-columns-repeated="16285"/>
        </table:table-row>
        <table:table-row table:style-name="ro1">
          <table:table-cell table:style-name="ce620"/>
          <table:table-cell table:style-name="ce879"/>
          <table:table-cell table:style-name="ce656"/>
          <table:table-cell table:style-name="ce666"/>
          <table:table-cell table:style-name="ce679" table:number-columns-spanned="1" table:number-rows-spanned="2"/>
          <table:table-cell table:style-name="ce679" table:number-columns-spanned="1" table:number-rows-spanned="2"/>
          <table:table-cell table:style-name="ce679" table:number-columns-spanned="1" table:number-rows-spanned="2"/>
          <table:table-cell table:style-name="ce679" table:number-columns-spanned="1" table:number-rows-spanned="2"/>
          <table:table-cell/>
          <table:table-cell table:style-name="ce679" table:number-columns-spanned="1" table:number-rows-spanned="2"/>
          <table:table-cell table:style-name="ce679" table:number-columns-spanned="1" table:number-rows-spanned="2"/>
          <table:table-cell table:style-name="ce679" table:number-columns-spanned="1" table:number-rows-spanned="2"/>
          <table:table-cell table:style-name="ce732" table:number-columns-spanned="1" table:number-rows-spanned="2"/>
          <table:table-cell table:style-name="ce666"/>
          <table:table-cell table:style-name="ce656"/>
          <table:table-cell table:style-name="ce939"/>
          <table:table-cell table:style-name="ce620"/>
          <table:table-cell/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798" office:value-type="float" office:value="2" calcext:value-type="float">
            <text:p>2</text:p>
          </table:table-cell>
          <table:table-cell table:style-name="ce798" office:value-type="float" office:value="3" calcext:value-type="float">
            <text:p>3</text:p>
          </table:table-cell>
          <table:table-cell table:style-name="ce798" office:value-type="float" office:value="4" calcext:value-type="float">
            <text:p>4</text:p>
          </table:table-cell>
          <table:table-cell table:style-name="ce798" office:value-type="float" office:value="5" calcext:value-type="float">
            <text:p>5</text:p>
          </table:table-cell>
          <table:table-cell table:style-name="Default"/>
          <table:table-cell table:style-name="ce836"/>
          <table:table-cell table:style-name="ce844"/>
          <table:table-cell table:style-name="ce836"/>
          <table:table-cell table:style-name="Default"/>
          <table:table-cell table:style-name="ce856" table:number-columns-repeated="2"/>
          <table:covered-table-cell table:style-name="ce856"/>
          <table:covered-table-cell table:number-columns-repeated="28"/>
          <table:table-cell table:number-columns-repeated="39"/>
          <table:table-cell table:style-name="Default" table:number-columns-repeated="16285"/>
        </table:table-row>
        <table:table-row table:style-name="ro1">
          <table:table-cell table:style-name="ce622" table:number-columns-repeated="4"/>
          <table:covered-table-cell table:style-name="ce622"/>
          <table:covered-table-cell table:number-columns-repeated="2" table:style-name="ce903"/>
          <table:covered-table-cell table:style-name="ce679"/>
          <table:table-cell/>
          <table:covered-table-cell table:style-name="ce679"/>
          <table:covered-table-cell table:number-columns-repeated="2" table:style-name="ce903"/>
          <table:covered-table-cell table:style-name="ce732"/>
          <table:table-cell table:style-name="ce622" table:number-columns-repeated="4"/>
          <table:table-cell/>
          <table:table-cell table:style-name="Default"/>
          <table:table-cell table:style-name="ce812" office:value-type="string" calcext:value-type="string">
            <text:p>p</text:p>
          </table:table-cell>
          <table:table-cell table:style-name="ce812" office:value-type="string" calcext:value-type="string">
            <text:p>r</text:p>
          </table:table-cell>
          <table:table-cell table:style-name="ce812" office:value-type="string" calcext:value-type="string">
            <text:p>m</text:p>
          </table:table-cell>
          <table:table-cell table:number-columns-repeated="2" table:style-name="ce812" office:value-type="string" calcext:value-type="string">
            <text:p>i</text:p>
          </table:table-cell>
          <table:table-cell table:style-name="Default"/>
          <table:table-cell table:style-name="ce837" office:value-type="float" office:value="1" calcext:value-type="float">
            <text:p>1.0</text:p>
          </table:table-cell>
          <table:table-cell table:style-name="Default" table:number-columns-repeated="3"/>
          <table:table-cell table:number-columns-repeated="2"/>
          <table:covered-table-cell table:number-columns-repeated="13"/>
          <table:covered-table-cell table:number-columns-repeated="3" table:style-name="ce856"/>
          <table:covered-table-cell table:number-columns-repeated="13"/>
          <table:table-cell table:number-columns-repeated="39"/>
          <table:table-cell table:style-name="Default" table:number-columns-repeated="16285"/>
        </table:table-row>
        <table:table-row table:style-name="ro2">
          <table:table-cell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Default" table:number-columns-repeated="11"/>
          <table:table-cell table:number-columns-repeated="70"/>
          <table:table-cell table:style-name="Default" table:number-columns-repeated="16285"/>
        </table:table-row>
        <table:table-row table:style-name="ro1">
          <table:table-cell table:style-name="ce623"/>
          <table:table-cell table:style-name="ce880" table:formula="of:=[.$T$2]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690"/>
          <table:table-cell office:value-type="float" office:value="9" calcext:value-type="float">
            <text:p>9</text:p>
          </table:table-cell>
          <table:table-cell table:style-name="ce880" table:formula="of:=[.$U$2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690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880" table:formula="of:=[.$V$2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852" office:value-type="float" office:value="7" calcext:value-type="float">
            <text:p>7</text:p>
          </table:table-cell>
          <table:table-cell table:style-name="ce690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0" table:formula="of:=[.$W$2]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690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0" table:formula="of:=[.$X$2]" office:value-type="float" office:value="13" calcext:value-type="float">
            <text:p>13</text:p>
          </table:table-cell>
          <table:table-cell/>
          <table:table-cell table:style-name="ce1319" table:formula="of:=COM.MICROSOFT.CONCAT(&quot;&quot;&quot;&quot;;[.$B$2]; &quot;&quot;&quot;: &quot;; [.B8])" office:value-type="string" office:string-value="&quot;0&quot;: 14" calcext:value-type="string">
            <text:p>"0": 14</text:p>
          </table:table-cell>
          <table:table-cell table:style-name="ce1319" table:formula="of:=COM.MICROSOFT.CONCAT(&quot;&quot;&quot;&quot;;[.$C$2]; &quot;&quot;&quot;: &quot;; [.C8])" office:value-type="string" office:string-value="&quot;1&quot;: 1" calcext:value-type="string">
            <text:p>"1": 1</text:p>
          </table:table-cell>
          <table:table-cell table:style-name="ce1319" table:formula="of:=COM.MICROSOFT.CONCAT(&quot;&quot;&quot;&quot;;[.$D$2]; &quot;&quot;&quot;: &quot;; [.D8])" office:value-type="string" office:string-value="&quot;2&quot;: 2" calcext:value-type="string">
            <text:p>"2": 2</text:p>
          </table:table-cell>
          <table:table-cell table:style-name="ce1319" table:formula="of:=COM.MICROSOFT.CONCAT(&quot;&quot;&quot;&quot;;[.$E$2]; &quot;&quot;&quot;: &quot;; [.E8])" office:value-type="string" office:string-value="&quot;3&quot;: 3" calcext:value-type="string">
            <text:p>"3": 3</text:p>
          </table:table-cell>
          <table:table-cell table:style-name="ce1319" table:formula="of:=COM.MICROSOFT.CONCAT(&quot;&quot;&quot;&quot;;[.$F$2]; &quot;&quot;&quot;: &quot;; [.F8])" office:value-type="string" office:string-value="&quot;4&quot;: 5" calcext:value-type="string">
            <text:p>"4": 5</text:p>
          </table:table-cell>
          <table:table-cell table:style-name="ce1319"/>
          <table:table-cell table:style-name="ce1319" table:formula="of:=COM.MICROSOFT.CONCAT(&quot;&quot;&quot;&quot;;[.$B$2]; &quot;&quot;&quot;: &quot;; [.H8])" office:value-type="string" office:string-value="&quot;0&quot;: 9" calcext:value-type="string">
            <text:p>"0": 9</text:p>
          </table:table-cell>
          <table:table-cell table:style-name="ce1319" table:formula="of:=COM.MICROSOFT.CONCAT(&quot;&quot;&quot;&quot;;[.$C$2]; &quot;&quot;&quot;: &quot;; [.I8])" office:value-type="string" office:string-value="&quot;1&quot;: 6" calcext:value-type="string">
            <text:p>"1": 6</text:p>
          </table:table-cell>
          <table:table-cell table:style-name="ce1319" table:formula="of:=COM.MICROSOFT.CONCAT(&quot;&quot;&quot;&quot;;[.$D$2]; &quot;&quot;&quot;: &quot;; [.J8])" office:value-type="string" office:string-value="&quot;2&quot;: 1" calcext:value-type="string">
            <text:p>"2": 1</text:p>
          </table:table-cell>
          <table:table-cell table:style-name="ce1319" table:formula="of:=COM.MICROSOFT.CONCAT(&quot;&quot;&quot;&quot;;[.$E$2]; &quot;&quot;&quot;: &quot;; [.K8])" office:value-type="string" office:string-value="&quot;3&quot;: 2" calcext:value-type="string">
            <text:p>"3": 2</text:p>
          </table:table-cell>
          <table:table-cell table:style-name="ce1319" table:formula="of:=COM.MICROSOFT.CONCAT(&quot;&quot;&quot;&quot;;[.$F$2]; &quot;&quot;&quot;: &quot;; [.L8])" office:value-type="string" office:string-value="&quot;4&quot;: 4" calcext:value-type="string">
            <text:p>"4": 4</text:p>
          </table:table-cell>
          <table:table-cell table:style-name="ce1319"/>
          <table:table-cell table:style-name="ce1319" table:formula="of:=COM.MICROSOFT.CONCAT(&quot;&quot;&quot;&quot;;[.$B$2]; &quot;&quot;&quot;: &quot;; [.N8])" office:value-type="string" office:string-value="&quot;0&quot;: 8" calcext:value-type="string">
            <text:p>"0": 8</text:p>
          </table:table-cell>
          <table:table-cell table:style-name="ce1319" table:formula="of:=COM.MICROSOFT.CONCAT(&quot;&quot;&quot;&quot;;[.$C$2]; &quot;&quot;&quot;: &quot;; [.O8])" office:value-type="string" office:string-value="&quot;1&quot;: 2" calcext:value-type="string">
            <text:p>"1": 2</text:p>
          </table:table-cell>
          <table:table-cell table:style-name="ce1319" table:formula="of:=COM.MICROSOFT.CONCAT(&quot;&quot;&quot;&quot;;[.$D$2]; &quot;&quot;&quot;: &quot;; [.P8])" office:value-type="string" office:string-value="&quot;2&quot;: 3" calcext:value-type="string">
            <text:p>"2": 3</text:p>
          </table:table-cell>
          <table:table-cell table:style-name="ce1319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1319" table:formula="of:=COM.MICROSOFT.CONCAT(&quot;&quot;&quot;&quot;;[.$F$2]; &quot;&quot;&quot;: &quot;; [.R8])" office:value-type="string" office:string-value="&quot;4&quot;: 7" calcext:value-type="string">
            <text:p>"4": 7</text:p>
          </table:table-cell>
          <table:table-cell table:style-name="ce1319"/>
          <table:table-cell table:style-name="ce1319" table:formula="of:=COM.MICROSOFT.CONCAT(&quot;&quot;&quot;&quot;;[.$B$2]; &quot;&quot;&quot;: &quot;; [.T8])" office:value-type="string" office:string-value="&quot;0&quot;: 3" calcext:value-type="string">
            <text:p>"0": 3</text:p>
          </table:table-cell>
          <table:table-cell table:style-name="ce1319" table:formula="of:=COM.MICROSOFT.CONCAT(&quot;&quot;&quot;&quot;;[.$C$2]; &quot;&quot;&quot;: &quot;; [.U8])" office:value-type="string" office:string-value="&quot;1&quot;: 2" calcext:value-type="string">
            <text:p>"1": 2</text:p>
          </table:table-cell>
          <table:table-cell table:style-name="ce1319" table:formula="of:=COM.MICROSOFT.CONCAT(&quot;&quot;&quot;&quot;;[.$D$2]; &quot;&quot;&quot;: &quot;; [.V8])" office:value-type="string" office:string-value="&quot;2&quot;: 1" calcext:value-type="string">
            <text:p>"2": 1</text:p>
          </table:table-cell>
          <table:table-cell table:style-name="ce1319" table:formula="of:=COM.MICROSOFT.CONCAT(&quot;&quot;&quot;&quot;;[.$E$2]; &quot;&quot;&quot;: &quot;; [.W8])" office:value-type="string" office:string-value="&quot;3&quot;: 5" calcext:value-type="string">
            <text:p>"3": 5</text:p>
          </table:table-cell>
          <table:table-cell table:style-name="ce1319" table:formula="of:=COM.MICROSOFT.CONCAT(&quot;&quot;&quot;&quot;;[.$F$2]; &quot;&quot;&quot;: &quot;; [.X8])" office:value-type="string" office:string-value="&quot;4&quot;: 7" calcext:value-type="string">
            <text:p>"4": 7</text:p>
          </table:table-cell>
          <table:table-cell table:style-name="ce1319"/>
          <table:table-cell table:style-name="ce1319" table:formula="of:=COM.MICROSOFT.CONCAT(&quot;&quot;&quot;&quot;;[.$B$2]; &quot;&quot;&quot;: &quot;; [.Z8])" office:value-type="string" office:string-value="&quot;0&quot;: 7" calcext:value-type="string">
            <text:p>"0": 7</text:p>
          </table:table-cell>
          <table:table-cell table:style-name="ce1319" table:formula="of:=COM.MICROSOFT.CONCAT(&quot;&quot;&quot;&quot;;[.$C$2]; &quot;&quot;&quot;: &quot;; [.AA8])" office:value-type="string" office:string-value="&quot;1&quot;: 3" calcext:value-type="string">
            <text:p>"1": 3</text:p>
          </table:table-cell>
          <table:table-cell table:style-name="ce1319" table:formula="of:=COM.MICROSOFT.CONCAT(&quot;&quot;&quot;&quot;;[.$D$2]; &quot;&quot;&quot;: &quot;; [.AB8])" office:value-type="string" office:string-value="&quot;2&quot;: 2" calcext:value-type="string">
            <text:p>"2": 2</text:p>
          </table:table-cell>
          <table:table-cell table:style-name="ce1319" table:formula="of:=COM.MICROSOFT.CONCAT(&quot;&quot;&quot;&quot;;[.$E$2]; &quot;&quot;&quot;: &quot;; [.AC8])" office:value-type="string" office:string-value="&quot;3&quot;: 1" calcext:value-type="string">
            <text:p>"3": 1</text:p>
          </table:table-cell>
          <table:table-cell table:style-name="ce1319" table:formula="of:=COM.MICROSOFT.CONCAT(&quot;&quot;&quot;&quot;;[.$F$2]; &quot;&quot;&quot;: &quot;; [.AD8])" office:value-type="string" office:string-value="&quot;4&quot;: 13" calcext:value-type="string">
            <text:p>"4": 13</text:p>
          </table:table-cell>
          <table:table-cell table:number-columns-repeated="2"/>
          <table:table-cell table:formula="of:=COM.MICROSOFT.CONCAT(&quot;&quot;&quot;0&quot;&quot;: { &quot;;COM.MICROSOFT.TEXTJOIN(&quot;, &quot;;TRUE();[.AF8:.AJ10]);&quot;}&quot;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3, &quot;12&quot;: 14, &quot;13&quot;: 10, &quot;14&quot;: 11}" calcext:value-type="string">
            <text:p>"0": { "0": 14, "1": 1, "2": 2, "3": 3, "4": 5, "5": 9, "6": 8, "7": 7, "8": 4, "9": 6, "10": 12, "11": 13, "12": 14, "13": 10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690"/>
          <table:table-cell office:value-type="float" office:value="8" calcext:value-type="float">
            <text:p>8</text:p>
          </table:table-cell>
          <table:table-cell table:style-name="ce845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690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852" office:value-type="float" office:value="9" calcext:value-type="float">
            <text:p>9</text:p>
          </table:table-cell>
          <table:table-cell table:style-name="ce690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690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852" office:value-type="float" office:value="8" calcext:value-type="float">
            <text:p>8</text:p>
          </table:table-cell>
          <table:table-cell/>
          <table:table-cell table:style-name="ce1319" table:formula="of:=COM.MICROSOFT.CONCAT(&quot;&quot;&quot;&quot;;[.$B$3]; &quot;&quot;&quot;: &quot;; [.B9])" office:value-type="string" office:string-value="&quot;5&quot;: 9" calcext:value-type="string">
            <text:p>"5": 9</text:p>
          </table:table-cell>
          <table:table-cell table:style-name="ce1319" table:formula="of:=COM.MICROSOFT.CONCAT(&quot;&quot;&quot;&quot;;[.$C$3]; &quot;&quot;&quot;: &quot;; [.C9])" office:value-type="string" office:string-value="&quot;6&quot;: 8" calcext:value-type="string">
            <text:p>"6": 8</text:p>
          </table:table-cell>
          <table:table-cell table:style-name="ce1319" table:formula="of:=COM.MICROSOFT.CONCAT(&quot;&quot;&quot;&quot;;[.$D$3]; &quot;&quot;&quot;: &quot;; [.D9])" office:value-type="string" office:string-value="&quot;7&quot;: 7" calcext:value-type="string">
            <text:p>"7": 7</text:p>
          </table:table-cell>
          <table:table-cell table:style-name="ce1319" table:formula="of:=COM.MICROSOFT.CONCAT(&quot;&quot;&quot;&quot;;[.$E$3]; &quot;&quot;&quot;: &quot;; [.E9])" office:value-type="string" office:string-value="&quot;8&quot;: 4" calcext:value-type="string">
            <text:p>"8": 4</text:p>
          </table:table-cell>
          <table:table-cell table:style-name="ce1319" table:formula="of:=COM.MICROSOFT.CONCAT(&quot;&quot;&quot;&quot;;[.$F$3]; &quot;&quot;&quot;: &quot;; [.F9])" office:value-type="string" office:string-value="&quot;9&quot;: 6" calcext:value-type="string">
            <text:p>"9": 6</text:p>
          </table:table-cell>
          <table:table-cell table:style-name="ce1319"/>
          <table:table-cell table:style-name="ce1319" table:formula="of:=COM.MICROSOFT.CONCAT(&quot;&quot;&quot;&quot;;[.$B$3]; &quot;&quot;&quot;: &quot;; [.H9])" office:value-type="string" office:string-value="&quot;5&quot;: 8" calcext:value-type="string">
            <text:p>"5": 8</text:p>
          </table:table-cell>
          <table:table-cell table:style-name="ce1319" table:formula="of:=COM.MICROSOFT.CONCAT(&quot;&quot;&quot;&quot;;[.$C$3]; &quot;&quot;&quot;: &quot;; [.I9])" office:value-type="string" office:string-value="&quot;6&quot;: 7" calcext:value-type="string">
            <text:p>"6": 7</text:p>
          </table:table-cell>
          <table:table-cell table:style-name="ce1319" table:formula="of:=COM.MICROSOFT.CONCAT(&quot;&quot;&quot;&quot;;[.$D$3]; &quot;&quot;&quot;: &quot;; [.J9])" office:value-type="string" office:string-value="&quot;7&quot;: 6" calcext:value-type="string">
            <text:p>"7": 6</text:p>
          </table:table-cell>
          <table:table-cell table:style-name="ce1319" table:formula="of:=COM.MICROSOFT.CONCAT(&quot;&quot;&quot;&quot;;[.$E$3]; &quot;&quot;&quot;: &quot;; [.K9])" office:value-type="string" office:string-value="&quot;8&quot;: 3" calcext:value-type="string">
            <text:p>"8": 3</text:p>
          </table:table-cell>
          <table:table-cell table:style-name="ce1319" table:formula="of:=COM.MICROSOFT.CONCAT(&quot;&quot;&quot;&quot;;[.$F$3]; &quot;&quot;&quot;: &quot;; [.L9])" office:value-type="string" office:string-value="&quot;9&quot;: 5" calcext:value-type="string">
            <text:p>"9": 5</text:p>
          </table:table-cell>
          <table:table-cell table:style-name="ce1319"/>
          <table:table-cell table:style-name="ce1319" table:formula="of:=COM.MICROSOFT.CONCAT(&quot;&quot;&quot;&quot;;[.$B$3]; &quot;&quot;&quot;: &quot;; [.N9])" office:value-type="string" office:string-value="&quot;5&quot;: 6" calcext:value-type="string">
            <text:p>"5": 6</text:p>
          </table:table-cell>
          <table:table-cell table:style-name="ce1319" table:formula="of:=COM.MICROSOFT.CONCAT(&quot;&quot;&quot;&quot;;[.$C$3]; &quot;&quot;&quot;: &quot;; [.O9])" office:value-type="string" office:string-value="&quot;6&quot;: 4" calcext:value-type="string">
            <text:p>"6": 4</text:p>
          </table:table-cell>
          <table:table-cell table:style-name="ce1319" table:formula="of:=COM.MICROSOFT.CONCAT(&quot;&quot;&quot;&quot;;[.$D$3]; &quot;&quot;&quot;: &quot;; [.P9])" office:value-type="string" office:string-value="&quot;7&quot;: 5" calcext:value-type="string">
            <text:p>"7": 5</text:p>
          </table:table-cell>
          <table:table-cell table:style-name="ce1319" table:formula="of:=COM.MICROSOFT.CONCAT(&quot;&quot;&quot;&quot;;[.$E$3]; &quot;&quot;&quot;: &quot;; [.Q9])" office:value-type="string" office:string-value="&quot;8&quot;: 3" calcext:value-type="string">
            <text:p>"8": 3</text:p>
          </table:table-cell>
          <table:table-cell table:style-name="ce1319" table:formula="of:=COM.MICROSOFT.CONCAT(&quot;&quot;&quot;&quot;;[.$F$3]; &quot;&quot;&quot;: &quot;; [.R9])" office:value-type="string" office:string-value="&quot;9&quot;: 9" calcext:value-type="string">
            <text:p>"9": 9</text:p>
          </table:table-cell>
          <table:table-cell table:style-name="ce1319"/>
          <table:table-cell table:style-name="ce1319" table:formula="of:=COM.MICROSOFT.CONCAT(&quot;&quot;&quot;&quot;;[.$B$3]; &quot;&quot;&quot;: &quot;; [.T9])" office:value-type="string" office:string-value="&quot;5&quot;: 5" calcext:value-type="string">
            <text:p>"5": 5</text:p>
          </table:table-cell>
          <table:table-cell table:style-name="ce1319" table:formula="of:=COM.MICROSOFT.CONCAT(&quot;&quot;&quot;&quot;;[.$C$3]; &quot;&quot;&quot;: &quot;; [.U9])" office:value-type="string" office:string-value="&quot;6&quot;: 6" calcext:value-type="string">
            <text:p>"6": 6</text:p>
          </table:table-cell>
          <table:table-cell table:style-name="ce1319" table:formula="of:=COM.MICROSOFT.CONCAT(&quot;&quot;&quot;&quot;;[.$D$3]; &quot;&quot;&quot;: &quot;; [.V9])" office:value-type="string" office:string-value="&quot;7&quot;: 8" calcext:value-type="string">
            <text:p>"7": 8</text:p>
          </table:table-cell>
          <table:table-cell table:style-name="ce1319" table:formula="of:=COM.MICROSOFT.CONCAT(&quot;&quot;&quot;&quot;;[.$E$3]; &quot;&quot;&quot;: &quot;; [.W9])" office:value-type="string" office:string-value="&quot;8&quot;: 4" calcext:value-type="string">
            <text:p>"8": 4</text:p>
          </table:table-cell>
          <table:table-cell table:style-name="ce1319" table:formula="of:=COM.MICROSOFT.CONCAT(&quot;&quot;&quot;&quot;;[.$F$3]; &quot;&quot;&quot;: &quot;; [.X9])" office:value-type="string" office:string-value="&quot;9&quot;: 9" calcext:value-type="string">
            <text:p>"9": 9</text:p>
          </table:table-cell>
          <table:table-cell table:style-name="ce1319"/>
          <table:table-cell table:style-name="ce1319" table:formula="of:=COM.MICROSOFT.CONCAT(&quot;&quot;&quot;&quot;;[.$B$3]; &quot;&quot;&quot;: &quot;; [.Z9])" office:value-type="string" office:string-value="&quot;5&quot;: 6" calcext:value-type="string">
            <text:p>"5": 6</text:p>
          </table:table-cell>
          <table:table-cell table:style-name="ce1319" table:formula="of:=COM.MICROSOFT.CONCAT(&quot;&quot;&quot;&quot;;[.$C$3]; &quot;&quot;&quot;: &quot;; [.AA9])" office:value-type="string" office:string-value="&quot;6&quot;: 5" calcext:value-type="string">
            <text:p>"6": 5</text:p>
          </table:table-cell>
          <table:table-cell table:style-name="ce1319" table:formula="of:=COM.MICROSOFT.CONCAT(&quot;&quot;&quot;&quot;;[.$D$3]; &quot;&quot;&quot;: &quot;; [.AB9])" office:value-type="string" office:string-value="&quot;7&quot;: 4" calcext:value-type="string">
            <text:p>"7": 4</text:p>
          </table:table-cell>
          <table:table-cell table:style-name="ce1319" table:formula="of:=COM.MICROSOFT.CONCAT(&quot;&quot;&quot;&quot;;[.$E$3]; &quot;&quot;&quot;: &quot;; [.AC9])" office:value-type="string" office:string-value="&quot;8&quot;: 9" calcext:value-type="string">
            <text:p>"8": 9</text:p>
          </table:table-cell>
          <table:table-cell table:style-name="ce1319" table:formula="of:=COM.MICROSOFT.CONCAT(&quot;&quot;&quot;&quot;;[.$F$3]; &quot;&quot;&quot;: &quot;; [.AD9])" office:value-type="string" office:string-value="&quot;9&quot;: 8" calcext:value-type="string">
            <text:p>"9": 8</text:p>
          </table:table-cell>
          <table:table-cell table:number-columns-repeated="2"/>
          <table:table-cell table:style-name="ce623" table:formula="of:=COM.MICROSOFT.CONCAT(&quot;&quot;&quot;1&quot;&quot;: { &quot;;COM.MICROSOFT.TEXTJOIN(&quot;, &quot;;TRUE();[.AL8:.AP10]);&quot;}&quot;)" office:value-type="string" office:string-value="&quot;1&quot;: { &quot;0&quot;: 9, &quot;1&quot;: 6, &quot;2&quot;: 1, &quot;3&quot;: 2, &quot;4&quot;: 4, &quot;5&quot;: 8, &quot;6&quot;: 7, &quot;7&quot;: 6, &quot;8&quot;: 3, &quot;9&quot;: 5, &quot;10&quot;: 13, &quot;11&quot;: 14, &quot;12&quot;: 12, &quot;13&quot;: 10, &quot;14&quot;: 11}" calcext:value-type="string">
            <text:p>"1": { "0": 9, "1": 6, "2": 1, "3": 2, "4": 4, "5": 8, "6": 7, "7": 6, "8": 3, "9": 5, "10": 13, "11": 14, "12": 12, "13": 10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690"/>
          <table:table-cell office:value-type="float" office:value="13" calcext:value-type="float">
            <text:p>13</text:p>
          </table:table-cell>
          <table:table-cell table:style-name="ce845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690"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852" office:value-type="float" office:value="13" calcext:value-type="float">
            <text:p>13</text:p>
          </table:table-cell>
          <table:table-cell table:style-name="ce690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690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852" office:value-type="float" office:value="14" calcext:value-type="float">
            <text:p>14</text:p>
          </table:table-cell>
          <table:table-cell/>
          <table:table-cell table:style-name="ce1319" table:formula="of:=COM.MICROSOFT.CONCAT(&quot;&quot;&quot;&quot;;[.$B$4]; &quot;&quot;&quot;: &quot;; [.B10])" office:value-type="string" office:string-value="&quot;10&quot;: 12" calcext:value-type="string">
            <text:p>"10": 12</text:p>
          </table:table-cell>
          <table:table-cell table:style-name="ce1319" table:formula="of:=COM.MICROSOFT.CONCAT(&quot;&quot;&quot;&quot;;[.$C$4]; &quot;&quot;&quot;: &quot;; [.C10])" office:value-type="string" office:string-value="&quot;11&quot;: 13" calcext:value-type="string">
            <text:p>"11": 13</text:p>
          </table:table-cell>
          <table:table-cell table:style-name="ce1319" table:formula="of:=COM.MICROSOFT.CONCAT(&quot;&quot;&quot;&quot;;[.$D$4]; &quot;&quot;&quot;: &quot;; [.D10])" office:value-type="string" office:string-value="&quot;12&quot;: 14" calcext:value-type="string">
            <text:p>"12": 14</text:p>
          </table:table-cell>
          <table:table-cell table:style-name="ce1319" table:formula="of:=COM.MICROSOFT.CONCAT(&quot;&quot;&quot;&quot;;[.$E$4]; &quot;&quot;&quot;: &quot;; [.E10])" office:value-type="string" office:string-value="&quot;13&quot;: 10" calcext:value-type="string">
            <text:p>"13": 10</text:p>
          </table:table-cell>
          <table:table-cell table:style-name="ce1319" table:formula="of:=COM.MICROSOFT.CONCAT(&quot;&quot;&quot;&quot;;[.$F$4]; &quot;&quot;&quot;: &quot;; [.F10])" office:value-type="string" office:string-value="&quot;14&quot;: 11" calcext:value-type="string">
            <text:p>"14": 11</text:p>
          </table:table-cell>
          <table:table-cell table:style-name="ce1319"/>
          <table:table-cell table:style-name="ce1319" table:formula="of:=COM.MICROSOFT.CONCAT(&quot;&quot;&quot;&quot;;[.$B$4]; &quot;&quot;&quot;: &quot;; [.H10])" office:value-type="string" office:string-value="&quot;10&quot;: 13" calcext:value-type="string">
            <text:p>"10": 13</text:p>
          </table:table-cell>
          <table:table-cell table:style-name="ce1319" table:formula="of:=COM.MICROSOFT.CONCAT(&quot;&quot;&quot;&quot;;[.$C$4]; &quot;&quot;&quot;: &quot;; [.I10])" office:value-type="string" office:string-value="&quot;11&quot;: 14" calcext:value-type="string">
            <text:p>"11": 14</text:p>
          </table:table-cell>
          <table:table-cell table:style-name="ce1319" table:formula="of:=COM.MICROSOFT.CONCAT(&quot;&quot;&quot;&quot;;[.$D$4]; &quot;&quot;&quot;: &quot;; [.J10])" office:value-type="string" office:string-value="&quot;12&quot;: 12" calcext:value-type="string">
            <text:p>"12": 12</text:p>
          </table:table-cell>
          <table:table-cell table:style-name="ce1319" table:formula="of:=COM.MICROSOFT.CONCAT(&quot;&quot;&quot;&quot;;[.$E$4]; &quot;&quot;&quot;: &quot;; [.K10])" office:value-type="string" office:string-value="&quot;13&quot;: 10" calcext:value-type="string">
            <text:p>"13": 10</text:p>
          </table:table-cell>
          <table:table-cell table:style-name="ce1319" table:formula="of:=COM.MICROSOFT.CONCAT(&quot;&quot;&quot;&quot;;[.$F$4]; &quot;&quot;&quot;: &quot;; [.L10])" office:value-type="string" office:string-value="&quot;14&quot;: 11" calcext:value-type="string">
            <text:p>"14": 11</text:p>
          </table:table-cell>
          <table:table-cell table:style-name="ce1319"/>
          <table:table-cell table:style-name="ce1319" table:formula="of:=COM.MICROSOFT.CONCAT(&quot;&quot;&quot;&quot;;[.$B$4]; &quot;&quot;&quot;: &quot;; [.N10])" office:value-type="string" office:string-value="&quot;10&quot;: 14" calcext:value-type="string">
            <text:p>"10": 14</text:p>
          </table:table-cell>
          <table:table-cell table:style-name="ce1319" table:formula="of:=COM.MICROSOFT.CONCAT(&quot;&quot;&quot;&quot;;[.$C$4]; &quot;&quot;&quot;: &quot;; [.O10])" office:value-type="string" office:string-value="&quot;11&quot;: 12" calcext:value-type="string">
            <text:p>"11": 12</text:p>
          </table:table-cell>
          <table:table-cell table:style-name="ce1319" table:formula="of:=COM.MICROSOFT.CONCAT(&quot;&quot;&quot;&quot;;[.$D$4]; &quot;&quot;&quot;: &quot;; [.P10])" office:value-type="string" office:string-value="&quot;12&quot;: 10" calcext:value-type="string">
            <text:p>"12": 10</text:p>
          </table:table-cell>
          <table:table-cell table:style-name="ce1319" table:formula="of:=COM.MICROSOFT.CONCAT(&quot;&quot;&quot;&quot;;[.$E$4]; &quot;&quot;&quot;: &quot;; [.Q10])" office:value-type="string" office:string-value="&quot;13&quot;: 11" calcext:value-type="string">
            <text:p>"13": 11</text:p>
          </table:table-cell>
          <table:table-cell table:style-name="ce1319" table:formula="of:=COM.MICROSOFT.CONCAT(&quot;&quot;&quot;&quot;;[.$F$4]; &quot;&quot;&quot;: &quot;; [.R10])" office:value-type="string" office:string-value="&quot;14&quot;: 13" calcext:value-type="string">
            <text:p>"14": 13</text:p>
          </table:table-cell>
          <table:table-cell table:style-name="ce1319"/>
          <table:table-cell table:style-name="ce1319" table:formula="of:=COM.MICROSOFT.CONCAT(&quot;&quot;&quot;&quot;;[.$B$4]; &quot;&quot;&quot;: &quot;; [.T10])" office:value-type="string" office:string-value="&quot;10&quot;: 14" calcext:value-type="string">
            <text:p>"10": 14</text:p>
          </table:table-cell>
          <table:table-cell table:style-name="ce1319" table:formula="of:=COM.MICROSOFT.CONCAT(&quot;&quot;&quot;&quot;;[.$C$4]; &quot;&quot;&quot;: &quot;; [.U10])" office:value-type="string" office:string-value="&quot;11&quot;: 13" calcext:value-type="string">
            <text:p>"11": 13</text:p>
          </table:table-cell>
          <table:table-cell table:style-name="ce1319" table:formula="of:=COM.MICROSOFT.CONCAT(&quot;&quot;&quot;&quot;;[.$D$4]; &quot;&quot;&quot;: &quot;; [.V10])" office:value-type="string" office:string-value="&quot;12&quot;: 12" calcext:value-type="string">
            <text:p>"12": 12</text:p>
          </table:table-cell>
          <table:table-cell table:style-name="ce1319" table:formula="of:=COM.MICROSOFT.CONCAT(&quot;&quot;&quot;&quot;;[.$E$4]; &quot;&quot;&quot;: &quot;; [.W10])" office:value-type="string" office:string-value="&quot;13&quot;: 10" calcext:value-type="string">
            <text:p>"13": 10</text:p>
          </table:table-cell>
          <table:table-cell table:style-name="ce1319" table:formula="of:=COM.MICROSOFT.CONCAT(&quot;&quot;&quot;&quot;;[.$F$4]; &quot;&quot;&quot;: &quot;; [.X10])" office:value-type="string" office:string-value="&quot;14&quot;: 11" calcext:value-type="string">
            <text:p>"14": 11</text:p>
          </table:table-cell>
          <table:table-cell table:style-name="ce1319"/>
          <table:table-cell table:style-name="ce1319" table:formula="of:=COM.MICROSOFT.CONCAT(&quot;&quot;&quot;&quot;;[.$B$4]; &quot;&quot;&quot;: &quot;; [.Z10])" office:value-type="string" office:string-value="&quot;10&quot;: 10" calcext:value-type="string">
            <text:p>"10": 10</text:p>
          </table:table-cell>
          <table:table-cell table:style-name="ce1319" table:formula="of:=COM.MICROSOFT.CONCAT(&quot;&quot;&quot;&quot;;[.$C$4]; &quot;&quot;&quot;: &quot;; [.AA10])" office:value-type="string" office:string-value="&quot;11&quot;: 11" calcext:value-type="string">
            <text:p>"11": 11</text:p>
          </table:table-cell>
          <table:table-cell table:style-name="ce1319" table:formula="of:=COM.MICROSOFT.CONCAT(&quot;&quot;&quot;&quot;;[.$D$4]; &quot;&quot;&quot;: &quot;; [.AB10])" office:value-type="string" office:string-value="&quot;12&quot;: 12" calcext:value-type="string">
            <text:p>"12": 12</text:p>
          </table:table-cell>
          <table:table-cell table:style-name="ce1319" table:formula="of:=COM.MICROSOFT.CONCAT(&quot;&quot;&quot;&quot;;[.$E$4]; &quot;&quot;&quot;: &quot;; [.AC10])" office:value-type="string" office:string-value="&quot;13&quot;: 13" calcext:value-type="string">
            <text:p>"13": 13</text:p>
          </table:table-cell>
          <table:table-cell table:style-name="ce1319" table:formula="of:=COM.MICROSOFT.CONCAT(&quot;&quot;&quot;&quot;;[.$F$4]; &quot;&quot;&quot;: &quot;; [.AD10])" office:value-type="string" office:string-value="&quot;14&quot;: 14" calcext:value-type="string">
            <text:p>"14": 14</text:p>
          </table:table-cell>
          <table:table-cell table:number-columns-repeated="2"/>
          <table:table-cell table:style-name="ce623" table:formula="of:=COM.MICROSOFT.CONCAT(&quot;&quot;&quot;2&quot;&quot;: { &quot;;COM.MICROSOFT.TEXTJOIN(&quot;, &quot;;TRUE();[.AR8:.AV10]);&quot;}&quot;)" office:value-type="string" office:string-value="&quot;2&quot;: { &quot;0&quot;: 8, &quot;1&quot;: 2, &quot;2&quot;: 3, &quot;3&quot;: 1, &quot;4&quot;: 7, &quot;5&quot;: 6, &quot;6&quot;: 4, &quot;7&quot;: 5, &quot;8&quot;: 3, &quot;9&quot;: 9, &quot;10&quot;: 14, &quot;11&quot;: 12, &quot;12&quot;: 10, &quot;13&quot;: 11, &quot;14&quot;: 13}" calcext:value-type="string">
            <text:p>"2": { "0": 8, "1": 2, "2": 3, "3": 1, "4": 7, "5": 6, "6": 4, "7": 5, "8": 3, "9": 9, "10": 14, "11": 12, "12": 10, "13": 11, "14": 13}</text:p>
          </table:table-cell>
          <table:table-cell table:number-columns-repeated="36"/>
          <table:table-cell table:style-name="Default" table:number-columns-repeated="16285"/>
        </table:table-row>
        <table:table-row table:style-name="ro2">
          <table:table-cell table:style-name="ce623"/>
          <table:table-cell table:style-name="ce882" table:number-columns-repeated="29"/>
          <table:table-cell table:style-name="ce860"/>
          <table:table-cell table:number-columns-repeated="27"/>
          <table:table-cell table:style-name="ce860" table:number-columns-repeated="2"/>
          <table:table-cell table:number-columns-repeated="2"/>
          <table:table-cell table:style-name="ce623" table:formula="of:=COM.MICROSOFT.CONCAT(&quot;&quot;&quot;3&quot;&quot;: { &quot;;COM.MICROSOFT.TEXTJOIN(&quot;, &quot;;TRUE();[.AX8:.BB10]);&quot;}&quot;)" office:value-type="string" office:string-value="&quot;3&quot;: { &quot;0&quot;: 3, &quot;1&quot;: 2, &quot;2&quot;: 1, &quot;3&quot;: 5, &quot;4&quot;: 7, &quot;5&quot;: 5, &quot;6&quot;: 6, &quot;7&quot;: 8, &quot;8&quot;: 4, &quot;9&quot;: 9, &quot;10&quot;: 14, &quot;11&quot;: 13, &quot;12&quot;: 12, &quot;13&quot;: 10, &quot;14&quot;: 11}" calcext:value-type="string">
            <text:p>"3": { "0": 3, "1": 2, "2": 1, "3": 5, "4": 7, "5": 5, "6": 6, "7": 8, "8": 4, "9": 9, "10": 14, "11": 13, "12": 12, "13": 10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624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690"/>
          <table:table-cell office:value-type="float" office:value="14" calcext:value-type="float">
            <text:p>14</text:p>
          </table:table-cell>
          <table:table-cell table:style-name="ce845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690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852" office:value-type="float" office:value="13" calcext:value-type="float">
            <text:p>13</text:p>
          </table:table-cell>
          <table:table-cell table:style-name="ce690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690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852" office:value-type="float" office:value="9" calcext:value-type="float">
            <text:p>9</text:p>
          </table:table-cell>
          <table:table-cell/>
          <table:table-cell table:style-name="ce1320" table:formula="of:=COM.MICROSOFT.CONCAT(&quot;&quot;&quot;&quot;;[.$B$2]; &quot;&quot;&quot;: &quot;; [.B12])" office:value-type="string" office:string-value="&quot;0&quot;: 12" calcext:value-type="string">
            <text:p>"0": 12</text:p>
          </table:table-cell>
          <table:table-cell table:style-name="ce1320" table:formula="of:=COM.MICROSOFT.CONCAT(&quot;&quot;&quot;&quot;;[.$C$2]; &quot;&quot;&quot;: &quot;; [.C12])" office:value-type="string" office:string-value="&quot;1&quot;: 10" calcext:value-type="string">
            <text:p>"1": 10</text:p>
          </table:table-cell>
          <table:table-cell table:style-name="ce1320" table:formula="of:=COM.MICROSOFT.CONCAT(&quot;&quot;&quot;&quot;;[.$D$2]; &quot;&quot;&quot;: &quot;; [.D12])" office:value-type="string" office:string-value="&quot;2&quot;: 6" calcext:value-type="string">
            <text:p>"2": 6</text:p>
          </table:table-cell>
          <table:table-cell table:style-name="ce1320" table:formula="of:=COM.MICROSOFT.CONCAT(&quot;&quot;&quot;&quot;;[.$E$2]; &quot;&quot;&quot;: &quot;; [.E12])" office:value-type="string" office:string-value="&quot;3&quot;: 5" calcext:value-type="string">
            <text:p>"3": 5</text:p>
          </table:table-cell>
          <table:table-cell table:style-name="ce1320" table:formula="of:=COM.MICROSOFT.CONCAT(&quot;&quot;&quot;&quot;;[.$F$2]; &quot;&quot;&quot;: &quot;; [.F12])" office:value-type="string" office:string-value="&quot;4&quot;: 9" calcext:value-type="string">
            <text:p>"4": 9</text:p>
          </table:table-cell>
          <table:table-cell table:style-name="ce1320"/>
          <table:table-cell table:style-name="ce1320" table:formula="of:=COM.MICROSOFT.CONCAT(&quot;&quot;&quot;&quot;;[.$B$2]; &quot;&quot;&quot;: &quot;; [.H12])" office:value-type="string" office:string-value="&quot;0&quot;: 14" calcext:value-type="string">
            <text:p>"0": 14</text:p>
          </table:table-cell>
          <table:table-cell table:style-name="ce1320" table:formula="of:=COM.MICROSOFT.CONCAT(&quot;&quot;&quot;&quot;;[.$C$2]; &quot;&quot;&quot;: &quot;; [.I12])" office:value-type="string" office:string-value="&quot;1&quot;: 7" calcext:value-type="string">
            <text:p>"1": 7</text:p>
          </table:table-cell>
          <table:table-cell table:style-name="ce1320" table:formula="of:=COM.MICROSOFT.CONCAT(&quot;&quot;&quot;&quot;;[.$D$2]; &quot;&quot;&quot;: &quot;; [.J12])" office:value-type="string" office:string-value="&quot;2&quot;: 4" calcext:value-type="string">
            <text:p>"2": 4</text:p>
          </table:table-cell>
          <table:table-cell table:style-name="ce1320" table:formula="of:=COM.MICROSOFT.CONCAT(&quot;&quot;&quot;&quot;;[.$E$2]; &quot;&quot;&quot;: &quot;; [.K12])" office:value-type="string" office:string-value="&quot;3&quot;: 5" calcext:value-type="string">
            <text:p>"3": 5</text:p>
          </table:table-cell>
          <table:table-cell table:style-name="ce1320" table:formula="of:=COM.MICROSOFT.CONCAT(&quot;&quot;&quot;&quot;;[.$F$2]; &quot;&quot;&quot;: &quot;; [.L12])" office:value-type="string" office:string-value="&quot;4&quot;: 13" calcext:value-type="string">
            <text:p>"4": 13</text:p>
          </table:table-cell>
          <table:table-cell table:style-name="ce1320"/>
          <table:table-cell table:style-name="ce1320" table:formula="of:=COM.MICROSOFT.CONCAT(&quot;&quot;&quot;&quot;;[.$B$2]; &quot;&quot;&quot;: &quot;; [.N12])" office:value-type="string" office:string-value="&quot;0&quot;: 14" calcext:value-type="string">
            <text:p>"0": 14</text:p>
          </table:table-cell>
          <table:table-cell table:style-name="ce1320" table:formula="of:=COM.MICROSOFT.CONCAT(&quot;&quot;&quot;&quot;;[.$C$2]; &quot;&quot;&quot;: &quot;; [.O12])" office:value-type="string" office:string-value="&quot;1&quot;: 5" calcext:value-type="string">
            <text:p>"1": 5</text:p>
          </table:table-cell>
          <table:table-cell table:style-name="ce1320" table:formula="of:=COM.MICROSOFT.CONCAT(&quot;&quot;&quot;&quot;;[.$D$2]; &quot;&quot;&quot;: &quot;; [.P12])" office:value-type="string" office:string-value="&quot;2&quot;: 4" calcext:value-type="string">
            <text:p>"2": 4</text:p>
          </table:table-cell>
          <table:table-cell table:style-name="ce1320" table:formula="of:=COM.MICROSOFT.CONCAT(&quot;&quot;&quot;&quot;;[.$E$2]; &quot;&quot;&quot;: &quot;; [.Q12])" office:value-type="string" office:string-value="&quot;3&quot;: 6" calcext:value-type="string">
            <text:p>"3": 6</text:p>
          </table:table-cell>
          <table:table-cell table:style-name="ce1320" table:formula="of:=COM.MICROSOFT.CONCAT(&quot;&quot;&quot;&quot;;[.$F$2]; &quot;&quot;&quot;: &quot;; [.R12])" office:value-type="string" office:string-value="&quot;4&quot;: 13" calcext:value-type="string">
            <text:p>"4": 13</text:p>
          </table:table-cell>
          <table:table-cell table:style-name="ce1320"/>
          <table:table-cell table:style-name="ce1320" table:formula="of:=COM.MICROSOFT.CONCAT(&quot;&quot;&quot;&quot;;[.$B$2]; &quot;&quot;&quot;: &quot;; [.T12])" office:value-type="string" office:string-value="&quot;0&quot;: 13" calcext:value-type="string">
            <text:p>"0": 13</text:p>
          </table:table-cell>
          <table:table-cell table:style-name="ce1320" table:formula="of:=COM.MICROSOFT.CONCAT(&quot;&quot;&quot;&quot;;[.$C$2]; &quot;&quot;&quot;: &quot;; [.U12])" office:value-type="string" office:string-value="&quot;1&quot;: 5" calcext:value-type="string">
            <text:p>"1": 5</text:p>
          </table:table-cell>
          <table:table-cell table:style-name="ce1320" table:formula="of:=COM.MICROSOFT.CONCAT(&quot;&quot;&quot;&quot;;[.$D$2]; &quot;&quot;&quot;: &quot;; [.V12])" office:value-type="string" office:string-value="&quot;2&quot;: 3" calcext:value-type="string">
            <text:p>"2": 3</text:p>
          </table:table-cell>
          <table:table-cell table:style-name="ce1320" table:formula="of:=COM.MICROSOFT.CONCAT(&quot;&quot;&quot;&quot;;[.$E$2]; &quot;&quot;&quot;: &quot;; [.W12])" office:value-type="string" office:string-value="&quot;3&quot;: 6" calcext:value-type="string">
            <text:p>"3": 6</text:p>
          </table:table-cell>
          <table:table-cell table:style-name="ce1320" table:formula="of:=COM.MICROSOFT.CONCAT(&quot;&quot;&quot;&quot;;[.$F$2]; &quot;&quot;&quot;: &quot;; [.X12])" office:value-type="string" office:string-value="&quot;4&quot;: 10" calcext:value-type="string">
            <text:p>"4": 10</text:p>
          </table:table-cell>
          <table:table-cell table:style-name="ce1320"/>
          <table:table-cell table:style-name="ce1320" table:formula="of:=COM.MICROSOFT.CONCAT(&quot;&quot;&quot;&quot;;[.$B$2]; &quot;&quot;&quot;: &quot;; [.Z12])" office:value-type="string" office:string-value="&quot;0&quot;: 10" calcext:value-type="string">
            <text:p>"0": 10</text:p>
          </table:table-cell>
          <table:table-cell table:style-name="ce1320" table:formula="of:=COM.MICROSOFT.CONCAT(&quot;&quot;&quot;&quot;;[.$C$2]; &quot;&quot;&quot;: &quot;; [.AA12])" office:value-type="string" office:string-value="&quot;1&quot;: 7" calcext:value-type="string">
            <text:p>"1": 7</text:p>
          </table:table-cell>
          <table:table-cell table:style-name="ce1328" table:formula="of:=COM.MICROSOFT.CONCAT(&quot;&quot;&quot;&quot;;[.$D$2]; &quot;&quot;&quot;: &quot;; [.AB12])" office:value-type="string" office:string-value="&quot;2&quot;: 4" calcext:value-type="string">
            <text:p>"2": 4</text:p>
          </table:table-cell>
          <table:table-cell table:style-name="ce1320" table:formula="of:=COM.MICROSOFT.CONCAT(&quot;&quot;&quot;&quot;;[.$E$2]; &quot;&quot;&quot;: &quot;; [.AC12])" office:value-type="string" office:string-value="&quot;3&quot;: 3" calcext:value-type="string">
            <text:p>"3": 3</text:p>
          </table:table-cell>
          <table:table-cell table:style-name="ce1320" table:formula="of:=COM.MICROSOFT.CONCAT(&quot;&quot;&quot;&quot;;[.$F$2]; &quot;&quot;&quot;: &quot;; [.AD12])" office:value-type="string" office:string-value="&quot;4&quot;: 9" calcext:value-type="string">
            <text:p>"4": 9</text:p>
          </table:table-cell>
          <table:table-cell table:style-name="ce860" table:number-columns-repeated="2"/>
          <table:table-cell table:style-name="ce624" table:formula="of:=COM.MICROSOFT.CONCAT(&quot;&quot;&quot;4&quot;&quot;: { &quot;;COM.MICROSOFT.TEXTJOIN(&quot;, &quot;;TRUE();[.BD8:.BH10]);&quot;}&quot;)" office:value-type="string" office:string-value="&quot;4&quot;: { &quot;0&quot;: 7, &quot;1&quot;: 3, &quot;2&quot;: 2, &quot;3&quot;: 1, &quot;4&quot;: 13, &quot;5&quot;: 6, &quot;6&quot;: 5, &quot;7&quot;: 4, &quot;8&quot;: 9, &quot;9&quot;: 8, &quot;10&quot;: 10, &quot;11&quot;: 11, &quot;12&quot;: 12, &quot;13&quot;: 13, &quot;14&quot;: 14}" calcext:value-type="string">
            <text:p>"4": { "0": 7, "1": 3, "2": 2, "3": 1, "4": 13, "5": 6, "6": 5, "7": 4, "8": 9, "9": 8, "10": 10, "11": 11, "12": 12, "13": 13, "14": 14}</text:p>
          </table:table-cell>
          <table:table-cell table:style-name="ce860" table:number-columns-repeated="26"/>
          <table:table-cell table:number-columns-repeated="10"/>
          <table:table-cell table:style-name="Default" table:number-columns-repeated="16285"/>
        </table:table-row>
        <table:table-row table:style-name="ro1">
          <table:table-cell table:style-name="ce623"/>
          <table:table-cell table:style-name="ce880" table:formula="of:=[.$T$3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690"/>
          <table:table-cell office:value-type="float" office:value="10" calcext:value-type="float">
            <text:p>10</text:p>
          </table:table-cell>
          <table:table-cell table:style-name="ce880" table:formula="of:=[.$U$3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690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880" table:formula="of:=[.$V$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52" office:value-type="float" office:value="9" calcext:value-type="float">
            <text:p>9</text:p>
          </table:table-cell>
          <table:table-cell table:style-name="ce690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0" table:formula="of:=[.$W$3]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690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0" table:formula="of:=[.$X$3]" office:value-type="float" office:value="7" calcext:value-type="float">
            <text:p>7</text:p>
          </table:table-cell>
          <table:table-cell/>
          <table:table-cell table:style-name="ce1320" table:formula="of:=COM.MICROSOFT.CONCAT(&quot;&quot;&quot;&quot;;[.$B$3]; &quot;&quot;&quot;: &quot;; [.B13])" office:value-type="string" office:string-value="&quot;5&quot;: 8" calcext:value-type="string">
            <text:p>"5": 8</text:p>
          </table:table-cell>
          <table:table-cell table:style-name="ce1320" table:formula="of:=COM.MICROSOFT.CONCAT(&quot;&quot;&quot;&quot;;[.$C$3]; &quot;&quot;&quot;: &quot;; [.C13])" office:value-type="string" office:string-value="&quot;6&quot;: 1" calcext:value-type="string">
            <text:p>"6": 1</text:p>
          </table:table-cell>
          <table:table-cell table:style-name="ce1320" table:formula="of:=COM.MICROSOFT.CONCAT(&quot;&quot;&quot;&quot;;[.$D$3]; &quot;&quot;&quot;: &quot;; [.D13])" office:value-type="string" office:string-value="&quot;7&quot;: 2" calcext:value-type="string">
            <text:p>"7": 2</text:p>
          </table:table-cell>
          <table:table-cell table:style-name="ce1320" table:formula="of:=COM.MICROSOFT.CONCAT(&quot;&quot;&quot;&quot;;[.$E$3]; &quot;&quot;&quot;: &quot;; [.E13])" office:value-type="string" office:string-value="&quot;8&quot;: 3" calcext:value-type="string">
            <text:p>"8": 3</text:p>
          </table:table-cell>
          <table:table-cell table:style-name="ce1320" table:formula="of:=COM.MICROSOFT.CONCAT(&quot;&quot;&quot;&quot;;[.$F$3]; &quot;&quot;&quot;: &quot;; [.F13])" office:value-type="string" office:string-value="&quot;9&quot;: 4" calcext:value-type="string">
            <text:p>"9": 4</text:p>
          </table:table-cell>
          <table:table-cell table:style-name="ce1320"/>
          <table:table-cell table:style-name="ce1320" table:formula="of:=COM.MICROSOFT.CONCAT(&quot;&quot;&quot;&quot;;[.$B$3]; &quot;&quot;&quot;: &quot;; [.H13])" office:value-type="string" office:string-value="&quot;5&quot;: 10" calcext:value-type="string">
            <text:p>"5": 10</text:p>
          </table:table-cell>
          <table:table-cell table:style-name="ce1320" table:formula="of:=COM.MICROSOFT.CONCAT(&quot;&quot;&quot;&quot;;[.$C$3]; &quot;&quot;&quot;: &quot;; [.I13])" office:value-type="string" office:string-value="&quot;6&quot;: 2" calcext:value-type="string">
            <text:p>"6": 2</text:p>
          </table:table-cell>
          <table:table-cell table:style-name="ce1320" table:formula="of:=COM.MICROSOFT.CONCAT(&quot;&quot;&quot;&quot;;[.$D$3]; &quot;&quot;&quot;: &quot;; [.J13])" office:value-type="string" office:string-value="&quot;7&quot;: 1" calcext:value-type="string">
            <text:p>"7": 1</text:p>
          </table:table-cell>
          <table:table-cell table:style-name="ce1320" table:formula="of:=COM.MICROSOFT.CONCAT(&quot;&quot;&quot;&quot;;[.$E$3]; &quot;&quot;&quot;: &quot;; [.K13])" office:value-type="string" office:string-value="&quot;8&quot;: 2" calcext:value-type="string">
            <text:p>"8": 2</text:p>
          </table:table-cell>
          <table:table-cell table:style-name="ce1320" table:formula="of:=COM.MICROSOFT.CONCAT(&quot;&quot;&quot;&quot;;[.$F$3]; &quot;&quot;&quot;: &quot;; [.L13])" office:value-type="string" office:string-value="&quot;9&quot;: 9" calcext:value-type="string">
            <text:p>"9": 9</text:p>
          </table:table-cell>
          <table:table-cell table:style-name="ce1320"/>
          <table:table-cell table:style-name="ce1320" table:formula="of:=COM.MICROSOFT.CONCAT(&quot;&quot;&quot;&quot;;[.$B$3]; &quot;&quot;&quot;: &quot;; [.N13])" office:value-type="string" office:string-value="&quot;5&quot;: 10" calcext:value-type="string">
            <text:p>"5": 10</text:p>
          </table:table-cell>
          <table:table-cell table:style-name="ce1320" table:formula="of:=COM.MICROSOFT.CONCAT(&quot;&quot;&quot;&quot;;[.$C$3]; &quot;&quot;&quot;: &quot;; [.O13])" office:value-type="string" office:string-value="&quot;6&quot;: 2" calcext:value-type="string">
            <text:p>"6": 2</text:p>
          </table:table-cell>
          <table:table-cell table:style-name="ce1320" table:formula="of:=COM.MICROSOFT.CONCAT(&quot;&quot;&quot;&quot;;[.$D$3]; &quot;&quot;&quot;: &quot;; [.P13])" office:value-type="string" office:string-value="&quot;7&quot;: 0" calcext:value-type="string">
            <text:p>"7": 0</text:p>
          </table:table-cell>
          <table:table-cell table:style-name="ce1320" table:formula="of:=COM.MICROSOFT.CONCAT(&quot;&quot;&quot;&quot;;[.$E$3]; &quot;&quot;&quot;: &quot;; [.Q13])" office:value-type="string" office:string-value="&quot;8&quot;: 1" calcext:value-type="string">
            <text:p>"8": 1</text:p>
          </table:table-cell>
          <table:table-cell table:style-name="ce1320" table:formula="of:=COM.MICROSOFT.CONCAT(&quot;&quot;&quot;&quot;;[.$F$3]; &quot;&quot;&quot;: &quot;; [.R13])" office:value-type="string" office:string-value="&quot;9&quot;: 9" calcext:value-type="string">
            <text:p>"9": 9</text:p>
          </table:table-cell>
          <table:table-cell table:style-name="ce1320"/>
          <table:table-cell table:style-name="ce1320" table:formula="of:=COM.MICROSOFT.CONCAT(&quot;&quot;&quot;&quot;;[.$B$3]; &quot;&quot;&quot;: &quot;; [.T13])" office:value-type="string" office:string-value="&quot;5&quot;: 4" calcext:value-type="string">
            <text:p>"5": 4</text:p>
          </table:table-cell>
          <table:table-cell table:style-name="ce1320" table:formula="of:=COM.MICROSOFT.CONCAT(&quot;&quot;&quot;&quot;;[.$C$3]; &quot;&quot;&quot;: &quot;; [.U13])" office:value-type="string" office:string-value="&quot;6&quot;: 2" calcext:value-type="string">
            <text:p>"6": 2</text:p>
          </table:table-cell>
          <table:table-cell table:style-name="ce1320" table:formula="of:=COM.MICROSOFT.CONCAT(&quot;&quot;&quot;&quot;;[.$D$3]; &quot;&quot;&quot;: &quot;; [.V13])" office:value-type="string" office:string-value="&quot;7&quot;: 1" calcext:value-type="string">
            <text:p>"7": 1</text:p>
          </table:table-cell>
          <table:table-cell table:style-name="ce1320" table:formula="of:=COM.MICROSOFT.CONCAT(&quot;&quot;&quot;&quot;;[.$E$3]; &quot;&quot;&quot;: &quot;; [.W13])" office:value-type="string" office:string-value="&quot;8&quot;: 1" calcext:value-type="string">
            <text:p>"8": 1</text:p>
          </table:table-cell>
          <table:table-cell table:style-name="ce1320" table:formula="of:=COM.MICROSOFT.CONCAT(&quot;&quot;&quot;&quot;;[.$F$3]; &quot;&quot;&quot;: &quot;; [.X13])" office:value-type="string" office:string-value="&quot;9&quot;: 8" calcext:value-type="string">
            <text:p>"9": 8</text:p>
          </table:table-cell>
          <table:table-cell table:style-name="ce1320"/>
          <table:table-cell table:style-name="ce1320" table:formula="of:=COM.MICROSOFT.CONCAT(&quot;&quot;&quot;&quot;;[.$B$3]; &quot;&quot;&quot;: &quot;; [.Z13])" office:value-type="string" office:string-value="&quot;5&quot;: 6" calcext:value-type="string">
            <text:p>"5": 6</text:p>
          </table:table-cell>
          <table:table-cell table:style-name="ce1320" table:formula="of:=COM.MICROSOFT.CONCAT(&quot;&quot;&quot;&quot;;[.$C$3]; &quot;&quot;&quot;: &quot;; [.AA13])" office:value-type="string" office:string-value="&quot;6&quot;: 5" calcext:value-type="string">
            <text:p>"6": 5</text:p>
          </table:table-cell>
          <table:table-cell table:style-name="ce1320" table:formula="of:=COM.MICROSOFT.CONCAT(&quot;&quot;&quot;&quot;;[.$D$3]; &quot;&quot;&quot;: &quot;; [.AB13])" office:value-type="string" office:string-value="&quot;7&quot;: 2" calcext:value-type="string">
            <text:p>"7": 2</text:p>
          </table:table-cell>
          <table:table-cell table:style-name="ce1320" table:formula="of:=COM.MICROSOFT.CONCAT(&quot;&quot;&quot;&quot;;[.$E$3]; &quot;&quot;&quot;: &quot;; [.AC13])" office:value-type="string" office:string-value="&quot;8&quot;: 1" calcext:value-type="string">
            <text:p>"8": 1</text:p>
          </table:table-cell>
          <table:table-cell table:style-name="ce1320" table:formula="of:=COM.MICROSOFT.CONCAT(&quot;&quot;&quot;&quot;;[.$F$3]; &quot;&quot;&quot;: &quot;; [.AD13])" office:value-type="string" office:string-value="&quot;9&quot;: 7" calcext:value-type="string">
            <text:p>"9": 7</text:p>
          </table:table-cell>
          <table:table-cell table:number-columns-repeated="39"/>
          <table:table-cell table:style-name="Default" table:number-columns-repeated="16285"/>
        </table:table-row>
        <table:table-row table:style-name="ro1">
          <table:table-cell table:style-name="ce623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690"/>
          <table:table-cell office:value-type="float" office:value="12" calcext:value-type="float">
            <text:p>12</text:p>
          </table:table-cell>
          <table:table-cell table:style-name="ce845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style-name="ce690"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852" office:value-type="float" office:value="12" calcext:value-type="float">
            <text:p>12</text:p>
          </table:table-cell>
          <table:table-cell table:style-name="ce690"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690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style-name="ce852" office:value-type="float" office:value="8" calcext:value-type="float">
            <text:p>8</text:p>
          </table:table-cell>
          <table:table-cell/>
          <table:table-cell table:style-name="ce1320" table:formula="of:=COM.MICROSOFT.CONCAT(&quot;&quot;&quot;&quot;;[.$B$4]; &quot;&quot;&quot;: &quot;; [.B14])" office:value-type="string" office:string-value="&quot;10&quot;: 13" calcext:value-type="string">
            <text:p>"10": 13</text:p>
          </table:table-cell>
          <table:table-cell table:style-name="ce1320" table:formula="of:=COM.MICROSOFT.CONCAT(&quot;&quot;&quot;&quot;;[.$C$4]; &quot;&quot;&quot;: &quot;; [.C14])" office:value-type="string" office:string-value="&quot;11&quot;: 14" calcext:value-type="string">
            <text:p>"11": 14</text:p>
          </table:table-cell>
          <table:table-cell table:style-name="ce1320" table:formula="of:=COM.MICROSOFT.CONCAT(&quot;&quot;&quot;&quot;;[.$D$4]; &quot;&quot;&quot;: &quot;; [.D14])" office:value-type="string" office:string-value="&quot;12&quot;: 11" calcext:value-type="string">
            <text:p>"12": 11</text:p>
          </table:table-cell>
          <table:table-cell table:style-name="ce1320" table:formula="of:=COM.MICROSOFT.CONCAT(&quot;&quot;&quot;&quot;;[.$E$4]; &quot;&quot;&quot;: &quot;; [.E14])" office:value-type="string" office:string-value="&quot;13&quot;: 7" calcext:value-type="string">
            <text:p>"13": 7</text:p>
          </table:table-cell>
          <table:table-cell table:style-name="ce1320" table:formula="of:=COM.MICROSOFT.CONCAT(&quot;&quot;&quot;&quot;;[.$F$4]; &quot;&quot;&quot;: &quot;; [.F14])" office:value-type="string" office:string-value="&quot;14&quot;: 8" calcext:value-type="string">
            <text:p>"14": 8</text:p>
          </table:table-cell>
          <table:table-cell table:style-name="ce1320"/>
          <table:table-cell table:style-name="ce1320" table:formula="of:=COM.MICROSOFT.CONCAT(&quot;&quot;&quot;&quot;;[.$B$4]; &quot;&quot;&quot;: &quot;; [.H14])" office:value-type="string" office:string-value="&quot;10&quot;: 12" calcext:value-type="string">
            <text:p>"10": 12</text:p>
          </table:table-cell>
          <table:table-cell table:style-name="ce1320" table:formula="of:=COM.MICROSOFT.CONCAT(&quot;&quot;&quot;&quot;;[.$C$4]; &quot;&quot;&quot;: &quot;; [.I14])" office:value-type="string" office:string-value="&quot;11&quot;: 8" calcext:value-type="string">
            <text:p>"11": 8</text:p>
          </table:table-cell>
          <table:table-cell table:style-name="ce1320" table:formula="of:=COM.MICROSOFT.CONCAT(&quot;&quot;&quot;&quot;;[.$D$4]; &quot;&quot;&quot;: &quot;; [.J14])" office:value-type="string" office:string-value="&quot;12&quot;: 6" calcext:value-type="string">
            <text:p>"12": 6</text:p>
          </table:table-cell>
          <table:table-cell table:style-name="ce1320" table:formula="of:=COM.MICROSOFT.CONCAT(&quot;&quot;&quot;&quot;;[.$E$4]; &quot;&quot;&quot;: &quot;; [.K14])" office:value-type="string" office:string-value="&quot;13&quot;: 3" calcext:value-type="string">
            <text:p>"13": 3</text:p>
          </table:table-cell>
          <table:table-cell table:style-name="ce1320" table:formula="of:=COM.MICROSOFT.CONCAT(&quot;&quot;&quot;&quot;;[.$F$4]; &quot;&quot;&quot;: &quot;; [.L14])" office:value-type="string" office:string-value="&quot;14&quot;: 11" calcext:value-type="string">
            <text:p>"14": 11</text:p>
          </table:table-cell>
          <table:table-cell table:style-name="ce1320"/>
          <table:table-cell table:style-name="ce1320" table:formula="of:=COM.MICROSOFT.CONCAT(&quot;&quot;&quot;&quot;;[.$B$4]; &quot;&quot;&quot;: &quot;; [.N14])" office:value-type="string" office:string-value="&quot;10&quot;: 11" calcext:value-type="string">
            <text:p>"10": 11</text:p>
          </table:table-cell>
          <table:table-cell table:style-name="ce1320" table:formula="of:=COM.MICROSOFT.CONCAT(&quot;&quot;&quot;&quot;;[.$C$4]; &quot;&quot;&quot;: &quot;; [.O14])" office:value-type="string" office:string-value="&quot;11&quot;: 7" calcext:value-type="string">
            <text:p>"11": 7</text:p>
          </table:table-cell>
          <table:table-cell table:style-name="ce1320" table:formula="of:=COM.MICROSOFT.CONCAT(&quot;&quot;&quot;&quot;;[.$D$4]; &quot;&quot;&quot;: &quot;; [.P14])" office:value-type="string" office:string-value="&quot;12&quot;: 8" calcext:value-type="string">
            <text:p>"12": 8</text:p>
          </table:table-cell>
          <table:table-cell table:style-name="ce1320" table:formula="of:=COM.MICROSOFT.CONCAT(&quot;&quot;&quot;&quot;;[.$E$4]; &quot;&quot;&quot;: &quot;; [.Q14])" office:value-type="string" office:string-value="&quot;13&quot;: 3" calcext:value-type="string">
            <text:p>"13": 3</text:p>
          </table:table-cell>
          <table:table-cell table:style-name="ce1320" table:formula="of:=COM.MICROSOFT.CONCAT(&quot;&quot;&quot;&quot;;[.$F$4]; &quot;&quot;&quot;: &quot;; [.R14])" office:value-type="string" office:string-value="&quot;14&quot;: 12" calcext:value-type="string">
            <text:p>"14": 12</text:p>
          </table:table-cell>
          <table:table-cell table:style-name="ce1320"/>
          <table:table-cell table:style-name="ce1320" table:formula="of:=COM.MICROSOFT.CONCAT(&quot;&quot;&quot;&quot;;[.$B$4]; &quot;&quot;&quot;: &quot;; [.T14])" office:value-type="string" office:string-value="&quot;10&quot;: 12" calcext:value-type="string">
            <text:p>"10": 12</text:p>
          </table:table-cell>
          <table:table-cell table:style-name="ce1320" table:formula="of:=COM.MICROSOFT.CONCAT(&quot;&quot;&quot;&quot;;[.$C$4]; &quot;&quot;&quot;: &quot;; [.U14])" office:value-type="string" office:string-value="&quot;11&quot;: 14" calcext:value-type="string">
            <text:p>"11": 14</text:p>
          </table:table-cell>
          <table:table-cell table:style-name="ce1320" table:formula="of:=COM.MICROSOFT.CONCAT(&quot;&quot;&quot;&quot;;[.$D$4]; &quot;&quot;&quot;: &quot;; [.V14])" office:value-type="string" office:string-value="&quot;12&quot;: 11" calcext:value-type="string">
            <text:p>"12": 11</text:p>
          </table:table-cell>
          <table:table-cell table:style-name="ce1320" table:formula="of:=COM.MICROSOFT.CONCAT(&quot;&quot;&quot;&quot;;[.$E$4]; &quot;&quot;&quot;: &quot;; [.W14])" office:value-type="string" office:string-value="&quot;13&quot;: 7" calcext:value-type="string">
            <text:p>"13": 7</text:p>
          </table:table-cell>
          <table:table-cell table:style-name="ce1320" table:formula="of:=COM.MICROSOFT.CONCAT(&quot;&quot;&quot;&quot;;[.$F$4]; &quot;&quot;&quot;: &quot;; [.X14])" office:value-type="string" office:string-value="&quot;14&quot;: 9" calcext:value-type="string">
            <text:p>"14": 9</text:p>
          </table:table-cell>
          <table:table-cell table:style-name="ce1320"/>
          <table:table-cell table:style-name="ce1320" table:formula="of:=COM.MICROSOFT.CONCAT(&quot;&quot;&quot;&quot;;[.$B$4]; &quot;&quot;&quot;: &quot;; [.Z14])" office:value-type="string" office:string-value="&quot;10&quot;: 12" calcext:value-type="string">
            <text:p>"10": 12</text:p>
          </table:table-cell>
          <table:table-cell table:style-name="ce1320" table:formula="of:=COM.MICROSOFT.CONCAT(&quot;&quot;&quot;&quot;;[.$C$4]; &quot;&quot;&quot;: &quot;; [.AA14])" office:value-type="string" office:string-value="&quot;11&quot;: 13" calcext:value-type="string">
            <text:p>"11": 13</text:p>
          </table:table-cell>
          <table:table-cell table:style-name="ce1320" table:formula="of:=COM.MICROSOFT.CONCAT(&quot;&quot;&quot;&quot;;[.$D$4]; &quot;&quot;&quot;: &quot;; [.AB14])" office:value-type="string" office:string-value="&quot;12&quot;: 14" calcext:value-type="string">
            <text:p>"12": 14</text:p>
          </table:table-cell>
          <table:table-cell table:style-name="ce1320" table:formula="of:=COM.MICROSOFT.CONCAT(&quot;&quot;&quot;&quot;;[.$E$4]; &quot;&quot;&quot;: &quot;; [.AC14])" office:value-type="string" office:string-value="&quot;13&quot;: 11" calcext:value-type="string">
            <text:p>"13": 11</text:p>
          </table:table-cell>
          <table:table-cell table:style-name="ce1320" table:formula="of:=COM.MICROSOFT.CONCAT(&quot;&quot;&quot;&quot;;[.$F$4]; &quot;&quot;&quot;: &quot;; [.AD14])" office:value-type="string" office:string-value="&quot;14&quot;: 8" calcext:value-type="string">
            <text:p>"14": 8</text:p>
          </table:table-cell>
          <table:table-cell table:number-columns-repeated="2"/>
          <table:table-cell table:formula="of:=COM.MICROSOFT.TEXTJOIN(&quot;, &quot;;TRUE();[.BK8:.BK12]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3, &quot;12&quot;: 14, &quot;13&quot;: 10, &quot;14&quot;: 11}, &quot;1&quot;: { &quot;0&quot;: 9, &quot;1&quot;: 6, &quot;2&quot;: 1, &quot;3&quot;: 2, &quot;4&quot;: 4, &quot;5&quot;: 8, &quot;6&quot;: 7, &quot;7&quot;: 6, &quot;8&quot;: 3, &quot;9&quot;: 5, &quot;10&quot;: 13, &quot;11&quot;: 14, &quot;12&quot;: 12, &quot;13&quot;: 10, &quot;14&quot;: 11}, &quot;2&quot;: { &quot;0&quot;: 8, &quot;1&quot;: 2, &quot;2&quot;: 3, &quot;3&quot;: 1, &quot;4&quot;: 7, &quot;5&quot;: 6, &quot;6&quot;: 4, &quot;7&quot;: 5, &quot;8&quot;: 3, &quot;9&quot;: 9, &quot;10&quot;: 14, &quot;11&quot;: 12, &quot;12&quot;: 10, &quot;13&quot;: 11, &quot;14&quot;: 13}, &quot;3&quot;: { &quot;0&quot;: 3, &quot;1&quot;: 2, &quot;2&quot;: 1, &quot;3&quot;: 5, &quot;4&quot;: 7, &quot;5&quot;: 5, &quot;6&quot;: 6, &quot;7&quot;: 8, &quot;8&quot;: 4, &quot;9&quot;: 9, &quot;10&quot;: 14, &quot;11&quot;: 13, &quot;12&quot;: 12, &quot;13&quot;: 10, &quot;14&quot;: 11}, &quot;4&quot;: { &quot;0&quot;: 7, &quot;1&quot;: 3, &quot;2&quot;: 2, &quot;3&quot;: 1, &quot;4&quot;: 13, &quot;5&quot;: 6, &quot;6&quot;: 5, &quot;7&quot;: 4, &quot;8&quot;: 9, &quot;9&quot;: 8, &quot;10&quot;: 10, &quot;11&quot;: 11, &quot;12&quot;: 12, &quot;13&quot;: 13, &quot;14&quot;: 14}" calcext:value-type="string">
            <text:p>"0": { "0": 14, "1": 1, "2": 2, "3": 3, "4": 5, "5": 9, "6": 8, "7": 7, "8": 4, "9": 6, "10": 12, "11": 13, "12": 14, "13": 10, "14": 11}, "1": { "0": 9, "1": 6, "2": 1, "3": 2, "4": 4, "5": 8, "6": 7, "7": 6, "8": 3, "9": 5, "10": 13, "11": 14, "12": 12, "13": 10, "14": 11}, "2": { "0": 8, "1": 2, "2": 3, "3": 1, "4": 7, "5": 6, "6": 4, "7": 5, "8": 3, "9": 9, "10": 14, "11": 12, "12": 10, "13": 11, "14": 13}, "3": { "0": 3, "1": 2, "2": 1, "3": 5, "4": 7, "5": 5, "6": 6, "7": 8, "8": 4, "9": 9, "10": 14, "11": 13, "12": 12, "13": 10, "14": 11}, "4": { "0": 7, "1": 3, "2": 2, "3": 1, "4": 13, "5": 6, "6": 5, "7": 4, "8": 9, "9": 8, "10": 10, "11": 11, "12": 12, "13": 13, "14": 14}</text:p>
          </table:table-cell>
          <table:table-cell table:number-columns-repeated="36"/>
          <table:table-cell table:style-name="Default" table:number-columns-repeated="16285"/>
        </table:table-row>
        <table:table-row table:style-name="ro2">
          <table:table-cell table:style-name="ce623"/>
          <table:table-cell table:style-name="ce882" table:number-columns-repeated="29"/>
          <table:table-cell table:number-columns-repeated="69"/>
          <table:table-cell table:style-name="Default" table:number-columns-repeated="16285"/>
        </table:table-row>
        <table:table-row table:style-name="ro1">
          <table:table-cell table:style-name="ce623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style-name="ce690"/>
          <table:table-cell office:value-type="float" office:value="14" calcext:value-type="float">
            <text:p>14</text:p>
          </table:table-cell>
          <table:table-cell table:style-name="ce845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690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852" office:value-type="float" office:value="12" calcext:value-type="float">
            <text:p>12</text:p>
          </table:table-cell>
          <table:table-cell table:style-name="ce690"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690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style-name="ce852" office:value-type="float" office:value="10" calcext:value-type="float">
            <text:p>10</text:p>
          </table:table-cell>
          <table:table-cell table:style-name="ce623"/>
          <table:table-cell table:style-name="ce1321" table:formula="of:=COM.MICROSOFT.CONCAT(&quot;&quot;&quot;&quot;;[.$B$2]; &quot;&quot;&quot;: &quot;; [.B16])" office:value-type="string" office:string-value="&quot;0&quot;: 13" calcext:value-type="string">
            <text:p>"0": 13</text:p>
          </table:table-cell>
          <table:table-cell table:style-name="ce1321" table:formula="of:=COM.MICROSOFT.CONCAT(&quot;&quot;&quot;&quot;;[.$C$2]; &quot;&quot;&quot;: &quot;; [.C16])" office:value-type="string" office:string-value="&quot;1&quot;: 14" calcext:value-type="string">
            <text:p>"1": 14</text:p>
          </table:table-cell>
          <table:table-cell table:style-name="ce1321" table:formula="of:=COM.MICROSOFT.CONCAT(&quot;&quot;&quot;&quot;;[.$D$2]; &quot;&quot;&quot;: &quot;; [.D16])" office:value-type="string" office:string-value="&quot;2&quot;: 12" calcext:value-type="string">
            <text:p>"2": 12</text:p>
          </table:table-cell>
          <table:table-cell table:style-name="ce1321" table:formula="of:=COM.MICROSOFT.CONCAT(&quot;&quot;&quot;&quot;;[.$E$2]; &quot;&quot;&quot;: &quot;; [.E16])" office:value-type="string" office:string-value="&quot;3&quot;: 11" calcext:value-type="string">
            <text:p>"3": 11</text:p>
          </table:table-cell>
          <table:table-cell table:style-name="ce1321" table:formula="of:=COM.MICROSOFT.CONCAT(&quot;&quot;&quot;&quot;;[.$F$2]; &quot;&quot;&quot;: &quot;; [.F16])" office:value-type="string" office:string-value="&quot;4&quot;: 10" calcext:value-type="string">
            <text:p>"4": 10</text:p>
          </table:table-cell>
          <table:table-cell table:style-name="ce1321"/>
          <table:table-cell table:style-name="ce1321" table:formula="of:=COM.MICROSOFT.CONCAT(&quot;&quot;&quot;&quot;;[.$B$2]; &quot;&quot;&quot;: &quot;; [.H16])" office:value-type="string" office:string-value="&quot;0&quot;: 14" calcext:value-type="string">
            <text:p>"0": 14</text:p>
          </table:table-cell>
          <table:table-cell table:style-name="ce1321" table:formula="of:=COM.MICROSOFT.CONCAT(&quot;&quot;&quot;&quot;;[.$C$2]; &quot;&quot;&quot;: &quot;; [.I16])" office:value-type="string" office:string-value="&quot;1&quot;: 12" calcext:value-type="string">
            <text:p>"1": 12</text:p>
          </table:table-cell>
          <table:table-cell table:style-name="ce1321" table:formula="of:=COM.MICROSOFT.CONCAT(&quot;&quot;&quot;&quot;;[.$D$2]; &quot;&quot;&quot;: &quot;; [.J16])" office:value-type="string" office:string-value="&quot;2&quot;: 9" calcext:value-type="string">
            <text:p>"2": 9</text:p>
          </table:table-cell>
          <table:table-cell table:style-name="ce1321" table:formula="of:=COM.MICROSOFT.CONCAT(&quot;&quot;&quot;&quot;;[.$E$2]; &quot;&quot;&quot;: &quot;; [.K16])" office:value-type="string" office:string-value="&quot;3&quot;: 10" calcext:value-type="string">
            <text:p>"3": 10</text:p>
          </table:table-cell>
          <table:table-cell table:style-name="ce1321" table:formula="of:=COM.MICROSOFT.CONCAT(&quot;&quot;&quot;&quot;;[.$F$2]; &quot;&quot;&quot;: &quot;; [.L16])" office:value-type="string" office:string-value="&quot;4&quot;: 11" calcext:value-type="string">
            <text:p>"4": 11</text:p>
          </table:table-cell>
          <table:table-cell table:style-name="ce1321"/>
          <table:table-cell table:style-name="ce1321" table:formula="of:=COM.MICROSOFT.CONCAT(&quot;&quot;&quot;&quot;;[.$B$2]; &quot;&quot;&quot;: &quot;; [.N16])" office:value-type="string" office:string-value="&quot;0&quot;: 14" calcext:value-type="string">
            <text:p>"0": 14</text:p>
          </table:table-cell>
          <table:table-cell table:style-name="ce1321" table:formula="of:=COM.MICROSOFT.CONCAT(&quot;&quot;&quot;&quot;;[.$C$2]; &quot;&quot;&quot;: &quot;; [.O16])" office:value-type="string" office:string-value="&quot;1&quot;: 13" calcext:value-type="string">
            <text:p>"1": 13</text:p>
          </table:table-cell>
          <table:table-cell table:style-name="ce1321" table:formula="of:=COM.MICROSOFT.CONCAT(&quot;&quot;&quot;&quot;;[.$D$2]; &quot;&quot;&quot;: &quot;; [.P16])" office:value-type="string" office:string-value="&quot;2&quot;: 9" calcext:value-type="string">
            <text:p>"2": 9</text:p>
          </table:table-cell>
          <table:table-cell table:style-name="ce1321" table:formula="of:=COM.MICROSOFT.CONCAT(&quot;&quot;&quot;&quot;;[.$E$2]; &quot;&quot;&quot;: &quot;; [.Q16])" office:value-type="string" office:string-value="&quot;3&quot;: 10" calcext:value-type="string">
            <text:p>"3": 10</text:p>
          </table:table-cell>
          <table:table-cell table:style-name="ce1321" table:formula="of:=COM.MICROSOFT.CONCAT(&quot;&quot;&quot;&quot;;[.$F$2]; &quot;&quot;&quot;: &quot;; [.R16])" office:value-type="string" office:string-value="&quot;4&quot;: 12" calcext:value-type="string">
            <text:p>"4": 12</text:p>
          </table:table-cell>
          <table:table-cell table:style-name="ce1321"/>
          <table:table-cell table:style-name="ce1321" table:formula="of:=COM.MICROSOFT.CONCAT(&quot;&quot;&quot;&quot;;[.$B$2]; &quot;&quot;&quot;: &quot;; [.T16])" office:value-type="string" office:string-value="&quot;0&quot;: 14" calcext:value-type="string">
            <text:p>"0": 14</text:p>
          </table:table-cell>
          <table:table-cell table:style-name="ce1321" table:formula="of:=COM.MICROSOFT.CONCAT(&quot;&quot;&quot;&quot;;[.$C$2]; &quot;&quot;&quot;: &quot;; [.U16])" office:value-type="string" office:string-value="&quot;1&quot;: 10" calcext:value-type="string">
            <text:p>"1": 10</text:p>
          </table:table-cell>
          <table:table-cell table:style-name="ce1321" table:formula="of:=COM.MICROSOFT.CONCAT(&quot;&quot;&quot;&quot;;[.$D$2]; &quot;&quot;&quot;: &quot;; [.V16])" office:value-type="string" office:string-value="&quot;2&quot;: 8" calcext:value-type="string">
            <text:p>"2": 8</text:p>
          </table:table-cell>
          <table:table-cell table:style-name="ce1321" table:formula="of:=COM.MICROSOFT.CONCAT(&quot;&quot;&quot;&quot;;[.$E$2]; &quot;&quot;&quot;: &quot;; [.W16])" office:value-type="string" office:string-value="&quot;3&quot;: 12" calcext:value-type="string">
            <text:p>"3": 12</text:p>
          </table:table-cell>
          <table:table-cell table:style-name="ce1321" table:formula="of:=COM.MICROSOFT.CONCAT(&quot;&quot;&quot;&quot;;[.$F$2]; &quot;&quot;&quot;: &quot;; [.X16])" office:value-type="string" office:string-value="&quot;4&quot;: 13" calcext:value-type="string">
            <text:p>"4": 13</text:p>
          </table:table-cell>
          <table:table-cell table:style-name="ce1321"/>
          <table:table-cell table:style-name="ce1321" table:formula="of:=COM.MICROSOFT.CONCAT(&quot;&quot;&quot;&quot;;[.$B$2]; &quot;&quot;&quot;: &quot;; [.Z16])" office:value-type="string" office:string-value="&quot;0&quot;: 13" calcext:value-type="string">
            <text:p>"0": 13</text:p>
          </table:table-cell>
          <table:table-cell table:style-name="ce1321" table:formula="of:=COM.MICROSOFT.CONCAT(&quot;&quot;&quot;&quot;;[.$C$2]; &quot;&quot;&quot;: &quot;; [.AA16])" office:value-type="string" office:string-value="&quot;1&quot;: 14" calcext:value-type="string">
            <text:p>"1": 14</text:p>
          </table:table-cell>
          <table:table-cell table:style-name="ce1321" table:formula="of:=COM.MICROSOFT.CONCAT(&quot;&quot;&quot;&quot;;[.$D$2]; &quot;&quot;&quot;: &quot;; [.AB16])" office:value-type="string" office:string-value="&quot;2&quot;: 12" calcext:value-type="string">
            <text:p>"2": 12</text:p>
          </table:table-cell>
          <table:table-cell table:style-name="ce1321" table:formula="of:=COM.MICROSOFT.CONCAT(&quot;&quot;&quot;&quot;;[.$E$2]; &quot;&quot;&quot;: &quot;; [.AC16])" office:value-type="string" office:string-value="&quot;3&quot;: 11" calcext:value-type="string">
            <text:p>"3": 11</text:p>
          </table:table-cell>
          <table:table-cell table:style-name="ce1321" table:formula="of:=COM.MICROSOFT.CONCAT(&quot;&quot;&quot;&quot;;[.$F$2]; &quot;&quot;&quot;: &quot;; [.AD16])" office:value-type="string" office:string-value="&quot;4&quot;: 10" calcext:value-type="string">
            <text:p>"4": 10</text:p>
          </table:table-cell>
          <table:table-cell table:number-columns-repeated="2"/>
          <table:table-cell table:style-name="ce623" table:formula="of:=COM.MICROSOFT.CONCAT(&quot;&quot;&quot;5&quot;&quot;: { &quot;;COM.MICROSOFT.TEXTJOIN(&quot;, &quot;;TRUE();[.AF12:.AJ14]);&quot;}&quot;)" office:value-type="string" office:string-value="&quot;5&quot;: { &quot;0&quot;: 12, &quot;1&quot;: 10, &quot;2&quot;: 6, &quot;3&quot;: 5, &quot;4&quot;: 9, &quot;5&quot;: 8, &quot;6&quot;: 1, &quot;7&quot;: 2, &quot;8&quot;: 3, &quot;9&quot;: 4, &quot;10&quot;: 13, &quot;11&quot;: 14, &quot;12&quot;: 11, &quot;13&quot;: 7, &quot;14&quot;: 8}" calcext:value-type="string">
            <text:p>"5": { "0": 12, "1": 10, "2": 6, "3": 5, "4": 9, "5": 8, "6": 1, "7": 2, "8": 3, "9": 4, "10": 13, "11": 14, "12": 11, "13": 7, "14": 8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623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690"/>
          <table:table-cell office:value-type="float" office:value="13" calcext:value-type="float">
            <text:p>13</text:p>
          </table:table-cell>
          <table:table-cell table:style-name="ce845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690"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852" office:value-type="float" office:value="8" calcext:value-type="float">
            <text:p>8</text:p>
          </table:table-cell>
          <table:table-cell table:style-name="ce690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style-name="ce690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315" office:value-type="float" office:value="9" calcext:value-type="float">
            <text:p>9</text:p>
          </table:table-cell>
          <table:table-cell table:style-name="ce623"/>
          <table:table-cell table:style-name="ce1321" table:formula="of:=COM.MICROSOFT.CONCAT(&quot;&quot;&quot;&quot;;[.$B$3]; &quot;&quot;&quot;: &quot;; [.B17])" office:value-type="string" office:string-value="&quot;5&quot;: 9" calcext:value-type="string">
            <text:p>"5": 9</text:p>
          </table:table-cell>
          <table:table-cell table:style-name="ce1321" table:formula="of:=COM.MICROSOFT.CONCAT(&quot;&quot;&quot;&quot;;[.$C$3]; &quot;&quot;&quot;: &quot;; [.C17])" office:value-type="string" office:string-value="&quot;6&quot;: 8" calcext:value-type="string">
            <text:p>"6": 8</text:p>
          </table:table-cell>
          <table:table-cell table:style-name="ce1321" table:formula="of:=COM.MICROSOFT.CONCAT(&quot;&quot;&quot;&quot;;[.$D$3]; &quot;&quot;&quot;: &quot;; [.D17])" office:value-type="string" office:string-value="&quot;7&quot;: 4" calcext:value-type="string">
            <text:p>"7": 4</text:p>
          </table:table-cell>
          <table:table-cell table:style-name="ce1321" table:formula="of:=COM.MICROSOFT.CONCAT(&quot;&quot;&quot;&quot;;[.$E$3]; &quot;&quot;&quot;: &quot;; [.E17])" office:value-type="string" office:string-value="&quot;8&quot;: 5" calcext:value-type="string">
            <text:p>"8": 5</text:p>
          </table:table-cell>
          <table:table-cell table:style-name="ce1321" table:formula="of:=COM.MICROSOFT.CONCAT(&quot;&quot;&quot;&quot;;[.$F$3]; &quot;&quot;&quot;: &quot;; [.F17])" office:value-type="string" office:string-value="&quot;9&quot;: 6" calcext:value-type="string">
            <text:p>"9": 6</text:p>
          </table:table-cell>
          <table:table-cell table:style-name="ce1321"/>
          <table:table-cell table:style-name="ce1321" table:formula="of:=COM.MICROSOFT.CONCAT(&quot;&quot;&quot;&quot;;[.$B$3]; &quot;&quot;&quot;: &quot;; [.H17])" office:value-type="string" office:string-value="&quot;5&quot;: 13" calcext:value-type="string">
            <text:p>"5": 13</text:p>
          </table:table-cell>
          <table:table-cell table:style-name="ce1321" table:formula="of:=COM.MICROSOFT.CONCAT(&quot;&quot;&quot;&quot;;[.$C$3]; &quot;&quot;&quot;: &quot;; [.I17])" office:value-type="string" office:string-value="&quot;6&quot;: 6" calcext:value-type="string">
            <text:p>"6": 6</text:p>
          </table:table-cell>
          <table:table-cell table:style-name="ce1321" table:formula="of:=COM.MICROSOFT.CONCAT(&quot;&quot;&quot;&quot;;[.$D$3]; &quot;&quot;&quot;: &quot;; [.J17])" office:value-type="string" office:string-value="&quot;7&quot;: 3" calcext:value-type="string">
            <text:p>"7": 3</text:p>
          </table:table-cell>
          <table:table-cell table:style-name="ce1321" table:formula="of:=COM.MICROSOFT.CONCAT(&quot;&quot;&quot;&quot;;[.$E$3]; &quot;&quot;&quot;: &quot;; [.K17])" office:value-type="string" office:string-value="&quot;8&quot;: 4" calcext:value-type="string">
            <text:p>"8": 4</text:p>
          </table:table-cell>
          <table:table-cell table:style-name="ce1321" table:formula="of:=COM.MICROSOFT.CONCAT(&quot;&quot;&quot;&quot;;[.$F$3]; &quot;&quot;&quot;: &quot;; [.L17])" office:value-type="string" office:string-value="&quot;9&quot;: 5" calcext:value-type="string">
            <text:p>"9": 5</text:p>
          </table:table-cell>
          <table:table-cell table:style-name="ce1321"/>
          <table:table-cell table:style-name="ce1321" table:formula="of:=COM.MICROSOFT.CONCAT(&quot;&quot;&quot;&quot;;[.$B$3]; &quot;&quot;&quot;: &quot;; [.N17])" office:value-type="string" office:string-value="&quot;5&quot;: 11" calcext:value-type="string">
            <text:p>"5": 11</text:p>
          </table:table-cell>
          <table:table-cell table:style-name="ce1321" table:formula="of:=COM.MICROSOFT.CONCAT(&quot;&quot;&quot;&quot;;[.$C$3]; &quot;&quot;&quot;: &quot;; [.O17])" office:value-type="string" office:string-value="&quot;6&quot;: 6" calcext:value-type="string">
            <text:p>"6": 6</text:p>
          </table:table-cell>
          <table:table-cell table:style-name="ce1321" table:formula="of:=COM.MICROSOFT.CONCAT(&quot;&quot;&quot;&quot;;[.$D$3]; &quot;&quot;&quot;: &quot;; [.P17])" office:value-type="string" office:string-value="&quot;7&quot;: 4" calcext:value-type="string">
            <text:p>"7": 4</text:p>
          </table:table-cell>
          <table:table-cell table:style-name="ce1321" table:formula="of:=COM.MICROSOFT.CONCAT(&quot;&quot;&quot;&quot;;[.$E$3]; &quot;&quot;&quot;: &quot;; [.Q17])" office:value-type="string" office:string-value="&quot;8&quot;: 3" calcext:value-type="string">
            <text:p>"8": 3</text:p>
          </table:table-cell>
          <table:table-cell table:style-name="ce1321" table:formula="of:=COM.MICROSOFT.CONCAT(&quot;&quot;&quot;&quot;;[.$F$3]; &quot;&quot;&quot;: &quot;; [.R17])" office:value-type="string" office:string-value="&quot;9&quot;: 8" calcext:value-type="string">
            <text:p>"9": 8</text:p>
          </table:table-cell>
          <table:table-cell table:style-name="ce1321"/>
          <table:table-cell table:style-name="ce1321" table:formula="of:=COM.MICROSOFT.CONCAT(&quot;&quot;&quot;&quot;;[.$B$3]; &quot;&quot;&quot;: &quot;; [.T17])" office:value-type="string" office:string-value="&quot;5&quot;: 5" calcext:value-type="string">
            <text:p>"5": 5</text:p>
          </table:table-cell>
          <table:table-cell table:style-name="ce1321" table:formula="of:=COM.MICROSOFT.CONCAT(&quot;&quot;&quot;&quot;;[.$C$3]; &quot;&quot;&quot;: &quot;; [.U17])" office:value-type="string" office:string-value="&quot;6&quot;: 4" calcext:value-type="string">
            <text:p>"6": 4</text:p>
          </table:table-cell>
          <table:table-cell table:style-name="ce1321" table:formula="of:=COM.MICROSOFT.CONCAT(&quot;&quot;&quot;&quot;;[.$D$3]; &quot;&quot;&quot;: &quot;; [.V17])" office:value-type="string" office:string-value="&quot;7&quot;: 3" calcext:value-type="string">
            <text:p>"7": 3</text:p>
          </table:table-cell>
          <table:table-cell table:style-name="ce1321" table:formula="of:=COM.MICROSOFT.CONCAT(&quot;&quot;&quot;&quot;;[.$E$3]; &quot;&quot;&quot;: &quot;; [.W17])" office:value-type="string" office:string-value="&quot;8&quot;: 7" calcext:value-type="string">
            <text:p>"8": 7</text:p>
          </table:table-cell>
          <table:table-cell table:style-name="ce1321" table:formula="of:=COM.MICROSOFT.CONCAT(&quot;&quot;&quot;&quot;;[.$F$3]; &quot;&quot;&quot;: &quot;; [.X17])" office:value-type="string" office:string-value="&quot;9&quot;: 11" calcext:value-type="string">
            <text:p>"9": 11</text:p>
          </table:table-cell>
          <table:table-cell table:style-name="ce1321"/>
          <table:table-cell table:style-name="ce1321" table:formula="of:=COM.MICROSOFT.CONCAT(&quot;&quot;&quot;&quot;;[.$B$3]; &quot;&quot;&quot;: &quot;; [.Z17])" office:value-type="string" office:string-value="&quot;5&quot;: 7" calcext:value-type="string">
            <text:p>"5": 7</text:p>
          </table:table-cell>
          <table:table-cell table:style-name="ce1321" table:formula="of:=COM.MICROSOFT.CONCAT(&quot;&quot;&quot;&quot;;[.$C$3]; &quot;&quot;&quot;: &quot;; [.AA17])" office:value-type="string" office:string-value="&quot;6&quot;: 5" calcext:value-type="string">
            <text:p>"6": 5</text:p>
          </table:table-cell>
          <table:table-cell table:style-name="ce1321" table:formula="of:=COM.MICROSOFT.CONCAT(&quot;&quot;&quot;&quot;;[.$D$3]; &quot;&quot;&quot;: &quot;; [.AB17])" office:value-type="string" office:string-value="&quot;7&quot;: 3" calcext:value-type="string">
            <text:p>"7": 3</text:p>
          </table:table-cell>
          <table:table-cell table:style-name="ce1321" table:formula="of:=COM.MICROSOFT.CONCAT(&quot;&quot;&quot;&quot;;[.$E$3]; &quot;&quot;&quot;: &quot;; [.AC17])" office:value-type="string" office:string-value="&quot;8&quot;: 2" calcext:value-type="string">
            <text:p>"8": 2</text:p>
          </table:table-cell>
          <table:table-cell table:style-name="ce1321" table:formula="of:=COM.MICROSOFT.CONCAT(&quot;&quot;&quot;&quot;;[.$F$3]; &quot;&quot;&quot;: &quot;; [.AD17])" office:value-type="string" office:string-value="&quot;9&quot;: 9" calcext:value-type="string">
            <text:p>"9": 9</text:p>
          </table:table-cell>
          <table:table-cell table:number-columns-repeated="2"/>
          <table:table-cell table:style-name="ce623" table:formula="of:=COM.MICROSOFT.CONCAT(&quot;&quot;&quot;6&quot;&quot;: { &quot;;COM.MICROSOFT.TEXTJOIN(&quot;, &quot;;TRUE();[.AL12:.AP14]);&quot;}&quot;)" office:value-type="string" office:string-value="&quot;6&quot;: { &quot;0&quot;: 14, &quot;1&quot;: 7, &quot;2&quot;: 4, &quot;3&quot;: 5, &quot;4&quot;: 13, &quot;5&quot;: 10, &quot;6&quot;: 2, &quot;7&quot;: 1, &quot;8&quot;: 2, &quot;9&quot;: 9, &quot;10&quot;: 12, &quot;11&quot;: 8, &quot;12&quot;: 6, &quot;13&quot;: 3, &quot;14&quot;: 11}" calcext:value-type="string">
            <text:p>"6": { "0": 14, "1": 7, "2": 4, "3": 5, "4": 13, "5": 10, "6": 2, "7": 1, "8": 2, "9": 9, "10": 12, "11": 8, "12": 6, "13": 3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623"/>
          <table:table-cell table:style-name="ce880" table:formula="of:=[.$T$4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690"/>
          <table:table-cell office:value-type="float" office:value="7" calcext:value-type="float">
            <text:p>7</text:p>
          </table:table-cell>
          <table:table-cell table:style-name="ce880" table:formula="of:=[.$U$4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690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880" table:formula="of:=[.$V$4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852" office:value-type="float" office:value="7" calcext:value-type="float">
            <text:p>7</text:p>
          </table:table-cell>
          <table:table-cell table:style-name="ce690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0" table:formula="of:=[.$W$4]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690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880" table:formula="of:=[.$X$4]" office:value-type="float" office:value="11" calcext:value-type="float">
            <text:p>11</text:p>
          </table:table-cell>
          <table:table-cell table:style-name="ce623"/>
          <table:table-cell table:style-name="ce1321" table:formula="of:=COM.MICROSOFT.CONCAT(&quot;&quot;&quot;&quot;;[.$B$4]; &quot;&quot;&quot;: &quot;; [.B18])" office:value-type="string" office:string-value="&quot;10&quot;: 12" calcext:value-type="string">
            <text:p>"10": 12</text:p>
          </table:table-cell>
          <table:table-cell table:style-name="ce1321" table:formula="of:=COM.MICROSOFT.CONCAT(&quot;&quot;&quot;&quot;;[.$C$4]; &quot;&quot;&quot;: &quot;; [.C18])" office:value-type="string" office:string-value="&quot;11&quot;: 1" calcext:value-type="string">
            <text:p>"11": 1</text:p>
          </table:table-cell>
          <table:table-cell table:style-name="ce1321" table:formula="of:=COM.MICROSOFT.CONCAT(&quot;&quot;&quot;&quot;;[.$D$4]; &quot;&quot;&quot;: &quot;; [.D18])" office:value-type="string" office:string-value="&quot;12&quot;: 2" calcext:value-type="string">
            <text:p>"12": 2</text:p>
          </table:table-cell>
          <table:table-cell table:style-name="ce1321" table:formula="of:=COM.MICROSOFT.CONCAT(&quot;&quot;&quot;&quot;;[.$E$4]; &quot;&quot;&quot;: &quot;; [.E18])" office:value-type="string" office:string-value="&quot;13&quot;: 3" calcext:value-type="string">
            <text:p>"13": 3</text:p>
          </table:table-cell>
          <table:table-cell table:style-name="ce1321" table:formula="of:=COM.MICROSOFT.CONCAT(&quot;&quot;&quot;&quot;;[.$F$4]; &quot;&quot;&quot;: &quot;; [.F18])" office:value-type="string" office:string-value="&quot;14&quot;: 7" calcext:value-type="string">
            <text:p>"14": 7</text:p>
          </table:table-cell>
          <table:table-cell table:style-name="ce1321"/>
          <table:table-cell table:style-name="ce1321" table:formula="of:=COM.MICROSOFT.CONCAT(&quot;&quot;&quot;&quot;;[.$B$4]; &quot;&quot;&quot;: &quot;; [.H18])" office:value-type="string" office:string-value="&quot;10&quot;: 7" calcext:value-type="string">
            <text:p>"10": 7</text:p>
          </table:table-cell>
          <table:table-cell table:style-name="ce1321" table:formula="of:=COM.MICROSOFT.CONCAT(&quot;&quot;&quot;&quot;;[.$C$4]; &quot;&quot;&quot;: &quot;; [.I18])" office:value-type="string" office:string-value="&quot;11&quot;: 10" calcext:value-type="string">
            <text:p>"11": 10</text:p>
          </table:table-cell>
          <table:table-cell table:style-name="ce1321" table:formula="of:=COM.MICROSOFT.CONCAT(&quot;&quot;&quot;&quot;;[.$D$4]; &quot;&quot;&quot;: &quot;; [.J18])" office:value-type="string" office:string-value="&quot;12&quot;: 1" calcext:value-type="string">
            <text:p>"12": 1</text:p>
          </table:table-cell>
          <table:table-cell table:style-name="ce1321" table:formula="of:=COM.MICROSOFT.CONCAT(&quot;&quot;&quot;&quot;;[.$E$4]; &quot;&quot;&quot;: &quot;; [.K18])" office:value-type="string" office:string-value="&quot;13&quot;: 2" calcext:value-type="string">
            <text:p>"13": 2</text:p>
          </table:table-cell>
          <table:table-cell table:style-name="ce1321" table:formula="of:=COM.MICROSOFT.CONCAT(&quot;&quot;&quot;&quot;;[.$F$4]; &quot;&quot;&quot;: &quot;; [.L18])" office:value-type="string" office:string-value="&quot;14&quot;: 8" calcext:value-type="string">
            <text:p>"14": 8</text:p>
          </table:table-cell>
          <table:table-cell table:style-name="ce1321"/>
          <table:table-cell table:style-name="ce1321" table:formula="of:=COM.MICROSOFT.CONCAT(&quot;&quot;&quot;&quot;;[.$B$4]; &quot;&quot;&quot;: &quot;; [.N18])" office:value-type="string" office:string-value="&quot;10&quot;: 5" calcext:value-type="string">
            <text:p>"10": 5</text:p>
          </table:table-cell>
          <table:table-cell table:style-name="ce1321" table:formula="of:=COM.MICROSOFT.CONCAT(&quot;&quot;&quot;&quot;;[.$C$4]; &quot;&quot;&quot;: &quot;; [.O18])" office:value-type="string" office:string-value="&quot;11&quot;: 2" calcext:value-type="string">
            <text:p>"11": 2</text:p>
          </table:table-cell>
          <table:table-cell table:style-name="ce1321" table:formula="of:=COM.MICROSOFT.CONCAT(&quot;&quot;&quot;&quot;;[.$D$4]; &quot;&quot;&quot;: &quot;; [.P18])" office:value-type="string" office:string-value="&quot;12&quot;: 9" calcext:value-type="string">
            <text:p>"12": 9</text:p>
          </table:table-cell>
          <table:table-cell table:style-name="ce1321" table:formula="of:=COM.MICROSOFT.CONCAT(&quot;&quot;&quot;&quot;;[.$E$4]; &quot;&quot;&quot;: &quot;; [.Q18])" office:value-type="string" office:string-value="&quot;13&quot;: 1" calcext:value-type="string">
            <text:p>"13": 1</text:p>
          </table:table-cell>
          <table:table-cell table:style-name="ce1321" table:formula="of:=COM.MICROSOFT.CONCAT(&quot;&quot;&quot;&quot;;[.$F$4]; &quot;&quot;&quot;: &quot;; [.R18])" office:value-type="string" office:string-value="&quot;14&quot;: 7" calcext:value-type="string">
            <text:p>"14": 7</text:p>
          </table:table-cell>
          <table:table-cell table:style-name="ce1321"/>
          <table:table-cell table:style-name="ce1321" table:formula="of:=COM.MICROSOFT.CONCAT(&quot;&quot;&quot;&quot;;[.$B$4]; &quot;&quot;&quot;: &quot;; [.T18])" office:value-type="string" office:string-value="&quot;10&quot;: 6" calcext:value-type="string">
            <text:p>"10": 6</text:p>
          </table:table-cell>
          <table:table-cell table:style-name="ce1321" table:formula="of:=COM.MICROSOFT.CONCAT(&quot;&quot;&quot;&quot;;[.$C$4]; &quot;&quot;&quot;: &quot;; [.U18])" office:value-type="string" office:string-value="&quot;11&quot;: 2" calcext:value-type="string">
            <text:p>"11": 2</text:p>
          </table:table-cell>
          <table:table-cell table:style-name="ce1321" table:formula="of:=COM.MICROSOFT.CONCAT(&quot;&quot;&quot;&quot;;[.$D$4]; &quot;&quot;&quot;: &quot;; [.V18])" office:value-type="string" office:string-value="&quot;12&quot;: 1" calcext:value-type="string">
            <text:p>"12": 1</text:p>
          </table:table-cell>
          <table:table-cell table:style-name="ce1321" table:formula="of:=COM.MICROSOFT.CONCAT(&quot;&quot;&quot;&quot;;[.$E$4]; &quot;&quot;&quot;: &quot;; [.W18])" office:value-type="string" office:string-value="&quot;13&quot;: 4" calcext:value-type="string">
            <text:p>"13": 4</text:p>
          </table:table-cell>
          <table:table-cell table:style-name="ce1321" table:formula="of:=COM.MICROSOFT.CONCAT(&quot;&quot;&quot;&quot;;[.$F$4]; &quot;&quot;&quot;: &quot;; [.X18])" office:value-type="string" office:string-value="&quot;14&quot;: 9" calcext:value-type="string">
            <text:p>"14": 9</text:p>
          </table:table-cell>
          <table:table-cell table:style-name="ce1321"/>
          <table:table-cell table:style-name="ce1321" table:formula="of:=COM.MICROSOFT.CONCAT(&quot;&quot;&quot;&quot;;[.$B$4]; &quot;&quot;&quot;: &quot;; [.Z18])" office:value-type="string" office:string-value="&quot;10&quot;: 8" calcext:value-type="string">
            <text:p>"10": 8</text:p>
          </table:table-cell>
          <table:table-cell table:style-name="ce1321" table:formula="of:=COM.MICROSOFT.CONCAT(&quot;&quot;&quot;&quot;;[.$C$4]; &quot;&quot;&quot;: &quot;; [.AA18])" office:value-type="string" office:string-value="&quot;11&quot;: 6" calcext:value-type="string">
            <text:p>"11": 6</text:p>
          </table:table-cell>
          <table:table-cell table:style-name="ce1321" table:formula="of:=COM.MICROSOFT.CONCAT(&quot;&quot;&quot;&quot;;[.$D$4]; &quot;&quot;&quot;: &quot;; [.AB18])" office:value-type="string" office:string-value="&quot;12&quot;: 4" calcext:value-type="string">
            <text:p>"12": 4</text:p>
          </table:table-cell>
          <table:table-cell table:style-name="ce1321" table:formula="of:=COM.MICROSOFT.CONCAT(&quot;&quot;&quot;&quot;;[.$E$4]; &quot;&quot;&quot;: &quot;; [.AC18])" office:value-type="string" office:string-value="&quot;13&quot;: 1" calcext:value-type="string">
            <text:p>"13": 1</text:p>
          </table:table-cell>
          <table:table-cell table:style-name="ce1321" table:formula="of:=COM.MICROSOFT.CONCAT(&quot;&quot;&quot;&quot;;[.$F$4]; &quot;&quot;&quot;: &quot;; [.AD18])" office:value-type="string" office:string-value="&quot;14&quot;: 11" calcext:value-type="string">
            <text:p>"14": 11</text:p>
          </table:table-cell>
          <table:table-cell table:number-columns-repeated="2"/>
          <table:table-cell table:style-name="ce623" table:formula="of:=COM.MICROSOFT.CONCAT(&quot;&quot;&quot;7&quot;&quot;: { &quot;;COM.MICROSOFT.TEXTJOIN(&quot;, &quot;;TRUE();[.AR12:.AV14]);&quot;}&quot;)" office:value-type="string" office:string-value="&quot;7&quot;: { &quot;0&quot;: 14, &quot;1&quot;: 5, &quot;2&quot;: 4, &quot;3&quot;: 6, &quot;4&quot;: 13, &quot;5&quot;: 10, &quot;6&quot;: 2, &quot;7&quot;: 0, &quot;8&quot;: 1, &quot;9&quot;: 9, &quot;10&quot;: 11, &quot;11&quot;: 7, &quot;12&quot;: 8, &quot;13&quot;: 3, &quot;14&quot;: 12}" calcext:value-type="string">
            <text:p>"7": { "0": 14, "1": 5, "2": 4, "3": 6, "4": 13, "5": 10, "6": 2, "7": 0, "8": 1, "9": 9, "10": 11, "11": 7, "12": 8, "13": 3, "14": 12}</text:p>
          </table:table-cell>
          <table:table-cell table:number-columns-repeated="36"/>
          <table:table-cell table:style-name="Default" table:number-columns-repeated="16285"/>
        </table:table-row>
        <table:table-row table:style-name="ro2">
          <table:table-cell table:style-name="ce623"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Default" table:number-columns-repeated="11"/>
          <table:table-cell table:number-columns-repeated="33"/>
          <table:table-cell table:style-name="ce623" table:formula="of:=COM.MICROSOFT.CONCAT(&quot;&quot;&quot;8&quot;&quot;: { &quot;;COM.MICROSOFT.TEXTJOIN(&quot;, &quot;;TRUE();[.AX12:.BB14]);&quot;}&quot;)" office:value-type="string" office:string-value="&quot;8&quot;: { &quot;0&quot;: 13, &quot;1&quot;: 5, &quot;2&quot;: 3, &quot;3&quot;: 6, &quot;4&quot;: 10, &quot;5&quot;: 4, &quot;6&quot;: 2, &quot;7&quot;: 1, &quot;8&quot;: 1, &quot;9&quot;: 8, &quot;10&quot;: 12, &quot;11&quot;: 14, &quot;12&quot;: 11, &quot;13&quot;: 7, &quot;14&quot;: 9}" calcext:value-type="string">
            <text:p>"8": { "0": 13, "1": 5, "2": 3, "3": 6, "4": 10, "5": 4, "6": 2, "7": 1, "8": 1, "9": 8, "10": 12, "11": 14, "12": 11, "13": 7, "14": 9}</text:p>
          </table:table-cell>
          <table:table-cell table:number-columns-repeated="36"/>
          <table:table-cell table:style-name="Default" table:number-columns-repeated="16285"/>
        </table:table-row>
        <table:table-row table:style-name="ro2">
          <table:table-cell table:style-name="ce623"/>
          <table:table-cell table:style-name="ce1225" table:number-columns-spanned="29" table:number-rows-spanned="3"/>
          <table:covered-table-cell table:number-columns-repeated="28" table:style-name="ce634"/>
          <table:table-cell table:style-name="ce861"/>
          <table:table-cell table:style-name="ce1322" table:formula="of:=COM.MICROSOFT.CONCAT(&quot;{&quot;; COM.MICROSOFT.TEXTJOIN(&quot;, &quot;;TRUE();[.BK14]; [.BK22]; [.BK30]);&quot;}&quot;)" office:value-type="string" office:string-value="{&quot;0&quot;: { &quot;0&quot;: 14, &quot;1&quot;: 1, &quot;2&quot;: 2, &quot;3&quot;: 3, &quot;4&quot;: 5, &quot;5&quot;: 9, &quot;6&quot;: 8, &quot;7&quot;: 7, &quot;8&quot;: 4, &quot;9&quot;: 6, &quot;10&quot;: 12, &quot;11&quot;: 13, &quot;12&quot;: 14, &quot;13&quot;: 10, &quot;14&quot;: 11}, &quot;1&quot;: { &quot;0&quot;: 9, &quot;1&quot;: 6, &quot;2&quot;: 1, &quot;3&quot;: 2, &quot;4&quot;: 4, &quot;5&quot;: 8, &quot;6&quot;: 7, &quot;7&quot;: 6, &quot;8&quot;: 3, &quot;9&quot;: 5, &quot;10&quot;: 13, &quot;11&quot;: 14, &quot;12&quot;: 12, &quot;13&quot;: 10, &quot;14&quot;: 11}, &quot;2&quot;: { &quot;0&quot;: 8, &quot;1&quot;: 2, &quot;2&quot;: 3, &quot;3&quot;: 1, &quot;4&quot;: 7, &quot;5&quot;: 6, &quot;6&quot;: 4, &quot;7&quot;: 5, &quot;8&quot;: 3, &quot;9&quot;: 9, &quot;10&quot;: 14, &quot;11&quot;: 12, &quot;12&quot;: 10, &quot;13&quot;: 11, &quot;14&quot;: 13}, &quot;3&quot;: { &quot;0&quot;: 3, &quot;1&quot;: 2, &quot;2&quot;: 1, &quot;3&quot;: 5, &quot;4&quot;: 7, &quot;5&quot;: 5, &quot;6&quot;: 6, &quot;7&quot;: 8, &quot;8&quot;: 4, &quot;9&quot;: 9, &quot;10&quot;: 14, &quot;11&quot;: 13, &quot;12&quot;: 12, &quot;13&quot;: 10, &quot;14&quot;: 11}, &quot;4&quot;: { &quot;0&quot;: 7, &quot;1&quot;: 3, &quot;2&quot;: 2, &quot;3&quot;: 1, &quot;4&quot;: 13, &quot;5&quot;: 6, &quot;6&quot;: 5, &quot;7&quot;: 4, &quot;8&quot;: 9, &quot;9&quot;: 8, &quot;10&quot;: 10, &quot;11&quot;: 11, &quot;12&quot;: 12, &quot;13&quot;: 13, &quot;14&quot;: 14}, &quot;5&quot;: { &quot;0&quot;: 12, &quot;1&quot;: 10, &quot;2&quot;: 6, &quot;3&quot;: 5, &quot;4&quot;: 9, &quot;5&quot;: 8, &quot;6&quot;: 1, &quot;7&quot;: 2, &quot;8&quot;: 3, &quot;9&quot;: 4, &quot;10&quot;: 13, &quot;11&quot;: 14, &quot;12&quot;: 11, &quot;13&quot;: 7, &quot;14&quot;: 8}, &quot;6&quot;: { &quot;0&quot;: 14, &quot;1&quot;: 7, &quot;2&quot;: 4, &quot;3&quot;: 5, &quot;4&quot;: 13, &quot;5&quot;: 10, &quot;6&quot;: 2, &quot;7&quot;: 1, &quot;8&quot;: 2, &quot;9&quot;: 9, &quot;10&quot;: 12, &quot;11&quot;: 8, &quot;12&quot;: 6, &quot;13&quot;: 3, &quot;14&quot;: 11}, &quot;7&quot;: { &quot;0&quot;: 14, &quot;1&quot;: 5, &quot;2&quot;: 4, &quot;3&quot;: 6, &quot;4&quot;: 13, &quot;5&quot;: 10, &quot;6&quot;: 2, &quot;7&quot;: 0, &quot;8&quot;: 1, &quot;9&quot;: 9, &quot;10&quot;: 11, &quot;11&quot;: 7, &quot;12&quot;: 8, &quot;13&quot;: 3, &quot;14&quot;: 12}, &quot;8&quot;: { &quot;0&quot;: 13, &quot;1&quot;: 5, &quot;2&quot;: 3, &quot;3&quot;: 6, &quot;4&quot;: 10, &quot;5&quot;: 4, &quot;6&quot;: 2, &quot;7&quot;: 1, &quot;8&quot;: 1, &quot;9&quot;: 8, &quot;10&quot;: 12, &quot;11&quot;: 14, &quot;12&quot;: 11, &quot;13&quot;: 7, &quot;14&quot;: 9}, &quot;9&quot;: { &quot;0&quot;: 10, &quot;1&quot;: 7, &quot;2&quot;: 4, &quot;3&quot;: 3, &quot;4&quot;: 9, &quot;5&quot;: 6, &quot;6&quot;: 5, &quot;7&quot;: 2, &quot;8&quot;: 1, &quot;9&quot;: 7, &quot;10&quot;: 12, &quot;11&quot;: 13, &quot;12&quot;: 14, &quot;13&quot;: 11, &quot;14&quot;: 8}, &quot;10&quot;: { &quot;0&quot;: 13, &quot;1&quot;: 14, &quot;2&quot;: 12, &quot;3&quot;: 11, &quot;4&quot;: 10, &quot;5&quot;: 9, &quot;6&quot;: 8, &quot;7&quot;: 4, &quot;8&quot;: 5, &quot;9&quot;: 6, &quot;10&quot;: 12, &quot;11&quot;: 1, &quot;12&quot;: 2, &quot;13&quot;: 3, &quot;14&quot;: 7}, &quot;11&quot;: { &quot;0&quot;: 14, &quot;1&quot;: 12, &quot;2&quot;: 9, &quot;3&quot;: 10, &quot;4&quot;: 11, &quot;5&quot;: 13, &quot;6&quot;: 6, &quot;7&quot;: 3, &quot;8&quot;: 4, &quot;9&quot;: 5, &quot;10&quot;: 7, &quot;11&quot;: 10, &quot;12&quot;: 1, &quot;13&quot;: 2, &quot;14&quot;: 8}, &quot;12&quot;: { &quot;0&quot;: 14, &quot;1&quot;: 13, &quot;2&quot;: 9, &quot;3&quot;: 10, &quot;4&quot;: 12, &quot;5&quot;: 11, &quot;6&quot;: 6, &quot;7&quot;: 4, &quot;8&quot;: 3, &quot;9&quot;: 8, &quot;10&quot;: 5, &quot;11&quot;: 2, &quot;12&quot;: 9, &quot;13&quot;: 1, &quot;14&quot;: 7}, &quot;13&quot;: { &quot;0&quot;: 14, &quot;1&quot;: 10, &quot;2&quot;: 8, &quot;3&quot;: 12, &quot;4&quot;: 13, &quot;5&quot;: 5, &quot;6&quot;: 4, &quot;7&quot;: 3, &quot;8&quot;: 7, &quot;9&quot;: 11, &quot;10&quot;: 6, &quot;11&quot;: 2, &quot;12&quot;: 1, &quot;13&quot;: 4, &quot;14&quot;: 9}, &quot;14&quot;: { &quot;0&quot;: 13, &quot;1&quot;: 14, &quot;2&quot;: 12, &quot;3&quot;: 11, &quot;4&quot;: 10, &quot;5&quot;: 7, &quot;6&quot;: 5, &quot;7&quot;: 3, &quot;8&quot;: 2, &quot;9&quot;: 9, &quot;10&quot;: 8, &quot;11&quot;: 6, &quot;12&quot;: 4, &quot;13&quot;: 1, &quot;14&quot;: 11}}" calcext:value-type="string" table:number-columns-spanned="29" table:number-rows-spanned="4">
            <text:p>{"0": { "0": 14, "1": 1, "2": 2, "3": 3, "4": 5, "5": 9, "6": 8, "7": 7, "8": 4, "9": 6, "10": 12, "11": 13, "12": 14, "13": 10, "14": 11}, "1": { "0": 9, "1": 6, "2": 1, "3": 2, "4": 4, "5": 8, "6": 7, "7": 6, "8": 3, "9": 5, "10": 13, "11": 14, "12": 12, "13": 10, "14": 11}, "2": { "0": 8, "1": 2, "2": 3, "3": 1, "4": 7, "5": 6, "6": 4, "7": 5, "8": 3, "9": 9, "10": 14, "11": 12, "12": 10, "13": 11, "14": 13}, "3": { "0": 3, "1": 2, "2": 1, "3": 5, "4": 7, "5": 5, "6": 6, "7": 8, "8": 4, "9": 9, "10": 14, "11": 13, "12": 12, "13": 10, "14": 11}, "4": { "0": 7, "1": 3, "2": 2, "3": 1, "4": 13, "5": 6, "6": 5, "7": 4, "8": 9, "9": 8, "10": 10, "11": 11, "12": 12, "13": 13, "14": 14}, "5": { "0": 12, "1": 10, "2": 6, "3": 5, "4": 9, "5": 8, "6": 1, "7": 2, "8": 3, "9": 4, "10": 13, "11": 14, "12": 11, "13": 7, "14": 8}, "6": { "0": 14, "1": 7, "2": 4, "3": 5, "4": 13, "5": 10, "6": 2, "7": 1, "8": 2, "9": 9, "10": 12, "11": 8, "12": 6, "13": 3, "14": 11}, "7": { "0": 14, "1": 5, "2": 4, "3": 6, "4": 13, "5": 10, "6": 2, "7": 0, "8": 1, "9": 9, "10": 11, "11": 7, "12": 8, "13": 3, "14": 12}, "8": { "0": 13, "1": 5, "2": 3, "3": 6, "4": 10, "5": 4, "6": 2, "7": 1, "8": 1, "9": 8, "10": 12, "11": 14, "12": 11, "13": 7, "14": 9}, "9": { "0": 10, "1": 7, "2": 4, "3": 3, "4": 9, "5": 6, "6": 5, "7": 2, "8": 1, "9": 7, "10": 12, "11": 13, "12": 14, "13": 11, "14": 8}, "10": { "0": 13, "1": 14, "2": 12, "3": 11, "4": 10, "5": 9, "6": 8, "7": 4, "8": 5, "9": 6, "10": 12, "11": 1, "12": 2, "13": 3, "14": 7}, "11": { "0": 14, "1": 12, "2": 9, "3": 10, "4": 11, "5": 13, "6": 6, "7": 3, "8": 4, "9": 5, "10": 7, "11": 10, "12": 1, "13": 2, "14": 8}, "12": { "0": 14, "1": 13, "2": 9, "3": 10, "4": 12, "5": 11, "6": 6, "7": 4, "8": 3, "9": 8, "10": 5, "11": 2, "12": 9, "13": 1, "14": 7}, "13": { "0": 14, "1": 10, "2": 8, "3": 12, "4": 13, "5": 5, "6": 4, "7": 3, "8": 7, "9": 11, "10": 6, "11": 2, "12": 1, "13": 4, "14": 9}, "14": { "0": 13, "1": 14, "2": 12, "3": 11, "4": 10, "5": 7, "6": 5, "7": 3, "8": 2, "9": 9, "10": 8, "11": 6, "12": 4, "13": 1, "14": 11}}</text:p>
          </table:table-cell>
          <table:covered-table-cell table:number-columns-repeated="28" table:style-name="ce861"/>
          <table:table-cell table:number-columns-repeated="2"/>
          <table:table-cell table:style-name="ce623" table:formula="of:=COM.MICROSOFT.CONCAT(&quot;&quot;&quot;9&quot;&quot;: { &quot;;COM.MICROSOFT.TEXTJOIN(&quot;, &quot;;TRUE();[.BD12:.BH14]);&quot;}&quot;)" office:value-type="string" office:string-value="&quot;9&quot;: { &quot;0&quot;: 10, &quot;1&quot;: 7, &quot;2&quot;: 4, &quot;3&quot;: 3, &quot;4&quot;: 9, &quot;5&quot;: 6, &quot;6&quot;: 5, &quot;7&quot;: 2, &quot;8&quot;: 1, &quot;9&quot;: 7, &quot;10&quot;: 12, &quot;11&quot;: 13, &quot;12&quot;: 14, &quot;13&quot;: 11, &quot;14&quot;: 8}" calcext:value-type="string">
            <text:p>"9": { "0": 10, "1": 7, "2": 4, "3": 3, "4": 9, "5": 6, "6": 5, "7": 2, "8": 1, "9": 7, "10": 12, "11": 13, "12": 14, "13": 11, "14": 8}</text:p>
          </table:table-cell>
          <table:table-cell table:number-columns-repeated="36"/>
          <table:table-cell table:style-name="Default" table:number-columns-repeated="16285"/>
        </table:table-row>
        <table:table-row table:style-name="ro2">
          <table:table-cell table:style-name="ce623"/>
          <table:covered-table-cell table:number-columns-repeated="29" table:style-name="ce634"/>
          <table:table-cell table:style-name="ce861"/>
          <table:covered-table-cell table:number-columns-repeated="29" table:style-name="ce861"/>
          <table:table-cell table:number-columns-repeated="39"/>
          <table:table-cell table:style-name="Default" table:number-columns-repeated="16285"/>
        </table:table-row>
        <table:table-row table:style-name="ro2">
          <table:table-cell table:style-name="ce623"/>
          <table:covered-table-cell table:number-columns-repeated="29" table:style-name="ce634"/>
          <table:table-cell table:style-name="ce861"/>
          <table:covered-table-cell table:number-columns-repeated="29" table:style-name="ce861"/>
          <table:table-cell table:number-columns-repeated="2"/>
          <table:table-cell table:style-name="ce623" table:formula="of:=COM.MICROSOFT.TEXTJOIN(&quot;, &quot;;TRUE();[.BK16:.BK20])" office:value-type="string" office:string-value="&quot;5&quot;: { &quot;0&quot;: 12, &quot;1&quot;: 10, &quot;2&quot;: 6, &quot;3&quot;: 5, &quot;4&quot;: 9, &quot;5&quot;: 8, &quot;6&quot;: 1, &quot;7&quot;: 2, &quot;8&quot;: 3, &quot;9&quot;: 4, &quot;10&quot;: 13, &quot;11&quot;: 14, &quot;12&quot;: 11, &quot;13&quot;: 7, &quot;14&quot;: 8}, &quot;6&quot;: { &quot;0&quot;: 14, &quot;1&quot;: 7, &quot;2&quot;: 4, &quot;3&quot;: 5, &quot;4&quot;: 13, &quot;5&quot;: 10, &quot;6&quot;: 2, &quot;7&quot;: 1, &quot;8&quot;: 2, &quot;9&quot;: 9, &quot;10&quot;: 12, &quot;11&quot;: 8, &quot;12&quot;: 6, &quot;13&quot;: 3, &quot;14&quot;: 11}, &quot;7&quot;: { &quot;0&quot;: 14, &quot;1&quot;: 5, &quot;2&quot;: 4, &quot;3&quot;: 6, &quot;4&quot;: 13, &quot;5&quot;: 10, &quot;6&quot;: 2, &quot;7&quot;: 0, &quot;8&quot;: 1, &quot;9&quot;: 9, &quot;10&quot;: 11, &quot;11&quot;: 7, &quot;12&quot;: 8, &quot;13&quot;: 3, &quot;14&quot;: 12}, &quot;8&quot;: { &quot;0&quot;: 13, &quot;1&quot;: 5, &quot;2&quot;: 3, &quot;3&quot;: 6, &quot;4&quot;: 10, &quot;5&quot;: 4, &quot;6&quot;: 2, &quot;7&quot;: 1, &quot;8&quot;: 1, &quot;9&quot;: 8, &quot;10&quot;: 12, &quot;11&quot;: 14, &quot;12&quot;: 11, &quot;13&quot;: 7, &quot;14&quot;: 9}, &quot;9&quot;: { &quot;0&quot;: 10, &quot;1&quot;: 7, &quot;2&quot;: 4, &quot;3&quot;: 3, &quot;4&quot;: 9, &quot;5&quot;: 6, &quot;6&quot;: 5, &quot;7&quot;: 2, &quot;8&quot;: 1, &quot;9&quot;: 7, &quot;10&quot;: 12, &quot;11&quot;: 13, &quot;12&quot;: 14, &quot;13&quot;: 11, &quot;14&quot;: 8}" calcext:value-type="string">
            <text:p>"5": { "0": 12, "1": 10, "2": 6, "3": 5, "4": 9, "5": 8, "6": 1, "7": 2, "8": 3, "9": 4, "10": 13, "11": 14, "12": 11, "13": 7, "14": 8}, "6": { "0": 14, "1": 7, "2": 4, "3": 5, "4": 13, "5": 10, "6": 2, "7": 1, "8": 2, "9": 9, "10": 12, "11": 8, "12": 6, "13": 3, "14": 11}, "7": { "0": 14, "1": 5, "2": 4, "3": 6, "4": 13, "5": 10, "6": 2, "7": 0, "8": 1, "9": 9, "10": 11, "11": 7, "12": 8, "13": 3, "14": 12}, "8": { "0": 13, "1": 5, "2": 3, "3": 6, "4": 10, "5": 4, "6": 2, "7": 1, "8": 1, "9": 8, "10": 12, "11": 14, "12": 11, "13": 7, "14": 9}, "9": { "0": 10, "1": 7, "2": 4, "3": 3, "4": 9, "5": 6, "6": 5, "7": 2, "8": 1, "9": 7, "10": 12, "11": 13, "12": 14, "13": 11, "14": 8}</text:p>
          </table:table-cell>
          <table:table-cell table:number-columns-repeated="36"/>
          <table:table-cell table:style-name="Default" table:number-columns-repeated="16285"/>
        </table:table-row>
        <table:table-row table:style-name="ro2">
          <table:table-cell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Default" table:number-columns-repeated="11"/>
          <table:table-cell table:number-columns-repeated="2"/>
          <table:covered-table-cell table:number-columns-repeated="29"/>
          <table:table-cell table:number-columns-repeated="39"/>
          <table:table-cell table:style-name="Default" table:number-columns-repeated="16285"/>
        </table:table-row>
        <table:table-row table:style-name="ro2">
          <table:table-cell/>
          <table:table-cell table:style-name="ce635" table:formula="of:=SUM([.B25:.F27])-[.B25]" office:value-type="float" office:value="35.1" calcext:value-type="float" table:number-columns-spanned="2" table:number-rows-spanned="1">
            <text:p>35.1</text:p>
          </table:table-cell>
          <table:covered-table-cell table:style-name="ce659"/>
          <table:table-cell table:style-name="ce659" table:number-columns-repeated="4"/>
          <table:table-cell table:style-name="ce691" table:formula="of:=SUM([.H25:.L27])-[.I25]" office:value-type="float" office:value="35.1" calcext:value-type="float" table:number-columns-spanned="2" table:number-rows-spanned="1">
            <text:p>35.1</text:p>
          </table:table-cell>
          <table:covered-table-cell table:style-name="ce659"/>
          <table:table-cell table:style-name="ce659" table:number-columns-repeated="4"/>
          <table:table-cell table:style-name="ce635" table:formula="of:=SUM([.N25:.R27])-[.P25]" office:value-type="float" office:value="35.1" calcext:value-type="float" table:number-columns-spanned="2" table:number-rows-spanned="1">
            <text:p>35.1</text:p>
          </table:table-cell>
          <table:covered-table-cell table:style-name="ce659"/>
          <table:table-cell table:style-name="ce659" table:number-columns-repeated="4"/>
          <table:table-cell table:style-name="ce691" table:formula="of:=SUM([.T25:.X27])-[.W25]" office:value-type="float" office:value="35.1" calcext:value-type="float" table:number-columns-spanned="2" table:number-rows-spanned="1">
            <text:p>35.1</text:p>
          </table:table-cell>
          <table:covered-table-cell table:style-name="ce659"/>
          <table:table-cell table:style-name="ce659" table:number-columns-repeated="4"/>
          <table:table-cell table:style-name="ce635" table:formula="of:=SUM([.Z25:.AD27])-[.AD25]" office:value-type="float" office:value="35.1" calcext:value-type="float" table:number-columns-spanned="2" table:number-rows-spanned="1">
            <text:p>35.1</text:p>
          </table:table-cell>
          <table:covered-table-cell table:style-name="ce659"/>
          <table:table-cell table:style-name="ce659" table:number-columns-repeated="3"/>
          <table:table-cell table:style-name="ce623"/>
          <table:table-cell table:number-columns-repeated="31"/>
          <table:table-cell table:style-name="ce623" table:formula="of:=COM.MICROSOFT.CONCAT(&quot;&quot;&quot;10&quot;&quot;: { &quot;;COM.MICROSOFT.TEXTJOIN(&quot;, &quot;;TRUE();[.AF16:.AJ18]);&quot;}&quot;)" office:value-type="string" office:string-value="&quot;10&quot;: { &quot;0&quot;: 13, &quot;1&quot;: 14, &quot;2&quot;: 12, &quot;3&quot;: 11, &quot;4&quot;: 10, &quot;5&quot;: 9, &quot;6&quot;: 8, &quot;7&quot;: 4, &quot;8&quot;: 5, &quot;9&quot;: 6, &quot;10&quot;: 12, &quot;11&quot;: 1, &quot;12&quot;: 2, &quot;13&quot;: 3, &quot;14&quot;: 7}" calcext:value-type="string">
            <text:p>"10": { "0": 13, "1": 14, "2": 12, "3": 11, "4": 10, "5": 9, "6": 8, "7": 4, "8": 5, "9": 6, "10": 12, "11": 1, "12": 2, "13": 3, "14": 7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1226" table:formula="of:=HLOOKUP([.B8];[.$AF$25:.$AW$26];2;0)" office:value-type="float" office:value="4.5" calcext:value-type="float">
            <text:p>4.5</text:p>
          </table:table-cell>
          <table:table-cell table:style-name="ce1234" table:formula="of:=HLOOKUP([.C8];[.$AF$25:.$AW$26];2;0)" office:value-type="float" office:value="1.1" calcext:value-type="float">
            <text:p>1.1</text:p>
          </table:table-cell>
          <table:table-cell table:style-name="ce1237" table:formula="of:=HLOOKUP([.D8];[.$AF$25:.$AW$26];2;0)" office:value-type="float" office:value="1.2" calcext:value-type="float">
            <text:p>1.2</text:p>
          </table:table-cell>
          <table:table-cell table:style-name="ce1240" table:formula="of:=HLOOKUP([.E8];[.$AF$25:.$AW$26];2;0)" office:value-type="float" office:value="1.3" calcext:value-type="float">
            <text:p>1.3</text:p>
          </table:table-cell>
          <table:table-cell table:style-name="ce1240" table:formula="of:=HLOOKUP([.F8];[.$AF$25:.$AW$26];2;0)" office:value-type="float" office:value="2" calcext:value-type="float">
            <text:p>2.0</text:p>
          </table:table-cell>
          <table:table-cell/>
          <table:table-cell table:style-name="ce1243" table:formula="of:=HLOOKUP([.H8];[.$AF$25:.$AW$26];2;0)" office:value-type="float" office:value="3" calcext:value-type="float">
            <text:p>3.0</text:p>
          </table:table-cell>
          <table:table-cell table:style-name="ce1249" table:formula="of:=HLOOKUP([.I8];[.$AF$25:.$AW$26];2;0)" office:value-type="float" office:value="2.1" calcext:value-type="float">
            <text:p>2.1</text:p>
          </table:table-cell>
          <table:table-cell table:style-name="ce1255" table:formula="of:=HLOOKUP([.J8];[.$AF$25:.$AW$26];2;0)" office:value-type="float" office:value="1.1" calcext:value-type="float">
            <text:p>1.1</text:p>
          </table:table-cell>
          <table:table-cell table:style-name="ce1258" table:formula="of:=HLOOKUP([.K8];[.$AF$25:.$AW$26];2;0)" office:value-type="float" office:value="1.2" calcext:value-type="float">
            <text:p>1.2</text:p>
          </table:table-cell>
          <table:table-cell table:style-name="ce1258" table:formula="of:=HLOOKUP([.L8];[.$AF$25:.$AW$26];2;0)" office:value-type="float" office:value="1.6" calcext:value-type="float">
            <text:p>1.6</text:p>
          </table:table-cell>
          <table:table-cell/>
          <table:table-cell table:style-name="ce1261" table:formula="of:=HLOOKUP([.N8];[.$AF$25:.$AW$26];2;0)" office:value-type="float" office:value="2.3" calcext:value-type="float">
            <text:p>2.3</text:p>
          </table:table-cell>
          <table:table-cell table:style-name="ce1267" table:formula="of:=HLOOKUP([.O8];[.$AF$25:.$AW$26];2;0)" office:value-type="float" office:value="1.2" calcext:value-type="float">
            <text:p>1.2</text:p>
          </table:table-cell>
          <table:table-cell table:style-name="ce1270" table:formula="of:=HLOOKUP([.P8];[.$AF$25:.$AW$26];2;0)" office:value-type="float" office:value="1.3" calcext:value-type="float">
            <text:p>1.3</text:p>
          </table:table-cell>
          <table:table-cell table:style-name="ce1276" table:formula="of:=HLOOKUP([.Q8];[.$AF$25:.$AW$26];2;0)" office:value-type="float" office:value="1.1" calcext:value-type="float">
            <text:p>1.1</text:p>
          </table:table-cell>
          <table:table-cell table:style-name="ce1276" table:formula="of:=HLOOKUP([.R8];[.$AF$25:.$AW$26];2;0)" office:value-type="float" office:value="2.2" calcext:value-type="float">
            <text:p>2.2</text:p>
          </table:table-cell>
          <table:table-cell/>
          <table:table-cell table:style-name="ce1281" table:formula="of:=HLOOKUP([.T8];[.$AF$25:.$AW$26];2;0)" office:value-type="float" office:value="1.3" calcext:value-type="float">
            <text:p>1.3</text:p>
          </table:table-cell>
          <table:table-cell table:style-name="ce1287" table:formula="of:=HLOOKUP([.U8];[.$AF$25:.$AW$26];2;0)" office:value-type="float" office:value="1.2" calcext:value-type="float">
            <text:p>1.2</text:p>
          </table:table-cell>
          <table:table-cell table:style-name="ce1290" table:formula="of:=HLOOKUP([.V8];[.$AF$25:.$AW$26];2;0)" office:value-type="float" office:value="1.1" calcext:value-type="float">
            <text:p>1.1</text:p>
          </table:table-cell>
          <table:table-cell table:style-name="ce1293" table:formula="of:=HLOOKUP([.W8];[.$AF$25:.$AW$26];2;0)" office:value-type="float" office:value="2" calcext:value-type="float">
            <text:p>2.0</text:p>
          </table:table-cell>
          <table:table-cell table:style-name="ce1294" table:formula="of:=HLOOKUP([.X8];[.$AF$25:.$AW$26];2;0)" office:value-type="float" office:value="2.2" calcext:value-type="float">
            <text:p>2.2</text:p>
          </table:table-cell>
          <table:table-cell/>
          <table:table-cell table:style-name="ce1300" table:formula="of:=HLOOKUP([.Z8];[.$AF$25:.$AW$26];2;0)" office:value-type="float" office:value="2.2" calcext:value-type="float">
            <text:p>2.2</text:p>
          </table:table-cell>
          <table:table-cell table:style-name="ce1306" table:formula="of:=HLOOKUP([.AA8];[.$AF$25:.$AW$26];2;0)" office:value-type="float" office:value="1.3" calcext:value-type="float">
            <text:p>1.3</text:p>
          </table:table-cell>
          <table:table-cell table:style-name="ce1309" table:formula="of:=HLOOKUP([.AB8];[.$AF$25:.$AW$26];2;0)" office:value-type="float" office:value="1.2" calcext:value-type="float">
            <text:p>1.2</text:p>
          </table:table-cell>
          <table:table-cell table:style-name="ce1312" table:formula="of:=HLOOKUP([.AC8];[.$AF$25:.$AW$26];2;0)" office:value-type="float" office:value="1.1" calcext:value-type="float">
            <text:p>1.1</text:p>
          </table:table-cell>
          <table:table-cell table:style-name="ce1316" table:formula="of:=HLOOKUP([.AD8];[.$AF$25:.$AW$26];2;0)" office:value-type="float" office:value="4" calcext:value-type="float">
            <text:p>4.0</text:p>
          </table:table-cell>
          <table:table-cell table:style-name="ce623"/>
          <table:table-cell table:style-name="ce1323" office:value-type="float" office:value="0" calcext:value-type="float">
            <text:p>0</text:p>
          </table:table-cell>
          <table:table-cell table:style-name="ce1323" office:value-type="float" office:value="1" calcext:value-type="float">
            <text:p>1</text:p>
          </table:table-cell>
          <table:table-cell table:style-name="ce1323" office:value-type="float" office:value="2" calcext:value-type="float">
            <text:p>2</text:p>
          </table:table-cell>
          <table:table-cell table:style-name="ce1323" office:value-type="float" office:value="3" calcext:value-type="float">
            <text:p>3</text:p>
          </table:table-cell>
          <table:table-cell table:style-name="ce1325" office:value-type="float" office:value="4" calcext:value-type="float">
            <text:p>4</text:p>
          </table:table-cell>
          <table:table-cell table:style-name="ce1325" office:value-type="float" office:value="5" calcext:value-type="float">
            <text:p>5</text:p>
          </table:table-cell>
          <table:table-cell table:style-name="ce1325" office:value-type="float" office:value="6" calcext:value-type="float">
            <text:p>6</text:p>
          </table:table-cell>
          <table:table-cell table:style-name="ce1325" office:value-type="float" office:value="7" calcext:value-type="float">
            <text:p>7</text:p>
          </table:table-cell>
          <table:table-cell table:style-name="ce1325" office:value-type="float" office:value="8" calcext:value-type="float">
            <text:p>8</text:p>
          </table:table-cell>
          <table:table-cell table:style-name="ce1326" office:value-type="float" office:value="9" calcext:value-type="float">
            <text:p>9</text:p>
          </table:table-cell>
          <table:table-cell table:style-name="ce1326" office:value-type="float" office:value="10" calcext:value-type="float">
            <text:p>10</text:p>
          </table:table-cell>
          <table:table-cell table:style-name="ce1327" office:value-type="float" office:value="11" calcext:value-type="float">
            <text:p>11</text:p>
          </table:table-cell>
          <table:table-cell table:style-name="ce1327" office:value-type="float" office:value="12" calcext:value-type="float">
            <text:p>12</text:p>
          </table:table-cell>
          <table:table-cell table:style-name="ce1327" office:value-type="float" office:value="13" calcext:value-type="float">
            <text:p>13</text:p>
          </table:table-cell>
          <table:table-cell table:style-name="ce1327" office:value-type="float" office:value="14" calcext:value-type="float">
            <text:p>14</text:p>
          </table:table-cell>
          <table:table-cell table:number-columns-repeated="16"/>
          <table:table-cell table:style-name="ce623" table:formula="of:=COM.MICROSOFT.CONCAT(&quot;&quot;&quot;11&quot;&quot;: { &quot;;COM.MICROSOFT.TEXTJOIN(&quot;, &quot;;TRUE();[.AL16:.AP18]);&quot;}&quot;)" office:value-type="string" office:string-value="&quot;11&quot;: { &quot;0&quot;: 14, &quot;1&quot;: 12, &quot;2&quot;: 9, &quot;3&quot;: 10, &quot;4&quot;: 11, &quot;5&quot;: 13, &quot;6&quot;: 6, &quot;7&quot;: 3, &quot;8&quot;: 4, &quot;9&quot;: 5, &quot;10&quot;: 7, &quot;11&quot;: 10, &quot;12&quot;: 1, &quot;13&quot;: 2, &quot;14&quot;: 8}" calcext:value-type="string">
            <text:p>"11": { "0": 14, "1": 12, "2": 9, "3": 10, "4": 11, "5": 13, "6": 6, "7": 3, "8": 4, "9": 5, "10": 7, "11": 10, "12": 1, "13": 2, "14": 8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1227" table:formula="of:=HLOOKUP([.B9];[.$AF$25:.$AW$26];2;0)" office:value-type="float" office:value="3" calcext:value-type="float">
            <text:p>3.0</text:p>
          </table:table-cell>
          <table:table-cell table:style-name="ce1234" table:formula="of:=HLOOKUP([.C9];[.$AF$25:.$AW$26];2;0)" office:value-type="float" office:value="2.3" calcext:value-type="float">
            <text:p>2.3</text:p>
          </table:table-cell>
          <table:table-cell table:style-name="ce1237" table:formula="of:=HLOOKUP([.D9];[.$AF$25:.$AW$26];2;0)" office:value-type="float" office:value="2.2" calcext:value-type="float">
            <text:p>2.2</text:p>
          </table:table-cell>
          <table:table-cell table:style-name="ce1240" table:formula="of:=HLOOKUP([.E9];[.$AF$25:.$AW$26];2;0)" office:value-type="float" office:value="1.6" calcext:value-type="float">
            <text:p>1.6</text:p>
          </table:table-cell>
          <table:table-cell table:style-name="ce1240" table:formula="of:=HLOOKUP([.F9];[.$AF$25:.$AW$26];2;0)" office:value-type="float" office:value="2.1" calcext:value-type="float">
            <text:p>2.1</text:p>
          </table:table-cell>
          <table:table-cell/>
          <table:table-cell table:style-name="ce1244" table:formula="of:=HLOOKUP([.H9];[.$AF$25:.$AW$26];2;0)" office:value-type="float" office:value="2.3" calcext:value-type="float">
            <text:p>2.3</text:p>
          </table:table-cell>
          <table:table-cell table:style-name="ce1250" table:formula="of:=HLOOKUP([.I9];[.$AF$25:.$AW$26];2;0)" office:value-type="float" office:value="2.2" calcext:value-type="float">
            <text:p>2.2</text:p>
          </table:table-cell>
          <table:table-cell table:style-name="ce1255" table:formula="of:=HLOOKUP([.J9];[.$AF$25:.$AW$26];2;0)" office:value-type="float" office:value="2.1" calcext:value-type="float">
            <text:p>2.1</text:p>
          </table:table-cell>
          <table:table-cell table:style-name="ce1258" table:formula="of:=HLOOKUP([.K9];[.$AF$25:.$AW$26];2;0)" office:value-type="float" office:value="1.3" calcext:value-type="float">
            <text:p>1.3</text:p>
          </table:table-cell>
          <table:table-cell table:style-name="ce1258" table:formula="of:=HLOOKUP([.L9];[.$AF$25:.$AW$26];2;0)" office:value-type="float" office:value="2" calcext:value-type="float">
            <text:p>2.0</text:p>
          </table:table-cell>
          <table:table-cell/>
          <table:table-cell table:style-name="ce1262" table:formula="of:=HLOOKUP([.N9];[.$AF$25:.$AW$26];2;0)" office:value-type="float" office:value="2.1" calcext:value-type="float">
            <text:p>2.1</text:p>
          </table:table-cell>
          <table:table-cell table:style-name="ce1267" table:formula="of:=HLOOKUP([.O9];[.$AF$25:.$AW$26];2;0)" office:value-type="float" office:value="1.6" calcext:value-type="float">
            <text:p>1.6</text:p>
          </table:table-cell>
          <table:table-cell table:style-name="ce1271" table:formula="of:=HLOOKUP([.P9];[.$AF$25:.$AW$26];2;0)" office:value-type="float" office:value="2" calcext:value-type="float">
            <text:p>2.0</text:p>
          </table:table-cell>
          <table:table-cell table:style-name="ce1276" table:formula="of:=HLOOKUP([.Q9];[.$AF$25:.$AW$26];2;0)" office:value-type="float" office:value="1.3" calcext:value-type="float">
            <text:p>1.3</text:p>
          </table:table-cell>
          <table:table-cell table:style-name="ce1276" table:formula="of:=HLOOKUP([.R9];[.$AF$25:.$AW$26];2;0)" office:value-type="float" office:value="3" calcext:value-type="float">
            <text:p>3.0</text:p>
          </table:table-cell>
          <table:table-cell/>
          <table:table-cell table:style-name="ce1282" table:formula="of:=HLOOKUP([.T9];[.$AF$25:.$AW$26];2;0)" office:value-type="float" office:value="2" calcext:value-type="float">
            <text:p>2.0</text:p>
          </table:table-cell>
          <table:table-cell table:style-name="ce1287" table:formula="of:=HLOOKUP([.U9];[.$AF$25:.$AW$26];2;0)" office:value-type="float" office:value="2.1" calcext:value-type="float">
            <text:p>2.1</text:p>
          </table:table-cell>
          <table:table-cell table:style-name="ce1290" table:formula="of:=HLOOKUP([.V9];[.$AF$25:.$AW$26];2;0)" office:value-type="float" office:value="2.3" calcext:value-type="float">
            <text:p>2.3</text:p>
          </table:table-cell>
          <table:table-cell table:style-name="ce1294" table:formula="of:=HLOOKUP([.W9];[.$AF$25:.$AW$26];2;0)" office:value-type="float" office:value="1.6" calcext:value-type="float">
            <text:p>1.6</text:p>
          </table:table-cell>
          <table:table-cell table:style-name="ce1294" table:formula="of:=HLOOKUP([.X9];[.$AF$25:.$AW$26];2;0)" office:value-type="float" office:value="3" calcext:value-type="float">
            <text:p>3.0</text:p>
          </table:table-cell>
          <table:table-cell/>
          <table:table-cell table:style-name="ce1301" table:formula="of:=HLOOKUP([.Z9];[.$AF$25:.$AW$26];2;0)" office:value-type="float" office:value="2.1" calcext:value-type="float">
            <text:p>2.1</text:p>
          </table:table-cell>
          <table:table-cell table:style-name="ce1306" table:formula="of:=HLOOKUP([.AA9];[.$AF$25:.$AW$26];2;0)" office:value-type="float" office:value="2" calcext:value-type="float">
            <text:p>2.0</text:p>
          </table:table-cell>
          <table:table-cell table:style-name="ce1309" table:formula="of:=HLOOKUP([.AB9];[.$AF$25:.$AW$26];2;0)" office:value-type="float" office:value="1.6" calcext:value-type="float">
            <text:p>1.6</text:p>
          </table:table-cell>
          <table:table-cell table:style-name="ce1312" table:formula="of:=HLOOKUP([.AC9];[.$AF$25:.$AW$26];2;0)" office:value-type="float" office:value="3" calcext:value-type="float">
            <text:p>3.0</text:p>
          </table:table-cell>
          <table:table-cell table:style-name="ce1312" table:formula="of:=HLOOKUP([.AD9];[.$AF$25:.$AW$26];2;0)" office:value-type="float" office:value="2.3" calcext:value-type="float">
            <text:p>2.3</text:p>
          </table:table-cell>
          <table:table-cell table:style-name="ce623"/>
          <table:table-cell table:style-name="ce1324" office:value-type="float" office:value="1" calcext:value-type="float">
            <text:p>1.0</text:p>
          </table:table-cell>
          <table:table-cell table:style-name="ce1324" office:value-type="float" office:value="1.1" calcext:value-type="float">
            <text:p>1.1</text:p>
          </table:table-cell>
          <table:table-cell table:style-name="ce1324" office:value-type="float" office:value="1.2" calcext:value-type="float">
            <text:p>1.2</text:p>
          </table:table-cell>
          <table:table-cell table:style-name="ce1324" office:value-type="float" office:value="1.3" calcext:value-type="float">
            <text:p>1.3</text:p>
          </table:table-cell>
          <table:table-cell table:style-name="ce1324" office:value-type="float" office:value="1.6" calcext:value-type="float">
            <text:p>1.6</text:p>
          </table:table-cell>
          <table:table-cell table:style-name="ce1324" office:value-type="float" office:value="2" calcext:value-type="float">
            <text:p>2.0</text:p>
          </table:table-cell>
          <table:table-cell table:style-name="ce1324" office:value-type="float" office:value="2.1" calcext:value-type="float">
            <text:p>2.1</text:p>
          </table:table-cell>
          <table:table-cell table:style-name="ce1324" office:value-type="float" office:value="2.2" calcext:value-type="float">
            <text:p>2.2</text:p>
          </table:table-cell>
          <table:table-cell table:style-name="ce1324" office:value-type="float" office:value="2.3" calcext:value-type="float">
            <text:p>2.3</text:p>
          </table:table-cell>
          <table:table-cell table:style-name="ce1324" office:value-type="float" office:value="3" calcext:value-type="float">
            <text:p>3.0</text:p>
          </table:table-cell>
          <table:table-cell table:style-name="ce1324" office:value-type="float" office:value="3.1" calcext:value-type="float">
            <text:p>3.1</text:p>
          </table:table-cell>
          <table:table-cell table:style-name="ce1324" office:value-type="float" office:value="3.2" calcext:value-type="float">
            <text:p>3.2</text:p>
          </table:table-cell>
          <table:table-cell table:style-name="ce1324" office:value-type="float" office:value="3.5" calcext:value-type="float">
            <text:p>3.5</text:p>
          </table:table-cell>
          <table:table-cell table:style-name="ce1324" office:value-type="float" office:value="4" calcext:value-type="float">
            <text:p>4.0</text:p>
          </table:table-cell>
          <table:table-cell table:style-name="ce1324" office:value-type="float" office:value="4.5" calcext:value-type="float">
            <text:p>4.5</text:p>
          </table:table-cell>
          <table:table-cell table:number-columns-repeated="16"/>
          <table:table-cell table:style-name="ce623" table:formula="of:=COM.MICROSOFT.CONCAT(&quot;&quot;&quot;12&quot;&quot;: { &quot;;COM.MICROSOFT.TEXTJOIN(&quot;, &quot;;TRUE();[.AR16:.AV18]);&quot;}&quot;)" office:value-type="string" office:string-value="&quot;12&quot;: { &quot;0&quot;: 14, &quot;1&quot;: 13, &quot;2&quot;: 9, &quot;3&quot;: 10, &quot;4&quot;: 12, &quot;5&quot;: 11, &quot;6&quot;: 6, &quot;7&quot;: 4, &quot;8&quot;: 3, &quot;9&quot;: 8, &quot;10&quot;: 5, &quot;11&quot;: 2, &quot;12&quot;: 9, &quot;13&quot;: 1, &quot;14&quot;: 7}" calcext:value-type="string">
            <text:p>"12": { "0": 14, "1": 13, "2": 9, "3": 10, "4": 12, "5": 11, "6": 6, "7": 4, "8": 3, "9": 8, "10": 5, "11": 2, "12": 9, "13": 1, "14": 7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1227" table:formula="of:=HLOOKUP([.B10];[.$AF$25:.$AW$26];2;0)" office:value-type="float" office:value="3.5" calcext:value-type="float">
            <text:p>3.5</text:p>
          </table:table-cell>
          <table:table-cell table:style-name="ce1234" table:formula="of:=HLOOKUP([.C10];[.$AF$25:.$AW$26];2;0)" office:value-type="float" office:value="4" calcext:value-type="float">
            <text:p>4.0</text:p>
          </table:table-cell>
          <table:table-cell table:style-name="ce1237" table:formula="of:=HLOOKUP([.D10];[.$AF$25:.$AW$26];2;0)" office:value-type="float" office:value="4.5" calcext:value-type="float">
            <text:p>4.5</text:p>
          </table:table-cell>
          <table:table-cell table:style-name="ce1240" table:formula="of:=HLOOKUP([.E10];[.$AF$25:.$AW$26];2;0)" office:value-type="float" office:value="3.1" calcext:value-type="float">
            <text:p>3.1</text:p>
          </table:table-cell>
          <table:table-cell table:style-name="ce1240" table:formula="of:=HLOOKUP([.F10];[.$AF$25:.$AW$26];2;0)" office:value-type="float" office:value="3.2" calcext:value-type="float">
            <text:p>3.2</text:p>
          </table:table-cell>
          <table:table-cell/>
          <table:table-cell table:style-name="ce1244" table:formula="of:=HLOOKUP([.H10];[.$AF$25:.$AW$26];2;0)" office:value-type="float" office:value="4" calcext:value-type="float">
            <text:p>4.0</text:p>
          </table:table-cell>
          <table:table-cell table:style-name="ce1250" table:formula="of:=HLOOKUP([.I10];[.$AF$25:.$AW$26];2;0)" office:value-type="float" office:value="4.5" calcext:value-type="float">
            <text:p>4.5</text:p>
          </table:table-cell>
          <table:table-cell table:style-name="ce1255" table:formula="of:=HLOOKUP([.J10];[.$AF$25:.$AW$26];2;0)" office:value-type="float" office:value="3.5" calcext:value-type="float">
            <text:p>3.5</text:p>
          </table:table-cell>
          <table:table-cell table:style-name="ce1258" table:formula="of:=HLOOKUP([.K10];[.$AF$25:.$AW$26];2;0)" office:value-type="float" office:value="3.1" calcext:value-type="float">
            <text:p>3.1</text:p>
          </table:table-cell>
          <table:table-cell table:style-name="ce1258" table:formula="of:=HLOOKUP([.L10];[.$AF$25:.$AW$26];2;0)" office:value-type="float" office:value="3.2" calcext:value-type="float">
            <text:p>3.2</text:p>
          </table:table-cell>
          <table:table-cell/>
          <table:table-cell table:style-name="ce1262" table:formula="of:=HLOOKUP([.N10];[.$AF$25:.$AW$26];2;0)" office:value-type="float" office:value="4.5" calcext:value-type="float">
            <text:p>4.5</text:p>
          </table:table-cell>
          <table:table-cell table:style-name="ce1267" table:formula="of:=HLOOKUP([.O10];[.$AF$25:.$AW$26];2;0)" office:value-type="float" office:value="3.5" calcext:value-type="float">
            <text:p>3.5</text:p>
          </table:table-cell>
          <table:table-cell table:style-name="ce1271" table:formula="of:=HLOOKUP([.P10];[.$AF$25:.$AW$26];2;0)" office:value-type="float" office:value="3.1" calcext:value-type="float">
            <text:p>3.1</text:p>
          </table:table-cell>
          <table:table-cell table:style-name="ce1276" table:formula="of:=HLOOKUP([.Q10];[.$AF$25:.$AW$26];2;0)" office:value-type="float" office:value="3.2" calcext:value-type="float">
            <text:p>3.2</text:p>
          </table:table-cell>
          <table:table-cell table:style-name="ce1276" table:formula="of:=HLOOKUP([.R10];[.$AF$25:.$AW$26];2;0)" office:value-type="float" office:value="4" calcext:value-type="float">
            <text:p>4.0</text:p>
          </table:table-cell>
          <table:table-cell/>
          <table:table-cell table:style-name="ce1282" table:formula="of:=HLOOKUP([.T10];[.$AF$25:.$AW$26];2;0)" office:value-type="float" office:value="4.5" calcext:value-type="float">
            <text:p>4.5</text:p>
          </table:table-cell>
          <table:table-cell table:style-name="ce1287" table:formula="of:=HLOOKUP([.U10];[.$AF$25:.$AW$26];2;0)" office:value-type="float" office:value="4" calcext:value-type="float">
            <text:p>4.0</text:p>
          </table:table-cell>
          <table:table-cell table:style-name="ce1290" table:formula="of:=HLOOKUP([.V10];[.$AF$25:.$AW$26];2;0)" office:value-type="float" office:value="3.5" calcext:value-type="float">
            <text:p>3.5</text:p>
          </table:table-cell>
          <table:table-cell table:style-name="ce1294" table:formula="of:=HLOOKUP([.W10];[.$AF$25:.$AW$26];2;0)" office:value-type="float" office:value="3.1" calcext:value-type="float">
            <text:p>3.1</text:p>
          </table:table-cell>
          <table:table-cell table:style-name="ce1294" table:formula="of:=HLOOKUP([.X10];[.$AF$25:.$AW$26];2;0)" office:value-type="float" office:value="3.2" calcext:value-type="float">
            <text:p>3.2</text:p>
          </table:table-cell>
          <table:table-cell/>
          <table:table-cell table:style-name="ce1301" table:formula="of:=HLOOKUP([.Z10];[.$AF$25:.$AW$26];2;0)" office:value-type="float" office:value="3.1" calcext:value-type="float">
            <text:p>3.1</text:p>
          </table:table-cell>
          <table:table-cell table:style-name="ce1306" table:formula="of:=HLOOKUP([.AA10];[.$AF$25:.$AW$26];2;0)" office:value-type="float" office:value="3.2" calcext:value-type="float">
            <text:p>3.2</text:p>
          </table:table-cell>
          <table:table-cell table:style-name="ce1309" table:formula="of:=HLOOKUP([.AB10];[.$AF$25:.$AW$26];2;0)" office:value-type="float" office:value="3.5" calcext:value-type="float">
            <text:p>3.5</text:p>
          </table:table-cell>
          <table:table-cell table:style-name="ce1312" table:formula="of:=HLOOKUP([.AC10];[.$AF$25:.$AW$26];2;0)" office:value-type="float" office:value="4" calcext:value-type="float">
            <text:p>4.0</text:p>
          </table:table-cell>
          <table:table-cell table:style-name="ce1312" table:formula="of:=HLOOKUP([.AD10];[.$AF$25:.$AW$26];2;0)" office:value-type="float" office:value="4.5" calcext:value-type="float">
            <text:p>4.5</text:p>
          </table:table-cell>
          <table:table-cell table:style-name="ce623"/>
          <table:table-cell table:number-columns-repeated="31"/>
          <table:table-cell table:style-name="ce623" table:formula="of:=COM.MICROSOFT.CONCAT(&quot;&quot;&quot;13&quot;&quot;: { &quot;;COM.MICROSOFT.TEXTJOIN(&quot;, &quot;;TRUE();[.AX16:.BB18]);&quot;}&quot;)" office:value-type="string" office:string-value="&quot;13&quot;: { &quot;0&quot;: 14, &quot;1&quot;: 10, &quot;2&quot;: 8, &quot;3&quot;: 12, &quot;4&quot;: 13, &quot;5&quot;: 5, &quot;6&quot;: 4, &quot;7&quot;: 3, &quot;8&quot;: 7, &quot;9&quot;: 11, &quot;10&quot;: 6, &quot;11&quot;: 2, &quot;12&quot;: 1, &quot;13&quot;: 4, &quot;14&quot;: 9}" calcext:value-type="string">
            <text:p>"13": { "0": 14, "1": 10, "2": 8, "3": 12, "4": 13, "5": 5, "6": 4, "7": 3, "8": 7, "9": 11, "10": 6, "11": 2, "12": 1, "13": 4, "14": 9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639" table:number-columns-repeated="29"/>
          <table:table-cell table:style-name="ce623"/>
          <table:table-cell table:formula="of:=COM.MICROSOFT.TEXTJOIN(&quot;, &quot;;TRUE();[.AF26:.AT26])" office:value-type="string" office:string-value="1, 1.1, 1.2, 1.3, 1.6, 2, 2.1, 2.2, 2.3, 3, 3.1, 3.2, 3.5, 4, 4.5" calcext:value-type="string">
            <text:p>1, 1.1, 1.2, 1.3, 1.6, 2, 2.1, 2.2, 2.3, 3, 3.1, 3.2, 3.5, 4, 4.5</text:p>
          </table:table-cell>
          <table:table-cell table:number-columns-repeated="30"/>
          <table:table-cell table:style-name="ce623" table:formula="of:=COM.MICROSOFT.CONCAT(&quot;&quot;&quot;14&quot;&quot;: { &quot;;COM.MICROSOFT.TEXTJOIN(&quot;, &quot;;TRUE();[.BD16:.BH18]);&quot;}&quot;)" office:value-type="string" office:string-value="&quot;14&quot;: { &quot;0&quot;: 13, &quot;1&quot;: 14, &quot;2&quot;: 12, &quot;3&quot;: 11, &quot;4&quot;: 10, &quot;5&quot;: 7, &quot;6&quot;: 5, &quot;7&quot;: 3, &quot;8&quot;: 2, &quot;9&quot;: 9, &quot;10&quot;: 8, &quot;11&quot;: 6, &quot;12&quot;: 4, &quot;13&quot;: 1, &quot;14&quot;: 11}" calcext:value-type="string">
            <text:p>"14": { "0": 13, "1": 14, "2": 12, "3": 11, "4": 10, "5": 7, "6": 5, "7": 3, "8": 2, "9": 9, "10": 8, "11": 6, "12": 4, "13": 1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640" table:formula="of:=SUM([.B30:.F32])-[.B31]" office:value-type="float" office:value="35.1" calcext:value-type="float" table:number-columns-spanned="2" table:number-rows-spanned="1">
            <text:p>35.1</text:p>
          </table:table-cell>
          <table:covered-table-cell table:style-name="ce647"/>
          <table:table-cell table:style-name="ce647" table:number-columns-repeated="3"/>
          <table:table-cell/>
          <table:table-cell table:style-name="ce640" table:formula="of:=SUM([.H30:.L32])-[.I31]" office:value-type="float" office:value="35.1" calcext:value-type="float" table:number-columns-spanned="2" table:number-rows-spanned="1">
            <text:p>35.1</text:p>
          </table:table-cell>
          <table:covered-table-cell table:style-name="ce647"/>
          <table:table-cell table:style-name="ce647" table:number-columns-repeated="3"/>
          <table:table-cell/>
          <table:table-cell table:style-name="ce640" table:formula="of:=SUM([.N30:.R32])-[.P31]" office:value-type="float" office:value="35.1" calcext:value-type="float" table:number-columns-spanned="2" table:number-rows-spanned="1">
            <text:p>35.1</text:p>
          </table:table-cell>
          <table:covered-table-cell table:style-name="ce647"/>
          <table:table-cell table:style-name="ce647" table:number-columns-repeated="3"/>
          <table:table-cell/>
          <table:table-cell table:style-name="ce640" table:formula="of:=SUM([.T30:.X32])-[.W31]" office:value-type="float" office:value="35.1" calcext:value-type="float" table:number-columns-spanned="2" table:number-rows-spanned="1">
            <text:p>35.1</text:p>
          </table:table-cell>
          <table:covered-table-cell table:style-name="ce647"/>
          <table:table-cell table:style-name="ce647" table:number-columns-repeated="3"/>
          <table:table-cell/>
          <table:table-cell table:style-name="ce640" table:formula="of:=SUM([.Z30:.AD32])-[.AD31]" office:value-type="float" office:value="35.1" calcext:value-type="float" table:number-columns-spanned="2" table:number-rows-spanned="1">
            <text:p>35.1</text:p>
          </table:table-cell>
          <table:covered-table-cell table:style-name="ce647"/>
          <table:table-cell table:style-name="ce647" table:number-columns-repeated="3"/>
          <table:table-cell table:style-name="ce623"/>
          <table:table-cell table:number-columns-repeated="31"/>
          <table:table-cell table:style-name="ce623"/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1228" table:formula="of:=HLOOKUP([.B12];[.$AF$25:.$AW$26];2;0)" office:value-type="float" office:value="3.5" calcext:value-type="float">
            <text:p>3.5</text:p>
          </table:table-cell>
          <table:table-cell table:style-name="ce1235" table:formula="of:=HLOOKUP([.C12];[.$AF$25:.$AW$26];2;0)" office:value-type="float" office:value="3.1" calcext:value-type="float">
            <text:p>3.1</text:p>
          </table:table-cell>
          <table:table-cell table:style-name="ce1238" table:formula="of:=HLOOKUP([.D12];[.$AF$25:.$AW$26];2;0)" office:value-type="float" office:value="2.1" calcext:value-type="float">
            <text:p>2.1</text:p>
          </table:table-cell>
          <table:table-cell table:style-name="ce1241" table:formula="of:=HLOOKUP([.E12];[.$AF$25:.$AW$26];2;0)" office:value-type="float" office:value="2" calcext:value-type="float">
            <text:p>2.0</text:p>
          </table:table-cell>
          <table:table-cell table:style-name="ce1241" table:formula="of:=HLOOKUP([.F12];[.$AF$25:.$AW$26];2;0)" office:value-type="float" office:value="3" calcext:value-type="float">
            <text:p>3.0</text:p>
          </table:table-cell>
          <table:table-cell/>
          <table:table-cell table:style-name="ce1245" table:formula="of:=HLOOKUP([.H12];[.$AF$25:.$AW$26];2;0)" office:value-type="float" office:value="4.5" calcext:value-type="float">
            <text:p>4.5</text:p>
          </table:table-cell>
          <table:table-cell table:style-name="ce1251" table:formula="of:=HLOOKUP([.I12];[.$AF$25:.$AW$26];2;0)" office:value-type="float" office:value="2.2" calcext:value-type="float">
            <text:p>2.2</text:p>
          </table:table-cell>
          <table:table-cell table:style-name="ce1256" table:formula="of:=HLOOKUP([.J12];[.$AF$25:.$AW$26];2;0)" office:value-type="float" office:value="1.6" calcext:value-type="float">
            <text:p>1.6</text:p>
          </table:table-cell>
          <table:table-cell table:style-name="ce1259" table:formula="of:=HLOOKUP([.K12];[.$AF$25:.$AW$26];2;0)" office:value-type="float" office:value="2" calcext:value-type="float">
            <text:p>2.0</text:p>
          </table:table-cell>
          <table:table-cell table:style-name="ce1259" table:formula="of:=HLOOKUP([.L12];[.$AF$25:.$AW$26];2;0)" office:value-type="float" office:value="4" calcext:value-type="float">
            <text:p>4.0</text:p>
          </table:table-cell>
          <table:table-cell/>
          <table:table-cell table:style-name="ce1263" table:formula="of:=HLOOKUP([.N12];[.$AF$25:.$AW$26];2;0)" office:value-type="float" office:value="4.5" calcext:value-type="float">
            <text:p>4.5</text:p>
          </table:table-cell>
          <table:table-cell table:style-name="ce1268" table:formula="of:=HLOOKUP([.O12];[.$AF$25:.$AW$26];2;0)" office:value-type="float" office:value="2" calcext:value-type="float">
            <text:p>2.0</text:p>
          </table:table-cell>
          <table:table-cell table:style-name="ce1272" table:formula="of:=HLOOKUP([.P12];[.$AF$25:.$AW$26];2;0)" office:value-type="float" office:value="1.6" calcext:value-type="float">
            <text:p>1.6</text:p>
          </table:table-cell>
          <table:table-cell table:style-name="ce1277" table:formula="of:=HLOOKUP([.Q12];[.$AF$25:.$AW$26];2;0)" office:value-type="float" office:value="2.1" calcext:value-type="float">
            <text:p>2.1</text:p>
          </table:table-cell>
          <table:table-cell table:style-name="ce1277" table:formula="of:=HLOOKUP([.R12];[.$AF$25:.$AW$26];2;0)" office:value-type="float" office:value="4" calcext:value-type="float">
            <text:p>4.0</text:p>
          </table:table-cell>
          <table:table-cell/>
          <table:table-cell table:style-name="ce1283" table:formula="of:=HLOOKUP([.T12];[.$AF$25:.$AW$26];2;0)" office:value-type="float" office:value="4" calcext:value-type="float">
            <text:p>4.0</text:p>
          </table:table-cell>
          <table:table-cell table:style-name="ce1288" table:formula="of:=HLOOKUP([.U12];[.$AF$25:.$AW$26];2;0)" office:value-type="float" office:value="2" calcext:value-type="float">
            <text:p>2.0</text:p>
          </table:table-cell>
          <table:table-cell table:style-name="ce1291" table:formula="of:=HLOOKUP([.V12];[.$AF$25:.$AW$26];2;0)" office:value-type="float" office:value="1.3" calcext:value-type="float">
            <text:p>1.3</text:p>
          </table:table-cell>
          <table:table-cell table:style-name="ce1295" table:formula="of:=HLOOKUP([.W12];[.$AF$25:.$AW$26];2;0)" office:value-type="float" office:value="2.1" calcext:value-type="float">
            <text:p>2.1</text:p>
          </table:table-cell>
          <table:table-cell table:style-name="ce1295" table:formula="of:=HLOOKUP([.X12];[.$AF$25:.$AW$26];2;0)" office:value-type="float" office:value="3.1" calcext:value-type="float">
            <text:p>3.1</text:p>
          </table:table-cell>
          <table:table-cell/>
          <table:table-cell table:style-name="ce1302" table:formula="of:=HLOOKUP([.Z12];[.$AF$25:.$AW$26];2;0)" office:value-type="float" office:value="3.1" calcext:value-type="float">
            <text:p>3.1</text:p>
          </table:table-cell>
          <table:table-cell table:style-name="ce1307" table:formula="of:=HLOOKUP([.AA12];[.$AF$25:.$AW$26];2;0)" office:value-type="float" office:value="2.2" calcext:value-type="float">
            <text:p>2.2</text:p>
          </table:table-cell>
          <table:table-cell table:style-name="ce1310" table:formula="of:=HLOOKUP([.AB12];[.$AF$25:.$AW$26];2;0)" office:value-type="float" office:value="1.6" calcext:value-type="float">
            <text:p>1.6</text:p>
          </table:table-cell>
          <table:table-cell table:style-name="ce1313" table:formula="of:=HLOOKUP([.AC12];[.$AF$25:.$AW$26];2;0)" office:value-type="float" office:value="1.3" calcext:value-type="float">
            <text:p>1.3</text:p>
          </table:table-cell>
          <table:table-cell table:style-name="ce1313" table:formula="of:=HLOOKUP([.AD12];[.$AF$25:.$AW$26];2;0)" office:value-type="float" office:value="3" calcext:value-type="float">
            <text:p>3.0</text:p>
          </table:table-cell>
          <table:table-cell table:style-name="ce623"/>
          <table:table-cell table:number-columns-repeated="31"/>
          <table:table-cell table:style-name="ce623" table:formula="of:=COM.MICROSOFT.TEXTJOIN(&quot;, &quot;;TRUE();[.BK24:.BK28])" office:value-type="string" office:string-value="&quot;10&quot;: { &quot;0&quot;: 13, &quot;1&quot;: 14, &quot;2&quot;: 12, &quot;3&quot;: 11, &quot;4&quot;: 10, &quot;5&quot;: 9, &quot;6&quot;: 8, &quot;7&quot;: 4, &quot;8&quot;: 5, &quot;9&quot;: 6, &quot;10&quot;: 12, &quot;11&quot;: 1, &quot;12&quot;: 2, &quot;13&quot;: 3, &quot;14&quot;: 7}, &quot;11&quot;: { &quot;0&quot;: 14, &quot;1&quot;: 12, &quot;2&quot;: 9, &quot;3&quot;: 10, &quot;4&quot;: 11, &quot;5&quot;: 13, &quot;6&quot;: 6, &quot;7&quot;: 3, &quot;8&quot;: 4, &quot;9&quot;: 5, &quot;10&quot;: 7, &quot;11&quot;: 10, &quot;12&quot;: 1, &quot;13&quot;: 2, &quot;14&quot;: 8}, &quot;12&quot;: { &quot;0&quot;: 14, &quot;1&quot;: 13, &quot;2&quot;: 9, &quot;3&quot;: 10, &quot;4&quot;: 12, &quot;5&quot;: 11, &quot;6&quot;: 6, &quot;7&quot;: 4, &quot;8&quot;: 3, &quot;9&quot;: 8, &quot;10&quot;: 5, &quot;11&quot;: 2, &quot;12&quot;: 9, &quot;13&quot;: 1, &quot;14&quot;: 7}, &quot;13&quot;: { &quot;0&quot;: 14, &quot;1&quot;: 10, &quot;2&quot;: 8, &quot;3&quot;: 12, &quot;4&quot;: 13, &quot;5&quot;: 5, &quot;6&quot;: 4, &quot;7&quot;: 3, &quot;8&quot;: 7, &quot;9&quot;: 11, &quot;10&quot;: 6, &quot;11&quot;: 2, &quot;12&quot;: 1, &quot;13&quot;: 4, &quot;14&quot;: 9}, &quot;14&quot;: { &quot;0&quot;: 13, &quot;1&quot;: 14, &quot;2&quot;: 12, &quot;3&quot;: 11, &quot;4&quot;: 10, &quot;5&quot;: 7, &quot;6&quot;: 5, &quot;7&quot;: 3, &quot;8&quot;: 2, &quot;9&quot;: 9, &quot;10&quot;: 8, &quot;11&quot;: 6, &quot;12&quot;: 4, &quot;13&quot;: 1, &quot;14&quot;: 11}" calcext:value-type="string">
            <text:p>"10": { "0": 13, "1": 14, "2": 12, "3": 11, "4": 10, "5": 9, "6": 8, "7": 4, "8": 5, "9": 6, "10": 12, "11": 1, "12": 2, "13": 3, "14": 7}, "11": { "0": 14, "1": 12, "2": 9, "3": 10, "4": 11, "5": 13, "6": 6, "7": 3, "8": 4, "9": 5, "10": 7, "11": 10, "12": 1, "13": 2, "14": 8}, "12": { "0": 14, "1": 13, "2": 9, "3": 10, "4": 12, "5": 11, "6": 6, "7": 4, "8": 3, "9": 8, "10": 5, "11": 2, "12": 9, "13": 1, "14": 7}, "13": { "0": 14, "1": 10, "2": 8, "3": 12, "4": 13, "5": 5, "6": 4, "7": 3, "8": 7, "9": 11, "10": 6, "11": 2, "12": 1, "13": 4, "14": 9}, "14": { "0": 13, "1": 14, "2": 12, "3": 11, "4": 10, "5": 7, "6": 5, "7": 3, "8": 2, "9": 9, "10": 8, "11": 6, "12": 4, "13": 1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1229" table:formula="of:=HLOOKUP([.B13];[.$AF$25:.$AW$26];2;0)" office:value-type="float" office:value="2.3" calcext:value-type="float">
            <text:p>2.3</text:p>
          </table:table-cell>
          <table:table-cell table:style-name="ce1235" table:formula="of:=HLOOKUP([.C13];[.$AF$25:.$AW$26];2;0)" office:value-type="float" office:value="1.1" calcext:value-type="float">
            <text:p>1.1</text:p>
          </table:table-cell>
          <table:table-cell table:style-name="ce1238" table:formula="of:=HLOOKUP([.D13];[.$AF$25:.$AW$26];2;0)" office:value-type="float" office:value="1.2" calcext:value-type="float">
            <text:p>1.2</text:p>
          </table:table-cell>
          <table:table-cell table:style-name="ce1241" table:formula="of:=HLOOKUP([.E13];[.$AF$25:.$AW$26];2;0)" office:value-type="float" office:value="1.3" calcext:value-type="float">
            <text:p>1.3</text:p>
          </table:table-cell>
          <table:table-cell table:style-name="ce1241" table:formula="of:=HLOOKUP([.F13];[.$AF$25:.$AW$26];2;0)" office:value-type="float" office:value="1.6" calcext:value-type="float">
            <text:p>1.6</text:p>
          </table:table-cell>
          <table:table-cell/>
          <table:table-cell table:style-name="ce1246" table:formula="of:=HLOOKUP([.H13];[.$AF$25:.$AW$26];2;0)" office:value-type="float" office:value="3.1" calcext:value-type="float">
            <text:p>3.1</text:p>
          </table:table-cell>
          <table:table-cell table:style-name="ce1252" table:formula="of:=HLOOKUP([.I13];[.$AF$25:.$AW$26];2;0)" office:value-type="float" office:value="1.2" calcext:value-type="float">
            <text:p>1.2</text:p>
          </table:table-cell>
          <table:table-cell table:style-name="ce1256" table:formula="of:=HLOOKUP([.J13];[.$AF$25:.$AW$26];2;0)" office:value-type="float" office:value="1.1" calcext:value-type="float">
            <text:p>1.1</text:p>
          </table:table-cell>
          <table:table-cell table:style-name="ce1259" table:formula="of:=HLOOKUP([.K13];[.$AF$25:.$AW$26];2;0)" office:value-type="float" office:value="1.2" calcext:value-type="float">
            <text:p>1.2</text:p>
          </table:table-cell>
          <table:table-cell table:style-name="ce1259" table:formula="of:=HLOOKUP([.L13];[.$AF$25:.$AW$26];2;0)" office:value-type="float" office:value="3" calcext:value-type="float">
            <text:p>3.0</text:p>
          </table:table-cell>
          <table:table-cell/>
          <table:table-cell table:style-name="ce1264" table:formula="of:=HLOOKUP([.N13];[.$AF$25:.$AW$26];2;0)" office:value-type="float" office:value="3.1" calcext:value-type="float">
            <text:p>3.1</text:p>
          </table:table-cell>
          <table:table-cell table:style-name="ce1268" table:formula="of:=HLOOKUP([.O13];[.$AF$25:.$AW$26];2;0)" office:value-type="float" office:value="1.2" calcext:value-type="float">
            <text:p>1.2</text:p>
          </table:table-cell>
          <table:table-cell table:style-name="ce1273" table:formula="of:=HLOOKUP([.P13];[.$AF$25:.$AW$26];2;0)" office:value-type="float" office:value="1" calcext:value-type="float">
            <text:p>1.0</text:p>
          </table:table-cell>
          <table:table-cell table:style-name="ce1277" table:formula="of:=HLOOKUP([.Q13];[.$AF$25:.$AW$26];2;0)" office:value-type="float" office:value="1.1" calcext:value-type="float">
            <text:p>1.1</text:p>
          </table:table-cell>
          <table:table-cell table:style-name="ce1277" table:formula="of:=HLOOKUP([.R13];[.$AF$25:.$AW$26];2;0)" office:value-type="float" office:value="3" calcext:value-type="float">
            <text:p>3.0</text:p>
          </table:table-cell>
          <table:table-cell/>
          <table:table-cell table:style-name="ce1284" table:formula="of:=HLOOKUP([.T13];[.$AF$25:.$AW$26];2;0)" office:value-type="float" office:value="1.6" calcext:value-type="float">
            <text:p>1.6</text:p>
          </table:table-cell>
          <table:table-cell table:style-name="ce1288" table:formula="of:=HLOOKUP([.U13];[.$AF$25:.$AW$26];2;0)" office:value-type="float" office:value="1.2" calcext:value-type="float">
            <text:p>1.2</text:p>
          </table:table-cell>
          <table:table-cell table:style-name="ce1291" table:formula="of:=HLOOKUP([.V13];[.$AF$25:.$AW$26];2;0)" office:value-type="float" office:value="1.1" calcext:value-type="float">
            <text:p>1.1</text:p>
          </table:table-cell>
          <table:table-cell table:style-name="ce1296" table:formula="of:=HLOOKUP([.W13];[.$AF$25:.$AW$26];2;0)" office:value-type="float" office:value="1.1" calcext:value-type="float">
            <text:p>1.1</text:p>
          </table:table-cell>
          <table:table-cell table:style-name="ce1295" table:formula="of:=HLOOKUP([.X13];[.$AF$25:.$AW$26];2;0)" office:value-type="float" office:value="2.3" calcext:value-type="float">
            <text:p>2.3</text:p>
          </table:table-cell>
          <table:table-cell/>
          <table:table-cell table:style-name="ce1303" table:formula="of:=HLOOKUP([.Z13];[.$AF$25:.$AW$26];2;0)" office:value-type="float" office:value="2.1" calcext:value-type="float">
            <text:p>2.1</text:p>
          </table:table-cell>
          <table:table-cell table:style-name="ce1307" table:formula="of:=HLOOKUP([.AA13];[.$AF$25:.$AW$26];2;0)" office:value-type="float" office:value="2" calcext:value-type="float">
            <text:p>2.0</text:p>
          </table:table-cell>
          <table:table-cell table:style-name="ce1310" table:formula="of:=HLOOKUP([.AB13];[.$AF$25:.$AW$26];2;0)" office:value-type="float" office:value="1.2" calcext:value-type="float">
            <text:p>1.2</text:p>
          </table:table-cell>
          <table:table-cell table:style-name="ce1313" table:formula="of:=HLOOKUP([.AC13];[.$AF$25:.$AW$26];2;0)" office:value-type="float" office:value="1.1" calcext:value-type="float">
            <text:p>1.1</text:p>
          </table:table-cell>
          <table:table-cell table:style-name="ce1317" table:formula="of:=HLOOKUP([.AD13];[.$AF$25:.$AW$26];2;0)" office:value-type="float" office:value="2.2" calcext:value-type="float">
            <text:p>2.2</text:p>
          </table:table-cell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1230" table:formula="of:=HLOOKUP([.B14];[.$AF$25:.$AW$26];2;0)" office:value-type="float" office:value="4" calcext:value-type="float">
            <text:p>4.0</text:p>
          </table:table-cell>
          <table:table-cell table:style-name="ce1235" table:formula="of:=HLOOKUP([.C14];[.$AF$25:.$AW$26];2;0)" office:value-type="float" office:value="4.5" calcext:value-type="float">
            <text:p>4.5</text:p>
          </table:table-cell>
          <table:table-cell table:style-name="ce1238" table:formula="of:=HLOOKUP([.D14];[.$AF$25:.$AW$26];2;0)" office:value-type="float" office:value="3.2" calcext:value-type="float">
            <text:p>3.2</text:p>
          </table:table-cell>
          <table:table-cell table:style-name="ce1241" table:formula="of:=HLOOKUP([.E14];[.$AF$25:.$AW$26];2;0)" office:value-type="float" office:value="2.2" calcext:value-type="float">
            <text:p>2.2</text:p>
          </table:table-cell>
          <table:table-cell table:style-name="ce1241" table:formula="of:=HLOOKUP([.F14];[.$AF$25:.$AW$26];2;0)" office:value-type="float" office:value="2.3" calcext:value-type="float">
            <text:p>2.3</text:p>
          </table:table-cell>
          <table:table-cell/>
          <table:table-cell table:style-name="ce1246" table:formula="of:=HLOOKUP([.H14];[.$AF$25:.$AW$26];2;0)" office:value-type="float" office:value="3.5" calcext:value-type="float">
            <text:p>3.5</text:p>
          </table:table-cell>
          <table:table-cell table:style-name="ce1251" table:formula="of:=HLOOKUP([.I14];[.$AF$25:.$AW$26];2;0)" office:value-type="float" office:value="2.3" calcext:value-type="float">
            <text:p>2.3</text:p>
          </table:table-cell>
          <table:table-cell table:style-name="ce1256" table:formula="of:=HLOOKUP([.J14];[.$AF$25:.$AW$26];2;0)" office:value-type="float" office:value="2.1" calcext:value-type="float">
            <text:p>2.1</text:p>
          </table:table-cell>
          <table:table-cell table:style-name="ce1259" table:formula="of:=HLOOKUP([.K14];[.$AF$25:.$AW$26];2;0)" office:value-type="float" office:value="1.3" calcext:value-type="float">
            <text:p>1.3</text:p>
          </table:table-cell>
          <table:table-cell table:style-name="ce1259" table:formula="of:=HLOOKUP([.L14];[.$AF$25:.$AW$26];2;0)" office:value-type="float" office:value="3.2" calcext:value-type="float">
            <text:p>3.2</text:p>
          </table:table-cell>
          <table:table-cell/>
          <table:table-cell table:style-name="ce1264" table:formula="of:=HLOOKUP([.N14];[.$AF$25:.$AW$26];2;0)" office:value-type="float" office:value="3.2" calcext:value-type="float">
            <text:p>3.2</text:p>
          </table:table-cell>
          <table:table-cell table:style-name="ce1268" table:formula="of:=HLOOKUP([.O14];[.$AF$25:.$AW$26];2;0)" office:value-type="float" office:value="2.2" calcext:value-type="float">
            <text:p>2.2</text:p>
          </table:table-cell>
          <table:table-cell table:style-name="ce1272" table:formula="of:=HLOOKUP([.P14];[.$AF$25:.$AW$26];2;0)" office:value-type="float" office:value="2.3" calcext:value-type="float">
            <text:p>2.3</text:p>
          </table:table-cell>
          <table:table-cell table:style-name="ce1277" table:formula="of:=HLOOKUP([.Q14];[.$AF$25:.$AW$26];2;0)" office:value-type="float" office:value="1.3" calcext:value-type="float">
            <text:p>1.3</text:p>
          </table:table-cell>
          <table:table-cell table:style-name="ce1277" table:formula="of:=HLOOKUP([.R14];[.$AF$25:.$AW$26];2;0)" office:value-type="float" office:value="3.5" calcext:value-type="float">
            <text:p>3.5</text:p>
          </table:table-cell>
          <table:table-cell/>
          <table:table-cell table:style-name="ce1284" table:formula="of:=HLOOKUP([.T14];[.$AF$25:.$AW$26];2;0)" office:value-type="float" office:value="3.5" calcext:value-type="float">
            <text:p>3.5</text:p>
          </table:table-cell>
          <table:table-cell table:style-name="ce1288" table:formula="of:=HLOOKUP([.U14];[.$AF$25:.$AW$26];2;0)" office:value-type="float" office:value="4.5" calcext:value-type="float">
            <text:p>4.5</text:p>
          </table:table-cell>
          <table:table-cell table:style-name="ce1291" table:formula="of:=HLOOKUP([.V14];[.$AF$25:.$AW$26];2;0)" office:value-type="float" office:value="3.2" calcext:value-type="float">
            <text:p>3.2</text:p>
          </table:table-cell>
          <table:table-cell table:style-name="ce1295" table:formula="of:=HLOOKUP([.W14];[.$AF$25:.$AW$26];2;0)" office:value-type="float" office:value="2.2" calcext:value-type="float">
            <text:p>2.2</text:p>
          </table:table-cell>
          <table:table-cell table:style-name="ce1295" table:formula="of:=HLOOKUP([.X14];[.$AF$25:.$AW$26];2;0)" office:value-type="float" office:value="3" calcext:value-type="float">
            <text:p>3.0</text:p>
          </table:table-cell>
          <table:table-cell/>
          <table:table-cell table:style-name="ce1303" table:formula="of:=HLOOKUP([.Z14];[.$AF$25:.$AW$26];2;0)" office:value-type="float" office:value="3.5" calcext:value-type="float">
            <text:p>3.5</text:p>
          </table:table-cell>
          <table:table-cell table:style-name="ce1307" table:formula="of:=HLOOKUP([.AA14];[.$AF$25:.$AW$26];2;0)" office:value-type="float" office:value="4" calcext:value-type="float">
            <text:p>4.0</text:p>
          </table:table-cell>
          <table:table-cell table:style-name="ce1310" table:formula="of:=HLOOKUP([.AB14];[.$AF$25:.$AW$26];2;0)" office:value-type="float" office:value="4.5" calcext:value-type="float">
            <text:p>4.5</text:p>
          </table:table-cell>
          <table:table-cell table:style-name="ce1313" table:formula="of:=HLOOKUP([.AC14];[.$AF$25:.$AW$26];2;0)" office:value-type="float" office:value="3.2" calcext:value-type="float">
            <text:p>3.2</text:p>
          </table:table-cell>
          <table:table-cell table:style-name="ce1313" table:formula="of:=HLOOKUP([.AD14];[.$AF$25:.$AW$26];2;0)" office:value-type="float" office:value="2.3" calcext:value-type="float">
            <text:p>2.3</text:p>
          </table:table-cell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647" table:number-columns-repeated="5"/>
          <table:table-cell/>
          <table:table-cell table:style-name="ce647" table:number-columns-repeated="5"/>
          <table:table-cell/>
          <table:table-cell table:style-name="ce647" table:number-columns-repeated="5"/>
          <table:table-cell/>
          <table:table-cell table:style-name="ce647" table:number-columns-repeated="5"/>
          <table:table-cell/>
          <table:table-cell table:style-name="ce647" table:number-columns-repeated="5"/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640" table:formula="of:=SUM([.B35:.F37])-[.B37]" office:value-type="float" office:value="35.1" calcext:value-type="float" table:number-columns-spanned="2" table:number-rows-spanned="1">
            <text:p>35.1</text:p>
          </table:table-cell>
          <table:covered-table-cell table:style-name="ce647"/>
          <table:table-cell table:style-name="ce647" table:number-columns-repeated="3"/>
          <table:table-cell/>
          <table:table-cell table:style-name="ce640" table:formula="of:=SUM([.H35:.L37])-[.I37]" office:value-type="float" office:value="35.1" calcext:value-type="float" table:number-columns-spanned="2" table:number-rows-spanned="1">
            <text:p>35.1</text:p>
          </table:table-cell>
          <table:covered-table-cell table:style-name="ce647"/>
          <table:table-cell table:style-name="ce647" table:number-columns-repeated="3"/>
          <table:table-cell/>
          <table:table-cell table:style-name="ce640" table:formula="of:=SUM([.N35:.R37])-[.P37]" office:value-type="float" office:value="35.1" calcext:value-type="float" table:number-columns-spanned="2" table:number-rows-spanned="1">
            <text:p>35.1</text:p>
          </table:table-cell>
          <table:covered-table-cell table:style-name="ce647"/>
          <table:table-cell table:style-name="ce647" table:number-columns-repeated="3"/>
          <table:table-cell/>
          <table:table-cell table:style-name="ce640" table:formula="of:=SUM([.T35:.X37])-[.W37]" office:value-type="float" office:value="35.1" calcext:value-type="float" table:number-columns-spanned="2" table:number-rows-spanned="1">
            <text:p>35.1</text:p>
          </table:table-cell>
          <table:covered-table-cell table:style-name="ce647"/>
          <table:table-cell table:style-name="ce647" table:number-columns-repeated="3"/>
          <table:table-cell/>
          <table:table-cell table:style-name="ce640" table:formula="of:=SUM([.Z35:.AD37])-[.AD37]" office:value-type="float" office:value="35.1" calcext:value-type="float" table:number-columns-spanned="2" table:number-rows-spanned="1">
            <text:p>35.1</text:p>
          </table:table-cell>
          <table:covered-table-cell table:style-name="ce647"/>
          <table:table-cell table:style-name="ce647" table:number-columns-repeated="3"/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1231" table:formula="of:=HLOOKUP([.B16];[.$AF$25:.$AW$26];2;0)" office:value-type="float" office:value="4" calcext:value-type="float">
            <text:p>4.0</text:p>
          </table:table-cell>
          <table:table-cell table:style-name="ce1236" table:formula="of:=HLOOKUP([.C16];[.$AF$25:.$AW$26];2;0)" office:value-type="float" office:value="4.5" calcext:value-type="float">
            <text:p>4.5</text:p>
          </table:table-cell>
          <table:table-cell table:style-name="ce1239" table:formula="of:=HLOOKUP([.D16];[.$AF$25:.$AW$26];2;0)" office:value-type="float" office:value="3.5" calcext:value-type="float">
            <text:p>3.5</text:p>
          </table:table-cell>
          <table:table-cell table:style-name="ce1242" table:formula="of:=HLOOKUP([.E16];[.$AF$25:.$AW$26];2;0)" office:value-type="float" office:value="3.2" calcext:value-type="float">
            <text:p>3.2</text:p>
          </table:table-cell>
          <table:table-cell table:style-name="ce1242" table:formula="of:=HLOOKUP([.F16];[.$AF$25:.$AW$26];2;0)" office:value-type="float" office:value="3.1" calcext:value-type="float">
            <text:p>3.1</text:p>
          </table:table-cell>
          <table:table-cell/>
          <table:table-cell table:style-name="ce1247" table:formula="of:=HLOOKUP([.H16];[.$AF$25:.$AW$26];2;0)" office:value-type="float" office:value="4.5" calcext:value-type="float">
            <text:p>4.5</text:p>
          </table:table-cell>
          <table:table-cell table:style-name="ce1253" table:formula="of:=HLOOKUP([.I16];[.$AF$25:.$AW$26];2;0)" office:value-type="float" office:value="3.5" calcext:value-type="float">
            <text:p>3.5</text:p>
          </table:table-cell>
          <table:table-cell table:style-name="ce1257" table:formula="of:=HLOOKUP([.J16];[.$AF$25:.$AW$26];2;0)" office:value-type="float" office:value="3" calcext:value-type="float">
            <text:p>3.0</text:p>
          </table:table-cell>
          <table:table-cell table:style-name="ce1260" table:formula="of:=HLOOKUP([.K16];[.$AF$25:.$AW$26];2;0)" office:value-type="float" office:value="3.1" calcext:value-type="float">
            <text:p>3.1</text:p>
          </table:table-cell>
          <table:table-cell table:style-name="ce1260" table:formula="of:=HLOOKUP([.L16];[.$AF$25:.$AW$26];2;0)" office:value-type="float" office:value="3.2" calcext:value-type="float">
            <text:p>3.2</text:p>
          </table:table-cell>
          <table:table-cell/>
          <table:table-cell table:style-name="ce1265" table:formula="of:=HLOOKUP([.N16];[.$AF$25:.$AW$26];2;0)" office:value-type="float" office:value="4.5" calcext:value-type="float">
            <text:p>4.5</text:p>
          </table:table-cell>
          <table:table-cell table:style-name="ce1269" table:formula="of:=HLOOKUP([.O16];[.$AF$25:.$AW$26];2;0)" office:value-type="float" office:value="4" calcext:value-type="float">
            <text:p>4.0</text:p>
          </table:table-cell>
          <table:table-cell table:style-name="ce1274" table:formula="of:=HLOOKUP([.P16];[.$AF$25:.$AW$26];2;0)" office:value-type="float" office:value="3" calcext:value-type="float">
            <text:p>3.0</text:p>
          </table:table-cell>
          <table:table-cell table:style-name="ce1278" table:formula="of:=HLOOKUP([.Q16];[.$AF$25:.$AW$26];2;0)" office:value-type="float" office:value="3.1" calcext:value-type="float">
            <text:p>3.1</text:p>
          </table:table-cell>
          <table:table-cell table:style-name="ce1278" table:formula="of:=HLOOKUP([.R16];[.$AF$25:.$AW$26];2;0)" office:value-type="float" office:value="3.5" calcext:value-type="float">
            <text:p>3.5</text:p>
          </table:table-cell>
          <table:table-cell/>
          <table:table-cell table:style-name="ce1285" table:formula="of:=HLOOKUP([.T16];[.$AF$25:.$AW$26];2;0)" office:value-type="float" office:value="4.5" calcext:value-type="float">
            <text:p>4.5</text:p>
          </table:table-cell>
          <table:table-cell table:style-name="ce1289" table:formula="of:=HLOOKUP([.U16];[.$AF$25:.$AW$26];2;0)" office:value-type="float" office:value="3.1" calcext:value-type="float">
            <text:p>3.1</text:p>
          </table:table-cell>
          <table:table-cell table:style-name="ce1292" table:formula="of:=HLOOKUP([.V16];[.$AF$25:.$AW$26];2;0)" office:value-type="float" office:value="2.3" calcext:value-type="float">
            <text:p>2.3</text:p>
          </table:table-cell>
          <table:table-cell table:style-name="ce1297" table:formula="of:=HLOOKUP([.W16];[.$AF$25:.$AW$26];2;0)" office:value-type="float" office:value="3.5" calcext:value-type="float">
            <text:p>3.5</text:p>
          </table:table-cell>
          <table:table-cell table:style-name="ce1297" table:formula="of:=HLOOKUP([.X16];[.$AF$25:.$AW$26];2;0)" office:value-type="float" office:value="4" calcext:value-type="float">
            <text:p>4.0</text:p>
          </table:table-cell>
          <table:table-cell/>
          <table:table-cell table:style-name="ce1304" table:formula="of:=HLOOKUP([.Z16];[.$AF$25:.$AW$26];2;0)" office:value-type="float" office:value="4" calcext:value-type="float">
            <text:p>4.0</text:p>
          </table:table-cell>
          <table:table-cell table:style-name="ce1308" table:formula="of:=HLOOKUP([.AA16];[.$AF$25:.$AW$26];2;0)" office:value-type="float" office:value="4.5" calcext:value-type="float">
            <text:p>4.5</text:p>
          </table:table-cell>
          <table:table-cell table:style-name="ce1311" table:formula="of:=HLOOKUP([.AB16];[.$AF$25:.$AW$26];2;0)" office:value-type="float" office:value="3.5" calcext:value-type="float">
            <text:p>3.5</text:p>
          </table:table-cell>
          <table:table-cell table:style-name="ce1314" table:formula="of:=HLOOKUP([.AC16];[.$AF$25:.$AW$26];2;0)" office:value-type="float" office:value="3.2" calcext:value-type="float">
            <text:p>3.2</text:p>
          </table:table-cell>
          <table:table-cell table:style-name="ce1314" table:formula="of:=HLOOKUP([.AD16];[.$AF$25:.$AW$26];2;0)" office:value-type="float" office:value="3.1" calcext:value-type="float">
            <text:p>3.1</text:p>
          </table:table-cell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1232" table:formula="of:=HLOOKUP([.B17];[.$AF$25:.$AW$26];2;0)" office:value-type="float" office:value="3" calcext:value-type="float">
            <text:p>3.0</text:p>
          </table:table-cell>
          <table:table-cell table:style-name="ce1236" table:formula="of:=HLOOKUP([.C17];[.$AF$25:.$AW$26];2;0)" office:value-type="float" office:value="2.3" calcext:value-type="float">
            <text:p>2.3</text:p>
          </table:table-cell>
          <table:table-cell table:style-name="ce1239" table:formula="of:=HLOOKUP([.D17];[.$AF$25:.$AW$26];2;0)" office:value-type="float" office:value="1.6" calcext:value-type="float">
            <text:p>1.6</text:p>
          </table:table-cell>
          <table:table-cell table:style-name="ce1242" table:formula="of:=HLOOKUP([.E17];[.$AF$25:.$AW$26];2;0)" office:value-type="float" office:value="2" calcext:value-type="float">
            <text:p>2.0</text:p>
          </table:table-cell>
          <table:table-cell table:style-name="ce1242" table:formula="of:=HLOOKUP([.F17];[.$AF$25:.$AW$26];2;0)" office:value-type="float" office:value="2.1" calcext:value-type="float">
            <text:p>2.1</text:p>
          </table:table-cell>
          <table:table-cell/>
          <table:table-cell table:style-name="ce1248" table:formula="of:=HLOOKUP([.H17];[.$AF$25:.$AW$26];2;0)" office:value-type="float" office:value="4" calcext:value-type="float">
            <text:p>4.0</text:p>
          </table:table-cell>
          <table:table-cell table:style-name="ce1253" table:formula="of:=HLOOKUP([.I17];[.$AF$25:.$AW$26];2;0)" office:value-type="float" office:value="2.1" calcext:value-type="float">
            <text:p>2.1</text:p>
          </table:table-cell>
          <table:table-cell table:style-name="ce1257" table:formula="of:=HLOOKUP([.J17];[.$AF$25:.$AW$26];2;0)" office:value-type="float" office:value="1.3" calcext:value-type="float">
            <text:p>1.3</text:p>
          </table:table-cell>
          <table:table-cell table:style-name="ce1260" table:formula="of:=HLOOKUP([.K17];[.$AF$25:.$AW$26];2;0)" office:value-type="float" office:value="1.6" calcext:value-type="float">
            <text:p>1.6</text:p>
          </table:table-cell>
          <table:table-cell table:style-name="ce1260" table:formula="of:=HLOOKUP([.L17];[.$AF$25:.$AW$26];2;0)" office:value-type="float" office:value="2" calcext:value-type="float">
            <text:p>2.0</text:p>
          </table:table-cell>
          <table:table-cell/>
          <table:table-cell table:style-name="ce1266" table:formula="of:=HLOOKUP([.N17];[.$AF$25:.$AW$26];2;0)" office:value-type="float" office:value="3.2" calcext:value-type="float">
            <text:p>3.2</text:p>
          </table:table-cell>
          <table:table-cell table:style-name="ce1269" table:formula="of:=HLOOKUP([.O17];[.$AF$25:.$AW$26];2;0)" office:value-type="float" office:value="2.1" calcext:value-type="float">
            <text:p>2.1</text:p>
          </table:table-cell>
          <table:table-cell table:style-name="ce1274" table:formula="of:=HLOOKUP([.P17];[.$AF$25:.$AW$26];2;0)" office:value-type="float" office:value="1.6" calcext:value-type="float">
            <text:p>1.6</text:p>
          </table:table-cell>
          <table:table-cell table:style-name="ce1278" table:formula="of:=HLOOKUP([.Q17];[.$AF$25:.$AW$26];2;0)" office:value-type="float" office:value="1.3" calcext:value-type="float">
            <text:p>1.3</text:p>
          </table:table-cell>
          <table:table-cell table:style-name="ce1278" table:formula="of:=HLOOKUP([.R17];[.$AF$25:.$AW$26];2;0)" office:value-type="float" office:value="2.3" calcext:value-type="float">
            <text:p>2.3</text:p>
          </table:table-cell>
          <table:table-cell/>
          <table:table-cell table:style-name="ce1286" table:formula="of:=HLOOKUP([.T17];[.$AF$25:.$AW$26];2;0)" office:value-type="float" office:value="2" calcext:value-type="float">
            <text:p>2.0</text:p>
          </table:table-cell>
          <table:table-cell table:style-name="ce1289" table:formula="of:=HLOOKUP([.U17];[.$AF$25:.$AW$26];2;0)" office:value-type="float" office:value="1.6" calcext:value-type="float">
            <text:p>1.6</text:p>
          </table:table-cell>
          <table:table-cell table:style-name="ce1292" table:formula="of:=HLOOKUP([.V17];[.$AF$25:.$AW$26];2;0)" office:value-type="float" office:value="1.3" calcext:value-type="float">
            <text:p>1.3</text:p>
          </table:table-cell>
          <table:table-cell table:style-name="ce1297" table:formula="of:=HLOOKUP([.W17];[.$AF$25:.$AW$26];2;0)" office:value-type="float" office:value="2.2" calcext:value-type="float">
            <text:p>2.2</text:p>
          </table:table-cell>
          <table:table-cell table:style-name="ce1297" table:formula="of:=HLOOKUP([.X17];[.$AF$25:.$AW$26];2;0)" office:value-type="float" office:value="3.2" calcext:value-type="float">
            <text:p>3.2</text:p>
          </table:table-cell>
          <table:table-cell/>
          <table:table-cell table:style-name="ce1305" table:formula="of:=HLOOKUP([.Z17];[.$AF$25:.$AW$26];2;0)" office:value-type="float" office:value="2.2" calcext:value-type="float">
            <text:p>2.2</text:p>
          </table:table-cell>
          <table:table-cell table:style-name="ce1308" table:formula="of:=HLOOKUP([.AA17];[.$AF$25:.$AW$26];2;0)" office:value-type="float" office:value="2" calcext:value-type="float">
            <text:p>2.0</text:p>
          </table:table-cell>
          <table:table-cell table:style-name="ce1311" table:formula="of:=HLOOKUP([.AB17];[.$AF$25:.$AW$26];2;0)" office:value-type="float" office:value="1.3" calcext:value-type="float">
            <text:p>1.3</text:p>
          </table:table-cell>
          <table:table-cell table:style-name="ce1314" table:formula="of:=HLOOKUP([.AC17];[.$AF$25:.$AW$26];2;0)" office:value-type="float" office:value="1.2" calcext:value-type="float">
            <text:p>1.2</text:p>
          </table:table-cell>
          <table:table-cell table:style-name="ce1314" table:formula="of:=HLOOKUP([.AD17];[.$AF$25:.$AW$26];2;0)" office:value-type="float" office:value="3" calcext:value-type="float">
            <text:p>3.0</text:p>
          </table:table-cell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1233" table:formula="of:=HLOOKUP([.B18];[.$AF$25:.$AW$26];2;0)" office:value-type="float" office:value="3.5" calcext:value-type="float">
            <text:p>3.5</text:p>
          </table:table-cell>
          <table:table-cell table:style-name="ce1236" table:formula="of:=HLOOKUP([.C18];[.$AF$25:.$AW$26];2;0)" office:value-type="float" office:value="1.1" calcext:value-type="float">
            <text:p>1.1</text:p>
          </table:table-cell>
          <table:table-cell table:style-name="ce1239" table:formula="of:=HLOOKUP([.D18];[.$AF$25:.$AW$26];2;0)" office:value-type="float" office:value="1.2" calcext:value-type="float">
            <text:p>1.2</text:p>
          </table:table-cell>
          <table:table-cell table:style-name="ce1242" table:formula="of:=HLOOKUP([.E18];[.$AF$25:.$AW$26];2;0)" office:value-type="float" office:value="1.3" calcext:value-type="float">
            <text:p>1.3</text:p>
          </table:table-cell>
          <table:table-cell table:style-name="ce1242" table:formula="of:=HLOOKUP([.F18];[.$AF$25:.$AW$26];2;0)" office:value-type="float" office:value="2.2" calcext:value-type="float">
            <text:p>2.2</text:p>
          </table:table-cell>
          <table:table-cell/>
          <table:table-cell table:style-name="ce1248" table:formula="of:=HLOOKUP([.H18];[.$AF$25:.$AW$26];2;0)" office:value-type="float" office:value="2.2" calcext:value-type="float">
            <text:p>2.2</text:p>
          </table:table-cell>
          <table:table-cell table:style-name="ce1254" table:formula="of:=HLOOKUP([.I18];[.$AF$25:.$AW$26];2;0)" office:value-type="float" office:value="3.1" calcext:value-type="float">
            <text:p>3.1</text:p>
          </table:table-cell>
          <table:table-cell table:style-name="ce1257" table:formula="of:=HLOOKUP([.J18];[.$AF$25:.$AW$26];2;0)" office:value-type="float" office:value="1.1" calcext:value-type="float">
            <text:p>1.1</text:p>
          </table:table-cell>
          <table:table-cell table:style-name="ce1260" table:formula="of:=HLOOKUP([.K18];[.$AF$25:.$AW$26];2;0)" office:value-type="float" office:value="1.2" calcext:value-type="float">
            <text:p>1.2</text:p>
          </table:table-cell>
          <table:table-cell table:style-name="ce1260" table:formula="of:=HLOOKUP([.L18];[.$AF$25:.$AW$26];2;0)" office:value-type="float" office:value="2.3" calcext:value-type="float">
            <text:p>2.3</text:p>
          </table:table-cell>
          <table:table-cell/>
          <table:table-cell table:style-name="ce1266" table:formula="of:=HLOOKUP([.N18];[.$AF$25:.$AW$26];2;0)" office:value-type="float" office:value="2" calcext:value-type="float">
            <text:p>2.0</text:p>
          </table:table-cell>
          <table:table-cell table:style-name="ce1269" table:formula="of:=HLOOKUP([.O18];[.$AF$25:.$AW$26];2;0)" office:value-type="float" office:value="1.2" calcext:value-type="float">
            <text:p>1.2</text:p>
          </table:table-cell>
          <table:table-cell table:style-name="ce1275" table:formula="of:=HLOOKUP([.P18];[.$AF$25:.$AW$26];2;0)" office:value-type="float" office:value="3" calcext:value-type="float">
            <text:p>3.0</text:p>
          </table:table-cell>
          <table:table-cell table:style-name="ce1278" table:formula="of:=HLOOKUP([.Q18];[.$AF$25:.$AW$26];2;0)" office:value-type="float" office:value="1.1" calcext:value-type="float">
            <text:p>1.1</text:p>
          </table:table-cell>
          <table:table-cell table:style-name="ce1278" table:formula="of:=HLOOKUP([.R18];[.$AF$25:.$AW$26];2;0)" office:value-type="float" office:value="2.2" calcext:value-type="float">
            <text:p>2.2</text:p>
          </table:table-cell>
          <table:table-cell/>
          <table:table-cell table:style-name="ce1286" table:formula="of:=HLOOKUP([.T18];[.$AF$25:.$AW$26];2;0)" office:value-type="float" office:value="2.1" calcext:value-type="float">
            <text:p>2.1</text:p>
          </table:table-cell>
          <table:table-cell table:style-name="ce1289" table:formula="of:=HLOOKUP([.U18];[.$AF$25:.$AW$26];2;0)" office:value-type="float" office:value="1.2" calcext:value-type="float">
            <text:p>1.2</text:p>
          </table:table-cell>
          <table:table-cell table:style-name="ce1292" table:formula="of:=HLOOKUP([.V18];[.$AF$25:.$AW$26];2;0)" office:value-type="float" office:value="1.1" calcext:value-type="float">
            <text:p>1.1</text:p>
          </table:table-cell>
          <table:table-cell table:style-name="ce1298" table:formula="of:=HLOOKUP([.W18];[.$AF$25:.$AW$26];2;0)" office:value-type="float" office:value="1.6" calcext:value-type="float">
            <text:p>1.6</text:p>
          </table:table-cell>
          <table:table-cell table:style-name="ce1297" table:formula="of:=HLOOKUP([.X18];[.$AF$25:.$AW$26];2;0)" office:value-type="float" office:value="3" calcext:value-type="float">
            <text:p>3.0</text:p>
          </table:table-cell>
          <table:table-cell/>
          <table:table-cell table:style-name="ce1305" table:formula="of:=HLOOKUP([.Z18];[.$AF$25:.$AW$26];2;0)" office:value-type="float" office:value="2.3" calcext:value-type="float">
            <text:p>2.3</text:p>
          </table:table-cell>
          <table:table-cell table:style-name="ce1308" table:formula="of:=HLOOKUP([.AA18];[.$AF$25:.$AW$26];2;0)" office:value-type="float" office:value="2.1" calcext:value-type="float">
            <text:p>2.1</text:p>
          </table:table-cell>
          <table:table-cell table:style-name="ce1311" table:formula="of:=HLOOKUP([.AB18];[.$AF$25:.$AW$26];2;0)" office:value-type="float" office:value="1.6" calcext:value-type="float">
            <text:p>1.6</text:p>
          </table:table-cell>
          <table:table-cell table:style-name="ce1314" table:formula="of:=HLOOKUP([.AC18];[.$AF$25:.$AW$26];2;0)" office:value-type="float" office:value="1.1" calcext:value-type="float">
            <text:p>1.1</text:p>
          </table:table-cell>
          <table:table-cell table:style-name="ce1318" table:formula="of:=HLOOKUP([.AD18];[.$AF$25:.$AW$26];2;0)" office:value-type="float" office:value="3.2" calcext:value-type="float">
            <text:p>3.2</text:p>
          </table:table-cell>
          <table:table-cell table:number-columns-repeated="69"/>
          <table:table-cell table:style-name="Default" table:number-columns-repeated="16285"/>
        </table:table-row>
        <calcext:conditional-formats>
          <calcext:conditional-format calcext:target-range-address="'keys 3'.Z2:'keys 3'.AD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Z30:'keys 3'.AD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T30:'keys 3'.X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N30:'keys 3'.R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H30:'keys 3'.L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B30:'keys 3'.F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B35:'keys 3'.F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H35:'keys 3'.L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N35:'keys 3'.R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T35:'keys 3'.X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Z35:'keys 3'.AD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B25:'keys 3'.F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H25:'keys 3'.L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N25:'keys 3'.R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T25:'keys 3'.X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Z25:'keys 3'.AD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AF25:'keys 3'.AT25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T2:'keys 3'.X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AF26:'keys 3'.AT26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HG Mincho Light J" style:font-family-asian="'HG Mincho Light J'" style:font-pitch-asian="variable" style:font-size-asian="10pt" style:font-name-complex="Liberation Sans Unicode MS" style:font-family-complex="'Liberation Sans Unicode MS'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8">
      <number:number number:decimal-places="1" number:min-decimal-places="1" number:min-integer-digits="1"/>
    </number:number-style>
    <number:number-style style:name="N149">
      <number:number number:decimal-places="1" number:min-decimal-places="1" number:min-integer-digits="1" number:grouping="true"/>
    </number:number-style>
    <style:style style:name="Default" style:family="table-cell" style:data-style-name="N0">
      <style:table-cell-properties fo:background-color="#003366"/>
      <style:text-properties fo:color="#ffffff" style:font-name="Liberation Sans" fo:font-family="'Liberation Sans'" style:font-family-generic="swiss" style:font-pitch="variable"/>
    </style:style>
    <style:style style:name="Heading" style:family="table-cell" style:parent-style-name="Default">
      <style:table-cell-properties style:text-align-source="fix" style:repeat-content="false" fo:border="1.11pt double #ffcf03" style:border-line-width="0.002cm 0.035cm 0.002cm"/>
      <style:paragraph-properties fo:text-align="center"/>
      <style:text-properties fo:color="#ffcc00" fo:font-size="18pt" fo:font-weight="bold"/>
    </style:style>
    <style:style style:name="Heading_20_1" style:display-name="Heading 1" style:family="table-cell" style:parent-style-name="Heading">
      <style:text-properties fo:font-size="10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 style:data-style-name="N120">
      <style:table-cell-properties fo:background-color="#336699" fo:border="0.06pt solid #ffcf03" style:shadow="none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6" style:display-name="Excel Built-in 20% - Accent6" style:family="table-cell" style:parent-style-name="Default">
      <style:table-cell-properties fo:background-color="#e2f0d9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6" style:display-name="Excel Built-in 40% - Accent6" style:family="table-cell" style:parent-style-name="Default">
      <style:table-cell-properties fo:background-color="#c5e0b4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6" style:display-name="Excel Built-in 60% - Accent6" style:family="table-cell" style:parent-style-name="Default">
      <style:table-cell-properties fo:background-color="#a9d18e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Accent6" style:display-name="Excel Built-in Accent6" style:family="table-cell" style:parent-style-name="Default">
      <style:table-cell-properties fo:background-color="#70ad47">
        <loext:background-complex-color loext:theme-type="accent6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light1" loext:color-type="theme"/>
      </style:text-properties>
    </style:style>
    <style:style style:name="Result2" style:family="table-cell" style:parent-style-name="Result" style:data-style-name="N119">
      <style:text-properties fo:color="#ffffff" fo:font-style="italic" fo:font-weight="normal"/>
    </style:style>
    <style:style style:name="Background" style:family="table-cell" style:parent-style-name="Default">
      <style:table-cell-properties fo:background-color="#000033"/>
      <style:text-properties fo:color="#cccccc"/>
    </style:style>
    <style:style style:name="Card" style:family="table-cell" style:parent-style-name="Default">
      <style:table-cell-properties fo:padding-bottom="0.035cm" fo:padding-left="0.335cm" fo:padding-right="0.035cm" fo:padding-top="0.035cm"/>
    </style:style>
    <style:style style:name="Input" style:family="table-cell" style:parent-style-name="Default" style:data-style-name="N120">
      <style:table-cell-properties fo:background-color="#ffff66" style:cell-protect="none" style:print-content="true" style:text-align-source="value-type" style:repeat-content="false" fo:border="0.06pt solid #ffcf03" style:shadow="none"/>
      <style:text-properties fo:color="#000033"/>
    </style:style>
    <style:style style:name="Card_20_TL" style:display-name="Card TL" style:family="table-cell" style:parent-style-name="Card">
      <style:table-cell-properties fo:border-bottom="none" fo:border-left="1.11pt double #ffcf03" style:border-line-width-left="0.002cm 0.035cm 0.002cm" fo:border-right="none" fo:border-top="1.11pt double #ffcf03" style:border-line-width-top="0.002cm 0.035cm 0.002cm"/>
    </style:style>
    <style:style style:name="Card_20_T" style:display-name="Card T" style:family="table-cell" style:parent-style-name="Card">
      <style:table-cell-properties fo:border-bottom="none" fo:border-left="none" fo:border-right="none" fo:border-top="1.11pt double #ffcf03" style:border-line-width-top="0.002cm 0.035cm 0.002cm"/>
    </style:style>
    <style:style style:name="Card_20_TR" style:display-name="Card TR" style:family="table-cell" style:parent-style-name="Card">
      <style:table-cell-properties fo:border-bottom="none" fo:border-left="none" fo:border-right="1.11pt double #ffcf03" style:border-line-width-right="0.002cm 0.035cm 0.002cm" fo:border-top="1.11pt double #ffcf03" style:border-line-width-top="0.002cm 0.035cm 0.002cm"/>
    </style:style>
    <style:style style:name="Card_20_L" style:display-name="Card L" style:family="table-cell" style:parent-style-name="Card">
      <style:table-cell-properties fo:border-bottom="none" fo:border-left="1.11pt double #ffcf03" style:border-line-width-left="0.002cm 0.035cm 0.002cm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1.11pt double #ffcf03" style:border-line-width-right="0.002cm 0.035cm 0.002cm" fo:border-top="none"/>
    </style:style>
    <style:style style:name="Card_20_B" style:display-name="Card B" style:family="table-cell" style:parent-style-name="Card">
      <style:table-cell-properties fo:border-bottom="1.11pt double #ffcf03" style:border-line-width-bottom="0.002cm 0.035cm 0.002cm" fo:border-left="none" fo:border-right="none" fo:border-top="none"/>
    </style:style>
    <style:style style:name="Card_20_BL" style:display-name="Card BL" style:family="table-cell" style:parent-style-name="Card">
      <style:table-cell-properties fo:border-bottom="1.11pt double #ffcf03" style:border-line-width-bottom="0.002cm 0.035cm 0.002cm" fo:border-left="1.11pt double #ffcf03" style:border-line-width-left="0.002cm 0.035cm 0.002cm" fo:border-right="none" fo:border-top="none"/>
    </style:style>
    <style:style style:name="Card_20_BR" style:display-name="Card BR" style:family="table-cell" style:parent-style-name="Card">
      <style:table-cell-properties fo:border-bottom="1.11pt double #ffcf03" style:border-line-width-bottom="0.002cm 0.035cm 0.002cm" fo:border-left="none" fo:border-right="1.11pt double #ffcf03" style:border-line-width-right="0.002cm 0.035cm 0.002cm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wrap-option="wrap" fo:border="0.06pt solid #ffcf03" fo:padding="0.035cm" style:vertical-align="automatic"/>
      <style:paragraph-properties fo:text-align="center" fo:margin-left="0cm"/>
      <style:text-properties fo:color="#ffcf03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6-07-09">00/00/0000</text:date></text:span><text:span text:style-name="MT1">, </text:span><text:span text:style-name="MT1"><text:time style:data-style-name="N2" text:time-value="20:26:35.274732800">00:00:00</text:time></text:span></text:p>
        </style:region-right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text:span text:style-name="MT1"><text:s/>/ </text:span><text:page-count>99</text:page-count></text:p>
      </style:footer>
      <style:footer-left style:display="false"/>
      <style:footer-first style:display="false"/>
    </style:master-page>
    <style:master-page style:name="PageStyle_5f_v0" style:display-name="PageStyle_v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1" style:display-name="PageStyle_v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eys" style:display-name="PageStyle_key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2" style:display-name="PageStyle_v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sgaliamov</meta:initial-creator>
    <meta:creation-date>2021-01-17T15:42:06</meta:creation-date>
    <dc:date>2026-07-09T21:59:13.036945500</dc:date>
    <meta:generator>LibreOffice/26.2.0.3$Windows_X86_64 LibreOffice_project/620$Build-3</meta:generator>
    <meta:editing-duration>P3DT20H9M32S</meta:editing-duration>
    <meta:editing-cycles>757</meta:editing-cycles>
    <meta:document-statistic meta:table-count="5" meta:cell-count="4132" meta:object-count="0"/>
    <meta:user-defined meta:name="AppVersion">16.0300</meta:user-defined>
  </office:meta>
</office:document-meta>
</file>
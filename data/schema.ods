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74" style:family="table-cell" style:parent-style-name="Default" style:data-style-name="N4">
      <style:table-cell-properties style:shrink-to-fit="tru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7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38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90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6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3" style:family="table-cell" style:parent-style-name="Default">
      <style:table-cell-properties fo:wrap-option="no-wrap"/>
    </style:style>
    <style:style style:name="ce52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527" style:family="table-cell" style:parent-style-name="Default">
      <style:table-cell-properties fo:wrap-option="wrap" style:vertical-align="top"/>
      <style:text-properties fo:font-size="6pt"/>
    </style:style>
    <style:style style:name="ce49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29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9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9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0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501" style:family="table-cell" style:parent-style-name="Default">
      <style:table-cell-properties fo:wrap-option="no-wrap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7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ce150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6" office:value-type="float" office:value="9" calcext:value-type="float">
            <text:p>9</text:p>
          </table:table-cell>
          <table:table-cell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152" office:value-type="float" office:value="12" calcext:value-type="float">
            <text:p>12</text:p>
          </table:table-cell>
          <table:table-cell table:style-name="ce171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5" office:value-type="float" office:value="4" calcext:value-type="float">
            <text:p>4</text:p>
          </table:table-cell>
          <table:table-cell table:style-name="ce171" office:value-type="float" office:value="11" calcext:value-type="float">
            <text:p>11</text:p>
          </table:table-cell>
          <table:table-cell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8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7"/>
          <table:table-cell table:style-name="ce77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2]" office:value-type="float" office:value="7" calcext:value-type="float">
            <text:p>7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3" table:formula="of:=[.$T$3]+[.$AA$2]" office:value-type="float" office:value="6" calcext:value-type="float">
            <text:p>6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4" table:formula="of:=[.$T$4]+[.$AA$2]+[.$AA$4]" office:value-type="float" office:value="14" calcext:value-type="float">
            <text:p>14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81" table:formula="of:=[.$U$4]+[.$AA$2]+[.$AA$4]" office:value-type="float" office:value="12" calcext:value-type="float">
            <text:p>12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138" table:formula="of:=[.$V$4]+[.$AA$2]+[.$AA$4]" office:value-type="float" office:value="10" calcext:value-type="float">
            <text:p>10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6"/>
          <table:table-cell table:style-name="ce19" table:formula="of:=[.$T$2]+[.$AA$2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105" table:formula="of:=[.$X$2]+[.$AA$4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89" table:formula="of:=[.$U$2]+[.$AA$2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31" table:formula="of:=[.$U$2]+[.$AA$3]" office:value-type="float" office:value="8" calcext:value-type="float">
            <text:p>8</text:p>
          </table:table-cell>
          <table:table-cell table:style-name="ce92" table:formula="of:=[.$V$2]+[.$AA$2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149" table:formula="of:=[.$T$2]+[.$AA$5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 table:style-name="ce109"/>
          <table:table-cell table:style-name="ce149" table:formula="of:=[.$T$2]+[.$AA$4]+[.$AA$5]" office:value-type="float" office:value="16" calcext:value-type="float">
            <text:p>16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6"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20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0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20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20" table:formula="of:=[.$W$3]" office:value-type="float" office:value="0" calcext:value-type="float">
            <text:p>0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20" table:formula="of:=[.$X$3]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"/>
          <table:table-cell table:style-name="ce14" table:formula="of:=[.$T$4]+[.$AA$2]" office:value-type="float" office:value="13" calcext:value-type="float">
            <text:p>13</text:p>
          </table:table-cell>
          <table:table-cell table:style-name="ce29" table:formula="of:=[.$U$4]+[.$AA$3]" office:value-type="float" office:value="12" calcext:value-type="float">
            <text:p>12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06" table:formula="of:=[.$X$4]+[.$AA$4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81" table:formula="of:=[.$U$4]+[.$AA$2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38" table:formula="of:=[.$V$4]+[.$AA$2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38" table:formula="of:=[.$V$4]+[.$AA$3]" office:value-type="float" office:value="10" calcext:value-type="float">
            <text:p>10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+[.$AA$4]" office:value-type="float" office:value="14" calcext:value-type="float">
            <text:p>14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"/>
          <table:table-cell table:style-name="ce19" table:formula="of:=[.$T$2]+[.$AA$2]+[.$AA$4]" office:value-type="float" office:value="16" calcext:value-type="float">
            <text:p>16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39" table:formula="of:=[.$V$2]+[.$AA$5]+[.$AA$4]" office:value-type="float" office:value="5" calcext:value-type="float">
            <text:p>5</text:p>
          </table:table-cell>
          <table:table-cell table:style-name="ce49" table:formula="of:=[.$W$2]+[.$AA$4]+[.$AA$5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89" table:formula="of:=[.$U$2]+[.$AA$2]+[.$AA$4]" office:value-type="float" office:value="8" calcext:value-type="float">
            <text:p>8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49" table:formula="of:=[.$W$2]+[.$AA$5]+[.$AA$4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19" table:formula="of:=[.$T$2]+[.$AA$3]+[.$AA$4]" office:value-type="float" office:value="17" calcext:value-type="float">
            <text:p>17</text:p>
          </table:table-cell>
          <table:table-cell table:style-name="ce89" table:formula="of:=[.$U$2]+[.$AA$3]+[.$AA$4]" office:value-type="float" office:value="9" calcext:value-type="float">
            <text:p>9</text:p>
          </table:table-cell>
          <table:table-cell table:style-name="ce92" table:formula="of:=[.$V$2]+[.$AA$2]+[.$AA$4]" office:value-type="float" office:value="5" calcext:value-type="float">
            <text:p>5</text:p>
          </table:table-cell>
          <table:table-cell table:style-name="ce105" table:formula="of:=[.$W$2]+[.$AA$3]+[.$AA$4]" office:value-type="float" office:value="10" calcext:value-type="float">
            <text:p>10</text:p>
          </table:table-cell>
          <table:table-cell table:style-name="ce105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+[.$AA$3]+[.$AA$4]" office:value-type="float" office:value="9" calcext:value-type="float">
            <text:p>9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4]+[.$AA$2]" office:value-type="float" office:value="15" calcext:value-type="float">
            <text:p>15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165" table:formula="of:=[.$V$2]+[.$AA$3]+[.$AA$4]" office:value-type="float" office:value="6" calcext:value-type="float">
            <text:p>6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2]+[.$AA$4]" office:value-type="float" office:value="15" calcext:value-type="float">
            <text:p>15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3" table:formula="of:=[.$T$3]+[.$AA$2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6" table:formula="of:=[.$X$3]+[.$AA$4]+[.$AA$5]" office:value-type="float" office:value="11" calcext:value-type="float">
            <text:p>11</text:p>
          </table:table-cell>
          <table:table-cell table:style-name="ce115"/>
          <table:table-cell table:style-name="ce79" table:formula="of:=[.$T$3]+[.$AA$3]" office:value-type="float" office:value="7" calcext:value-type="float">
            <text:p>7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104" table:formula="of:=[.$X$3]+[.$AA$3]" office:value-type="float" office:value="11" calcext:value-type="float">
            <text:p>11</text:p>
          </table:table-cell>
          <table:table-cell table:style-name="ce115"/>
          <table:table-cell table:style-name="ce13" table:formula="of:=[.$T$3]+[.$AA$3]" office:value-type="float" office:value="7" calcext:value-type="float">
            <text:p>7</text:p>
          </table:table-cell>
          <table:table-cell table:style-name="ce27" table:formula="of:=[.$U$3]+[.$AA$3]" office:value-type="float" office:value="4" calcext:value-type="float">
            <text:p>4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+[.$AA$3]" office:value-type="float" office:value="2" calcext:value-type="float">
            <text:p>2</text:p>
          </table:table-cell>
          <table:table-cell table:style-name="ce45" table:formula="of:=[.$X$3]+[.$AA$3]" office:value-type="float" office:value="11" calcext:value-type="float">
            <text:p>11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9" table:formula="of:=[.$T$3]+[.$AA$4]+[.$AA$3]" office:value-type="float" office:value="8" calcext:value-type="float">
            <text:p>8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4]" office:value-type="float" office:value="8" calcext:value-type="float">
            <text:p>8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31"/>
          <table:table-cell table:style-name="ce5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22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3" table:formula="of:=HLOOKUP([.B8];[.$AF$25:.$AW$26];2;0)" office:value-type="float" office:value="5" calcext:value-type="float">
            <text:p>5.0</text:p>
          </table:table-cell>
          <table:table-cell table:style-name="ce57" table:formula="of:=HLOOKUP([.C8];[.$AF$25:.$AW$26];2;0)" office:value-type="float" office:value="1.2" calcext:value-type="float">
            <text:p>1.2</text:p>
          </table:table-cell>
          <table:table-cell table:style-name="ce68" table:formula="of:=HLOOKUP([.D8];[.$AF$25:.$AW$26];2;0)" office:value-type="float" office:value="1.1" calcext:value-type="float">
            <text:p>1.1</text:p>
          </table:table-cell>
          <table:table-cell table:style-name="ce93" table:formula="of:=HLOOKUP([.E8];[.$AF$25:.$AW$26];2;0)" office:value-type="float" office:value="1" calcext:value-type="float">
            <text:p>1.0</text:p>
          </table:table-cell>
          <table:table-cell table:style-name="ce93" table:formula="of:=HLOOKUP([.F8];[.$AF$25:.$AW$26];2;0)" office:value-type="float" office:value="3.2" calcext:value-type="float">
            <text:p>3.2</text:p>
          </table:table-cell>
          <table:table-cell table:style-name="ce53"/>
          <table:table-cell table:style-name="ce136" table:formula="of:=HLOOKUP([.H8];[.$AF$25:.$AW$26];2;0)" office:value-type="float" office:value="2.2" calcext:value-type="float">
            <text:p>2.2</text:p>
          </table:table-cell>
          <table:table-cell table:style-name="ce151" table:formula="of:=HLOOKUP([.I8];[.$AF$25:.$AW$26];2;0)" office:value-type="float" office:value="2.2" calcext:value-type="float">
            <text:p>2.2</text:p>
          </table:table-cell>
          <table:table-cell table:style-name="ce163" table:formula="of:=HLOOKUP([.J8];[.$AF$25:.$AW$26];2;0)" office:value-type="float" office:value="1.1" calcext:value-type="float">
            <text:p>1.1</text:p>
          </table:table-cell>
          <table:table-cell table:style-name="ce177" table:formula="of:=HLOOKUP([.K8];[.$AF$25:.$AW$26];2;0)" office:value-type="float" office:value="1.1" calcext:value-type="float">
            <text:p>1.1</text:p>
          </table:table-cell>
          <table:table-cell table:style-name="ce177" table:formula="of:=HLOOKUP([.L8];[.$AF$25:.$AW$26];2;0)" office:value-type="float" office:value="3.1" calcext:value-type="float">
            <text:p>3.1</text:p>
          </table:table-cell>
          <table:table-cell table:style-name="ce53"/>
          <table:table-cell table:style-name="ce193" table:formula="of:=HLOOKUP([.N8];[.$AF$25:.$AW$26];2;0)" office:value-type="float" office:value="2.2" calcext:value-type="float">
            <text:p>2.2</text:p>
          </table:table-cell>
          <table:table-cell table:style-name="ce200" table:formula="of:=HLOOKUP([.O8];[.$AF$25:.$AW$26];2;0)" office:value-type="float" office:value="1.2" calcext:value-type="float">
            <text:p>1.2</text:p>
          </table:table-cell>
          <table:table-cell table:style-name="ce205" table:formula="of:=HLOOKUP([.P8];[.$AF$25:.$AW$26];2;0)" office:value-type="float" office:value="1.3" calcext:value-type="float">
            <text:p>1.3</text:p>
          </table:table-cell>
          <table:table-cell table:style-name="ce211" table:formula="of:=HLOOKUP([.Q8];[.$AF$25:.$AW$26];2;0)" office:value-type="float" office:value="1.1" calcext:value-type="float">
            <text:p>1.1</text:p>
          </table:table-cell>
          <table:table-cell table:style-name="ce211" table:formula="of:=HLOOKUP([.R8];[.$AF$25:.$AW$26];2;0)" office:value-type="float" office:value="3.1" calcext:value-type="float">
            <text:p>3.1</text:p>
          </table:table-cell>
          <table:table-cell table:style-name="ce53"/>
          <table:table-cell table:style-name="ce218" table:formula="of:=HLOOKUP([.T8];[.$AF$25:.$AW$26];2;0)" office:value-type="float" office:value="2.1" calcext:value-type="float">
            <text:p>2.1</text:p>
          </table:table-cell>
          <table:table-cell table:style-name="ce227" table:formula="of:=HLOOKUP([.U8];[.$AF$25:.$AW$26];2;0)" office:value-type="float" office:value="1.2" calcext:value-type="float">
            <text:p>1.2</text:p>
          </table:table-cell>
          <table:table-cell table:style-name="ce232" table:formula="of:=HLOOKUP([.V8];[.$AF$25:.$AW$26];2;0)" office:value-type="float" office:value="1.1" calcext:value-type="float">
            <text:p>1.1</text:p>
          </table:table-cell>
          <table:table-cell table:style-name="ce237" table:formula="of:=HLOOKUP([.W8];[.$AF$25:.$AW$26];2;0)" office:value-type="float" office:value="2.3" calcext:value-type="float">
            <text:p>2.3</text:p>
          </table:table-cell>
          <table:table-cell table:style-name="ce238" table:formula="of:=HLOOKUP([.X8];[.$AF$25:.$AW$26];2;0)" office:value-type="float" office:value="3.2" calcext:value-type="float">
            <text:p>3.2</text:p>
          </table:table-cell>
          <table:table-cell table:style-name="ce53"/>
          <table:table-cell table:style-name="ce245" table:formula="of:=HLOOKUP([.Z8];[.$AF$25:.$AW$26];2;0)" office:value-type="float" office:value="2.3" calcext:value-type="float">
            <text:p>2.3</text:p>
          </table:table-cell>
          <table:table-cell table:style-name="ce255" table:formula="of:=HLOOKUP([.AA8];[.$AF$25:.$AW$26];2;0)" office:value-type="float" office:value="1.3" calcext:value-type="float">
            <text:p>1.3</text:p>
          </table:table-cell>
          <table:table-cell table:style-name="ce259" table:formula="of:=HLOOKUP([.AB8];[.$AF$25:.$AW$26];2;0)" office:value-type="float" office:value="1.2" calcext:value-type="float">
            <text:p>1.2</text:p>
          </table:table-cell>
          <table:table-cell table:style-name="ce264" table:formula="of:=HLOOKUP([.AC8];[.$AF$25:.$AW$26];2;0)" office:value-type="float" office:value="1.1" calcext:value-type="float">
            <text:p>1.1</text:p>
          </table:table-cell>
          <table:table-cell table:style-name="ce267" table:formula="of:=HLOOKUP([.AD8];[.$AF$25:.$AW$26];2;0)" office:value-type="float" office:value="4.2" calcext:value-type="float">
            <text:p>4.2</text:p>
          </table:table-cell>
          <table:table-cell table:style-name="ce5"/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3" office:value-type="float" office:value="17" calcext:value-type="float">
            <text:p>17</text:p>
          </table:table-cell>
          <table:table-cell table:number-columns-repeated="13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9];[.$AF$25:.$AW$26];2;0)" office:value-type="float" office:value="2.2" calcext:value-type="float">
            <text:p>2.2</text:p>
          </table:table-cell>
          <table:table-cell table:style-name="ce57" table:formula="of:=HLOOKUP([.C9];[.$AF$25:.$AW$26];2;0)" office:value-type="float" office:value="2" calcext:value-type="float">
            <text:p>2.0</text:p>
          </table:table-cell>
          <table:table-cell table:style-name="ce68" table:formula="of:=HLOOKUP([.D9];[.$AF$25:.$AW$26];2;0)" office:value-type="float" office:value="1.3" calcext:value-type="float">
            <text:p>1.3</text:p>
          </table:table-cell>
          <table:table-cell table:style-name="ce93" table:formula="of:=HLOOKUP([.E9];[.$AF$25:.$AW$26];2;0)" office:value-type="float" office:value="1.1" calcext:value-type="float">
            <text:p>1.1</text:p>
          </table:table-cell>
          <table:table-cell table:style-name="ce93" table:formula="of:=HLOOKUP([.F9];[.$AF$25:.$AW$26];2;0)" office:value-type="float" office:value="3.2" calcext:value-type="float">
            <text:p>3.2</text:p>
          </table:table-cell>
          <table:table-cell table:style-name="ce53"/>
          <table:table-cell table:style-name="ce137" table:formula="of:=HLOOKUP([.H9];[.$AF$25:.$AW$26];2;0)" office:value-type="float" office:value="2.2" calcext:value-type="float">
            <text:p>2.2</text:p>
          </table:table-cell>
          <table:table-cell table:style-name="ce153" table:formula="of:=HLOOKUP([.I9];[.$AF$25:.$AW$26];2;0)" office:value-type="float" office:value="1.3" calcext:value-type="float">
            <text:p>1.3</text:p>
          </table:table-cell>
          <table:table-cell table:style-name="ce163" table:formula="of:=HLOOKUP([.J9];[.$AF$25:.$AW$26];2;0)" office:value-type="float" office:value="1.2" calcext:value-type="float">
            <text:p>1.2</text:p>
          </table:table-cell>
          <table:table-cell table:style-name="ce177" table:formula="of:=HLOOKUP([.K9];[.$AF$25:.$AW$26];2;0)" office:value-type="float" office:value="1" calcext:value-type="float">
            <text:p>1.0</text:p>
          </table:table-cell>
          <table:table-cell table:style-name="ce177" table:formula="of:=HLOOKUP([.L9];[.$AF$25:.$AW$26];2;0)" office:value-type="float" office:value="3.1" calcext:value-type="float">
            <text:p>3.1</text:p>
          </table:table-cell>
          <table:table-cell table:style-name="ce53"/>
          <table:table-cell table:style-name="ce194" table:formula="of:=HLOOKUP([.N9];[.$AF$25:.$AW$26];2;0)" office:value-type="float" office:value="2.1" calcext:value-type="float">
            <text:p>2.1</text:p>
          </table:table-cell>
          <table:table-cell table:style-name="ce200" table:formula="of:=HLOOKUP([.O9];[.$AF$25:.$AW$26];2;0)" office:value-type="float" office:value="1.2" calcext:value-type="float">
            <text:p>1.2</text:p>
          </table:table-cell>
          <table:table-cell table:style-name="ce206" table:formula="of:=HLOOKUP([.P9];[.$AF$25:.$AW$26];2;0)" office:value-type="float" office:value="1.2" calcext:value-type="float">
            <text:p>1.2</text:p>
          </table:table-cell>
          <table:table-cell table:style-name="ce211" table:formula="of:=HLOOKUP([.Q9];[.$AF$25:.$AW$26];2;0)" office:value-type="float" office:value="1" calcext:value-type="float">
            <text:p>1.0</text:p>
          </table:table-cell>
          <table:table-cell table:style-name="ce211" table:formula="of:=HLOOKUP([.R9];[.$AF$25:.$AW$26];2;0)" office:value-type="float" office:value="3.1" calcext:value-type="float">
            <text:p>3.1</text:p>
          </table:table-cell>
          <table:table-cell table:style-name="ce53"/>
          <table:table-cell table:style-name="ce219" table:formula="of:=HLOOKUP([.T9];[.$AF$25:.$AW$26];2;0)" office:value-type="float" office:value="2.2" calcext:value-type="float">
            <text:p>2.2</text:p>
          </table:table-cell>
          <table:table-cell table:style-name="ce227" table:formula="of:=HLOOKUP([.U9];[.$AF$25:.$AW$26];2;0)" office:value-type="float" office:value="1.3" calcext:value-type="float">
            <text:p>1.3</text:p>
          </table:table-cell>
          <table:table-cell table:style-name="ce232" table:formula="of:=HLOOKUP([.V9];[.$AF$25:.$AW$26];2;0)" office:value-type="float" office:value="1.2" calcext:value-type="float">
            <text:p>1.2</text:p>
          </table:table-cell>
          <table:table-cell table:style-name="ce238" table:formula="of:=HLOOKUP([.W9];[.$AF$25:.$AW$26];2;0)" office:value-type="float" office:value="1.1" calcext:value-type="float">
            <text:p>1.1</text:p>
          </table:table-cell>
          <table:table-cell table:style-name="ce238" table:formula="of:=HLOOKUP([.X9];[.$AF$25:.$AW$26];2;0)" office:value-type="float" office:value="3.2" calcext:value-type="float">
            <text:p>3.2</text:p>
          </table:table-cell>
          <table:table-cell table:style-name="ce53"/>
          <table:table-cell table:style-name="ce246" table:formula="of:=HLOOKUP([.Z9];[.$AF$25:.$AW$26];2;0)" office:value-type="float" office:value="2.3" calcext:value-type="float">
            <text:p>2.3</text:p>
          </table:table-cell>
          <table:table-cell table:style-name="ce255" table:formula="of:=HLOOKUP([.AA9];[.$AF$25:.$AW$26];2;0)" office:value-type="float" office:value="1.3" calcext:value-type="float">
            <text:p>1.3</text:p>
          </table:table-cell>
          <table:table-cell table:style-name="ce259" table:formula="of:=HLOOKUP([.AB9];[.$AF$25:.$AW$26];2;0)" office:value-type="float" office:value="1.2" calcext:value-type="float">
            <text:p>1.2</text:p>
          </table:table-cell>
          <table:table-cell table:style-name="ce264" table:formula="of:=HLOOKUP([.AC9];[.$AF$25:.$AW$26];2;0)" office:value-type="float" office:value="1.1" calcext:value-type="float">
            <text:p>1.1</text:p>
          </table:table-cell>
          <table:table-cell table:style-name="ce264" table:formula="of:=HLOOKUP([.AD9];[.$AF$25:.$AW$26];2;0)" office:value-type="float" office:value="3.2" calcext:value-type="float">
            <text:p>3.2</text:p>
          </table:table-cell>
          <table:table-cell table:style-name="ce5"/>
          <table:table-cell table:style-name="ce274" office:value-type="float" office:value="1" calcext:value-type="float">
            <text:p>1.00</text:p>
          </table:table-cell>
          <table:table-cell table:style-name="ce274" office:value-type="float" office:value="1.1" calcext:value-type="float">
            <text:p>1.10</text:p>
          </table:table-cell>
          <table:table-cell table:style-name="ce274" office:value-type="float" office:value="1.2" calcext:value-type="float">
            <text:p>1.20</text:p>
          </table:table-cell>
          <table:table-cell table:style-name="ce274" office:value-type="float" office:value="1.3" calcext:value-type="float">
            <text:p>1.30</text:p>
          </table:table-cell>
          <table:table-cell table:style-name="ce274" office:value-type="float" office:value="2" calcext:value-type="float">
            <text:p>2.00</text:p>
          </table:table-cell>
          <table:table-cell table:style-name="ce274" office:value-type="float" office:value="2.1" calcext:value-type="float">
            <text:p>2.10</text:p>
          </table:table-cell>
          <table:table-cell table:style-name="ce274" office:value-type="float" office:value="2.2" calcext:value-type="float">
            <text:p>2.20</text:p>
          </table:table-cell>
          <table:table-cell table:style-name="ce274" office:value-type="float" office:value="2.3" calcext:value-type="float">
            <text:p>2.30</text:p>
          </table:table-cell>
          <table:table-cell table:style-name="ce274" office:value-type="float" office:value="3" calcext:value-type="float">
            <text:p>3.00</text:p>
          </table:table-cell>
          <table:table-cell table:style-name="ce274" office:value-type="float" office:value="3.1" calcext:value-type="float">
            <text:p>3.10</text:p>
          </table:table-cell>
          <table:table-cell table:style-name="ce274" office:value-type="float" office:value="3.2" calcext:value-type="float">
            <text:p>3.20</text:p>
          </table:table-cell>
          <table:table-cell table:style-name="ce274" office:value-type="float" office:value="4" calcext:value-type="float">
            <text:p>4.00</text:p>
          </table:table-cell>
          <table:table-cell table:style-name="ce274" office:value-type="float" office:value="4.1" calcext:value-type="float">
            <text:p>4.10</text:p>
          </table:table-cell>
          <table:table-cell table:style-name="ce274" office:value-type="float" office:value="4.2" calcext:value-type="float">
            <text:p>4.20</text:p>
          </table:table-cell>
          <table:table-cell table:style-name="ce274" office:value-type="float" office:value="5" calcext:value-type="float">
            <text:p>5.00</text:p>
          </table:table-cell>
          <table:table-cell table:style-name="ce274" office:value-type="float" office:value="5.1" calcext:value-type="float">
            <text:p>5.10</text:p>
          </table:table-cell>
          <table:table-cell table:style-name="ce274" office:value-type="float" office:value="5.2" calcext:value-type="float">
            <text:p>5.20</text:p>
          </table:table-cell>
          <table:table-cell table:style-name="ce274" office:value-type="float" office:value="5.3" calcext:value-type="float">
            <text:p>5.30</text:p>
          </table:table-cell>
          <table:table-cell table:number-columns-repeated="13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10];[.$AF$25:.$AW$26];2;0)" office:value-type="float" office:value="5" calcext:value-type="float">
            <text:p>5.0</text:p>
          </table:table-cell>
          <table:table-cell table:style-name="ce57" table:formula="of:=HLOOKUP([.C10];[.$AF$25:.$AW$26];2;0)" office:value-type="float" office:value="4.2" calcext:value-type="float">
            <text:p>4.2</text:p>
          </table:table-cell>
          <table:table-cell table:style-name="ce68" table:formula="of:=HLOOKUP([.D10];[.$AF$25:.$AW$26];2;0)" office:value-type="float" office:value="4" calcext:value-type="float">
            <text:p>4.0</text:p>
          </table:table-cell>
          <table:table-cell table:style-name="ce93" table:formula="of:=HLOOKUP([.E10];[.$AF$25:.$AW$26];2;0)" office:value-type="float" office:value="2.3" calcext:value-type="float">
            <text:p>2.3</text:p>
          </table:table-cell>
          <table:table-cell table:style-name="ce93" table:formula="of:=HLOOKUP([.F10];[.$AF$25:.$AW$26];2;0)" office:value-type="float" office:value="5" calcext:value-type="float">
            <text:p>5.0</text:p>
          </table:table-cell>
          <table:table-cell table:style-name="ce53"/>
          <table:table-cell table:style-name="ce137" table:formula="of:=HLOOKUP([.H10];[.$AF$25:.$AW$26];2;0)" office:value-type="float" office:value="5.1" calcext:value-type="float">
            <text:p>5.1</text:p>
          </table:table-cell>
          <table:table-cell table:style-name="ce153" table:formula="of:=HLOOKUP([.I10];[.$AF$25:.$AW$26];2;0)" office:value-type="float" office:value="4.1" calcext:value-type="float">
            <text:p>4.1</text:p>
          </table:table-cell>
          <table:table-cell table:style-name="ce163" table:formula="of:=HLOOKUP([.J10];[.$AF$25:.$AW$26];2;0)" office:value-type="float" office:value="4" calcext:value-type="float">
            <text:p>4.0</text:p>
          </table:table-cell>
          <table:table-cell table:style-name="ce177" table:formula="of:=HLOOKUP([.K10];[.$AF$25:.$AW$26];2;0)" office:value-type="float" office:value="2.3" calcext:value-type="float">
            <text:p>2.3</text:p>
          </table:table-cell>
          <table:table-cell table:style-name="ce177" table:formula="of:=HLOOKUP([.L10];[.$AF$25:.$AW$26];2;0)" office:value-type="float" office:value="5" calcext:value-type="float">
            <text:p>5.0</text:p>
          </table:table-cell>
          <table:table-cell table:style-name="ce53"/>
          <table:table-cell table:style-name="ce194" table:formula="of:=HLOOKUP([.N10];[.$AF$25:.$AW$26];2;0)" office:value-type="float" office:value="5.1" calcext:value-type="float">
            <text:p>5.1</text:p>
          </table:table-cell>
          <table:table-cell table:style-name="ce200" table:formula="of:=HLOOKUP([.O10];[.$AF$25:.$AW$26];2;0)" office:value-type="float" office:value="4.2" calcext:value-type="float">
            <text:p>4.2</text:p>
          </table:table-cell>
          <table:table-cell table:style-name="ce206" table:formula="of:=HLOOKUP([.P10];[.$AF$25:.$AW$26];2;0)" office:value-type="float" office:value="3.2" calcext:value-type="float">
            <text:p>3.2</text:p>
          </table:table-cell>
          <table:table-cell table:style-name="ce211" table:formula="of:=HLOOKUP([.Q10];[.$AF$25:.$AW$26];2;0)" office:value-type="float" office:value="2.3" calcext:value-type="float">
            <text:p>2.3</text:p>
          </table:table-cell>
          <table:table-cell table:style-name="ce211" table:formula="of:=HLOOKUP([.R10];[.$AF$25:.$AW$26];2;0)" office:value-type="float" office:value="5" calcext:value-type="float">
            <text:p>5.0</text:p>
          </table:table-cell>
          <table:table-cell table:style-name="ce53"/>
          <table:table-cell table:style-name="ce219" table:formula="of:=HLOOKUP([.T10];[.$AF$25:.$AW$26];2;0)" office:value-type="float" office:value="5.1" calcext:value-type="float">
            <text:p>5.1</text:p>
          </table:table-cell>
          <table:table-cell table:style-name="ce227" table:formula="of:=HLOOKUP([.U10];[.$AF$25:.$AW$26];2;0)" office:value-type="float" office:value="4.2" calcext:value-type="float">
            <text:p>4.2</text:p>
          </table:table-cell>
          <table:table-cell table:style-name="ce232" table:formula="of:=HLOOKUP([.V10];[.$AF$25:.$AW$26];2;0)" office:value-type="float" office:value="4" calcext:value-type="float">
            <text:p>4.0</text:p>
          </table:table-cell>
          <table:table-cell table:style-name="ce238" table:formula="of:=HLOOKUP([.W10];[.$AF$25:.$AW$26];2;0)" office:value-type="float" office:value="2.2" calcext:value-type="float">
            <text:p>2.2</text:p>
          </table:table-cell>
          <table:table-cell table:style-name="ce238" table:formula="of:=HLOOKUP([.X10];[.$AF$25:.$AW$26];2;0)" office:value-type="float" office:value="4.2" calcext:value-type="float">
            <text:p>4.2</text:p>
          </table:table-cell>
          <table:table-cell table:style-name="ce53"/>
          <table:table-cell table:style-name="ce246" table:formula="of:=HLOOKUP([.Z10];[.$AF$25:.$AW$26];2;0)" office:value-type="float" office:value="5.1" calcext:value-type="float">
            <text:p>5.1</text:p>
          </table:table-cell>
          <table:table-cell table:style-name="ce255" table:formula="of:=HLOOKUP([.AA10];[.$AF$25:.$AW$26];2;0)" office:value-type="float" office:value="4.2" calcext:value-type="float">
            <text:p>4.2</text:p>
          </table:table-cell>
          <table:table-cell table:style-name="ce259" table:formula="of:=HLOOKUP([.AB10];[.$AF$25:.$AW$26];2;0)" office:value-type="float" office:value="4" calcext:value-type="float">
            <text:p>4.0</text:p>
          </table:table-cell>
          <table:table-cell table:style-name="ce264" table:formula="of:=HLOOKUP([.AC10];[.$AF$25:.$AW$26];2;0)" office:value-type="float" office:value="2.2" calcext:value-type="float">
            <text:p>2.2</text:p>
          </table:table-cell>
          <table:table-cell table:style-name="ce264" table:formula="of:=HLOOKUP([.AD10];[.$AF$25:.$AW$26];2;0)" office:value-type="float" office:value="4.2" calcext:value-type="float">
            <text:p>4.2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number-columns-repeated="31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2" table:formula="of:=HLOOKUP([.B12];[.$AF$25:.$AW$26];2;0)" office:value-type="float" office:value="5.1" calcext:value-type="float">
            <text:p>5.1</text:p>
          </table:table-cell>
          <table:table-cell table:style-name="ce59" table:formula="of:=HLOOKUP([.C12];[.$AF$25:.$AW$26];2;0)" office:value-type="float" office:value="2.3" calcext:value-type="float">
            <text:p>2.3</text:p>
          </table:table-cell>
          <table:table-cell table:style-name="ce75" table:formula="of:=HLOOKUP([.D12];[.$AF$25:.$AW$26];2;0)" office:value-type="float" office:value="2" calcext:value-type="float">
            <text:p>2.0</text:p>
          </table:table-cell>
          <table:table-cell table:style-name="ce96" table:formula="of:=HLOOKUP([.E12];[.$AF$25:.$AW$26];2;0)" office:value-type="float" office:value="3" calcext:value-type="float">
            <text:p>3.0</text:p>
          </table:table-cell>
          <table:table-cell table:style-name="ce96" table:formula="of:=HLOOKUP([.F12];[.$AF$25:.$AW$26];2;0)" office:value-type="float" office:value="5" calcext:value-type="float">
            <text:p>5.0</text:p>
          </table:table-cell>
          <table:table-cell table:style-name="ce53"/>
          <table:table-cell table:style-name="ce142" table:formula="of:=HLOOKUP([.H12];[.$AF$25:.$AW$26];2;0)" office:value-type="float" office:value="5.2" calcext:value-type="float">
            <text:p>5.2</text:p>
          </table:table-cell>
          <table:table-cell table:style-name="ce154" table:formula="of:=HLOOKUP([.I12];[.$AF$25:.$AW$26];2;0)" office:value-type="float" office:value="2.3" calcext:value-type="float">
            <text:p>2.3</text:p>
          </table:table-cell>
          <table:table-cell table:style-name="ce164" table:formula="of:=HLOOKUP([.J12];[.$AF$25:.$AW$26];2;0)" office:value-type="float" office:value="1.3" calcext:value-type="float">
            <text:p>1.3</text:p>
          </table:table-cell>
          <table:table-cell table:style-name="ce178" table:formula="of:=HLOOKUP([.K12];[.$AF$25:.$AW$26];2;0)" office:value-type="float" office:value="3" calcext:value-type="float">
            <text:p>3.0</text:p>
          </table:table-cell>
          <table:table-cell table:style-name="ce178" table:formula="of:=HLOOKUP([.L12];[.$AF$25:.$AW$26];2;0)" office:value-type="float" office:value="5" calcext:value-type="float">
            <text:p>5.0</text:p>
          </table:table-cell>
          <table:table-cell table:style-name="ce53"/>
          <table:table-cell table:style-name="ce195" table:formula="of:=HLOOKUP([.N12];[.$AF$25:.$AW$26];2;0)" office:value-type="float" office:value="5.2" calcext:value-type="float">
            <text:p>5.2</text:p>
          </table:table-cell>
          <table:table-cell table:style-name="ce201" table:formula="of:=HLOOKUP([.O12];[.$AF$25:.$AW$26];2;0)" office:value-type="float" office:value="3" calcext:value-type="float">
            <text:p>3.0</text:p>
          </table:table-cell>
          <table:table-cell table:style-name="ce207" table:formula="of:=HLOOKUP([.P12];[.$AF$25:.$AW$26];2;0)" office:value-type="float" office:value="2" calcext:value-type="float">
            <text:p>2.0</text:p>
          </table:table-cell>
          <table:table-cell table:style-name="ce212" table:formula="of:=HLOOKUP([.Q12];[.$AF$25:.$AW$26];2;0)" office:value-type="float" office:value="3" calcext:value-type="float">
            <text:p>3.0</text:p>
          </table:table-cell>
          <table:table-cell table:style-name="ce212" table:formula="of:=HLOOKUP([.R12];[.$AF$25:.$AW$26];2;0)" office:value-type="float" office:value="5" calcext:value-type="float">
            <text:p>5.0</text:p>
          </table:table-cell>
          <table:table-cell table:style-name="ce53"/>
          <table:table-cell table:style-name="ce220" table:formula="of:=HLOOKUP([.T12];[.$AF$25:.$AW$26];2;0)" office:value-type="float" office:value="5.1" calcext:value-type="float">
            <text:p>5.1</text:p>
          </table:table-cell>
          <table:table-cell table:style-name="ce228" table:formula="of:=HLOOKUP([.U12];[.$AF$25:.$AW$26];2;0)" office:value-type="float" office:value="2.3" calcext:value-type="float">
            <text:p>2.3</text:p>
          </table:table-cell>
          <table:table-cell table:style-name="ce233" table:formula="of:=HLOOKUP([.V12];[.$AF$25:.$AW$26];2;0)" office:value-type="float" office:value="1.3" calcext:value-type="float">
            <text:p>1.3</text:p>
          </table:table-cell>
          <table:table-cell table:style-name="ce239" table:formula="of:=HLOOKUP([.W12];[.$AF$25:.$AW$26];2;0)" office:value-type="float" office:value="3" calcext:value-type="float">
            <text:p>3.0</text:p>
          </table:table-cell>
          <table:table-cell table:style-name="ce239" table:formula="of:=HLOOKUP([.X12];[.$AF$25:.$AW$26];2;0)" office:value-type="float" office:value="5" calcext:value-type="float">
            <text:p>5.0</text:p>
          </table:table-cell>
          <table:table-cell table:style-name="ce53"/>
          <table:table-cell table:style-name="ce247" table:formula="of:=HLOOKUP([.Z12];[.$AF$25:.$AW$26];2;0)" office:value-type="float" office:value="5.2" calcext:value-type="float">
            <text:p>5.2</text:p>
          </table:table-cell>
          <table:table-cell table:style-name="ce256" table:formula="of:=HLOOKUP([.AA12];[.$AF$25:.$AW$26];2;0)" office:value-type="float" office:value="2.3" calcext:value-type="float">
            <text:p>2.3</text:p>
          </table:table-cell>
          <table:table-cell table:style-name="ce260" table:formula="of:=HLOOKUP([.AB12];[.$AF$25:.$AW$26];2;0)" office:value-type="float" office:value="2" calcext:value-type="float">
            <text:p>2.0</text:p>
          </table:table-cell>
          <table:table-cell table:style-name="ce265" table:formula="of:=HLOOKUP([.AC12];[.$AF$25:.$AW$26];2;0)" office:value-type="float" office:value="3" calcext:value-type="float">
            <text:p>3.0</text:p>
          </table:table-cell>
          <table:table-cell table:style-name="ce265" table:formula="of:=HLOOKUP([.AD12];[.$AF$25:.$AW$26];2;0)" office:value-type="float" office:value="5" calcext:value-type="float">
            <text:p>5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3" table:formula="of:=HLOOKUP([.B13];[.$AF$25:.$AW$26];2;0)" office:value-type="float" office:value="2.1" calcext:value-type="float">
            <text:p>2.1</text:p>
          </table:table-cell>
          <table:table-cell table:style-name="ce59" table:formula="of:=HLOOKUP([.C13];[.$AF$25:.$AW$26];2;0)" office:value-type="float" office:value="1.2" calcext:value-type="float">
            <text:p>1.2</text:p>
          </table:table-cell>
          <table:table-cell table:style-name="ce75" table:formula="of:=HLOOKUP([.D13];[.$AF$25:.$AW$26];2;0)" office:value-type="float" office:value="1.1" calcext:value-type="float">
            <text:p>1.1</text:p>
          </table:table-cell>
          <table:table-cell table:style-name="ce96" table:formula="of:=HLOOKUP([.E13];[.$AF$25:.$AW$26];2;0)" office:value-type="float" office:value="1" calcext:value-type="float">
            <text:p>1.0</text:p>
          </table:table-cell>
          <table:table-cell table:style-name="ce96" table:formula="of:=HLOOKUP([.F13];[.$AF$25:.$AW$26];2;0)" office:value-type="float" office:value="3.2" calcext:value-type="float">
            <text:p>3.2</text:p>
          </table:table-cell>
          <table:table-cell table:style-name="ce53"/>
          <table:table-cell table:style-name="ce143" table:formula="of:=HLOOKUP([.H13];[.$AF$25:.$AW$26];2;0)" office:value-type="float" office:value="2.1" calcext:value-type="float">
            <text:p>2.1</text:p>
          </table:table-cell>
          <table:table-cell table:style-name="ce155" table:formula="of:=HLOOKUP([.I13];[.$AF$25:.$AW$26];2;0)" office:value-type="float" office:value="1.2" calcext:value-type="float">
            <text:p>1.2</text:p>
          </table:table-cell>
          <table:table-cell table:style-name="ce164" table:formula="of:=HLOOKUP([.J13];[.$AF$25:.$AW$26];2;0)" office:value-type="float" office:value="1.1" calcext:value-type="float">
            <text:p>1.1</text:p>
          </table:table-cell>
          <table:table-cell table:style-name="ce178" table:formula="of:=HLOOKUP([.K13];[.$AF$25:.$AW$26];2;0)" office:value-type="float" office:value="1" calcext:value-type="float">
            <text:p>1.0</text:p>
          </table:table-cell>
          <table:table-cell table:style-name="ce178" table:formula="of:=HLOOKUP([.L13];[.$AF$25:.$AW$26];2;0)" office:value-type="float" office:value="3.1" calcext:value-type="float">
            <text:p>3.1</text:p>
          </table:table-cell>
          <table:table-cell table:style-name="ce53"/>
          <table:table-cell table:style-name="ce196" table:formula="of:=HLOOKUP([.N13];[.$AF$25:.$AW$26];2;0)" office:value-type="float" office:value="2.1" calcext:value-type="float">
            <text:p>2.1</text:p>
          </table:table-cell>
          <table:table-cell table:style-name="ce201" table:formula="of:=HLOOKUP([.O13];[.$AF$25:.$AW$26];2;0)" office:value-type="float" office:value="1.2" calcext:value-type="float">
            <text:p>1.2</text:p>
          </table:table-cell>
          <table:table-cell table:style-name="ce208" table:formula="of:=HLOOKUP([.P13];[.$AF$25:.$AW$26];2;0)" office:value-type="float" office:value="1.1" calcext:value-type="float">
            <text:p>1.1</text:p>
          </table:table-cell>
          <table:table-cell table:style-name="ce212" table:formula="of:=HLOOKUP([.Q13];[.$AF$25:.$AW$26];2;0)" office:value-type="float" office:value="1" calcext:value-type="float">
            <text:p>1.0</text:p>
          </table:table-cell>
          <table:table-cell table:style-name="ce212" table:formula="of:=HLOOKUP([.R13];[.$AF$25:.$AW$26];2;0)" office:value-type="float" office:value="3.1" calcext:value-type="float">
            <text:p>3.1</text:p>
          </table:table-cell>
          <table:table-cell table:style-name="ce53"/>
          <table:table-cell table:style-name="ce221" table:formula="of:=HLOOKUP([.T13];[.$AF$25:.$AW$26];2;0)" office:value-type="float" office:value="2.1" calcext:value-type="float">
            <text:p>2.1</text:p>
          </table:table-cell>
          <table:table-cell table:style-name="ce228" table:formula="of:=HLOOKUP([.U13];[.$AF$25:.$AW$26];2;0)" office:value-type="float" office:value="1.2" calcext:value-type="float">
            <text:p>1.2</text:p>
          </table:table-cell>
          <table:table-cell table:style-name="ce233" table:formula="of:=HLOOKUP([.V13];[.$AF$25:.$AW$26];2;0)" office:value-type="float" office:value="1.1" calcext:value-type="float">
            <text:p>1.1</text:p>
          </table:table-cell>
          <table:table-cell table:style-name="ce240" table:formula="of:=HLOOKUP([.W13];[.$AF$25:.$AW$26];2;0)" office:value-type="float" office:value="1" calcext:value-type="float">
            <text:p>1.0</text:p>
          </table:table-cell>
          <table:table-cell table:style-name="ce239" table:formula="of:=HLOOKUP([.X13];[.$AF$25:.$AW$26];2;0)" office:value-type="float" office:value="3.2" calcext:value-type="float">
            <text:p>3.2</text:p>
          </table:table-cell>
          <table:table-cell table:style-name="ce53"/>
          <table:table-cell table:style-name="ce248" table:formula="of:=HLOOKUP([.Z13];[.$AF$25:.$AW$26];2;0)" office:value-type="float" office:value="2.3" calcext:value-type="float">
            <text:p>2.3</text:p>
          </table:table-cell>
          <table:table-cell table:style-name="ce256" table:formula="of:=HLOOKUP([.AA13];[.$AF$25:.$AW$26];2;0)" office:value-type="float" office:value="1.3" calcext:value-type="float">
            <text:p>1.3</text:p>
          </table:table-cell>
          <table:table-cell table:style-name="ce260" table:formula="of:=HLOOKUP([.AB13];[.$AF$25:.$AW$26];2;0)" office:value-type="float" office:value="1.2" calcext:value-type="float">
            <text:p>1.2</text:p>
          </table:table-cell>
          <table:table-cell table:style-name="ce265" table:formula="of:=HLOOKUP([.AC13];[.$AF$25:.$AW$26];2;0)" office:value-type="float" office:value="1.1" calcext:value-type="float">
            <text:p>1.1</text:p>
          </table:table-cell>
          <table:table-cell table:style-name="ce268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4" table:formula="of:=HLOOKUP([.B14];[.$AF$25:.$AW$26];2;0)" office:value-type="float" office:value="4.2" calcext:value-type="float">
            <text:p>4.2</text:p>
          </table:table-cell>
          <table:table-cell table:style-name="ce59" table:formula="of:=HLOOKUP([.C14];[.$AF$25:.$AW$26];2;0)" office:value-type="float" office:value="4.1" calcext:value-type="float">
            <text:p>4.1</text:p>
          </table:table-cell>
          <table:table-cell table:style-name="ce75" table:formula="of:=HLOOKUP([.D14];[.$AF$25:.$AW$26];2;0)" office:value-type="float" office:value="3.1" calcext:value-type="float">
            <text:p>3.1</text:p>
          </table:table-cell>
          <table:table-cell table:style-name="ce96" table:formula="of:=HLOOKUP([.E14];[.$AF$25:.$AW$26];2;0)" office:value-type="float" office:value="2.1" calcext:value-type="float">
            <text:p>2.1</text:p>
          </table:table-cell>
          <table:table-cell table:style-name="ce96" table:formula="of:=HLOOKUP([.F14];[.$AF$25:.$AW$26];2;0)" office:value-type="float" office:value="4.1" calcext:value-type="float">
            <text:p>4.1</text:p>
          </table:table-cell>
          <table:table-cell table:style-name="ce53"/>
          <table:table-cell table:style-name="ce143" table:formula="of:=HLOOKUP([.H14];[.$AF$25:.$AW$26];2;0)" office:value-type="float" office:value="4.2" calcext:value-type="float">
            <text:p>4.2</text:p>
          </table:table-cell>
          <table:table-cell table:style-name="ce154" table:formula="of:=HLOOKUP([.I14];[.$AF$25:.$AW$26];2;0)" office:value-type="float" office:value="4" calcext:value-type="float">
            <text:p>4.0</text:p>
          </table:table-cell>
          <table:table-cell table:style-name="ce164" table:formula="of:=HLOOKUP([.J14];[.$AF$25:.$AW$26];2;0)" office:value-type="float" office:value="3.1" calcext:value-type="float">
            <text:p>3.1</text:p>
          </table:table-cell>
          <table:table-cell table:style-name="ce178" table:formula="of:=HLOOKUP([.K14];[.$AF$25:.$AW$26];2;0)" office:value-type="float" office:value="2.1" calcext:value-type="float">
            <text:p>2.1</text:p>
          </table:table-cell>
          <table:table-cell table:style-name="ce178" table:formula="of:=HLOOKUP([.L14];[.$AF$25:.$AW$26];2;0)" office:value-type="float" office:value="4.1" calcext:value-type="float">
            <text:p>4.1</text:p>
          </table:table-cell>
          <table:table-cell table:style-name="ce53"/>
          <table:table-cell table:style-name="ce196" table:formula="of:=HLOOKUP([.N14];[.$AF$25:.$AW$26];2;0)" office:value-type="float" office:value="4.2" calcext:value-type="float">
            <text:p>4.2</text:p>
          </table:table-cell>
          <table:table-cell table:style-name="ce201" table:formula="of:=HLOOKUP([.O14];[.$AF$25:.$AW$26];2;0)" office:value-type="float" office:value="4" calcext:value-type="float">
            <text:p>4.0</text:p>
          </table:table-cell>
          <table:table-cell table:style-name="ce207" table:formula="of:=HLOOKUP([.P14];[.$AF$25:.$AW$26];2;0)" office:value-type="float" office:value="3.1" calcext:value-type="float">
            <text:p>3.1</text:p>
          </table:table-cell>
          <table:table-cell table:style-name="ce212" table:formula="of:=HLOOKUP([.Q14];[.$AF$25:.$AW$26];2;0)" office:value-type="float" office:value="2.1" calcext:value-type="float">
            <text:p>2.1</text:p>
          </table:table-cell>
          <table:table-cell table:style-name="ce212" table:formula="of:=HLOOKUP([.R14];[.$AF$25:.$AW$26];2;0)" office:value-type="float" office:value="4.1" calcext:value-type="float">
            <text:p>4.1</text:p>
          </table:table-cell>
          <table:table-cell table:style-name="ce53"/>
          <table:table-cell table:style-name="ce221" table:formula="of:=HLOOKUP([.T14];[.$AF$25:.$AW$26];2;0)" office:value-type="float" office:value="4.2" calcext:value-type="float">
            <text:p>4.2</text:p>
          </table:table-cell>
          <table:table-cell table:style-name="ce228" table:formula="of:=HLOOKUP([.U14];[.$AF$25:.$AW$26];2;0)" office:value-type="float" office:value="4" calcext:value-type="float">
            <text:p>4.0</text:p>
          </table:table-cell>
          <table:table-cell table:style-name="ce233" table:formula="of:=HLOOKUP([.V14];[.$AF$25:.$AW$26];2;0)" office:value-type="float" office:value="3.2" calcext:value-type="float">
            <text:p>3.2</text:p>
          </table:table-cell>
          <table:table-cell table:style-name="ce239" table:formula="of:=HLOOKUP([.W14];[.$AF$25:.$AW$26];2;0)" office:value-type="float" office:value="2.1" calcext:value-type="float">
            <text:p>2.1</text:p>
          </table:table-cell>
          <table:table-cell table:style-name="ce239" table:formula="of:=HLOOKUP([.X14];[.$AF$25:.$AW$26];2;0)" office:value-type="float" office:value="4.1" calcext:value-type="float">
            <text:p>4.1</text:p>
          </table:table-cell>
          <table:table-cell table:style-name="ce53"/>
          <table:table-cell table:style-name="ce248" table:formula="of:=HLOOKUP([.Z14];[.$AF$25:.$AW$26];2;0)" office:value-type="float" office:value="5" calcext:value-type="float">
            <text:p>5.0</text:p>
          </table:table-cell>
          <table:table-cell table:style-name="ce256" table:formula="of:=HLOOKUP([.AA14];[.$AF$25:.$AW$26];2;0)" office:value-type="float" office:value="4" calcext:value-type="float">
            <text:p>4.0</text:p>
          </table:table-cell>
          <table:table-cell table:style-name="ce260" table:formula="of:=HLOOKUP([.AB14];[.$AF$25:.$AW$26];2;0)" office:value-type="float" office:value="3.1" calcext:value-type="float">
            <text:p>3.1</text:p>
          </table:table-cell>
          <table:table-cell table:style-name="ce265" table:formula="of:=HLOOKUP([.AC14];[.$AF$25:.$AW$26];2;0)" office:value-type="float" office:value="2.1" calcext:value-type="float">
            <text:p>2.1</text:p>
          </table:table-cell>
          <table:table-cell table:style-name="ce265" table:formula="of:=HLOOKUP([.AD14];[.$AF$25:.$AW$26];2;0)" office:value-type="float" office:value="4.1" calcext:value-type="float">
            <text:p>4.1</text:p>
          </table:table-cell>
          <table:table-cell/>
          <table:table-cell table:style-name="ce5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53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53"/>
          <table:table-cell table:style-name="ce53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0" table:formula="of:=HLOOKUP([.B16];[.$AF$25:.$AW$26];2;0)" office:value-type="float" office:value="5.2" calcext:value-type="float">
            <text:p>5.2</text:p>
          </table:table-cell>
          <table:table-cell table:style-name="ce61" table:formula="of:=HLOOKUP([.C16];[.$AF$25:.$AW$26];2;0)" office:value-type="float" office:value="3.1" calcext:value-type="float">
            <text:p>3.1</text:p>
          </table:table-cell>
          <table:table-cell table:style-name="ce80" table:formula="of:=HLOOKUP([.D16];[.$AF$25:.$AW$26];2;0)" office:value-type="float" office:value="2.1" calcext:value-type="float">
            <text:p>2.1</text:p>
          </table:table-cell>
          <table:table-cell table:style-name="ce97" table:formula="of:=HLOOKUP([.E16];[.$AF$25:.$AW$26];2;0)" office:value-type="float" office:value="3.1" calcext:value-type="float">
            <text:p>3.1</text:p>
          </table:table-cell>
          <table:table-cell table:style-name="ce97" table:formula="of:=HLOOKUP([.F16];[.$AF$25:.$AW$26];2;0)" office:value-type="float" office:value="5.2" calcext:value-type="float">
            <text:p>5.2</text:p>
          </table:table-cell>
          <table:table-cell table:style-name="ce53"/>
          <table:table-cell table:style-name="ce145" table:formula="of:=HLOOKUP([.H16];[.$AF$25:.$AW$26];2;0)" office:value-type="float" office:value="5.3" calcext:value-type="float">
            <text:p>5.3</text:p>
          </table:table-cell>
          <table:table-cell table:style-name="ce156" table:formula="of:=HLOOKUP([.I16];[.$AF$25:.$AW$26];2;0)" office:value-type="float" office:value="3" calcext:value-type="float">
            <text:p>3.0</text:p>
          </table:table-cell>
          <table:table-cell table:style-name="ce168" table:formula="of:=HLOOKUP([.J16];[.$AF$25:.$AW$26];2;0)" office:value-type="float" office:value="2.1" calcext:value-type="float">
            <text:p>2.1</text:p>
          </table:table-cell>
          <table:table-cell table:style-name="ce189" table:formula="of:=HLOOKUP([.K16];[.$AF$25:.$AW$26];2;0)" office:value-type="float" office:value="3.1" calcext:value-type="float">
            <text:p>3.1</text:p>
          </table:table-cell>
          <table:table-cell table:style-name="ce189" table:formula="of:=HLOOKUP([.L16];[.$AF$25:.$AW$26];2;0)" office:value-type="float" office:value="5.2" calcext:value-type="float">
            <text:p>5.2</text:p>
          </table:table-cell>
          <table:table-cell table:style-name="ce53"/>
          <table:table-cell table:style-name="ce197" table:formula="of:=HLOOKUP([.N16];[.$AF$25:.$AW$26];2;0)" office:value-type="float" office:value="5.3" calcext:value-type="float">
            <text:p>5.3</text:p>
          </table:table-cell>
          <table:table-cell table:style-name="ce202" table:formula="of:=HLOOKUP([.O16];[.$AF$25:.$AW$26];2;0)" office:value-type="float" office:value="3.1" calcext:value-type="float">
            <text:p>3.1</text:p>
          </table:table-cell>
          <table:table-cell table:style-name="ce209" table:formula="of:=HLOOKUP([.P16];[.$AF$25:.$AW$26];2;0)" office:value-type="float" office:value="2.1" calcext:value-type="float">
            <text:p>2.1</text:p>
          </table:table-cell>
          <table:table-cell table:style-name="ce213" table:formula="of:=HLOOKUP([.Q16];[.$AF$25:.$AW$26];2;0)" office:value-type="float" office:value="3.2" calcext:value-type="float">
            <text:p>3.2</text:p>
          </table:table-cell>
          <table:table-cell table:style-name="ce213" table:formula="of:=HLOOKUP([.R16];[.$AF$25:.$AW$26];2;0)" office:value-type="float" office:value="5.2" calcext:value-type="float">
            <text:p>5.2</text:p>
          </table:table-cell>
          <table:table-cell table:style-name="ce53"/>
          <table:table-cell table:style-name="ce222" table:formula="of:=HLOOKUP([.T16];[.$AF$25:.$AW$26];2;0)" office:value-type="float" office:value="5.3" calcext:value-type="float">
            <text:p>5.3</text:p>
          </table:table-cell>
          <table:table-cell table:style-name="ce229" table:formula="of:=HLOOKUP([.U16];[.$AF$25:.$AW$26];2;0)" office:value-type="float" office:value="3.1" calcext:value-type="float">
            <text:p>3.1</text:p>
          </table:table-cell>
          <table:table-cell table:style-name="ce234" table:formula="of:=HLOOKUP([.V16];[.$AF$25:.$AW$26];2;0)" office:value-type="float" office:value="2.1" calcext:value-type="float">
            <text:p>2.1</text:p>
          </table:table-cell>
          <table:table-cell table:style-name="ce241" table:formula="of:=HLOOKUP([.W16];[.$AF$25:.$AW$26];2;0)" office:value-type="float" office:value="3.1" calcext:value-type="float">
            <text:p>3.1</text:p>
          </table:table-cell>
          <table:table-cell table:style-name="ce241" table:formula="of:=HLOOKUP([.X16];[.$AF$25:.$AW$26];2;0)" office:value-type="float" office:value="5.1" calcext:value-type="float">
            <text:p>5.1</text:p>
          </table:table-cell>
          <table:table-cell table:style-name="ce53"/>
          <table:table-cell table:style-name="ce249" table:formula="of:=HLOOKUP([.Z16];[.$AF$25:.$AW$26];2;0)" office:value-type="float" office:value="5.3" calcext:value-type="float">
            <text:p>5.3</text:p>
          </table:table-cell>
          <table:table-cell table:style-name="ce257" table:formula="of:=HLOOKUP([.AA16];[.$AF$25:.$AW$26];2;0)" office:value-type="float" office:value="3.1" calcext:value-type="float">
            <text:p>3.1</text:p>
          </table:table-cell>
          <table:table-cell table:style-name="ce261" table:formula="of:=HLOOKUP([.AB16];[.$AF$25:.$AW$26];2;0)" office:value-type="float" office:value="2.2" calcext:value-type="float">
            <text:p>2.2</text:p>
          </table:table-cell>
          <table:table-cell table:style-name="ce266" table:formula="of:=HLOOKUP([.AC16];[.$AF$25:.$AW$26];2;0)" office:value-type="float" office:value="3.1" calcext:value-type="float">
            <text:p>3.1</text:p>
          </table:table-cell>
          <table:table-cell table:style-name="ce266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1" table:formula="of:=HLOOKUP([.B17];[.$AF$25:.$AW$26];2;0)" office:value-type="float" office:value="2.2" calcext:value-type="float">
            <text:p>2.2</text:p>
          </table:table-cell>
          <table:table-cell table:style-name="ce61" table:formula="of:=HLOOKUP([.C17];[.$AF$25:.$AW$26];2;0)" office:value-type="float" office:value="1.3" calcext:value-type="float">
            <text:p>1.3</text:p>
          </table:table-cell>
          <table:table-cell table:style-name="ce80" table:formula="of:=HLOOKUP([.D17];[.$AF$25:.$AW$26];2;0)" office:value-type="float" office:value="1.2" calcext:value-type="float">
            <text:p>1.2</text:p>
          </table:table-cell>
          <table:table-cell table:style-name="ce97" table:formula="of:=HLOOKUP([.E17];[.$AF$25:.$AW$26];2;0)" office:value-type="float" office:value="1.1" calcext:value-type="float">
            <text:p>1.1</text:p>
          </table:table-cell>
          <table:table-cell table:style-name="ce97" table:formula="of:=HLOOKUP([.F17];[.$AF$25:.$AW$26];2;0)" office:value-type="float" office:value="4" calcext:value-type="float">
            <text:p>4.0</text:p>
          </table:table-cell>
          <table:table-cell table:style-name="ce53"/>
          <table:table-cell table:style-name="ce146" table:formula="of:=HLOOKUP([.H17];[.$AF$25:.$AW$26];2;0)" office:value-type="float" office:value="2.3" calcext:value-type="float">
            <text:p>2.3</text:p>
          </table:table-cell>
          <table:table-cell table:style-name="ce156" table:formula="of:=HLOOKUP([.I17];[.$AF$25:.$AW$26];2;0)" office:value-type="float" office:value="1.3" calcext:value-type="float">
            <text:p>1.3</text:p>
          </table:table-cell>
          <table:table-cell table:style-name="ce168" table:formula="of:=HLOOKUP([.J17];[.$AF$25:.$AW$26];2;0)" office:value-type="float" office:value="1.1" calcext:value-type="float">
            <text:p>1.1</text:p>
          </table:table-cell>
          <table:table-cell table:style-name="ce189" table:formula="of:=HLOOKUP([.K17];[.$AF$25:.$AW$26];2;0)" office:value-type="float" office:value="1.1" calcext:value-type="float">
            <text:p>1.1</text:p>
          </table:table-cell>
          <table:table-cell table:style-name="ce189" table:formula="of:=HLOOKUP([.L17];[.$AF$25:.$AW$26];2;0)" office:value-type="float" office:value="4" calcext:value-type="float">
            <text:p>4.0</text:p>
          </table:table-cell>
          <table:table-cell table:style-name="ce53"/>
          <table:table-cell table:style-name="ce198" table:formula="of:=HLOOKUP([.N17];[.$AF$25:.$AW$26];2;0)" office:value-type="float" office:value="2.3" calcext:value-type="float">
            <text:p>2.3</text:p>
          </table:table-cell>
          <table:table-cell table:style-name="ce202" table:formula="of:=HLOOKUP([.O17];[.$AF$25:.$AW$26];2;0)" office:value-type="float" office:value="2" calcext:value-type="float">
            <text:p>2.0</text:p>
          </table:table-cell>
          <table:table-cell table:style-name="ce209" table:formula="of:=HLOOKUP([.P17];[.$AF$25:.$AW$26];2;0)" office:value-type="float" office:value="1.2" calcext:value-type="float">
            <text:p>1.2</text:p>
          </table:table-cell>
          <table:table-cell table:style-name="ce213" table:formula="of:=HLOOKUP([.Q17];[.$AF$25:.$AW$26];2;0)" office:value-type="float" office:value="1.2" calcext:value-type="float">
            <text:p>1.2</text:p>
          </table:table-cell>
          <table:table-cell table:style-name="ce213" table:formula="of:=HLOOKUP([.R17];[.$AF$25:.$AW$26];2;0)" office:value-type="float" office:value="4" calcext:value-type="float">
            <text:p>4.0</text:p>
          </table:table-cell>
          <table:table-cell table:style-name="ce53"/>
          <table:table-cell table:style-name="ce223" table:formula="of:=HLOOKUP([.T17];[.$AF$25:.$AW$26];2;0)" office:value-type="float" office:value="2.2" calcext:value-type="float">
            <text:p>2.2</text:p>
          </table:table-cell>
          <table:table-cell table:style-name="ce229" table:formula="of:=HLOOKUP([.U17];[.$AF$25:.$AW$26];2;0)" office:value-type="float" office:value="1.2" calcext:value-type="float">
            <text:p>1.2</text:p>
          </table:table-cell>
          <table:table-cell table:style-name="ce234" table:formula="of:=HLOOKUP([.V17];[.$AF$25:.$AW$26];2;0)" office:value-type="float" office:value="1.1" calcext:value-type="float">
            <text:p>1.1</text:p>
          </table:table-cell>
          <table:table-cell table:style-name="ce241" table:formula="of:=HLOOKUP([.W17];[.$AF$25:.$AW$26];2;0)" office:value-type="float" office:value="1.1" calcext:value-type="float">
            <text:p>1.1</text:p>
          </table:table-cell>
          <table:table-cell table:style-name="ce241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7];[.$AF$25:.$AW$26];2;0)" office:value-type="float" office:value="3" calcext:value-type="float">
            <text:p>3.0</text:p>
          </table:table-cell>
          <table:table-cell table:style-name="ce257" table:formula="of:=HLOOKUP([.AA17];[.$AF$25:.$AW$26];2;0)" office:value-type="float" office:value="2" calcext:value-type="float">
            <text:p>2.0</text:p>
          </table:table-cell>
          <table:table-cell table:style-name="ce261" table:formula="of:=HLOOKUP([.AB17];[.$AF$25:.$AW$26];2;0)" office:value-type="float" office:value="1.3" calcext:value-type="float">
            <text:p>1.3</text:p>
          </table:table-cell>
          <table:table-cell table:style-name="ce266" table:formula="of:=HLOOKUP([.AC17];[.$AF$25:.$AW$26];2;0)" office:value-type="float" office:value="1.1" calcext:value-type="float">
            <text:p>1.1</text:p>
          </table:table-cell>
          <table:table-cell table:style-name="ce266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3" table:formula="of:=HLOOKUP([.B18];[.$AF$25:.$AW$26];2;0)" office:value-type="float" office:value="4.1" calcext:value-type="float">
            <text:p>4.1</text:p>
          </table:table-cell>
          <table:table-cell table:style-name="ce61" table:formula="of:=HLOOKUP([.C18];[.$AF$25:.$AW$26];2;0)" office:value-type="float" office:value="1.2" calcext:value-type="float">
            <text:p>1.2</text:p>
          </table:table-cell>
          <table:table-cell table:style-name="ce80" table:formula="of:=HLOOKUP([.D18];[.$AF$25:.$AW$26];2;0)" office:value-type="float" office:value="1.1" calcext:value-type="float">
            <text:p>1.1</text:p>
          </table:table-cell>
          <table:table-cell table:style-name="ce97" table:formula="of:=HLOOKUP([.E18];[.$AF$25:.$AW$26];2;0)" office:value-type="float" office:value="1" calcext:value-type="float">
            <text:p>1.0</text:p>
          </table:table-cell>
          <table:table-cell table:style-name="ce97" table:formula="of:=HLOOKUP([.F18];[.$AF$25:.$AW$26];2;0)" office:value-type="float" office:value="3.2" calcext:value-type="float">
            <text:p>3.2</text:p>
          </table:table-cell>
          <table:table-cell table:style-name="ce53"/>
          <table:table-cell table:style-name="ce146" table:formula="of:=HLOOKUP([.H18];[.$AF$25:.$AW$26];2;0)" office:value-type="float" office:value="2.1" calcext:value-type="float">
            <text:p>2.1</text:p>
          </table:table-cell>
          <table:table-cell table:style-name="ce157" table:formula="of:=HLOOKUP([.I18];[.$AF$25:.$AW$26];2;0)" office:value-type="float" office:value="3.2" calcext:value-type="float">
            <text:p>3.2</text:p>
          </table:table-cell>
          <table:table-cell table:style-name="ce168" table:formula="of:=HLOOKUP([.J18];[.$AF$25:.$AW$26];2;0)" office:value-type="float" office:value="1.1" calcext:value-type="float">
            <text:p>1.1</text:p>
          </table:table-cell>
          <table:table-cell table:style-name="ce189" table:formula="of:=HLOOKUP([.K18];[.$AF$25:.$AW$26];2;0)" office:value-type="float" office:value="1" calcext:value-type="float">
            <text:p>1.0</text:p>
          </table:table-cell>
          <table:table-cell table:style-name="ce189" table:formula="of:=HLOOKUP([.L18];[.$AF$25:.$AW$26];2;0)" office:value-type="float" office:value="3.1" calcext:value-type="float">
            <text:p>3.1</text:p>
          </table:table-cell>
          <table:table-cell table:style-name="ce53"/>
          <table:table-cell table:style-name="ce198" table:formula="of:=HLOOKUP([.N18];[.$AF$25:.$AW$26];2;0)" office:value-type="float" office:value="2.1" calcext:value-type="float">
            <text:p>2.1</text:p>
          </table:table-cell>
          <table:table-cell table:style-name="ce202" table:formula="of:=HLOOKUP([.O18];[.$AF$25:.$AW$26];2;0)" office:value-type="float" office:value="1.2" calcext:value-type="float">
            <text:p>1.2</text:p>
          </table:table-cell>
          <table:table-cell table:style-name="ce210" table:formula="of:=HLOOKUP([.P18];[.$AF$25:.$AW$26];2;0)" office:value-type="float" office:value="3" calcext:value-type="float">
            <text:p>3.0</text:p>
          </table:table-cell>
          <table:table-cell table:style-name="ce213" table:formula="of:=HLOOKUP([.Q18];[.$AF$25:.$AW$26];2;0)" office:value-type="float" office:value="1" calcext:value-type="float">
            <text:p>1.0</text:p>
          </table:table-cell>
          <table:table-cell table:style-name="ce213" table:formula="of:=HLOOKUP([.R18];[.$AF$25:.$AW$26];2;0)" office:value-type="float" office:value="3.1" calcext:value-type="float">
            <text:p>3.1</text:p>
          </table:table-cell>
          <table:table-cell table:style-name="ce53"/>
          <table:table-cell table:style-name="ce223" table:formula="of:=HLOOKUP([.T18];[.$AF$25:.$AW$26];2;0)" office:value-type="float" office:value="2.1" calcext:value-type="float">
            <text:p>2.1</text:p>
          </table:table-cell>
          <table:table-cell table:style-name="ce229" table:formula="of:=HLOOKUP([.U18];[.$AF$25:.$AW$26];2;0)" office:value-type="float" office:value="1.2" calcext:value-type="float">
            <text:p>1.2</text:p>
          </table:table-cell>
          <table:table-cell table:style-name="ce234" table:formula="of:=HLOOKUP([.V18];[.$AF$25:.$AW$26];2;0)" office:value-type="float" office:value="1.1" calcext:value-type="float">
            <text:p>1.1</text:p>
          </table:table-cell>
          <table:table-cell table:style-name="ce242" table:formula="of:=HLOOKUP([.W18];[.$AF$25:.$AW$26];2;0)" office:value-type="float" office:value="2" calcext:value-type="float">
            <text:p>2.0</text:p>
          </table:table-cell>
          <table:table-cell table:style-name="ce241" table:formula="of:=HLOOKUP([.X18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8];[.$AF$25:.$AW$26];2;0)" office:value-type="float" office:value="2.3" calcext:value-type="float">
            <text:p>2.3</text:p>
          </table:table-cell>
          <table:table-cell table:style-name="ce257" table:formula="of:=HLOOKUP([.AA18];[.$AF$25:.$AW$26];2;0)" office:value-type="float" office:value="1.3" calcext:value-type="float">
            <text:p>1.3</text:p>
          </table:table-cell>
          <table:table-cell table:style-name="ce261" table:formula="of:=HLOOKUP([.AB18];[.$AF$25:.$AW$26];2;0)" office:value-type="float" office:value="1.2" calcext:value-type="float">
            <text:p>1.2</text:p>
          </table:table-cell>
          <table:table-cell table:style-name="ce266" table:formula="of:=HLOOKUP([.AC18];[.$AF$25:.$AW$26];2;0)" office:value-type="float" office:value="1.1" calcext:value-type="float">
            <text:p>1.1</text:p>
          </table:table-cell>
          <table:table-cell table:style-name="ce269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370"/>
          <table:table-cell table:style-name="ce370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370"/>
          <table:table-cell table:style-name="ce370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370"/>
          <table:table-cell table:style-name="ce370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15" table:number-columns-repeated="5"/>
          <table:table-cell/>
          <table:table-cell table:style-name="ce115" table:number-columns-repeated="5"/>
          <table:table-cell/>
          <table:table-cell table:style-name="ce115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115"/>
          <table:table-cell table:style-name="ce115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2" calcext:value-type="float">
            <text:p>2</text:p>
          </table:table-cell>
          <table:table-cell table:style-name="ce115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table:style-name="ce459" office:value-type="string" calcext:value-type="string">
            <text:p>start priorities</text:p>
          </table:table-cell>
          <table:table-cell table:number-columns-repeated="12"/>
          <table:table-cell table:style-name="ce459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/>
          <table:table-cell table:style-name="ce453" office:value-type="float" office:value="1" calcext:value-type="float">
            <text:p>1</text:p>
          </table:table-cell>
          <table:table-cell table:style-name="ce461" office:value-type="float" office:value="14" calcext:value-type="float">
            <text:p>14</text:p>
          </table:table-cell>
          <table:table-cell table:style-name="ce463" office:value-type="float" office:value="6" calcext:value-type="float">
            <text:p>6</text:p>
          </table:table-cell>
          <table:table-cell table:style-name="ce461" office:value-type="float" office:value="3" calcext:value-type="float">
            <text:p>3</text:p>
          </table:table-cell>
          <table:table-cell table:style-name="ce463" office:value-type="float" office:value="5" calcext:value-type="float">
            <text:p>5</text:p>
          </table:table-cell>
          <table:table-cell table:style-name="ce461" office:value-type="float" office:value="13" calcext:value-type="float">
            <text:p>13</text:p>
          </table:table-cell>
          <table:table-cell/>
          <table:table-cell table:style-name="ce474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474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474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474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474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52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523"/>
          <table:table-cell table:style-name="ce501"/>
          <table:table-cell table:style-name="ce523"/>
          <table:table-cell/>
          <table:table-cell table:style-name="ce523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/>
          <table:table-cell table:style-name="ce453" office:value-type="float" office:value="2" calcext:value-type="float">
            <text:p>2</text:p>
          </table:table-cell>
          <table:table-cell table:style-name="ce463" office:value-type="float" office:value="8" calcext:value-type="float">
            <text:p>8</text:p>
          </table:table-cell>
          <table:table-cell table:style-name="ce461" office:value-type="float" office:value="2" calcext:value-type="float">
            <text:p>2</text:p>
          </table:table-cell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3" office:value-type="float" office:value="7" calcext:value-type="float">
            <text:p>7</text:p>
          </table:table-cell>
          <table:table-cell/>
          <table:table-cell table:style-name="ce474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474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474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474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474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523"/>
          <table:table-cell table:style-name="ce523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/>
          <table:table-cell table:style-name="ce453" office:value-type="float" office:value="3" calcext:value-type="float">
            <text:p>3</text:p>
          </table:table-cell>
          <table:table-cell table:style-name="ce461" office:value-type="float" office:value="12" calcext:value-type="float">
            <text:p>12</text:p>
          </table:table-cell>
          <table:table-cell table:style-name="ce463" office:value-type="float" office:value="10" calcext:value-type="float">
            <text:p>10</text:p>
          </table:table-cell>
          <table:table-cell table:style-name="ce463" office:value-type="float" office:value="9" calcext:value-type="float">
            <text:p>9</text:p>
          </table:table-cell>
          <table:table-cell table:style-name="ce461" office:value-type="float" office:value="4" calcext:value-type="float">
            <text:p>4</text:p>
          </table:table-cell>
          <table:table-cell table:style-name="ce461" office:value-type="float" office:value="11" calcext:value-type="float">
            <text:p>11</text:p>
          </table:table-cell>
          <table:table-cell/>
          <table:table-cell table:style-name="ce474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474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474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474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474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7"/>
          <table:covered-table-cell table:number-columns-repeated="29" table:style-name="ce523"/>
          <table:table-cell table:style-name="ce501"/>
          <table:table-cell table:style-name="ce523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2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2" calcext:value-type="float">
            <text:p>2</text:p>
          </table:table-cell>
          <table:table-cell table:style-name="ce453" office:value-type="float" office:value="3" calcext:value-type="float">
            <text:p>3</text:p>
          </table:table-cell>
          <table:table-cell table:style-name="ce453" office:value-type="float" office:value="4" calcext:value-type="float">
            <text:p>4</text:p>
          </table:table-cell>
          <table:table-cell table:style-name="ce453" office:value-type="float" office:value="5" calcext:value-type="float">
            <text:p>5</text:p>
          </table:table-cell>
          <table:table-cell/>
          <table:table-cell table:style-name="ce72"/>
          <table:table-cell table:style-name="ce158"/>
          <table:table-cell table:style-name="ce72"/>
          <table:table-cell/>
          <table:table-cell table:style-name="ce77" table:number-columns-repeated="2"/>
          <table:covered-table-cell table:style-name="ce77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r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string" calcext:value-type="string">
            <text:p>i</text:p>
          </table:table-cell>
          <table:table-cell/>
          <table:table-cell table:style-name="ce504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7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9" calcext:value-type="float">
            <text:p>9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3" calcext:value-type="float">
            <text:p>3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2]" office:value-type="float" office:value="5" calcext:value-type="float">
            <text:p>5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3" calcext:value-type="float">
            <text:p>3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95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95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7" calcext:value-type="float">
            <text:p>7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5" calcext:value-type="float">
            <text:p>5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95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95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95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95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95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95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95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95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95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95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4" calcext:value-type="float">
            <text:p>14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405" office:value-type="float" office:value="14" calcext:value-type="float">
            <text:p>14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95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95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95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95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95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5"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6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0" calcext:value-type="float">
            <text:p>10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00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00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00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0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0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6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"/>
          <table:table-cell table:style-name="ce12" table:formula="of:=[.$T$3]" office:value-type="float" office:value="8" calcext:value-type="float">
            <text:p>8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12" table:formula="of:=[.$U$3]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3]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3]" office:value-type="float" office:value="1" calcext:value-type="float">
            <text:p>1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3]" office:value-type="float" office:value="7" calcext:value-type="float">
            <text:p>7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00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0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0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2" calcext:value-type="float">
            <text:p>12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4" calcext:value-type="float">
            <text:p>14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00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0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00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00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0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00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5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9" calcext:value-type="float">
            <text:p>9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9" calcext:value-type="float">
            <text:p>9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2" calcext:value-type="float">
            <text:p>12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0" calcext:value-type="float">
            <text:p>10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03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03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3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03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3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2" calcext:value-type="float">
            <text:p>2</text:p>
          </table:table-cell>
          <table:table-cell table:style-name="ce521" office:value-type="float" office:value="9" calcext:value-type="float">
            <text:p>9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3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3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3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03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03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3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03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3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3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3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4]" office:value-type="float" office:value="9" calcext:value-type="float">
            <text:p>9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3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3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3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3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9" table:number-columns-spanned="29" table:number-rows-spanned="3"/>
          <table:covered-table-cell table:number-columns-repeated="28" table:style-name="ce390"/>
          <table:table-cell table:style-name="ce523"/>
          <table:table-cell table:style-name="ce52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523"/>
          <table:table-cell table:number-columns-repeated="2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covered-table-cell table:number-columns-repeated="29" table:style-name="ce390"/>
          <table:table-cell table:style-name="ce523"/>
          <table:covered-table-cell table:number-columns-repeated="29" table:style-name="ce523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"/>
          <table:covered-table-cell table:number-columns-repeated="29" table:style-name="ce390"/>
          <table:table-cell table:style-name="ce523"/>
          <table:covered-table-cell table:number-columns-repeated="29" table:style-name="ce523"/>
          <table:table-cell table:number-columns-repeated="2"/>
          <table:table-cell table:style-name="ce5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22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88" table:formula="of:=HLOOKUP([.B8];[.$AF$25:.$AW$26];2;0)" office:value-type="float" office:value="4.5" calcext:value-type="float">
            <text:p>4.5</text:p>
          </table:table-cell>
          <table:table-cell table:style-name="ce404" table:formula="of:=HLOOKUP([.C8];[.$AF$25:.$AW$26];2;0)" office:value-type="float" office:value="1.1" calcext:value-type="float">
            <text:p>1.1</text:p>
          </table:table-cell>
          <table:table-cell table:style-name="ce409" table:formula="of:=HLOOKUP([.D8];[.$AF$25:.$AW$26];2;0)" office:value-type="float" office:value="1.2" calcext:value-type="float">
            <text:p>1.2</text:p>
          </table:table-cell>
          <table:table-cell table:style-name="ce413" table:formula="of:=HLOOKUP([.E8];[.$AF$25:.$AW$26];2;0)" office:value-type="float" office:value="1.3" calcext:value-type="float">
            <text:p>1.3</text:p>
          </table:table-cell>
          <table:table-cell table:style-name="ce413" table:formula="of:=HLOOKUP([.F8];[.$AF$25:.$AW$26];2;0)" office:value-type="float" office:value="2" calcext:value-type="float">
            <text:p>2.0</text:p>
          </table:table-cell>
          <table:table-cell table:style-name="ce53"/>
          <table:table-cell table:style-name="ce416" table:formula="of:=HLOOKUP([.H8];[.$AF$25:.$AW$26];2;0)" office:value-type="float" office:value="3" calcext:value-type="float">
            <text:p>3.0</text:p>
          </table:table-cell>
          <table:table-cell table:style-name="ce420" table:formula="of:=HLOOKUP([.I8];[.$AF$25:.$AW$26];2;0)" office:value-type="float" office:value="2.1" calcext:value-type="float">
            <text:p>2.1</text:p>
          </table:table-cell>
          <table:table-cell table:style-name="ce431" table:formula="of:=HLOOKUP([.J8];[.$AF$25:.$AW$26];2;0)" office:value-type="float" office:value="1.1" calcext:value-type="float">
            <text:p>1.1</text:p>
          </table:table-cell>
          <table:table-cell table:style-name="ce434" table:formula="of:=HLOOKUP([.K8];[.$AF$25:.$AW$26];2;0)" office:value-type="float" office:value="1.2" calcext:value-type="float">
            <text:p>1.2</text:p>
          </table:table-cell>
          <table:table-cell table:style-name="ce434" table:formula="of:=HLOOKUP([.L8];[.$AF$25:.$AW$26];2;0)" office:value-type="float" office:value="1.6" calcext:value-type="float">
            <text:p>1.6</text:p>
          </table:table-cell>
          <table:table-cell table:style-name="ce53"/>
          <table:table-cell table:style-name="ce437" table:formula="of:=HLOOKUP([.N8];[.$AF$25:.$AW$26];2;0)" office:value-type="float" office:value="2.3" calcext:value-type="float">
            <text:p>2.3</text:p>
          </table:table-cell>
          <table:table-cell table:style-name="ce445" table:formula="of:=HLOOKUP([.O8];[.$AF$25:.$AW$26];2;0)" office:value-type="float" office:value="1.2" calcext:value-type="float">
            <text:p>1.2</text:p>
          </table:table-cell>
          <table:table-cell table:style-name="ce441" table:formula="of:=HLOOKUP([.P8];[.$AF$25:.$AW$26];2;0)" office:value-type="float" office:value="1.3" calcext:value-type="float">
            <text:p>1.3</text:p>
          </table:table-cell>
          <table:table-cell table:style-name="ce456" table:formula="of:=HLOOKUP([.Q8];[.$AF$25:.$AW$26];2;0)" office:value-type="float" office:value="1.1" calcext:value-type="float">
            <text:p>1.1</text:p>
          </table:table-cell>
          <table:table-cell table:style-name="ce456" table:formula="of:=HLOOKUP([.R8];[.$AF$25:.$AW$26];2;0)" office:value-type="float" office:value="2.2" calcext:value-type="float">
            <text:p>2.2</text:p>
          </table:table-cell>
          <table:table-cell table:style-name="ce53"/>
          <table:table-cell table:style-name="ce466" table:formula="of:=HLOOKUP([.T8];[.$AF$25:.$AW$26];2;0)" office:value-type="float" office:value="1.3" calcext:value-type="float">
            <text:p>1.3</text:p>
          </table:table-cell>
          <table:table-cell table:style-name="ce472" table:formula="of:=HLOOKUP([.U8];[.$AF$25:.$AW$26];2;0)" office:value-type="float" office:value="1.2" calcext:value-type="float">
            <text:p>1.2</text:p>
          </table:table-cell>
          <table:table-cell table:style-name="ce479" table:formula="of:=HLOOKUP([.V8];[.$AF$25:.$AW$26];2;0)" office:value-type="float" office:value="1.1" calcext:value-type="float">
            <text:p>1.1</text:p>
          </table:table-cell>
          <table:table-cell table:style-name="ce483" table:formula="of:=HLOOKUP([.W8];[.$AF$25:.$AW$26];2;0)" office:value-type="float" office:value="2" calcext:value-type="float">
            <text:p>2.0</text:p>
          </table:table-cell>
          <table:table-cell table:style-name="ce484" table:formula="of:=HLOOKUP([.X8];[.$AF$25:.$AW$26];2;0)" office:value-type="float" office:value="2.2" calcext:value-type="float">
            <text:p>2.2</text:p>
          </table:table-cell>
          <table:table-cell table:style-name="ce53"/>
          <table:table-cell table:style-name="ce476" table:formula="of:=HLOOKUP([.Z8];[.$AF$25:.$AW$26];2;0)" office:value-type="float" office:value="2.2" calcext:value-type="float">
            <text:p>2.2</text:p>
          </table:table-cell>
          <table:table-cell table:style-name="ce482" table:formula="of:=HLOOKUP([.AA8];[.$AF$25:.$AW$26];2;0)" office:value-type="float" office:value="1.3" calcext:value-type="float">
            <text:p>1.3</text:p>
          </table:table-cell>
          <table:table-cell table:style-name="ce485" table:formula="of:=HLOOKUP([.AB8];[.$AF$25:.$AW$26];2;0)" office:value-type="float" office:value="1.2" calcext:value-type="float">
            <text:p>1.2</text:p>
          </table:table-cell>
          <table:table-cell table:style-name="ce488" table:formula="of:=HLOOKUP([.AC8];[.$AF$25:.$AW$26];2;0)" office:value-type="float" office:value="1.1" calcext:value-type="float">
            <text:p>1.1</text:p>
          </table:table-cell>
          <table:table-cell table:style-name="ce491" table:formula="of:=HLOOKUP([.AD8];[.$AF$25:.$AW$26];2;0)" office:value-type="float" office:value="4" calcext:value-type="float">
            <text:p>4.0</text:p>
          </table:table-cell>
          <table:table-cell table:style-name="ce5"/>
          <table:table-cell table:style-name="ce496" office:value-type="float" office:value="0" calcext:value-type="float">
            <text:p>0</text:p>
          </table:table-cell>
          <table:table-cell table:style-name="ce496" office:value-type="float" office:value="1" calcext:value-type="float">
            <text:p>1</text:p>
          </table:table-cell>
          <table:table-cell table:style-name="ce496" office:value-type="float" office:value="2" calcext:value-type="float">
            <text:p>2</text:p>
          </table:table-cell>
          <table:table-cell table:style-name="ce496" office:value-type="float" office:value="3" calcext:value-type="float">
            <text:p>3</text:p>
          </table:table-cell>
          <table:table-cell table:style-name="ce498" office:value-type="float" office:value="4" calcext:value-type="float">
            <text:p>4</text:p>
          </table:table-cell>
          <table:table-cell table:style-name="ce498" office:value-type="float" office:value="5" calcext:value-type="float">
            <text:p>5</text:p>
          </table:table-cell>
          <table:table-cell table:style-name="ce498" office:value-type="float" office:value="6" calcext:value-type="float">
            <text:p>6</text:p>
          </table:table-cell>
          <table:table-cell table:style-name="ce498" office:value-type="float" office:value="7" calcext:value-type="float">
            <text:p>7</text:p>
          </table:table-cell>
          <table:table-cell table:style-name="ce498" office:value-type="float" office:value="8" calcext:value-type="float">
            <text:p>8</text:p>
          </table:table-cell>
          <table:table-cell table:style-name="ce499" office:value-type="float" office:value="9" calcext:value-type="float">
            <text:p>9</text:p>
          </table:table-cell>
          <table:table-cell table:style-name="ce499" office:value-type="float" office:value="10" calcext:value-type="float">
            <text:p>10</text:p>
          </table:table-cell>
          <table:table-cell table:style-name="ce500" office:value-type="float" office:value="11" calcext:value-type="float">
            <text:p>11</text:p>
          </table:table-cell>
          <table:table-cell table:style-name="ce500" office:value-type="float" office:value="12" calcext:value-type="float">
            <text:p>12</text:p>
          </table:table-cell>
          <table:table-cell table:style-name="ce500" office:value-type="float" office:value="13" calcext:value-type="float">
            <text:p>13</text:p>
          </table:table-cell>
          <table:table-cell table:style-name="ce500" office:value-type="float" office:value="14" calcext:value-type="float">
            <text:p>14</text:p>
          </table:table-cell>
          <table:table-cell table:number-columns-repeated="16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3" table:formula="of:=HLOOKUP([.B9];[.$AF$25:.$AW$26];2;0)" office:value-type="float" office:value="3" calcext:value-type="float">
            <text:p>3.0</text:p>
          </table:table-cell>
          <table:table-cell table:style-name="ce404" table:formula="of:=HLOOKUP([.C9];[.$AF$25:.$AW$26];2;0)" office:value-type="float" office:value="2.3" calcext:value-type="float">
            <text:p>2.3</text:p>
          </table:table-cell>
          <table:table-cell table:style-name="ce409" table:formula="of:=HLOOKUP([.D9];[.$AF$25:.$AW$26];2;0)" office:value-type="float" office:value="2.2" calcext:value-type="float">
            <text:p>2.2</text:p>
          </table:table-cell>
          <table:table-cell table:style-name="ce413" table:formula="of:=HLOOKUP([.E9];[.$AF$25:.$AW$26];2;0)" office:value-type="float" office:value="1.6" calcext:value-type="float">
            <text:p>1.6</text:p>
          </table:table-cell>
          <table:table-cell table:style-name="ce413" table:formula="of:=HLOOKUP([.F9];[.$AF$25:.$AW$26];2;0)" office:value-type="float" office:value="2.1" calcext:value-type="float">
            <text:p>2.1</text:p>
          </table:table-cell>
          <table:table-cell table:style-name="ce53"/>
          <table:table-cell table:style-name="ce417" table:formula="of:=HLOOKUP([.H9];[.$AF$25:.$AW$26];2;0)" office:value-type="float" office:value="2.3" calcext:value-type="float">
            <text:p>2.3</text:p>
          </table:table-cell>
          <table:table-cell table:style-name="ce425" table:formula="of:=HLOOKUP([.I9];[.$AF$25:.$AW$26];2;0)" office:value-type="float" office:value="2.2" calcext:value-type="float">
            <text:p>2.2</text:p>
          </table:table-cell>
          <table:table-cell table:style-name="ce431" table:formula="of:=HLOOKUP([.J9];[.$AF$25:.$AW$26];2;0)" office:value-type="float" office:value="2.1" calcext:value-type="float">
            <text:p>2.1</text:p>
          </table:table-cell>
          <table:table-cell table:style-name="ce434" table:formula="of:=HLOOKUP([.K9];[.$AF$25:.$AW$26];2;0)" office:value-type="float" office:value="1.3" calcext:value-type="float">
            <text:p>1.3</text:p>
          </table:table-cell>
          <table:table-cell table:style-name="ce434" table:formula="of:=HLOOKUP([.L9];[.$AF$25:.$AW$26];2;0)" office:value-type="float" office:value="2" calcext:value-type="float">
            <text:p>2.0</text:p>
          </table:table-cell>
          <table:table-cell table:style-name="ce53"/>
          <table:table-cell table:style-name="ce438" table:formula="of:=HLOOKUP([.N9];[.$AF$25:.$AW$26];2;0)" office:value-type="float" office:value="2.1" calcext:value-type="float">
            <text:p>2.1</text:p>
          </table:table-cell>
          <table:table-cell table:style-name="ce445" table:formula="of:=HLOOKUP([.O9];[.$AF$25:.$AW$26];2;0)" office:value-type="float" office:value="1.6" calcext:value-type="float">
            <text:p>1.6</text:p>
          </table:table-cell>
          <table:table-cell table:style-name="ce450" table:formula="of:=HLOOKUP([.P9];[.$AF$25:.$AW$26];2;0)" office:value-type="float" office:value="2" calcext:value-type="float">
            <text:p>2.0</text:p>
          </table:table-cell>
          <table:table-cell table:style-name="ce456" table:formula="of:=HLOOKUP([.Q9];[.$AF$25:.$AW$26];2;0)" office:value-type="float" office:value="1.3" calcext:value-type="float">
            <text:p>1.3</text:p>
          </table:table-cell>
          <table:table-cell table:style-name="ce456" table:formula="of:=HLOOKUP([.R9];[.$AF$25:.$AW$26];2;0)" office:value-type="float" office:value="3" calcext:value-type="float">
            <text:p>3.0</text:p>
          </table:table-cell>
          <table:table-cell table:style-name="ce53"/>
          <table:table-cell table:style-name="ce467" table:formula="of:=HLOOKUP([.T9];[.$AF$25:.$AW$26];2;0)" office:value-type="float" office:value="2" calcext:value-type="float">
            <text:p>2.0</text:p>
          </table:table-cell>
          <table:table-cell table:style-name="ce472" table:formula="of:=HLOOKUP([.U9];[.$AF$25:.$AW$26];2;0)" office:value-type="float" office:value="2.1" calcext:value-type="float">
            <text:p>2.1</text:p>
          </table:table-cell>
          <table:table-cell table:style-name="ce479" table:formula="of:=HLOOKUP([.V9];[.$AF$25:.$AW$26];2;0)" office:value-type="float" office:value="2.3" calcext:value-type="float">
            <text:p>2.3</text:p>
          </table:table-cell>
          <table:table-cell table:style-name="ce484" table:formula="of:=HLOOKUP([.W9];[.$AF$25:.$AW$26];2;0)" office:value-type="float" office:value="1.6" calcext:value-type="float">
            <text:p>1.6</text:p>
          </table:table-cell>
          <table:table-cell table:style-name="ce484" table:formula="of:=HLOOKUP([.X9];[.$AF$25:.$AW$26];2;0)" office:value-type="float" office:value="3" calcext:value-type="float">
            <text:p>3.0</text:p>
          </table:table-cell>
          <table:table-cell table:style-name="ce53"/>
          <table:table-cell table:style-name="ce477" table:formula="of:=HLOOKUP([.Z9];[.$AF$25:.$AW$26];2;0)" office:value-type="float" office:value="2.1" calcext:value-type="float">
            <text:p>2.1</text:p>
          </table:table-cell>
          <table:table-cell table:style-name="ce482" table:formula="of:=HLOOKUP([.AA9];[.$AF$25:.$AW$26];2;0)" office:value-type="float" office:value="2" calcext:value-type="float">
            <text:p>2.0</text:p>
          </table:table-cell>
          <table:table-cell table:style-name="ce485" table:formula="of:=HLOOKUP([.AB9];[.$AF$25:.$AW$26];2;0)" office:value-type="float" office:value="1.6" calcext:value-type="float">
            <text:p>1.6</text:p>
          </table:table-cell>
          <table:table-cell table:style-name="ce488" table:formula="of:=HLOOKUP([.AC9];[.$AF$25:.$AW$26];2;0)" office:value-type="float" office:value="3" calcext:value-type="float">
            <text:p>3.0</text:p>
          </table:table-cell>
          <table:table-cell table:style-name="ce488" table:formula="of:=HLOOKUP([.AD9];[.$AF$25:.$AW$26];2;0)" office:value-type="float" office:value="2.3" calcext:value-type="float">
            <text:p>2.3</text:p>
          </table:table-cell>
          <table:table-cell table:style-name="ce5"/>
          <table:table-cell table:style-name="ce529" office:value-type="float" office:value="1" calcext:value-type="float">
            <text:p>1.0</text:p>
          </table:table-cell>
          <table:table-cell table:style-name="ce529" office:value-type="float" office:value="1.1" calcext:value-type="float">
            <text:p>1.1</text:p>
          </table:table-cell>
          <table:table-cell table:style-name="ce529" office:value-type="float" office:value="1.2" calcext:value-type="float">
            <text:p>1.2</text:p>
          </table:table-cell>
          <table:table-cell table:style-name="ce529" office:value-type="float" office:value="1.3" calcext:value-type="float">
            <text:p>1.3</text:p>
          </table:table-cell>
          <table:table-cell table:style-name="ce529" office:value-type="float" office:value="1.6" calcext:value-type="float">
            <text:p>1.6</text:p>
          </table:table-cell>
          <table:table-cell table:style-name="ce529" office:value-type="float" office:value="2" calcext:value-type="float">
            <text:p>2.0</text:p>
          </table:table-cell>
          <table:table-cell table:style-name="ce529" office:value-type="float" office:value="2.1" calcext:value-type="float">
            <text:p>2.1</text:p>
          </table:table-cell>
          <table:table-cell table:style-name="ce529" office:value-type="float" office:value="2.2" calcext:value-type="float">
            <text:p>2.2</text:p>
          </table:table-cell>
          <table:table-cell table:style-name="ce529" office:value-type="float" office:value="2.3" calcext:value-type="float">
            <text:p>2.3</text:p>
          </table:table-cell>
          <table:table-cell table:style-name="ce529" office:value-type="float" office:value="3" calcext:value-type="float">
            <text:p>3.0</text:p>
          </table:table-cell>
          <table:table-cell table:style-name="ce529" office:value-type="float" office:value="3.1" calcext:value-type="float">
            <text:p>3.1</text:p>
          </table:table-cell>
          <table:table-cell table:style-name="ce529" office:value-type="float" office:value="3.2" calcext:value-type="float">
            <text:p>3.2</text:p>
          </table:table-cell>
          <table:table-cell table:style-name="ce529" office:value-type="float" office:value="3.5" calcext:value-type="float">
            <text:p>3.5</text:p>
          </table:table-cell>
          <table:table-cell table:style-name="ce529" office:value-type="float" office:value="4" calcext:value-type="float">
            <text:p>4.0</text:p>
          </table:table-cell>
          <table:table-cell table:style-name="ce529" office:value-type="float" office:value="4.5" calcext:value-type="float">
            <text:p>4.5</text:p>
          </table:table-cell>
          <table:table-cell table:number-columns-repeated="16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3" table:formula="of:=HLOOKUP([.B10];[.$AF$25:.$AW$26];2;0)" office:value-type="float" office:value="3.5" calcext:value-type="float">
            <text:p>3.5</text:p>
          </table:table-cell>
          <table:table-cell table:style-name="ce404" table:formula="of:=HLOOKUP([.C10];[.$AF$25:.$AW$26];2;0)" office:value-type="float" office:value="4" calcext:value-type="float">
            <text:p>4.0</text:p>
          </table:table-cell>
          <table:table-cell table:style-name="ce409" table:formula="of:=HLOOKUP([.D10];[.$AF$25:.$AW$26];2;0)" office:value-type="float" office:value="4.5" calcext:value-type="float">
            <text:p>4.5</text:p>
          </table:table-cell>
          <table:table-cell table:style-name="ce413" table:formula="of:=HLOOKUP([.E10];[.$AF$25:.$AW$26];2;0)" office:value-type="float" office:value="3.1" calcext:value-type="float">
            <text:p>3.1</text:p>
          </table:table-cell>
          <table:table-cell table:style-name="ce413" table:formula="of:=HLOOKUP([.F10];[.$AF$25:.$AW$26];2;0)" office:value-type="float" office:value="3.2" calcext:value-type="float">
            <text:p>3.2</text:p>
          </table:table-cell>
          <table:table-cell table:style-name="ce53"/>
          <table:table-cell table:style-name="ce417" table:formula="of:=HLOOKUP([.H10];[.$AF$25:.$AW$26];2;0)" office:value-type="float" office:value="4" calcext:value-type="float">
            <text:p>4.0</text:p>
          </table:table-cell>
          <table:table-cell table:style-name="ce425" table:formula="of:=HLOOKUP([.I10];[.$AF$25:.$AW$26];2;0)" office:value-type="float" office:value="4.5" calcext:value-type="float">
            <text:p>4.5</text:p>
          </table:table-cell>
          <table:table-cell table:style-name="ce431" table:formula="of:=HLOOKUP([.J10];[.$AF$25:.$AW$26];2;0)" office:value-type="float" office:value="3.5" calcext:value-type="float">
            <text:p>3.5</text:p>
          </table:table-cell>
          <table:table-cell table:style-name="ce434" table:formula="of:=HLOOKUP([.K10];[.$AF$25:.$AW$26];2;0)" office:value-type="float" office:value="3.1" calcext:value-type="float">
            <text:p>3.1</text:p>
          </table:table-cell>
          <table:table-cell table:style-name="ce434" table:formula="of:=HLOOKUP([.L10];[.$AF$25:.$AW$26];2;0)" office:value-type="float" office:value="3.2" calcext:value-type="float">
            <text:p>3.2</text:p>
          </table:table-cell>
          <table:table-cell table:style-name="ce53"/>
          <table:table-cell table:style-name="ce438" table:formula="of:=HLOOKUP([.N10];[.$AF$25:.$AW$26];2;0)" office:value-type="float" office:value="4.5" calcext:value-type="float">
            <text:p>4.5</text:p>
          </table:table-cell>
          <table:table-cell table:style-name="ce445" table:formula="of:=HLOOKUP([.O10];[.$AF$25:.$AW$26];2;0)" office:value-type="float" office:value="3.5" calcext:value-type="float">
            <text:p>3.5</text:p>
          </table:table-cell>
          <table:table-cell table:style-name="ce450" table:formula="of:=HLOOKUP([.P10];[.$AF$25:.$AW$26];2;0)" office:value-type="float" office:value="3.1" calcext:value-type="float">
            <text:p>3.1</text:p>
          </table:table-cell>
          <table:table-cell table:style-name="ce456" table:formula="of:=HLOOKUP([.Q10];[.$AF$25:.$AW$26];2;0)" office:value-type="float" office:value="3.2" calcext:value-type="float">
            <text:p>3.2</text:p>
          </table:table-cell>
          <table:table-cell table:style-name="ce456" table:formula="of:=HLOOKUP([.R10];[.$AF$25:.$AW$26];2;0)" office:value-type="float" office:value="4" calcext:value-type="float">
            <text:p>4.0</text:p>
          </table:table-cell>
          <table:table-cell table:style-name="ce53"/>
          <table:table-cell table:style-name="ce467" table:formula="of:=HLOOKUP([.T10];[.$AF$25:.$AW$26];2;0)" office:value-type="float" office:value="4.5" calcext:value-type="float">
            <text:p>4.5</text:p>
          </table:table-cell>
          <table:table-cell table:style-name="ce472" table:formula="of:=HLOOKUP([.U10];[.$AF$25:.$AW$26];2;0)" office:value-type="float" office:value="4" calcext:value-type="float">
            <text:p>4.0</text:p>
          </table:table-cell>
          <table:table-cell table:style-name="ce479" table:formula="of:=HLOOKUP([.V10];[.$AF$25:.$AW$26];2;0)" office:value-type="float" office:value="3.5" calcext:value-type="float">
            <text:p>3.5</text:p>
          </table:table-cell>
          <table:table-cell table:style-name="ce484" table:formula="of:=HLOOKUP([.W10];[.$AF$25:.$AW$26];2;0)" office:value-type="float" office:value="3.1" calcext:value-type="float">
            <text:p>3.1</text:p>
          </table:table-cell>
          <table:table-cell table:style-name="ce484" table:formula="of:=HLOOKUP([.X10];[.$AF$25:.$AW$26];2;0)" office:value-type="float" office:value="3.2" calcext:value-type="float">
            <text:p>3.2</text:p>
          </table:table-cell>
          <table:table-cell table:style-name="ce53"/>
          <table:table-cell table:style-name="ce477" table:formula="of:=HLOOKUP([.Z10];[.$AF$25:.$AW$26];2;0)" office:value-type="float" office:value="3.1" calcext:value-type="float">
            <text:p>3.1</text:p>
          </table:table-cell>
          <table:table-cell table:style-name="ce482" table:formula="of:=HLOOKUP([.AA10];[.$AF$25:.$AW$26];2;0)" office:value-type="float" office:value="3.2" calcext:value-type="float">
            <text:p>3.2</text:p>
          </table:table-cell>
          <table:table-cell table:style-name="ce485" table:formula="of:=HLOOKUP([.AB10];[.$AF$25:.$AW$26];2;0)" office:value-type="float" office:value="3.5" calcext:value-type="float">
            <text:p>3.5</text:p>
          </table:table-cell>
          <table:table-cell table:style-name="ce488" table:formula="of:=HLOOKUP([.AC10];[.$AF$25:.$AW$26];2;0)" office:value-type="float" office:value="4" calcext:value-type="float">
            <text:p>4.0</text:p>
          </table:table-cell>
          <table:table-cell table:style-name="ce488" table:formula="of:=HLOOKUP([.AD10];[.$AF$25:.$AW$26];2;0)" office:value-type="float" office:value="4.5" calcext:value-type="float">
            <text:p>4.5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0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4" table:formula="of:=HLOOKUP([.B12];[.$AF$25:.$AW$26];2;0)" office:value-type="float" office:value="3.5" calcext:value-type="float">
            <text:p>3.5</text:p>
          </table:table-cell>
          <table:table-cell table:style-name="ce406" table:formula="of:=HLOOKUP([.C12];[.$AF$25:.$AW$26];2;0)" office:value-type="float" office:value="3.1" calcext:value-type="float">
            <text:p>3.1</text:p>
          </table:table-cell>
          <table:table-cell table:style-name="ce410" table:formula="of:=HLOOKUP([.D12];[.$AF$25:.$AW$26];2;0)" office:value-type="float" office:value="2.1" calcext:value-type="float">
            <text:p>2.1</text:p>
          </table:table-cell>
          <table:table-cell table:style-name="ce414" table:formula="of:=HLOOKUP([.E12];[.$AF$25:.$AW$26];2;0)" office:value-type="float" office:value="2" calcext:value-type="float">
            <text:p>2.0</text:p>
          </table:table-cell>
          <table:table-cell table:style-name="ce414" table:formula="of:=HLOOKUP([.F12];[.$AF$25:.$AW$26];2;0)" office:value-type="float" office:value="3" calcext:value-type="float">
            <text:p>3.0</text:p>
          </table:table-cell>
          <table:table-cell table:style-name="ce53"/>
          <table:table-cell table:style-name="ce418" table:formula="of:=HLOOKUP([.H12];[.$AF$25:.$AW$26];2;0)" office:value-type="float" office:value="4.5" calcext:value-type="float">
            <text:p>4.5</text:p>
          </table:table-cell>
          <table:table-cell table:style-name="ce426" table:formula="of:=HLOOKUP([.I12];[.$AF$25:.$AW$26];2;0)" office:value-type="float" office:value="2.2" calcext:value-type="float">
            <text:p>2.2</text:p>
          </table:table-cell>
          <table:table-cell table:style-name="ce432" table:formula="of:=HLOOKUP([.J12];[.$AF$25:.$AW$26];2;0)" office:value-type="float" office:value="1.6" calcext:value-type="float">
            <text:p>1.6</text:p>
          </table:table-cell>
          <table:table-cell table:style-name="ce435" table:formula="of:=HLOOKUP([.K12];[.$AF$25:.$AW$26];2;0)" office:value-type="float" office:value="2" calcext:value-type="float">
            <text:p>2.0</text:p>
          </table:table-cell>
          <table:table-cell table:style-name="ce435" table:formula="of:=HLOOKUP([.L12];[.$AF$25:.$AW$26];2;0)" office:value-type="float" office:value="4" calcext:value-type="float">
            <text:p>4.0</text:p>
          </table:table-cell>
          <table:table-cell table:style-name="ce53"/>
          <table:table-cell table:style-name="ce439" table:formula="of:=HLOOKUP([.N12];[.$AF$25:.$AW$26];2;0)" office:value-type="float" office:value="4.5" calcext:value-type="float">
            <text:p>4.5</text:p>
          </table:table-cell>
          <table:table-cell table:style-name="ce446" table:formula="of:=HLOOKUP([.O12];[.$AF$25:.$AW$26];2;0)" office:value-type="float" office:value="2" calcext:value-type="float">
            <text:p>2.0</text:p>
          </table:table-cell>
          <table:table-cell table:style-name="ce451" table:formula="of:=HLOOKUP([.P12];[.$AF$25:.$AW$26];2;0)" office:value-type="float" office:value="1.6" calcext:value-type="float">
            <text:p>1.6</text:p>
          </table:table-cell>
          <table:table-cell table:style-name="ce457" table:formula="of:=HLOOKUP([.Q12];[.$AF$25:.$AW$26];2;0)" office:value-type="float" office:value="2.1" calcext:value-type="float">
            <text:p>2.1</text:p>
          </table:table-cell>
          <table:table-cell table:style-name="ce457" table:formula="of:=HLOOKUP([.R12];[.$AF$25:.$AW$26];2;0)" office:value-type="float" office:value="4" calcext:value-type="float">
            <text:p>4.0</text:p>
          </table:table-cell>
          <table:table-cell table:style-name="ce53"/>
          <table:table-cell table:style-name="ce468" table:formula="of:=HLOOKUP([.T12];[.$AF$25:.$AW$26];2;0)" office:value-type="float" office:value="4" calcext:value-type="float">
            <text:p>4.0</text:p>
          </table:table-cell>
          <table:table-cell table:style-name="ce475" table:formula="of:=HLOOKUP([.U12];[.$AF$25:.$AW$26];2;0)" office:value-type="float" office:value="2" calcext:value-type="float">
            <text:p>2.0</text:p>
          </table:table-cell>
          <table:table-cell table:style-name="ce480" table:formula="of:=HLOOKUP([.V12];[.$AF$25:.$AW$26];2;0)" office:value-type="float" office:value="1.3" calcext:value-type="float">
            <text:p>1.3</text:p>
          </table:table-cell>
          <table:table-cell table:style-name="ce486" table:formula="of:=HLOOKUP([.W12];[.$AF$25:.$AW$26];2;0)" office:value-type="float" office:value="2.1" calcext:value-type="float">
            <text:p>2.1</text:p>
          </table:table-cell>
          <table:table-cell table:style-name="ce486" table:formula="of:=HLOOKUP([.X12];[.$AF$25:.$AW$26];2;0)" office:value-type="float" office:value="3.1" calcext:value-type="float">
            <text:p>3.1</text:p>
          </table:table-cell>
          <table:table-cell table:style-name="ce53"/>
          <table:table-cell table:style-name="ce505" table:formula="of:=HLOOKUP([.Z12];[.$AF$25:.$AW$26];2;0)" office:value-type="float" office:value="3.1" calcext:value-type="float">
            <text:p>3.1</text:p>
          </table:table-cell>
          <table:table-cell table:style-name="ce510" table:formula="of:=HLOOKUP([.AA12];[.$AF$25:.$AW$26];2;0)" office:value-type="float" office:value="2.2" calcext:value-type="float">
            <text:p>2.2</text:p>
          </table:table-cell>
          <table:table-cell table:style-name="ce513" table:formula="of:=HLOOKUP([.AB12];[.$AF$25:.$AW$26];2;0)" office:value-type="float" office:value="1.6" calcext:value-type="float">
            <text:p>1.6</text:p>
          </table:table-cell>
          <table:table-cell table:style-name="ce516" table:formula="of:=HLOOKUP([.AC12];[.$AF$25:.$AW$26];2;0)" office:value-type="float" office:value="1.3" calcext:value-type="float">
            <text:p>1.3</text:p>
          </table:table-cell>
          <table:table-cell table:style-name="ce516" table:formula="of:=HLOOKUP([.AD12];[.$AF$25:.$AW$26];2;0)" office:value-type="float" office:value="3" calcext:value-type="float">
            <text:p>3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1" table:formula="of:=HLOOKUP([.B13];[.$AF$25:.$AW$26];2;0)" office:value-type="float" office:value="2.3" calcext:value-type="float">
            <text:p>2.3</text:p>
          </table:table-cell>
          <table:table-cell table:style-name="ce406" table:formula="of:=HLOOKUP([.C13];[.$AF$25:.$AW$26];2;0)" office:value-type="float" office:value="1.1" calcext:value-type="float">
            <text:p>1.1</text:p>
          </table:table-cell>
          <table:table-cell table:style-name="ce410" table:formula="of:=HLOOKUP([.D13];[.$AF$25:.$AW$26];2;0)" office:value-type="float" office:value="1.2" calcext:value-type="float">
            <text:p>1.2</text:p>
          </table:table-cell>
          <table:table-cell table:style-name="ce414" table:formula="of:=HLOOKUP([.E13];[.$AF$25:.$AW$26];2;0)" office:value-type="float" office:value="1.3" calcext:value-type="float">
            <text:p>1.3</text:p>
          </table:table-cell>
          <table:table-cell table:style-name="ce414" table:formula="of:=HLOOKUP([.F13];[.$AF$25:.$AW$26];2;0)" office:value-type="float" office:value="1.6" calcext:value-type="float">
            <text:p>1.6</text:p>
          </table:table-cell>
          <table:table-cell table:style-name="ce53"/>
          <table:table-cell table:style-name="ce419" table:formula="of:=HLOOKUP([.H13];[.$AF$25:.$AW$26];2;0)" office:value-type="float" office:value="3.1" calcext:value-type="float">
            <text:p>3.1</text:p>
          </table:table-cell>
          <table:table-cell table:style-name="ce423" table:formula="of:=HLOOKUP([.I13];[.$AF$25:.$AW$26];2;0)" office:value-type="float" office:value="1.2" calcext:value-type="float">
            <text:p>1.2</text:p>
          </table:table-cell>
          <table:table-cell table:style-name="ce432" table:formula="of:=HLOOKUP([.J13];[.$AF$25:.$AW$26];2;0)" office:value-type="float" office:value="1.1" calcext:value-type="float">
            <text:p>1.1</text:p>
          </table:table-cell>
          <table:table-cell table:style-name="ce435" table:formula="of:=HLOOKUP([.K13];[.$AF$25:.$AW$26];2;0)" office:value-type="float" office:value="1.2" calcext:value-type="float">
            <text:p>1.2</text:p>
          </table:table-cell>
          <table:table-cell table:style-name="ce435" table:formula="of:=HLOOKUP([.L13];[.$AF$25:.$AW$26];2;0)" office:value-type="float" office:value="3" calcext:value-type="float">
            <text:p>3.0</text:p>
          </table:table-cell>
          <table:table-cell table:style-name="ce53"/>
          <table:table-cell table:style-name="ce440" table:formula="of:=HLOOKUP([.N13];[.$AF$25:.$AW$26];2;0)" office:value-type="float" office:value="3.1" calcext:value-type="float">
            <text:p>3.1</text:p>
          </table:table-cell>
          <table:table-cell table:style-name="ce446" table:formula="of:=HLOOKUP([.O13];[.$AF$25:.$AW$26];2;0)" office:value-type="float" office:value="1.2" calcext:value-type="float">
            <text:p>1.2</text:p>
          </table:table-cell>
          <table:table-cell table:style-name="ce444" table:formula="of:=HLOOKUP([.P13];[.$AF$25:.$AW$26];2;0)" office:value-type="float" office:value="1" calcext:value-type="float">
            <text:p>1.0</text:p>
          </table:table-cell>
          <table:table-cell table:style-name="ce457" table:formula="of:=HLOOKUP([.Q13];[.$AF$25:.$AW$26];2;0)" office:value-type="float" office:value="1.1" calcext:value-type="float">
            <text:p>1.1</text:p>
          </table:table-cell>
          <table:table-cell table:style-name="ce457" table:formula="of:=HLOOKUP([.R13];[.$AF$25:.$AW$26];2;0)" office:value-type="float" office:value="3" calcext:value-type="float">
            <text:p>3.0</text:p>
          </table:table-cell>
          <table:table-cell table:style-name="ce53"/>
          <table:table-cell table:style-name="ce469" table:formula="of:=HLOOKUP([.T13];[.$AF$25:.$AW$26];2;0)" office:value-type="float" office:value="1.6" calcext:value-type="float">
            <text:p>1.6</text:p>
          </table:table-cell>
          <table:table-cell table:style-name="ce475" table:formula="of:=HLOOKUP([.U13];[.$AF$25:.$AW$26];2;0)" office:value-type="float" office:value="1.2" calcext:value-type="float">
            <text:p>1.2</text:p>
          </table:table-cell>
          <table:table-cell table:style-name="ce480" table:formula="of:=HLOOKUP([.V13];[.$AF$25:.$AW$26];2;0)" office:value-type="float" office:value="1.1" calcext:value-type="float">
            <text:p>1.1</text:p>
          </table:table-cell>
          <table:table-cell table:style-name="ce490" table:formula="of:=HLOOKUP([.W13];[.$AF$25:.$AW$26];2;0)" office:value-type="float" office:value="1.1" calcext:value-type="float">
            <text:p>1.1</text:p>
          </table:table-cell>
          <table:table-cell table:style-name="ce486" table:formula="of:=HLOOKUP([.X13];[.$AF$25:.$AW$26];2;0)" office:value-type="float" office:value="2.3" calcext:value-type="float">
            <text:p>2.3</text:p>
          </table:table-cell>
          <table:table-cell table:style-name="ce53"/>
          <table:table-cell table:style-name="ce506" table:formula="of:=HLOOKUP([.Z13];[.$AF$25:.$AW$26];2;0)" office:value-type="float" office:value="2.1" calcext:value-type="float">
            <text:p>2.1</text:p>
          </table:table-cell>
          <table:table-cell table:style-name="ce510" table:formula="of:=HLOOKUP([.AA13];[.$AF$25:.$AW$26];2;0)" office:value-type="float" office:value="2" calcext:value-type="float">
            <text:p>2.0</text:p>
          </table:table-cell>
          <table:table-cell table:style-name="ce513" table:formula="of:=HLOOKUP([.AB13];[.$AF$25:.$AW$26];2;0)" office:value-type="float" office:value="1.2" calcext:value-type="float">
            <text:p>1.2</text:p>
          </table:table-cell>
          <table:table-cell table:style-name="ce516" table:formula="of:=HLOOKUP([.AC13];[.$AF$25:.$AW$26];2;0)" office:value-type="float" office:value="1.1" calcext:value-type="float">
            <text:p>1.1</text:p>
          </table:table-cell>
          <table:table-cell table:style-name="ce492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98" table:formula="of:=HLOOKUP([.B14];[.$AF$25:.$AW$26];2;0)" office:value-type="float" office:value="4" calcext:value-type="float">
            <text:p>4.0</text:p>
          </table:table-cell>
          <table:table-cell table:style-name="ce406" table:formula="of:=HLOOKUP([.C14];[.$AF$25:.$AW$26];2;0)" office:value-type="float" office:value="4.5" calcext:value-type="float">
            <text:p>4.5</text:p>
          </table:table-cell>
          <table:table-cell table:style-name="ce410" table:formula="of:=HLOOKUP([.D14];[.$AF$25:.$AW$26];2;0)" office:value-type="float" office:value="3.2" calcext:value-type="float">
            <text:p>3.2</text:p>
          </table:table-cell>
          <table:table-cell table:style-name="ce414" table:formula="of:=HLOOKUP([.E14];[.$AF$25:.$AW$26];2;0)" office:value-type="float" office:value="2.2" calcext:value-type="float">
            <text:p>2.2</text:p>
          </table:table-cell>
          <table:table-cell table:style-name="ce414" table:formula="of:=HLOOKUP([.F14];[.$AF$25:.$AW$26];2;0)" office:value-type="float" office:value="2.3" calcext:value-type="float">
            <text:p>2.3</text:p>
          </table:table-cell>
          <table:table-cell table:style-name="ce53"/>
          <table:table-cell table:style-name="ce419" table:formula="of:=HLOOKUP([.H14];[.$AF$25:.$AW$26];2;0)" office:value-type="float" office:value="3.5" calcext:value-type="float">
            <text:p>3.5</text:p>
          </table:table-cell>
          <table:table-cell table:style-name="ce426" table:formula="of:=HLOOKUP([.I14];[.$AF$25:.$AW$26];2;0)" office:value-type="float" office:value="2.3" calcext:value-type="float">
            <text:p>2.3</text:p>
          </table:table-cell>
          <table:table-cell table:style-name="ce432" table:formula="of:=HLOOKUP([.J14];[.$AF$25:.$AW$26];2;0)" office:value-type="float" office:value="2.1" calcext:value-type="float">
            <text:p>2.1</text:p>
          </table:table-cell>
          <table:table-cell table:style-name="ce435" table:formula="of:=HLOOKUP([.K14];[.$AF$25:.$AW$26];2;0)" office:value-type="float" office:value="1.3" calcext:value-type="float">
            <text:p>1.3</text:p>
          </table:table-cell>
          <table:table-cell table:style-name="ce435" table:formula="of:=HLOOKUP([.L14];[.$AF$25:.$AW$26];2;0)" office:value-type="float" office:value="3.2" calcext:value-type="float">
            <text:p>3.2</text:p>
          </table:table-cell>
          <table:table-cell table:style-name="ce53"/>
          <table:table-cell table:style-name="ce440" table:formula="of:=HLOOKUP([.N14];[.$AF$25:.$AW$26];2;0)" office:value-type="float" office:value="3.2" calcext:value-type="float">
            <text:p>3.2</text:p>
          </table:table-cell>
          <table:table-cell table:style-name="ce446" table:formula="of:=HLOOKUP([.O14];[.$AF$25:.$AW$26];2;0)" office:value-type="float" office:value="2.2" calcext:value-type="float">
            <text:p>2.2</text:p>
          </table:table-cell>
          <table:table-cell table:style-name="ce451" table:formula="of:=HLOOKUP([.P14];[.$AF$25:.$AW$26];2;0)" office:value-type="float" office:value="2.3" calcext:value-type="float">
            <text:p>2.3</text:p>
          </table:table-cell>
          <table:table-cell table:style-name="ce457" table:formula="of:=HLOOKUP([.Q14];[.$AF$25:.$AW$26];2;0)" office:value-type="float" office:value="1.3" calcext:value-type="float">
            <text:p>1.3</text:p>
          </table:table-cell>
          <table:table-cell table:style-name="ce457" table:formula="of:=HLOOKUP([.R14];[.$AF$25:.$AW$26];2;0)" office:value-type="float" office:value="3.5" calcext:value-type="float">
            <text:p>3.5</text:p>
          </table:table-cell>
          <table:table-cell table:style-name="ce53"/>
          <table:table-cell table:style-name="ce469" table:formula="of:=HLOOKUP([.T14];[.$AF$25:.$AW$26];2;0)" office:value-type="float" office:value="3.5" calcext:value-type="float">
            <text:p>3.5</text:p>
          </table:table-cell>
          <table:table-cell table:style-name="ce475" table:formula="of:=HLOOKUP([.U14];[.$AF$25:.$AW$26];2;0)" office:value-type="float" office:value="4.5" calcext:value-type="float">
            <text:p>4.5</text:p>
          </table:table-cell>
          <table:table-cell table:style-name="ce480" table:formula="of:=HLOOKUP([.V14];[.$AF$25:.$AW$26];2;0)" office:value-type="float" office:value="3.2" calcext:value-type="float">
            <text:p>3.2</text:p>
          </table:table-cell>
          <table:table-cell table:style-name="ce486" table:formula="of:=HLOOKUP([.W14];[.$AF$25:.$AW$26];2;0)" office:value-type="float" office:value="2.2" calcext:value-type="float">
            <text:p>2.2</text:p>
          </table:table-cell>
          <table:table-cell table:style-name="ce486" table:formula="of:=HLOOKUP([.X14];[.$AF$25:.$AW$26];2;0)" office:value-type="float" office:value="3" calcext:value-type="float">
            <text:p>3.0</text:p>
          </table:table-cell>
          <table:table-cell table:style-name="ce53"/>
          <table:table-cell table:style-name="ce506" table:formula="of:=HLOOKUP([.Z14];[.$AF$25:.$AW$26];2;0)" office:value-type="float" office:value="3.5" calcext:value-type="float">
            <text:p>3.5</text:p>
          </table:table-cell>
          <table:table-cell table:style-name="ce510" table:formula="of:=HLOOKUP([.AA14];[.$AF$25:.$AW$26];2;0)" office:value-type="float" office:value="4" calcext:value-type="float">
            <text:p>4.0</text:p>
          </table:table-cell>
          <table:table-cell table:style-name="ce513" table:formula="of:=HLOOKUP([.AB14];[.$AF$25:.$AW$26];2;0)" office:value-type="float" office:value="4.5" calcext:value-type="float">
            <text:p>4.5</text:p>
          </table:table-cell>
          <table:table-cell table:style-name="ce516" table:formula="of:=HLOOKUP([.AC14];[.$AF$25:.$AW$26];2;0)" office:value-type="float" office:value="3.2" calcext:value-type="float">
            <text:p>3.2</text:p>
          </table:table-cell>
          <table:table-cell table:style-name="ce516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3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0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99" table:formula="of:=HLOOKUP([.B16];[.$AF$25:.$AW$26];2;0)" office:value-type="float" office:value="4" calcext:value-type="float">
            <text:p>4.0</text:p>
          </table:table-cell>
          <table:table-cell table:style-name="ce407" table:formula="of:=HLOOKUP([.C16];[.$AF$25:.$AW$26];2;0)" office:value-type="float" office:value="4.5" calcext:value-type="float">
            <text:p>4.5</text:p>
          </table:table-cell>
          <table:table-cell table:style-name="ce411" table:formula="of:=HLOOKUP([.D16];[.$AF$25:.$AW$26];2;0)" office:value-type="float" office:value="3.5" calcext:value-type="float">
            <text:p>3.5</text:p>
          </table:table-cell>
          <table:table-cell table:style-name="ce415" table:formula="of:=HLOOKUP([.E16];[.$AF$25:.$AW$26];2;0)" office:value-type="float" office:value="3.2" calcext:value-type="float">
            <text:p>3.2</text:p>
          </table:table-cell>
          <table:table-cell table:style-name="ce415" table:formula="of:=HLOOKUP([.F16];[.$AF$25:.$AW$26];2;0)" office:value-type="float" office:value="3.1" calcext:value-type="float">
            <text:p>3.1</text:p>
          </table:table-cell>
          <table:table-cell table:style-name="ce53"/>
          <table:table-cell table:style-name="ce421" table:formula="of:=HLOOKUP([.H16];[.$AF$25:.$AW$26];2;0)" office:value-type="float" office:value="4.5" calcext:value-type="float">
            <text:p>4.5</text:p>
          </table:table-cell>
          <table:table-cell table:style-name="ce429" table:formula="of:=HLOOKUP([.I16];[.$AF$25:.$AW$26];2;0)" office:value-type="float" office:value="3.5" calcext:value-type="float">
            <text:p>3.5</text:p>
          </table:table-cell>
          <table:table-cell table:style-name="ce433" table:formula="of:=HLOOKUP([.J16];[.$AF$25:.$AW$26];2;0)" office:value-type="float" office:value="3" calcext:value-type="float">
            <text:p>3.0</text:p>
          </table:table-cell>
          <table:table-cell table:style-name="ce436" table:formula="of:=HLOOKUP([.K16];[.$AF$25:.$AW$26];2;0)" office:value-type="float" office:value="3.1" calcext:value-type="float">
            <text:p>3.1</text:p>
          </table:table-cell>
          <table:table-cell table:style-name="ce436" table:formula="of:=HLOOKUP([.L16];[.$AF$25:.$AW$26];2;0)" office:value-type="float" office:value="3.2" calcext:value-type="float">
            <text:p>3.2</text:p>
          </table:table-cell>
          <table:table-cell table:style-name="ce53"/>
          <table:table-cell table:style-name="ce442" table:formula="of:=HLOOKUP([.N16];[.$AF$25:.$AW$26];2;0)" office:value-type="float" office:value="4.5" calcext:value-type="float">
            <text:p>4.5</text:p>
          </table:table-cell>
          <table:table-cell table:style-name="ce447" table:formula="of:=HLOOKUP([.O16];[.$AF$25:.$AW$26];2;0)" office:value-type="float" office:value="4" calcext:value-type="float">
            <text:p>4.0</text:p>
          </table:table-cell>
          <table:table-cell table:style-name="ce454" table:formula="of:=HLOOKUP([.P16];[.$AF$25:.$AW$26];2;0)" office:value-type="float" office:value="3" calcext:value-type="float">
            <text:p>3.0</text:p>
          </table:table-cell>
          <table:table-cell table:style-name="ce458" table:formula="of:=HLOOKUP([.Q16];[.$AF$25:.$AW$26];2;0)" office:value-type="float" office:value="3.1" calcext:value-type="float">
            <text:p>3.1</text:p>
          </table:table-cell>
          <table:table-cell table:style-name="ce458" table:formula="of:=HLOOKUP([.R16];[.$AF$25:.$AW$26];2;0)" office:value-type="float" office:value="3.5" calcext:value-type="float">
            <text:p>3.5</text:p>
          </table:table-cell>
          <table:table-cell table:style-name="ce53"/>
          <table:table-cell table:style-name="ce470" table:formula="of:=HLOOKUP([.T16];[.$AF$25:.$AW$26];2;0)" office:value-type="float" office:value="4.5" calcext:value-type="float">
            <text:p>4.5</text:p>
          </table:table-cell>
          <table:table-cell table:style-name="ce478" table:formula="of:=HLOOKUP([.U16];[.$AF$25:.$AW$26];2;0)" office:value-type="float" office:value="3.1" calcext:value-type="float">
            <text:p>3.1</text:p>
          </table:table-cell>
          <table:table-cell table:style-name="ce481" table:formula="of:=HLOOKUP([.V16];[.$AF$25:.$AW$26];2;0)" office:value-type="float" office:value="2.3" calcext:value-type="float">
            <text:p>2.3</text:p>
          </table:table-cell>
          <table:table-cell table:style-name="ce489" table:formula="of:=HLOOKUP([.W16];[.$AF$25:.$AW$26];2;0)" office:value-type="float" office:value="3.5" calcext:value-type="float">
            <text:p>3.5</text:p>
          </table:table-cell>
          <table:table-cell table:style-name="ce489" table:formula="of:=HLOOKUP([.X16];[.$AF$25:.$AW$26];2;0)" office:value-type="float" office:value="4" calcext:value-type="float">
            <text:p>4.0</text:p>
          </table:table-cell>
          <table:table-cell table:style-name="ce53"/>
          <table:table-cell table:style-name="ce507" table:formula="of:=HLOOKUP([.Z16];[.$AF$25:.$AW$26];2;0)" office:value-type="float" office:value="4" calcext:value-type="float">
            <text:p>4.0</text:p>
          </table:table-cell>
          <table:table-cell table:style-name="ce511" table:formula="of:=HLOOKUP([.AA16];[.$AF$25:.$AW$26];2;0)" office:value-type="float" office:value="4.5" calcext:value-type="float">
            <text:p>4.5</text:p>
          </table:table-cell>
          <table:table-cell table:style-name="ce514" table:formula="of:=HLOOKUP([.AB16];[.$AF$25:.$AW$26];2;0)" office:value-type="float" office:value="3.5" calcext:value-type="float">
            <text:p>3.5</text:p>
          </table:table-cell>
          <table:table-cell table:style-name="ce517" table:formula="of:=HLOOKUP([.AC16];[.$AF$25:.$AW$26];2;0)" office:value-type="float" office:value="3.2" calcext:value-type="float">
            <text:p>3.2</text:p>
          </table:table-cell>
          <table:table-cell table:style-name="ce517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01" table:formula="of:=HLOOKUP([.B17];[.$AF$25:.$AW$26];2;0)" office:value-type="float" office:value="3" calcext:value-type="float">
            <text:p>3.0</text:p>
          </table:table-cell>
          <table:table-cell table:style-name="ce407" table:formula="of:=HLOOKUP([.C17];[.$AF$25:.$AW$26];2;0)" office:value-type="float" office:value="2.3" calcext:value-type="float">
            <text:p>2.3</text:p>
          </table:table-cell>
          <table:table-cell table:style-name="ce411" table:formula="of:=HLOOKUP([.D17];[.$AF$25:.$AW$26];2;0)" office:value-type="float" office:value="1.6" calcext:value-type="float">
            <text:p>1.6</text:p>
          </table:table-cell>
          <table:table-cell table:style-name="ce415" table:formula="of:=HLOOKUP([.E17];[.$AF$25:.$AW$26];2;0)" office:value-type="float" office:value="2" calcext:value-type="float">
            <text:p>2.0</text:p>
          </table:table-cell>
          <table:table-cell table:style-name="ce415" table:formula="of:=HLOOKUP([.F17];[.$AF$25:.$AW$26];2;0)" office:value-type="float" office:value="2.1" calcext:value-type="float">
            <text:p>2.1</text:p>
          </table:table-cell>
          <table:table-cell table:style-name="ce53"/>
          <table:table-cell table:style-name="ce422" table:formula="of:=HLOOKUP([.H17];[.$AF$25:.$AW$26];2;0)" office:value-type="float" office:value="4" calcext:value-type="float">
            <text:p>4.0</text:p>
          </table:table-cell>
          <table:table-cell table:style-name="ce429" table:formula="of:=HLOOKUP([.I17];[.$AF$25:.$AW$26];2;0)" office:value-type="float" office:value="2.1" calcext:value-type="float">
            <text:p>2.1</text:p>
          </table:table-cell>
          <table:table-cell table:style-name="ce433" table:formula="of:=HLOOKUP([.J17];[.$AF$25:.$AW$26];2;0)" office:value-type="float" office:value="1.3" calcext:value-type="float">
            <text:p>1.3</text:p>
          </table:table-cell>
          <table:table-cell table:style-name="ce436" table:formula="of:=HLOOKUP([.K17];[.$AF$25:.$AW$26];2;0)" office:value-type="float" office:value="1.6" calcext:value-type="float">
            <text:p>1.6</text:p>
          </table:table-cell>
          <table:table-cell table:style-name="ce436" table:formula="of:=HLOOKUP([.L17];[.$AF$25:.$AW$26];2;0)" office:value-type="float" office:value="2" calcext:value-type="float">
            <text:p>2.0</text:p>
          </table:table-cell>
          <table:table-cell table:style-name="ce53"/>
          <table:table-cell table:style-name="ce443" table:formula="of:=HLOOKUP([.N17];[.$AF$25:.$AW$26];2;0)" office:value-type="float" office:value="3.2" calcext:value-type="float">
            <text:p>3.2</text:p>
          </table:table-cell>
          <table:table-cell table:style-name="ce447" table:formula="of:=HLOOKUP([.O17];[.$AF$25:.$AW$26];2;0)" office:value-type="float" office:value="2.1" calcext:value-type="float">
            <text:p>2.1</text:p>
          </table:table-cell>
          <table:table-cell table:style-name="ce454" table:formula="of:=HLOOKUP([.P17];[.$AF$25:.$AW$26];2;0)" office:value-type="float" office:value="1.6" calcext:value-type="float">
            <text:p>1.6</text:p>
          </table:table-cell>
          <table:table-cell table:style-name="ce458" table:formula="of:=HLOOKUP([.Q17];[.$AF$25:.$AW$26];2;0)" office:value-type="float" office:value="1.3" calcext:value-type="float">
            <text:p>1.3</text:p>
          </table:table-cell>
          <table:table-cell table:style-name="ce458" table:formula="of:=HLOOKUP([.R17];[.$AF$25:.$AW$26];2;0)" office:value-type="float" office:value="2.3" calcext:value-type="float">
            <text:p>2.3</text:p>
          </table:table-cell>
          <table:table-cell table:style-name="ce53"/>
          <table:table-cell table:style-name="ce471" table:formula="of:=HLOOKUP([.T17];[.$AF$25:.$AW$26];2;0)" office:value-type="float" office:value="2" calcext:value-type="float">
            <text:p>2.0</text:p>
          </table:table-cell>
          <table:table-cell table:style-name="ce478" table:formula="of:=HLOOKUP([.U17];[.$AF$25:.$AW$26];2;0)" office:value-type="float" office:value="1.6" calcext:value-type="float">
            <text:p>1.6</text:p>
          </table:table-cell>
          <table:table-cell table:style-name="ce481" table:formula="of:=HLOOKUP([.V17];[.$AF$25:.$AW$26];2;0)" office:value-type="float" office:value="1.3" calcext:value-type="float">
            <text:p>1.3</text:p>
          </table:table-cell>
          <table:table-cell table:style-name="ce489" table:formula="of:=HLOOKUP([.W17];[.$AF$25:.$AW$26];2;0)" office:value-type="float" office:value="2.2" calcext:value-type="float">
            <text:p>2.2</text:p>
          </table:table-cell>
          <table:table-cell table:style-name="ce489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508" table:formula="of:=HLOOKUP([.Z17];[.$AF$25:.$AW$26];2;0)" office:value-type="float" office:value="2.2" calcext:value-type="float">
            <text:p>2.2</text:p>
          </table:table-cell>
          <table:table-cell table:style-name="ce511" table:formula="of:=HLOOKUP([.AA17];[.$AF$25:.$AW$26];2;0)" office:value-type="float" office:value="2" calcext:value-type="float">
            <text:p>2.0</text:p>
          </table:table-cell>
          <table:table-cell table:style-name="ce514" table:formula="of:=HLOOKUP([.AB17];[.$AF$25:.$AW$26];2;0)" office:value-type="float" office:value="1.3" calcext:value-type="float">
            <text:p>1.3</text:p>
          </table:table-cell>
          <table:table-cell table:style-name="ce517" table:formula="of:=HLOOKUP([.AC17];[.$AF$25:.$AW$26];2;0)" office:value-type="float" office:value="1.2" calcext:value-type="float">
            <text:p>1.2</text:p>
          </table:table-cell>
          <table:table-cell table:style-name="ce517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97" table:formula="of:=HLOOKUP([.B18];[.$AF$25:.$AW$26];2;0)" office:value-type="float" office:value="3.5" calcext:value-type="float">
            <text:p>3.5</text:p>
          </table:table-cell>
          <table:table-cell table:style-name="ce407" table:formula="of:=HLOOKUP([.C18];[.$AF$25:.$AW$26];2;0)" office:value-type="float" office:value="1.1" calcext:value-type="float">
            <text:p>1.1</text:p>
          </table:table-cell>
          <table:table-cell table:style-name="ce411" table:formula="of:=HLOOKUP([.D18];[.$AF$25:.$AW$26];2;0)" office:value-type="float" office:value="1.2" calcext:value-type="float">
            <text:p>1.2</text:p>
          </table:table-cell>
          <table:table-cell table:style-name="ce415" table:formula="of:=HLOOKUP([.E18];[.$AF$25:.$AW$26];2;0)" office:value-type="float" office:value="1.3" calcext:value-type="float">
            <text:p>1.3</text:p>
          </table:table-cell>
          <table:table-cell table:style-name="ce415" table:formula="of:=HLOOKUP([.F18];[.$AF$25:.$AW$26];2;0)" office:value-type="float" office:value="2.2" calcext:value-type="float">
            <text:p>2.2</text:p>
          </table:table-cell>
          <table:table-cell table:style-name="ce53"/>
          <table:table-cell table:style-name="ce422" table:formula="of:=HLOOKUP([.H18];[.$AF$25:.$AW$26];2;0)" office:value-type="float" office:value="2.2" calcext:value-type="float">
            <text:p>2.2</text:p>
          </table:table-cell>
          <table:table-cell table:style-name="ce427" table:formula="of:=HLOOKUP([.I18];[.$AF$25:.$AW$26];2;0)" office:value-type="float" office:value="3.1" calcext:value-type="float">
            <text:p>3.1</text:p>
          </table:table-cell>
          <table:table-cell table:style-name="ce433" table:formula="of:=HLOOKUP([.J18];[.$AF$25:.$AW$26];2;0)" office:value-type="float" office:value="1.1" calcext:value-type="float">
            <text:p>1.1</text:p>
          </table:table-cell>
          <table:table-cell table:style-name="ce436" table:formula="of:=HLOOKUP([.K18];[.$AF$25:.$AW$26];2;0)" office:value-type="float" office:value="1.2" calcext:value-type="float">
            <text:p>1.2</text:p>
          </table:table-cell>
          <table:table-cell table:style-name="ce436" table:formula="of:=HLOOKUP([.L18];[.$AF$25:.$AW$26];2;0)" office:value-type="float" office:value="2.3" calcext:value-type="float">
            <text:p>2.3</text:p>
          </table:table-cell>
          <table:table-cell table:style-name="ce53"/>
          <table:table-cell table:style-name="ce443" table:formula="of:=HLOOKUP([.N18];[.$AF$25:.$AW$26];2;0)" office:value-type="float" office:value="2" calcext:value-type="float">
            <text:p>2.0</text:p>
          </table:table-cell>
          <table:table-cell table:style-name="ce447" table:formula="of:=HLOOKUP([.O18];[.$AF$25:.$AW$26];2;0)" office:value-type="float" office:value="1.2" calcext:value-type="float">
            <text:p>1.2</text:p>
          </table:table-cell>
          <table:table-cell table:style-name="ce449" table:formula="of:=HLOOKUP([.P18];[.$AF$25:.$AW$26];2;0)" office:value-type="float" office:value="3" calcext:value-type="float">
            <text:p>3.0</text:p>
          </table:table-cell>
          <table:table-cell table:style-name="ce458" table:formula="of:=HLOOKUP([.Q18];[.$AF$25:.$AW$26];2;0)" office:value-type="float" office:value="1.1" calcext:value-type="float">
            <text:p>1.1</text:p>
          </table:table-cell>
          <table:table-cell table:style-name="ce458" table:formula="of:=HLOOKUP([.R18];[.$AF$25:.$AW$26];2;0)" office:value-type="float" office:value="2.2" calcext:value-type="float">
            <text:p>2.2</text:p>
          </table:table-cell>
          <table:table-cell table:style-name="ce53"/>
          <table:table-cell table:style-name="ce471" table:formula="of:=HLOOKUP([.T18];[.$AF$25:.$AW$26];2;0)" office:value-type="float" office:value="2.1" calcext:value-type="float">
            <text:p>2.1</text:p>
          </table:table-cell>
          <table:table-cell table:style-name="ce478" table:formula="of:=HLOOKUP([.U18];[.$AF$25:.$AW$26];2;0)" office:value-type="float" office:value="1.2" calcext:value-type="float">
            <text:p>1.2</text:p>
          </table:table-cell>
          <table:table-cell table:style-name="ce481" table:formula="of:=HLOOKUP([.V18];[.$AF$25:.$AW$26];2;0)" office:value-type="float" office:value="1.1" calcext:value-type="float">
            <text:p>1.1</text:p>
          </table:table-cell>
          <table:table-cell table:style-name="ce473" table:formula="of:=HLOOKUP([.W18];[.$AF$25:.$AW$26];2;0)" office:value-type="float" office:value="1.6" calcext:value-type="float">
            <text:p>1.6</text:p>
          </table:table-cell>
          <table:table-cell table:style-name="ce489" table:formula="of:=HLOOKUP([.X18];[.$AF$25:.$AW$26];2;0)" office:value-type="float" office:value="3" calcext:value-type="float">
            <text:p>3.0</text:p>
          </table:table-cell>
          <table:table-cell table:style-name="ce53"/>
          <table:table-cell table:style-name="ce508" table:formula="of:=HLOOKUP([.Z18];[.$AF$25:.$AW$26];2;0)" office:value-type="float" office:value="2.3" calcext:value-type="float">
            <text:p>2.3</text:p>
          </table:table-cell>
          <table:table-cell table:style-name="ce511" table:formula="of:=HLOOKUP([.AA18];[.$AF$25:.$AW$26];2;0)" office:value-type="float" office:value="2.1" calcext:value-type="float">
            <text:p>2.1</text:p>
          </table:table-cell>
          <table:table-cell table:style-name="ce514" table:formula="of:=HLOOKUP([.AB18];[.$AF$25:.$AW$26];2;0)" office:value-type="float" office:value="1.6" calcext:value-type="float">
            <text:p>1.6</text:p>
          </table:table-cell>
          <table:table-cell table:style-name="ce517" table:formula="of:=HLOOKUP([.AC18];[.$AF$25:.$AW$26];2;0)" office:value-type="float" office:value="1.1" calcext:value-type="float">
            <text:p>1.1</text:p>
          </table:table-cell>
          <table:table-cell table:style-name="ce493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15:18:18.10331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7T15:26:04.528744800</dc:date>
    <meta:generator>LibreOffice/26.2.0.3$Windows_X86_64 LibreOffice_project/620$Build-3</meta:generator>
    <meta:editing-duration>P2DT5H34M31S</meta:editing-duration>
    <meta:editing-cycles>463</meta:editing-cycles>
    <meta:document-statistic meta:table-count="3" meta:cell-count="2162" meta:object-count="0"/>
    <meta:user-defined meta:name="AppVersion">16.0300</meta:user-defined>
  </office:meta>
</office:document-meta>
</file>
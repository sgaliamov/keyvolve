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default-cell-style-name="ce78"/>
        <table:table-column table:style-name="co1" table:default-cell-style-name="ce37"/>
        <table:table-column table:style-name="co1" table:default-cell-style-name="Default"/>
        <table:table-column table:style-name="co1" table:default-cell-style-name="ce98"/>
        <table:table-column table:style-name="co1" table:number-columns-repeated="4" table:default-cell-style-name="Default"/>
        <table:table-column table:style-name="co1" table:default-cell-style-name="ce32"/>
        <table:table-column table:style-name="co1" table:default-cell-style-name="ce98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3"/>
          <table:table-cell table:style-name="ce11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/>
          <table:table-cell table:style-name="Default"/>
          <table:table-cell table:style-name="ce53" office:value-type="string" calcext:value-type="string">
            <text:p>penalties: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priorities:</text:p>
          </table:table-cell>
          <table:table-cell table:number-columns-repeated="4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/>
          <table:table-cell table:style-name="Default"/>
          <table:table-cell/>
          <table:table-cell table:style-name="ce54" office:value-type="float" office:value="1" calcext:value-type="float">
            <text:p>1</text:p>
          </table:table-cell>
          <table:table-cell table:style-name="ce53" office:value-type="string" calcext:value-type="string">
            <text:p>same finger</text:p>
          </table:table-cell>
          <table:table-cell table:style-name="ce57" table:number-columns-repeated="2"/>
          <table:table-cell table:style-name="Default"/>
          <table:table-cell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3" calcext:value-type="float">
            <text:p>13</text:p>
          </table:table-cell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/>
          <table:table-cell table:style-name="Default"/>
          <table:table-cell table:style-name="ce53"/>
          <table:table-cell table:style-name="ce55" office:value-type="float" office:value="2" calcext:value-type="float">
            <text:p>2</text:p>
          </table:table-cell>
          <table:table-cell table:style-name="ce53" office:value-type="string" calcext:value-type="string">
            <text:p>diagonal</text:p>
          </table:table-cell>
          <table:table-cell table:style-name="ce59"/>
          <table:table-cell table:style-name="ce57"/>
          <table:table-cell table:style-name="Default"/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/>
          <table:table-cell table:style-name="Default"/>
          <table:table-cell table:style-name="ce53"/>
          <table:table-cell table:style-name="ce55" office:value-type="float" office:value="1" calcext:value-type="float">
            <text:p>1</text:p>
          </table:table-cell>
          <table:table-cell table:style-name="ce53" office:value-type="string" calcext:value-type="string">
            <text:p>distance</text:p>
          </table:table-cell>
          <table:table-cell table:style-name="ce59" table:number-columns-repeated="3"/>
          <table:table-cell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9" calcext:value-type="float">
            <text:p>9</text:p>
          </table:table-cell>
          <table:table-cell table:style-name="ce59" table:number-columns-repeated="7"/>
          <table:table-cell table:style-name="ce6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51" table:number-columns-spanned="1" table:number-rows-spanned="2"/>
          <table:table-cell table:number-columns-repeated="2"/>
          <table:table-cell table:style-name="ce127"/>
          <table:table-cell table:style-name="ce78"/>
          <table:table-cell/>
          <table:table-cell table:style-name="Default"/>
          <table:table-cell table:style-name="ce53"/>
          <table:table-cell table:number-columns-repeated="3"/>
          <table:table-cell table:style-name="ce59" table:number-columns-repeated="15"/>
          <table:table-cell table:style-name="ce6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31"/>
          <table:table-cell/>
          <table:covered-table-cell table:style-name="ce31"/>
          <table:covered-table-cell table:number-columns-repeated="2" table:style-name="ce119"/>
          <table:covered-table-cell table:style-name="ce51"/>
          <table:table-cell table:style-name="ce4" table:number-columns-repeated="4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style-name="ce60"/>
          <table:table-cell table:number-columns-repeated="4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8" table:formula="of:=[.$AA$2]" office:value-type="float" office:value="14" calcext:value-type="float">
            <text:p>14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32" table:formula="of:=[.$AD$3]+[.$U$4]" office:value-type="float" office:value="1" calcext:value-type="float">
            <text:p>1</text:p>
          </table:table-cell>
          <table:table-cell table:style-name="ce37" table:formula="of:=[.$AE$3]+[.$U$4]" office:value-type="float" office:value="9" calcext:value-type="float">
            <text:p>9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8" table:formula="of:=[.$AB$2]" office:value-type="float" office:value="6" calcext:value-type="float">
            <text:p>6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37" table:formula="of:=[.$AD$3]" office:value-type="float" office:value="0" calcext:value-type="float">
            <text:p>0</text:p>
          </table:table-cell>
          <table:table-cell table:style-name="ce37" table:formula="of:=[.$AE$3]+[.$U$4]" office:value-type="float" office:value="9" calcext:value-type="float">
            <text:p>9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8" table:formula="of:=[.$AC$2]" office:value-type="float" office:value="3" calcext:value-type="float">
            <text:p>3</text:p>
          </table:table-cell>
          <table:table-cell table:formula="of:=[.$AD$3]" office:value-type="float" office:value="0" calcext:value-type="float">
            <text:p>0</text:p>
          </table:table-cell>
          <table:table-cell table:style-name="ce32" table:formula="of:=[.$AE$3]+[.$U$3]" office:value-type="float" office:value="10" calcext:value-type="float">
            <text:p>10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8" table:formula="of:=[.$AD$2]" office:value-type="float" office:value="10" calcext:value-type="float">
            <text:p>10</text:p>
          </table:table-cell>
          <table:table-cell table:formula="of:=[.$AE$3]+[.$U$2]" office:value-type="float" office:value="9" calcext:value-type="float">
            <text:p>9</text:p>
          </table:table-cell>
          <table:table-cell/>
          <table:table-cell table:style-name="ce9" table:formula="of:=[.$AA$3]+[.$U$4]+[.$U$3]" office:value-type="float" office:value="8" calcext:value-type="float">
            <text:p>8</text:p>
          </table:table-cell>
          <table:table-cell table:style-name="ce21" table:formula="of:=[.$AB$3]+[.$U$4]+[.$U$3]" office:value-type="float" office:value="5" calcext:value-type="float">
            <text:p>5</text:p>
          </table:table-cell>
          <table:table-cell table:style-name="ce26" table:formula="of:=[.$AC$3]+[.$U$4]+[.$U$3]" office:value-type="float" office:value="4" calcext:value-type="float">
            <text:p>4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style-name="ce8" table:formula="of:=[.$AE$2]" office:value-type="float" office:value="13" calcext:value-type="float">
            <text:p>13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1, &quot;4&quot;: 9, &quot;5&quot;: 6, &quot;6&quot;: 4, &quot;7&quot;: 3, &quot;8&quot;: 3, &quot;9&quot;: 11, &quot;10&quot;: 14, &quot;11&quot;: 14, &quot;12&quot;: 10, &quot;13&quot;: 7, &quot;14&quot;: 12}" calcext:value-type="string">
            <text:p>"0": { "0": 14, "1": 2, "2": 1, "3": 1, "4": 9, "5": 6, "6": 4, "7": 3, "8": 3, "9": 11, "10": 14, "11": 14, "12": 10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A$3]+[.$U$2]" office:value-type="float" office:value="6" calcext:value-type="float">
            <text:p>6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2" table:formula="of:=[.$AD$3]+[.$U$3]+[.$U$4]" office:value-type="float" office:value="3" calcext:value-type="float">
            <text:p>3</text:p>
          </table:table-cell>
          <table:table-cell table:style-name="ce32" table:formula="of:=[.$AE$3]+[.$U$4]+[.$U$3]" office:value-type="float" office:value="11" calcext:value-type="float">
            <text:p>11</text:p>
          </table:table-cell>
          <table:table-cell table:style-name="ce43"/>
          <table:table-cell table:style-name="ce9" table:formula="of:=[.$AA$3]+[.$U$3]" office:value-type="float" office:value="7" calcext:value-type="float">
            <text:p>7</text:p>
          </table:table-cell>
          <table:table-cell table:style-name="ce21" table:formula="of:=[.$AB$3]+[.$U$2]" office:value-type="float" office:value="3" calcext:value-type="float">
            <text:p>3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7" table:formula="of:=[.$AD$3]" office:value-type="float" office:value="0" calcext:value-type="float">
            <text:p>0</text:p>
          </table:table-cell>
          <table:table-cell table:style-name="ce32" table:formula="of:=[.$AE$3]+[.$U$4]+[.$U$3]" office:value-type="float" office:value="11" calcext:value-type="float">
            <text:p>11</text:p>
          </table:table-cell>
          <table:table-cell table:style-name="ce43"/>
          <table:table-cell table:style-name="ce9" table:formula="of:=[.$AA$3]+[.$U$3]" office:value-type="float" office:value="7" calcext:value-type="float">
            <text:p>7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2]" office:value-type="float" office:value="2" calcext:value-type="float">
            <text:p>2</text:p>
          </table:table-cell>
          <table:table-cell table:formula="of:=[.$AD$3]" office:value-type="float" office:value="0" calcext:value-type="float">
            <text:p>0</text:p>
          </table:table-cell>
          <table:table-cell table:style-name="ce32" table:formula="of:=[.$AE$3]+[.$U$3]" office:value-type="float" office:value="10" calcext:value-type="float">
            <text:p>10</text:p>
          </table:table-cell>
          <table:table-cell table:style-name="ce43"/>
          <table:table-cell table:style-name="ce9" table:formula="of:=[.$AA$3]+[.$U$3]+[.$U$4]" office:value-type="float" office:value="8" calcext:value-type="float">
            <text:p>8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formula="of:=[.$AE$3]+[.$U$2]" office:value-type="float" office:value="9" calcext:value-type="float">
            <text:p>9</text:p>
          </table:table-cell>
          <table:table-cell table:style-name="ce43"/>
          <table:table-cell table:style-name="ce9" table:formula="of:=[.$AA$3]+[.$U$3]+[.$U$4]" office:value-type="float" office:value="8" calcext:value-type="float">
            <text:p>8</text:p>
          </table:table-cell>
          <table:table-cell table:style-name="ce21" table:formula="of:=[.$AB$3]+[.$U$4]+[.$U$3]" office:value-type="float" office:value="5" calcext:value-type="float">
            <text:p>5</text:p>
          </table:table-cell>
          <table:table-cell table:style-name="ce26" table:formula="of:=[.$AC$3]+[.$U$4]+[.$U$3]" office:value-type="float" office:value="4" calcext:value-type="float">
            <text:p>4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style-name="ce32" table:formula="of:=[.$AE$3]+[.$U$2]" office:value-type="float" office:value="9" calcext:value-type="float">
            <text:p>9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6, &quot;2&quot;: 1, &quot;3&quot;: 0, &quot;4&quot;: 9, &quot;5&quot;: 7, &quot;6&quot;: 3, &quot;7&quot;: 3, &quot;8&quot;: 0, &quot;9&quot;: 11, &quot;10&quot;: 15, &quot;11&quot;: 13, &quot;12&quot;: 10, &quot;13&quot;: 7, &quot;14&quot;: 12}" calcext:value-type="string">
            <text:p>"1": { "0": 5, "1": 6, "2": 1, "3": 0, "4": 9, "5": 7, "6": 3, "7": 3, "8": 0, "9": 11, "10": 15, "11": 13, "12": 10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" table:formula="of:=[.$AA$4]+[.$U$2]+[.$U$4]" office:value-type="float" office:value="14" calcext:value-type="float">
            <text:p>14</text:p>
          </table:table-cell>
          <table:table-cell table:style-name="ce22" table:formula="of:=[.$AB$4]+[.$U$3]+[.$U$4]" office:value-type="float" office:value="14" calcext:value-type="float">
            <text:p>14</text:p>
          </table:table-cell>
          <table:table-cell table:style-name="ce27" table:formula="of:=[.$AC$4]+[.$U$3]+[.$U$4]" office:value-type="float" office:value="10" calcext:value-type="float">
            <text:p>10</text:p>
          </table:table-cell>
          <table:table-cell table:style-name="ce33" table:formula="of:=[.$AD$4]+[.$U$3]+[.$U$4]" office:value-type="float" office:value="7" calcext:value-type="float">
            <text:p>7</text:p>
          </table:table-cell>
          <table:table-cell table:style-name="ce33" table:formula="of:=[.$AE$4]+[.$U$3]+[.$U$4]" office:value-type="float" office:value="12" calcext:value-type="float">
            <text:p>12</text:p>
          </table:table-cell>
          <table:table-cell table:style-name="ce44"/>
          <table:table-cell table:style-name="ce10" table:formula="of:=[.$AA$4]+[.$U$3]+[.$U$4]" office:value-type="float" office:value="15" calcext:value-type="float">
            <text:p>15</text:p>
          </table:table-cell>
          <table:table-cell table:style-name="ce22" table:formula="of:=[.$AB$4]+[.$U$2]+[.$U$4]" office:value-type="float" office:value="13" calcext:value-type="float">
            <text:p>13</text:p>
          </table:table-cell>
          <table:table-cell table:style-name="ce27" table:formula="of:=[.$AC$4]+[.$U$3]+[.$U$4]" office:value-type="float" office:value="10" calcext:value-type="float">
            <text:p>10</text:p>
          </table:table-cell>
          <table:table-cell table:style-name="ce33" table:formula="of:=[.$AD$4]+[.$U$3]+[.$U$4]" office:value-type="float" office:value="7" calcext:value-type="float">
            <text:p>7</text:p>
          </table:table-cell>
          <table:table-cell table:style-name="ce33" table:formula="of:=[.$AE$4]+[.$U$3]+[.$U$4]" office:value-type="float" office:value="12" calcext:value-type="float">
            <text:p>12</text:p>
          </table:table-cell>
          <table:table-cell table:style-name="ce44"/>
          <table:table-cell table:style-name="ce10" table:formula="of:=[.$AA$4]+[.$U$3]+[.$U$4]" office:value-type="float" office:value="15" calcext:value-type="float">
            <text:p>15</text:p>
          </table:table-cell>
          <table:table-cell table:style-name="ce22" table:formula="of:=[.$AB$4]+[.$U$3]+[.$U$4]" office:value-type="float" office:value="14" calcext:value-type="float">
            <text:p>14</text:p>
          </table:table-cell>
          <table:table-cell table:style-name="ce27" table:formula="of:=[.$AC$4]+[.$U$2]+[.$U$4]" office:value-type="float" office:value="9" calcext:value-type="float">
            <text:p>9</text:p>
          </table:table-cell>
          <table:table-cell table:style-name="ce33" table:formula="of:=[.$AD$4]+[.$U$3]+[.$U$4]" office:value-type="float" office:value="7" calcext:value-type="float">
            <text:p>7</text:p>
          </table:table-cell>
          <table:table-cell table:style-name="ce33" table:formula="of:=[.$AE$4]+[.$U$3]+[.$U$4]" office:value-type="float" office:value="12" calcext:value-type="float">
            <text:p>12</text:p>
          </table:table-cell>
          <table:table-cell table:style-name="ce44"/>
          <table:table-cell table:style-name="ce10" table:formula="of:=[.$AA$4]+[.$U$3]+[.$U$4]" office:value-type="float" office:value="15" calcext:value-type="float">
            <text:p>15</text:p>
          </table:table-cell>
          <table:table-cell table:style-name="ce22" table:formula="of:=[.$AB$4]+[.$U$3]+[.$U$4]" office:value-type="float" office:value="14" calcext:value-type="float">
            <text:p>14</text:p>
          </table:table-cell>
          <table:table-cell table:style-name="ce27" table:formula="of:=[.$AC$4]+[.$U$3]+[.$U$4]" office:value-type="float" office:value="10" calcext:value-type="float">
            <text:p>10</text:p>
          </table:table-cell>
          <table:table-cell table:style-name="ce33" table:formula="of:=[.$AD$4]+[.$U$2]+[.$U$4]" office:value-type="float" office:value="6" calcext:value-type="float">
            <text:p>6</text:p>
          </table:table-cell>
          <table:table-cell table:style-name="ce33" table:formula="of:=[.$AE$4]+[.$U$2]+[.$U$4]" office:value-type="float" office:value="11" calcext:value-type="float">
            <text:p>11</text:p>
          </table:table-cell>
          <table:table-cell table:style-name="ce44"/>
          <table:table-cell table:style-name="ce10" table:formula="of:=[.$AA$4]+[.$U$3]+[.$U$4]" office:value-type="float" office:value="15" calcext:value-type="float">
            <text:p>15</text:p>
          </table:table-cell>
          <table:table-cell table:style-name="ce22" table:formula="of:=[.$AB$4]+[.$U$3]+[.$U$4]" office:value-type="float" office:value="14" calcext:value-type="float">
            <text:p>14</text:p>
          </table:table-cell>
          <table:table-cell table:style-name="ce27" table:formula="of:=[.$AC$4]+[.$U$3]+[.$U$4]" office:value-type="float" office:value="10" calcext:value-type="float">
            <text:p>10</text:p>
          </table:table-cell>
          <table:table-cell table:style-name="ce33" table:formula="of:=[.$AD$4]+[.$U$2]+[.$U$4]" office:value-type="float" office:value="6" calcext:value-type="float">
            <text:p>6</text:p>
          </table:table-cell>
          <table:table-cell table:style-name="ce33" table:formula="of:=[.$AE$4]+[.$U$2]+[.$U$4]" office:value-type="float" office:value="11" calcext:value-type="float">
            <text:p>11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2, &quot;2&quot;: 3, &quot;3&quot;: 0, &quot;4&quot;: 10, &quot;5&quot;: 7, &quot;6&quot;: 4, &quot;7&quot;: 2, &quot;8&quot;: 0, &quot;9&quot;: 10, &quot;10&quot;: 15, &quot;11&quot;: 14, &quot;12&quot;: 9, &quot;13&quot;: 7, &quot;14&quot;: 12}" calcext:value-type="string">
            <text:p>"2": { "0": 5, "1": 2, "2": 3, "3": 0, "4": 10, "5": 7, "6": 4, "7": 2, "8": 0, "9": 10, "10": 15, "11": 14, "12": 9, "13": 7, "14": 12}</text:p>
          </table:table-cell>
          <table:table-cell table:number-columns-repeated="32"/>
          <table:table-cell table:style-name="ce57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10, &quot;4&quot;: 9, &quot;5&quot;: 8, &quot;6&quot;: 4, &quot;7&quot;: 3, &quot;8&quot;: 1, &quot;9&quot;: 9, &quot;10&quot;: 15, &quot;11&quot;: 14, &quot;12&quot;: 10, &quot;13&quot;: 6, &quot;14&quot;: 11}" calcext:value-type="string">
            <text:p>"3": { "0": 5, "1": 2, "2": 1, "3": 10, "4": 9, "5": 8, "6": 4, "7": 3, "8": 1, "9": 9, "10": 15, "11": 14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10" calcext:value-type="string">
            <text:p>"3": 10</text:p>
          </table:table-cell>
          <table:table-cell table:style-name="ce95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AA8])" office:value-type="string" office:string-value="&quot;1&quot;: 5" calcext:value-type="string">
            <text:p>"1": 5</text:p>
          </table:table-cell>
          <table:table-cell table:style-name="ce95" table:formula="of:=COM.MICROSOFT.CONCAT(&quot;&quot;&quot;&quot;;[.$D$2]; &quot;&quot;&quot;: &quot;; [.AB8])" office:value-type="string" office:string-value="&quot;2&quot;: 4" calcext:value-type="string">
            <text:p>"2": 4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57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8, &quot;1&quot;: 5, &quot;2&quot;: 4, &quot;3&quot;: 1, &quot;4&quot;: 13, &quot;5&quot;: 8, `, &quot;7&quot;: 4, &quot;8&quot;: 1, &quot;9&quot;: 9, &quot;10&quot;: 15, &quot;11&quot;: 14, &quot;12&quot;: 10, &quot;13&quot;: 6, &quot;14&quot;: 11}" calcext:value-type="string">
            <text:p>"4": { "0": 8, "1": 5, "2": 4, "3": 1, "4": 13, "5": 8, `, "7": 4, "8": 1, "9": 9, "10": 15, "11": 14, "12": 10, "13": 6, "14": 11}</text:p>
          </table:table-cell>
          <table:table-cell table:style-name="ce57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V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8" calcext:value-type="string">
            <text:p>"5": 8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9" calcext:value-type="string">
            <text:p>"9": 9</text:p>
          </table:table-cell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D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P10])" office:value-type="string" office:string-value="&quot;12&quot;: 9" calcext:value-type="string">
            <text:p>"12": 9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1" calcext:value-type="string">
            <text:p>"14": 11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14, &quot;1&quot;: 2, &quot;2&quot;: 1, &quot;3&quot;: 1, &quot;4&quot;: 9, &quot;5&quot;: 6, &quot;6&quot;: 4, &quot;7&quot;: 3, &quot;8&quot;: 3, &quot;9&quot;: 11, &quot;10&quot;: 14, &quot;11&quot;: 14, &quot;12&quot;: 10, &quot;13&quot;: 7, &quot;14&quot;: 12}, &quot;1&quot;: { &quot;0&quot;: 5, &quot;1&quot;: 6, &quot;2&quot;: 1, &quot;3&quot;: 0, &quot;4&quot;: 9, &quot;5&quot;: 7, &quot;6&quot;: 3, &quot;7&quot;: 3, &quot;8&quot;: 0, &quot;9&quot;: 11, &quot;10&quot;: 15, &quot;11&quot;: 13, &quot;12&quot;: 10, &quot;13&quot;: 7, &quot;14&quot;: 12}, &quot;2&quot;: { &quot;0&quot;: 5, &quot;1&quot;: 2, &quot;2&quot;: 3, &quot;3&quot;: 0, &quot;4&quot;: 10, &quot;5&quot;: 7, &quot;6&quot;: 4, &quot;7&quot;: 2, &quot;8&quot;: 0, &quot;9&quot;: 10, &quot;10&quot;: 15, &quot;11&quot;: 14, &quot;12&quot;: 9, &quot;13&quot;: 7, &quot;14&quot;: 12}, &quot;3&quot;: { &quot;0&quot;: 5, &quot;1&quot;: 2, &quot;2&quot;: 1, &quot;3&quot;: 10, &quot;4&quot;: 9, &quot;5&quot;: 8, &quot;6&quot;: 4, &quot;7&quot;: 3, &quot;8&quot;: 1, &quot;9&quot;: 9, &quot;10&quot;: 15, &quot;11&quot;: 14, &quot;12&quot;: 10, &quot;13&quot;: 6, &quot;14&quot;: 11}, &quot;4&quot;: { &quot;0&quot;: 8, &quot;1&quot;: 5, &quot;2&quot;: 4, &quot;3&quot;: 1, &quot;4&quot;: 13, &quot;5&quot;: 8, `, &quot;7&quot;: 4, &quot;8&quot;: 1, &quot;9&quot;: 9, &quot;10&quot;: 15, &quot;11&quot;: 14, &quot;12&quot;: 10, &quot;13&quot;: 6, &quot;14&quot;: 11}" calcext:value-type="string">
            <text:p>"0": { "0": 14, "1": 2, "2": 1, "3": 1, "4": 9, "5": 6, "6": 4, "7": 3, "8": 3, "9": 11, "10": 14, "11": 14, "12": 10, "13": 7, "14": 12}, "1": { "0": 5, "1": 6, "2": 1, "3": 0, "4": 9, "5": 7, "6": 3, "7": 3, "8": 0, "9": 11, "10": 15, "11": 13, "12": 10, "13": 7, "14": 12}, "2": { "0": 5, "1": 2, "2": 3, "3": 0, "4": 10, "5": 7, "6": 4, "7": 2, "8": 0, "9": 10, "10": 15, "11": 14, "12": 9, "13": 7, "14": 12}, "3": { "0": 5, "1": 2, "2": 1, "3": 10, "4": 9, "5": 8, "6": 4, "7": 3, "8": 1, "9": 9, "10": 15, "11": 14, "12": 10, "13": 6, "14": 11}, "4": { "0": 8, "1": 5, "2": 4, "3": 1, "4": 13, "5": 8, `, "7": 4, "8": 1, "9": 9, "10": 15, "11": 14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A$2]+[.$U$2]" office:value-type="float" office:value="15" calcext:value-type="float">
            <text:p>15</text:p>
          </table:table-cell>
          <table:table-cell table:style-name="ce23" table:formula="of:=[.$AB$2]+[.$U$3]" office:value-type="float" office:value="8" calcext:value-type="float">
            <text:p>8</text:p>
          </table:table-cell>
          <table:table-cell table:style-name="ce28" table:formula="of:=[.$AC$2]+[.$U$3]" office:value-type="float" office:value="5" calcext:value-type="float">
            <text:p>5</text:p>
          </table:table-cell>
          <table:table-cell table:style-name="ce34" table:formula="of:=[.$AD$2]+[.$U$3]" office:value-type="float" office:value="12" calcext:value-type="float">
            <text:p>12</text:p>
          </table:table-cell>
          <table:table-cell table:style-name="ce34" table:formula="of:=[.$AE$2]+[.$U$4]+[.$U$3]" office:value-type="float" office:value="16" calcext:value-type="float">
            <text:p>16</text:p>
          </table:table-cell>
          <table:table-cell table:style-name="ce45"/>
          <table:table-cell table:style-name="ce14" table:formula="of:=[.$AA$2]+[.$U$3]" office:value-type="float" office:value="16" calcext:value-type="float">
            <text:p>16</text:p>
          </table:table-cell>
          <table:table-cell table:style-name="ce23" table:formula="of:=[.$AB$2]+[.$U$2]" office:value-type="float" office:value="7" calcext:value-type="float">
            <text:p>7</text:p>
          </table:table-cell>
          <table:table-cell table:style-name="ce49" table:formula="of:=[.$AC$2]" office:value-type="float" office:value="3" calcext:value-type="float">
            <text:p>3</text:p>
          </table:table-cell>
          <table:table-cell table:style-name="ce34" table:formula="of:=[.$AD$2]+[.$U$3]" office:value-type="float" office:value="12" calcext:value-type="float">
            <text:p>12</text:p>
          </table:table-cell>
          <table:table-cell table:style-name="ce34" table:formula="of:=[.$AE$2]+[.$U$4]+[.$U$3]" office:value-type="float" office:value="16" calcext:value-type="float">
            <text:p>16</text:p>
          </table:table-cell>
          <table:table-cell table:style-name="ce45"/>
          <table:table-cell table:style-name="ce14" table:formula="of:=[.$AA$2]+[.$U$3]" office:value-type="float" office:value="16" calcext:value-type="float">
            <text:p>16</text:p>
          </table:table-cell>
          <table:table-cell table:style-name="ce23" table:formula="of:=[.$AB$2]+[.$U$3]" office:value-type="float" office:value="8" calcext:value-type="float">
            <text:p>8</text:p>
          </table:table-cell>
          <table:table-cell table:style-name="ce28" table:formula="of:=[.$AC$2]+[.$U$2]" office:value-type="float" office:value="4" calcext:value-type="float">
            <text:p>4</text:p>
          </table:table-cell>
          <table:table-cell table:style-name="ce34" table:formula="of:=[.$AD$2]+[.$U$3]" office:value-type="float" office:value="12" calcext:value-type="float">
            <text:p>12</text:p>
          </table:table-cell>
          <table:table-cell table:style-name="ce34" table:formula="of:=[.$AE$2]+[.$U$3]" office:value-type="float" office:value="15" calcext:value-type="float">
            <text:p>15</text:p>
          </table:table-cell>
          <table:table-cell table:style-name="ce45"/>
          <table:table-cell table:style-name="ce14" table:formula="of:=[.$AA$2]+[.$U$3]" office:value-type="float" office:value="16" calcext:value-type="float">
            <text:p>16</text:p>
          </table:table-cell>
          <table:table-cell table:style-name="ce56" table:formula="of:=[.$AB$2]" office:value-type="float" office:value="6" calcext:value-type="float">
            <text:p>6</text:p>
          </table:table-cell>
          <table:table-cell table:style-name="ce49" table:formula="of:=[.$AC$2]" office:value-type="float" office:value="3" calcext:value-type="float">
            <text:p>3</text:p>
          </table:table-cell>
          <table:table-cell table:style-name="ce34" table:formula="of:=[.$AD$2]+[.$U$2]" office:value-type="float" office:value="11" calcext:value-type="float">
            <text:p>11</text:p>
          </table:table-cell>
          <table:table-cell table:style-name="ce34" table:formula="of:=[.$AE$2]+[.$U$2]" office:value-type="float" office:value="14" calcext:value-type="float">
            <text:p>14</text:p>
          </table:table-cell>
          <table:table-cell table:style-name="ce45"/>
          <table:table-cell table:style-name="ce14" table:formula="of:=[.$AA$2]+[.$U$4]" office:value-type="float" office:value="15" calcext:value-type="float">
            <text:p>15</text:p>
          </table:table-cell>
          <table:table-cell table:style-name="ce23" table:formula="of:=[.$AB$2]+[.$U$3]+[.$U$4]" office:value-type="float" office:value="9" calcext:value-type="float">
            <text:p>9</text:p>
          </table:table-cell>
          <table:table-cell table:style-name="ce28" table:formula="of:=[.$AC$2]+[.$U$3]" office:value-type="float" office:value="5" calcext:value-type="float">
            <text:p>5</text:p>
          </table:table-cell>
          <table:table-cell table:style-name="ce34" table:formula="of:=[.$AD$2]+[.$U$2]" office:value-type="float" office:value="11" calcext:value-type="float">
            <text:p>11</text:p>
          </table:table-cell>
          <table:table-cell table:style-name="ce34" table:formula="of:=[.$AE$2]+[.$U$2]" office:value-type="float" office:value="14" calcext:value-type="float">
            <text:p>14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8, &quot;2&quot;: 5, &quot;3&quot;: 12, &quot;4&quot;: 16, &quot;5&quot;: 5, &quot;6&quot;: 2, &quot;7&quot;: 1, &quot;8&quot;: 0, &quot;9&quot;: 9, &quot;10&quot;: 13, &quot;11&quot;: 13, &quot;12&quot;: 9, &quot;13&quot;: 6, &quot;14&quot;: 12}" calcext:value-type="string">
            <text:p>"5": { "0": 15, "1": 8, "2": 5, "3": 12, "4": 16, "5": 5, "6": 2, "7": 1, "8": 0, "9": 9, "10": 13, "11": 13, "12": 9, "13": 6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5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37" table:formula="of:=[.$AD$3]" office:value-type="float" office:value="0" calcext:value-type="float">
            <text:p>0</text:p>
          </table:table-cell>
          <table:table-cell table:style-name="ce32" table:formula="of:=[.$AE$3]+[.$U$4]" office:value-type="float" office:value="9" calcext:value-type="float">
            <text:p>9</text:p>
          </table:table-cell>
          <table:table-cell table:style-name="ce43"/>
          <table:table-cell table:style-name="ce47" table:formula="of:=[.$AA$3]" office:value-type="float" office:value="5" calcext:value-type="float">
            <text:p>5</text:p>
          </table:table-cell>
          <table:table-cell table:style-name="ce15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37" table:formula="of:=[.$AD$3]" office:value-type="float" office:value="0" calcext:value-type="float">
            <text:p>0</text:p>
          </table:table-cell>
          <table:table-cell table:style-name="ce32" table:formula="of:=[.$AE$3]+[.$U$4]" office:value-type="float" office:value="9" calcext:value-type="float">
            <text:p>9</text:p>
          </table:table-cell>
          <table:table-cell table:style-name="ce43"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15" table:formula="of:=[.$AC$3]" office:value-type="float" office:value="1" calcext:value-type="float">
            <text:p>1</text:p>
          </table:table-cell>
          <table:table-cell table:formula="of:=[.$AD$3]" office:value-type="float" office:value="0" calcext:value-type="float">
            <text:p>0</text:p>
          </table:table-cell>
          <table:table-cell table:style-name="ce37" table:formula="of:=[.$AE$3]" office:value-type="float" office:value="8" calcext:value-type="float">
            <text:p>8</text:p>
          </table:table-cell>
          <table:table-cell table:style-name="ce43"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15" table:formula="of:=[.$AD$3]" office:value-type="float" office:value="0" calcext:value-type="float">
            <text:p>0</text:p>
          </table:table-cell>
          <table:table-cell table:formula="of:=[.$AE$3]+[.$U$2]" office:value-type="float" office:value="9" calcext:value-type="float">
            <text:p>9</text:p>
          </table:table-cell>
          <table:table-cell table:style-name="ce43"/>
          <table:table-cell table:style-name="ce9" table:formula="of:=[.$AA$3]+[.$U$4]" office:value-type="float" office:value="6" calcext:value-type="float">
            <text:p>6</text:p>
          </table:table-cell>
          <table:table-cell table:style-name="ce21" table:formula="of:=[.$AB$3]+[.$U$4]" office:value-type="float" office:value="3" calcext:value-type="float">
            <text:p>3</text:p>
          </table:table-cell>
          <table:table-cell table:style-name="ce26" table:formula="of:=[.$AC$3]+[.$U$4]" office:value-type="float" office:value="2" calcext:value-type="float">
            <text:p>2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style-name="ce15" table:formula="of:=[.$AE$3]" office:value-type="float" office:value="8" calcext:value-type="float">
            <text:p>8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" calcext:value-type="string">
            <text:p>"6": { "0": 16, "1": 7, "2": 3, "3": 12, "4": 16, "5": 5, "6": 2, "7": 1, "8": 0, "9": 9, "10": 14, "11": 12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" table:formula="of:=[.$AA$4]+[.$U$2]" office:value-type="float" office:value="13" calcext:value-type="float">
            <text:p>13</text:p>
          </table:table-cell>
          <table:table-cell table:style-name="ce22" table:formula="of:=[.$AB$4]+[.$U$3]" office:value-type="float" office:value="13" calcext:value-type="float">
            <text:p>13</text:p>
          </table:table-cell>
          <table:table-cell table:style-name="ce27" table:formula="of:=[.$AC$4]+[.$U$3]" office:value-type="float" office:value="9" calcext:value-type="float">
            <text:p>9</text:p>
          </table:table-cell>
          <table:table-cell table:style-name="ce33" table:formula="of:=[.$AD$4]+[.$U$3]" office:value-type="float" office:value="6" calcext:value-type="float">
            <text:p>6</text:p>
          </table:table-cell>
          <table:table-cell table:style-name="ce33" table:formula="of:=[.$AE$4]+[.$U$3]+[.$U$4]" office:value-type="float" office:value="12" calcext:value-type="float">
            <text:p>12</text:p>
          </table:table-cell>
          <table:table-cell table:style-name="ce44"/>
          <table:table-cell table:style-name="ce10" table:formula="of:=[.$AA$4]+[.$U$3]" office:value-type="float" office:value="14" calcext:value-type="float">
            <text:p>14</text:p>
          </table:table-cell>
          <table:table-cell table:style-name="ce22" table:formula="of:=[.$AB$4]+[.$U$2]" office:value-type="float" office:value="12" calcext:value-type="float">
            <text:p>12</text:p>
          </table:table-cell>
          <table:table-cell table:style-name="ce27" table:formula="of:=[.$AC$4]+[.$U$3]" office:value-type="float" office:value="9" calcext:value-type="float">
            <text:p>9</text:p>
          </table:table-cell>
          <table:table-cell table:style-name="ce33" table:formula="of:=[.$AD$4]+[.$U$4]" office:value-type="float" office:value="5" calcext:value-type="float">
            <text:p>5</text:p>
          </table:table-cell>
          <table:table-cell table:style-name="ce33" table:formula="of:=[.$AE$4]+[.$U$4]" office:value-type="float" office:value="10" calcext:value-type="float">
            <text:p>10</text:p>
          </table:table-cell>
          <table:table-cell table:style-name="ce44"/>
          <table:table-cell table:style-name="ce10" table:formula="of:=[.$AA$4]+[.$U$3]" office:value-type="float" office:value="14" calcext:value-type="float">
            <text:p>14</text:p>
          </table:table-cell>
          <table:table-cell table:style-name="ce22" table:formula="of:=[.$AB$4]+[.$U$3]" office:value-type="float" office:value="13" calcext:value-type="float">
            <text:p>13</text:p>
          </table:table-cell>
          <table:table-cell table:style-name="ce27" table:formula="of:=[.$AC$4]+[.$U$2]" office:value-type="float" office:value="8" calcext:value-type="float">
            <text:p>8</text:p>
          </table:table-cell>
          <table:table-cell table:style-name="ce33" table:formula="of:=[.$AD$4]+[.$U$4]" office:value-type="float" office:value="5" calcext:value-type="float">
            <text:p>5</text:p>
          </table:table-cell>
          <table:table-cell table:style-name="ce33" table:formula="of:=[.$AE$4]+[.$U$4]" office:value-type="float" office:value="10" calcext:value-type="float">
            <text:p>10</text:p>
          </table:table-cell>
          <table:table-cell table:style-name="ce44"/>
          <table:table-cell table:style-name="ce10" table:formula="of:=[.$AA$4]+[.$U$4]" office:value-type="float" office:value="13" calcext:value-type="float">
            <text:p>13</text:p>
          </table:table-cell>
          <table:table-cell table:style-name="ce22" table:formula="of:=[.$AB$4]+[.$U$4]" office:value-type="float" office:value="12" calcext:value-type="float">
            <text:p>12</text:p>
          </table:table-cell>
          <table:table-cell table:style-name="ce27" table:formula="of:=[.$AC$4]+[.$U$3]" office:value-type="float" office:value="9" calcext:value-type="float">
            <text:p>9</text:p>
          </table:table-cell>
          <table:table-cell table:style-name="ce33" table:formula="of:=[.$AD$4]+[.$U$2]" office:value-type="float" office:value="5" calcext:value-type="float">
            <text:p>5</text:p>
          </table:table-cell>
          <table:table-cell table:style-name="ce33" table:formula="of:=[.$AE$4]+[.$U$2]" office:value-type="float" office:value="10" calcext:value-type="float">
            <text:p>10</text:p>
          </table:table-cell>
          <table:table-cell table:style-name="ce44"/>
          <table:table-cell table:style-name="ce10" table:formula="of:=[.$AA$4]+[.$U$3]+[.$U$4]" office:value-type="float" office:value="15" calcext:value-type="float">
            <text:p>15</text:p>
          </table:table-cell>
          <table:table-cell table:style-name="ce22" table:formula="of:=[.$AB$4]+[.$U$3]+[.$U$4]" office:value-type="float" office:value="14" calcext:value-type="float">
            <text:p>14</text:p>
          </table:table-cell>
          <table:table-cell table:style-name="ce27" table:formula="of:=[.$AC$4]+[.$U$3]" office:value-type="float" office:value="9" calcext:value-type="float">
            <text:p>9</text:p>
          </table:table-cell>
          <table:table-cell table:style-name="ce33" table:formula="of:=[.$AD$4]+[.$U$2]" office:value-type="float" office:value="5" calcext:value-type="float">
            <text:p>5</text:p>
          </table:table-cell>
          <table:table-cell table:style-name="ce33" table:formula="of:=[.$AE$4]+[.$U$2]" office:value-type="float" office:value="10" calcext:value-type="float">
            <text:p>10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12, &quot;4&quot;: 15, &quot;5&quot;: 5, &quot;6&quot;: 2, &quot;7&quot;: 1, &quot;8&quot;: 0, &quot;9&quot;: 8, &quot;10&quot;: 14, &quot;11&quot;: 13, &quot;12&quot;: 8, &quot;13&quot;: 5, &quot;14&quot;: 10}" calcext:value-type="string">
            <text:p>"7": { "0": 16, "1": 8, "2": 4, "3": 12, "4": 15, "5": 5, "6": 2, "7": 1, "8": 0, "9": 8, "10": 14, "11": 13, "12": 8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16, &quot;1&quot;: 6, &quot;2&quot;: 3, &quot;3&quot;: 11, &quot;4&quot;: 14, &quot;5&quot;: 5, &quot;6&quot;: 2, &quot;7&quot;: 1, &quot;8&quot;: 0, &quot;9&quot;: 9, &quot;10&quot;: 13, &quot;11&quot;: 12, &quot;12&quot;: 9, &quot;13&quot;: 5, &quot;14&quot;: 10}" calcext:value-type="string">
            <text:p>"8": { "0": 16, "1": 6, "2": 3, "3": 11, "4": 14, "5": 5, "6": 2, "7": 1, "8": 0, "9": 9, "10": 13, "11": 12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0" table:formula="of:=COM.MICROSOFT.CONCAT(&quot;&quot;&quot;&quot;;[.$E$2]; &quot;&quot;&quot;: &quot;; [.E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R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U16])" office:value-type="string" office:string-value="&quot;1&quot;: 6" calcext:value-type="string">
            <text:p>"1": 6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31" table:formula="of:=COM.MICROSOFT.CONCAT(&quot;&quot;&quot;&quot;;[.$D$2]; &quot;&quot;&quot;: &quot;; [.AB16])" office:value-type="string" office:string-value="&quot;2&quot;: 5" calcext:value-type="string">
            <text:p>"2": 5</text:p>
          </table:table-cell>
          <table:table-cell table:style-name="ce10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15, &quot;1&quot;: 9, &quot;2&quot;: 5, &quot;3&quot;: 11, &quot;4&quot;: 14, &quot;5&quot;: 6, &quot;6&quot;: 3, &quot;7&quot;: 2, &quot;8&quot;: 1, &quot;9&quot;: 8, &quot;10&quot;: 15, &quot;11&quot;: 14, &quot;12&quot;: 9, &quot;13&quot;: 5, &quot;14&quot;: 10}" calcext:value-type="string">
            <text:p>"9": { "0": 15, "1": 9, "2": 5, "3": 11, "4": 14, "5": 6, "6": 3, "7": 2, "8": 1, "9": 8, "10": 15, "11": 14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I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O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V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5" calcext:value-type="string">
            <text:p>"10": 15</text:p>
          </table:table-cell>
          <table:table-cell table:style-name="ce100" table:formula="of:=COM.MICROSOFT.CONCAT(&quot;&quot;&quot;&quot;;[.$C$4]; &quot;&quot;&quot;: &quot;; [.AA18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0" calcext:value-type="string">
            <text:p>"14": 10</text:p>
          </table:table-cell>
          <table:table-cell/>
          <table:table-cell table:formula="of:=COM.MICROSOFT.TEXTJOIN(&quot;, &quot;;TRUE();[.AF16:.AF20])" office:value-type="string" office:string-value="&quot;5&quot;: { &quot;0&quot;: 15, &quot;1&quot;: 8, &quot;2&quot;: 5, &quot;3&quot;: 12, &quot;4&quot;: 16, &quot;5&quot;: 5, &quot;6&quot;: 2, &quot;7&quot;: 1, &quot;8&quot;: 0, &quot;9&quot;: 9, &quot;10&quot;: 13, &quot;11&quot;: 13, &quot;12&quot;: 9, &quot;13&quot;: 6, &quot;14&quot;: 12}, 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, &quot;7&quot;: { &quot;0&quot;: 16, &quot;1&quot;: 8, &quot;2&quot;: 4, &quot;3&quot;: 12, &quot;4&quot;: 15, &quot;5&quot;: 5, &quot;6&quot;: 2, &quot;7&quot;: 1, &quot;8&quot;: 0, &quot;9&quot;: 8, &quot;10&quot;: 14, &quot;11&quot;: 13, &quot;12&quot;: 8, &quot;13&quot;: 5, &quot;14&quot;: 10}, &quot;8&quot;: { &quot;0&quot;: 16, &quot;1&quot;: 6, &quot;2&quot;: 3, &quot;3&quot;: 11, &quot;4&quot;: 14, &quot;5&quot;: 5, &quot;6&quot;: 2, &quot;7&quot;: 1, &quot;8&quot;: 0, &quot;9&quot;: 9, &quot;10&quot;: 13, &quot;11&quot;: 12, &quot;12&quot;: 9, &quot;13&quot;: 5, &quot;14&quot;: 10}, &quot;9&quot;: { &quot;0&quot;: 15, &quot;1&quot;: 9, &quot;2&quot;: 5, &quot;3&quot;: 11, &quot;4&quot;: 14, &quot;5&quot;: 6, &quot;6&quot;: 3, &quot;7&quot;: 2, &quot;8&quot;: 1, &quot;9&quot;: 8, &quot;10&quot;: 15, &quot;11&quot;: 14, &quot;12&quot;: 9, &quot;13&quot;: 5, &quot;14&quot;: 10}" calcext:value-type="string">
            <text:p>"5": { "0": 15, "1": 8, "2": 5, "3": 12, "4": 16, "5": 5, "6": 2, "7": 1, "8": 0, "9": 9, "10": 13, "11": 13, "12": 9, "13": 6, "14": 12}, "6": { "0": 16, "1": 7, "2": 3, "3": 12, "4": 16, "5": 5, "6": 2, "7": 1, "8": 0, "9": 9, "10": 14, "11": 12, "12": 9, "13": 5, "14": 10}, "7": { "0": 16, "1": 8, "2": 4, "3": 12, "4": 15, "5": 5, "6": 2, "7": 1, "8": 0, "9": 8, "10": 14, "11": 13, "12": 8, "13": 5, "14": 10}, "8": { "0": 16, "1": 6, "2": 3, "3": 11, "4": 14, "5": 5, "6": 2, "7": 1, "8": 0, "9": 9, "10": 13, "11": 12, "12": 9, "13": 5, "14": 10}, "9": { "0": 15, "1": 9, "2": 5, "3": 11, "4": 14, "5": 6, "6": 3, "7": 2, "8": 1, "9": 8, "10": 15, "11": 14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7" table:formula="of:=[.$AA$2]+[.$U$2]+[.$U$4]" office:value-type="float" office:value="16" calcext:value-type="float">
            <text:p>16</text:p>
          </table:table-cell>
          <table:table-cell table:style-name="ce24" table:formula="of:=[.$AB$2]+[.$U$3]+[.$U$4]" office:value-type="float" office:value="9" calcext:value-type="float">
            <text:p>9</text:p>
          </table:table-cell>
          <table:table-cell table:style-name="ce29" table:formula="of:=[.$AC$2]+[.$U$3]+[.$U$4]" office:value-type="float" office:value="6" calcext:value-type="float">
            <text:p>6</text:p>
          </table:table-cell>
          <table:table-cell table:style-name="ce39" table:formula="of:=[.$AD$2]+[.$U$3]+[.$U$4]" office:value-type="float" office:value="13" calcext:value-type="float">
            <text:p>13</text:p>
          </table:table-cell>
          <table:table-cell table:style-name="ce39" table:formula="of:=[.$AE$2]+[.$U$4]+[.$U$3]" office:value-type="float" office:value="16" calcext:value-type="float">
            <text:p>16</text:p>
          </table:table-cell>
          <table:table-cell table:style-name="ce46"/>
          <table:table-cell table:style-name="ce17" table:formula="of:=[.$AA$2]+[.$U$3]+[.$U$4]" office:value-type="float" office:value="17" calcext:value-type="float">
            <text:p>17</text:p>
          </table:table-cell>
          <table:table-cell table:style-name="ce24" table:formula="of:=[.$AB$2]+[.$U$2]+[.$U$4]" office:value-type="float" office:value="8" calcext:value-type="float">
            <text:p>8</text:p>
          </table:table-cell>
          <table:table-cell table:style-name="ce29" table:formula="of:=[.$AC$2]+[.$U$3]+[.$U$4]" office:value-type="float" office:value="6" calcext:value-type="float">
            <text:p>6</text:p>
          </table:table-cell>
          <table:table-cell table:style-name="ce39" table:formula="of:=[.$AD$2]+[.$U$3]+[.$U$4]" office:value-type="float" office:value="13" calcext:value-type="float">
            <text:p>13</text:p>
          </table:table-cell>
          <table:table-cell table:style-name="ce39" table:formula="of:=[.$AE$2]+[.$U$4]+[.$U$3]" office:value-type="float" office:value="16" calcext:value-type="float">
            <text:p>16</text:p>
          </table:table-cell>
          <table:table-cell table:style-name="ce46"/>
          <table:table-cell table:style-name="ce17" table:formula="of:=[.$AA$2]+[.$U$3]+[.$U$4]" office:value-type="float" office:value="17" calcext:value-type="float">
            <text:p>17</text:p>
          </table:table-cell>
          <table:table-cell table:style-name="ce24" table:formula="of:=[.$AB$2]+[.$U$3]+[.$U$4]" office:value-type="float" office:value="9" calcext:value-type="float">
            <text:p>9</text:p>
          </table:table-cell>
          <table:table-cell table:style-name="ce29" table:formula="of:=[.$AC$2]+[.$U$2]+[.$U$4]" office:value-type="float" office:value="5" calcext:value-type="float">
            <text:p>5</text:p>
          </table:table-cell>
          <table:table-cell table:style-name="ce39" table:formula="of:=[.$AD$2]+[.$U$3]+[.$U$4]" office:value-type="float" office:value="13" calcext:value-type="float">
            <text:p>13</text:p>
          </table:table-cell>
          <table:table-cell table:style-name="ce39" table:formula="of:=[.$AE$2]+[.$U$4]+[.$U$3]" office:value-type="float" office:value="16" calcext:value-type="float">
            <text:p>16</text:p>
          </table:table-cell>
          <table:table-cell table:style-name="ce46"/>
          <table:table-cell table:style-name="ce17" table:formula="of:=[.$AA$2]+[.$U$3]+[.$U$4]" office:value-type="float" office:value="17" calcext:value-type="float">
            <text:p>17</text:p>
          </table:table-cell>
          <table:table-cell table:style-name="ce24" table:formula="of:=[.$AB$2]+[.$U$3]+[.$U$4]" office:value-type="float" office:value="9" calcext:value-type="float">
            <text:p>9</text:p>
          </table:table-cell>
          <table:table-cell table:style-name="ce29" table:formula="of:=[.$AC$2]+[.$U$3]+[.$U$4]" office:value-type="float" office:value="6" calcext:value-type="float">
            <text:p>6</text:p>
          </table:table-cell>
          <table:table-cell table:style-name="ce39" table:formula="of:=[.$AD$2]+[.$U$2]+[.$U$4]" office:value-type="float" office:value="12" calcext:value-type="float">
            <text:p>12</text:p>
          </table:table-cell>
          <table:table-cell table:style-name="ce39" table:formula="of:=[.$AE$2]+[.$U$4]+[.$U$2]" office:value-type="float" office:value="15" calcext:value-type="float">
            <text:p>15</text:p>
          </table:table-cell>
          <table:table-cell table:style-name="ce46"/>
          <table:table-cell table:style-name="ce17" table:formula="of:=[.$AA$2]+[.$U$3]+[.$U$4]" office:value-type="float" office:value="17" calcext:value-type="float">
            <text:p>17</text:p>
          </table:table-cell>
          <table:table-cell table:style-name="ce24" table:formula="of:=[.$AB$2]+[.$U$3]+[.$U$4]" office:value-type="float" office:value="9" calcext:value-type="float">
            <text:p>9</text:p>
          </table:table-cell>
          <table:table-cell table:style-name="ce29" table:formula="of:=[.$AC$2]+[.$U$3]+[.$U$4]" office:value-type="float" office:value="6" calcext:value-type="float">
            <text:p>6</text:p>
          </table:table-cell>
          <table:table-cell table:style-name="ce39" table:formula="of:=[.$AD$2]+[.$U$2]+[.$U$4]" office:value-type="float" office:value="12" calcext:value-type="float">
            <text:p>12</text:p>
          </table:table-cell>
          <table:table-cell table:style-name="ce39" table:formula="of:=[.$AE$2]+[.$U$2]+[.$U$4]" office:value-type="float" office:value="15" calcext:value-type="float">
            <text:p>1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6, &quot;3&quot;: 13, &quot;4&quot;: 16, &quot;5&quot;: 6, &quot;6&quot;: 4, &quot;7&quot;: 3, &quot;8&quot;: 3, &quot;9&quot;: 11, &quot;10&quot;: 12, &quot;11&quot;: 2, &quot;12&quot;: 1, &quot;13&quot;: 1, &quot;14&quot;: 9}" calcext:value-type="string">
            <text:p>"10": { "0": 16, "1": 9, "2": 6, "3": 13, "4": 16, "5": 6, "6": 4, "7": 3, "8": 3, "9": 11, "10": 12, "11": 2, "12": 1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A$3]+[.$U$2]" office:value-type="float" office:value="6" calcext:value-type="float">
            <text:p>6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2" table:formula="of:=[.$AD$3]+[.$U$3]+[.$U$4]" office:value-type="float" office:value="3" calcext:value-type="float">
            <text:p>3</text:p>
          </table:table-cell>
          <table:table-cell table:style-name="ce32" table:formula="of:=[.$AE$3]+[.$U$4]+[.$U$3]" office:value-type="float" office:value="11" calcext:value-type="float">
            <text:p>11</text:p>
          </table:table-cell>
          <table:table-cell/>
          <table:table-cell table:style-name="ce9" table:formula="of:=[.$AA$3]+[.$U$3]+[.$U$4]" office:value-type="float" office:value="8" calcext:value-type="float">
            <text:p>8</text:p>
          </table:table-cell>
          <table:table-cell table:style-name="ce21" table:formula="of:=[.$AB$3]+[.$U$2]" office:value-type="float" office:value="3" calcext:value-type="float">
            <text:p>3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2" table:formula="of:=[.$AD$3]+[.$U$3]" office:value-type="float" office:value="2" calcext:value-type="float">
            <text:p>2</text:p>
          </table:table-cell>
          <table:table-cell table:style-name="ce32" table:formula="of:=[.$AE$3]+[.$U$4]+[.$U$3]" office:value-type="float" office:value="11" calcext:value-type="float">
            <text:p>11</text:p>
          </table:table-cell>
          <table:table-cell/>
          <table:table-cell table:style-name="ce9" table:formula="of:=[.$AA$3]+[.$U$3]+[.$U$4]" office:value-type="float" office:value="8" calcext:value-type="float">
            <text:p>8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2]" office:value-type="float" office:value="2" calcext:value-type="float">
            <text:p>2</text:p>
          </table:table-cell>
          <table:table-cell table:style-name="ce32" table:formula="of:=[.$AD$3]+[.$U$3]" office:value-type="float" office:value="2" calcext:value-type="float">
            <text:p>2</text:p>
          </table:table-cell>
          <table:table-cell table:style-name="ce32" table:formula="of:=[.$AE$3]+[.$U$4]+[.$U$3]" office:value-type="float" office:value="11" calcext:value-type="float">
            <text:p>11</text:p>
          </table:table-cell>
          <table:table-cell/>
          <table:table-cell table:style-name="ce9" table:formula="of:=[.$AA$3]+[.$U$3]" office:value-type="float" office:value="7" calcext:value-type="float">
            <text:p>7</text:p>
          </table:table-cell>
          <table:table-cell table:style-name="ce21" table:formula="of:=[.$AB$3]+[.$U$3]" office:value-type="float" office:value="4" calcext:value-type="float">
            <text:p>4</text:p>
          </table:table-cell>
          <table:table-cell table:style-name="ce26" table:formula="of:=[.$AC$3]+[.$U$3]" office:value-type="float" office:value="3" calcext:value-type="float">
            <text:p>3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formula="of:=[.$AE$3]+[.$U$2]" office:value-type="float" office:value="9" calcext:value-type="float">
            <text:p>9</text:p>
          </table:table-cell>
          <table:table-cell/>
          <table:table-cell table:style-name="ce9" table:formula="of:=[.$AA$3]+[.$U$3]+[.$U$4]" office:value-type="float" office:value="8" calcext:value-type="float">
            <text:p>8</text:p>
          </table:table-cell>
          <table:table-cell table:style-name="ce21" table:formula="of:=[.$AB$3]+[.$U$4]+[.$U$3]" office:value-type="float" office:value="5" calcext:value-type="float">
            <text:p>5</text:p>
          </table:table-cell>
          <table:table-cell table:style-name="ce26" table:formula="of:=[.$AC$3]+[.$U$4]+[.$U$3]" office:value-type="float" office:value="4" calcext:value-type="float">
            <text:p>4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style-name="ce32" table:formula="of:=[.$AE$3]+[.$U$2]" office:value-type="float" office:value="9" calcext:value-type="float">
            <text:p>9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6, &quot;3&quot;: 13, &quot;4&quot;: 16, &quot;5&quot;: 8, &quot;6&quot;: 3, &quot;7&quot;: 3, &quot;8&quot;: 2, &quot;9&quot;: 11, &quot;10&quot;: 5, &quot;11&quot;: 11, &quot;12&quot;: 1, &quot;13&quot;: 0, &quot;14&quot;: 9}" calcext:value-type="string">
            <text:p>"11": { "0": 17, "1": 8, "2": 6, "3": 13, "4": 16, "5": 8, "6": 3, "7": 3, "8": 2, "9": 11, "10": 5, "11": 11, "12": 1, "13": 0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8" table:formula="of:=[.$AA$4]" office:value-type="float" office:value="12" calcext:value-type="float">
            <text:p>12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6" table:formula="of:=[.$AC$3]" office:value-type="float" office:value="1" calcext:value-type="float">
            <text:p>1</text:p>
          </table:table-cell>
          <table:table-cell table:style-name="ce32" table:formula="of:=[.$AD$3]+[.$U$4]" office:value-type="float" office:value="1" calcext:value-type="float">
            <text:p>1</text:p>
          </table:table-cell>
          <table:table-cell table:style-name="ce37" table:formula="of:=[.$AE$3]+[.$U$4]" office:value-type="float" office:value="9" calcext:value-type="float">
            <text:p>9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8" table:formula="of:=[.$AB$4]" office:value-type="float" office:value="11" calcext:value-type="float">
            <text:p>11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37" table:formula="of:=[.$AD$3]" office:value-type="float" office:value="0" calcext:value-type="float">
            <text:p>0</text:p>
          </table:table-cell>
          <table:table-cell table:style-name="ce32" table:formula="of:=[.$AE$3]+[.$U$4]" office:value-type="float" office:value="9" calcext:value-type="float">
            <text:p>9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8" table:formula="of:=[.$AC$4]" office:value-type="float" office:value="7" calcext:value-type="float">
            <text:p>7</text:p>
          </table:table-cell>
          <table:table-cell table:formula="of:=[.$AD$3]" office:value-type="float" office:value="0" calcext:value-type="float">
            <text:p>0</text:p>
          </table:table-cell>
          <table:table-cell table:style-name="ce32" table:formula="of:=[.$AE$3]+[.$U$3]" office:value-type="float" office:value="10" calcext:value-type="float">
            <text:p>10</text:p>
          </table:table-cell>
          <table:table-cell/>
          <table:table-cell table:style-name="ce47" table:formula="of:=[.$AA$3]" office:value-type="float" office:value="5" calcext:value-type="float">
            <text:p>5</text:p>
          </table:table-cell>
          <table:table-cell table:style-name="ce20" table:formula="of:=[.$AB$3]" office:value-type="float" office:value="2" calcext:value-type="float">
            <text:p>2</text:p>
          </table:table-cell>
          <table:table-cell table:style-name="ce25" table:formula="of:=[.$AC$3]" office:value-type="float" office:value="1" calcext:value-type="float">
            <text:p>1</text:p>
          </table:table-cell>
          <table:table-cell table:style-name="ce8" table:formula="of:=[.$AD$4]" office:value-type="float" office:value="4" calcext:value-type="float">
            <text:p>4</text:p>
          </table:table-cell>
          <table:table-cell table:formula="of:=[.$AE$3]+[.$U$2]" office:value-type="float" office:value="9" calcext:value-type="float">
            <text:p>9</text:p>
          </table:table-cell>
          <table:table-cell/>
          <table:table-cell table:style-name="ce9" table:formula="of:=[.$AA$3]+[.$U$4]+[.$U$3]" office:value-type="float" office:value="8" calcext:value-type="float">
            <text:p>8</text:p>
          </table:table-cell>
          <table:table-cell table:style-name="ce21" table:formula="of:=[.$AB$3]+[.$U$4]+[.$U$3]" office:value-type="float" office:value="5" calcext:value-type="float">
            <text:p>5</text:p>
          </table:table-cell>
          <table:table-cell table:style-name="ce26" table:formula="of:=[.$AC$3]+[.$U$4]+[.$U$3]" office:value-type="float" office:value="4" calcext:value-type="float">
            <text:p>4</text:p>
          </table:table-cell>
          <table:table-cell table:style-name="ce32" table:formula="of:=[.$AD$3]+[.$U$2]" office:value-type="float" office:value="1" calcext:value-type="float">
            <text:p>1</text:p>
          </table:table-cell>
          <table:table-cell table:style-name="ce8" table:formula="of:=[.$AE$4]" office:value-type="float" office:value="9" calcext:value-type="float">
            <text:p>9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3, &quot;4&quot;: 16, &quot;5&quot;: 8, &quot;6&quot;: 4, &quot;7&quot;: 2, &quot;8&quot;: 2, &quot;9&quot;: 11, &quot;10&quot;: 5, &quot;11&quot;: 2, &quot;12&quot;: 7, &quot;13&quot;: 0, &quot;14&quot;: 10}" calcext:value-type="string">
            <text:p>"12": { "0": 17, "1": 9, "2": 5, "3": 13, "4": 16, "5": 8, "6": 4, "7": 2, "8": 2, "9": 11, "10": 5, "11": 2, "12": 7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6, &quot;3&quot;: 12, &quot;4&quot;: 15, &quot;5&quot;: 7, &quot;6&quot;: 4, &quot;7&quot;: 3, &quot;8&quot;: 1, &quot;9&quot;: 9, &quot;10&quot;: 5, &quot;11&quot;: 2, &quot;12&quot;: 1, &quot;13&quot;: 4, &quot;14&quot;: 9}" calcext:value-type="string">
            <text:p>"13": { "0": 17, "1": 9, "2": 6, "3": 12, "4": 15, "5": 7, "6": 4, "7": 3, "8": 1, "9": 9, "10": 5, "11": 2, "12": 1, "13": 4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E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K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W24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" calcext:value-type="string">
            <text:p>"14": { "0": 17, "1": 9, "2": 6, "3": 12, "4": 15, "5": 8, "6": 5, "7": 4, "8": 1, "9": 9, "10": 8, "11": 5, "12": 4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D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E25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F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L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U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9" calcext:value-type="string">
            <text:p>"9": 9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25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9" calcext:value-type="string">
            <text:p>"9": 9</text:p>
          </table:table-cell>
          <table:table-cell table:number-columns-repeated="34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11" calcext:value-type="string">
            <text:p>"11": 11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7" calcext:value-type="string">
            <text:p>"12": 7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26])" office:value-type="string" office:string-value="&quot;11&quot;: 5" calcext:value-type="string">
            <text:p>"11": 5</text:p>
          </table:table-cell>
          <table:table-cell table:style-name="ce103" table:formula="of:=COM.MICROSOFT.CONCAT(&quot;&quot;&quot;&quot;;[.$D$4]; &quot;&quot;&quot;: &quot;; [.AB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9" calcext:value-type="string">
            <text:p>"14": 9</text:p>
          </table:table-cell>
          <table:table-cell/>
          <table:table-cell table:formula="of:=COM.MICROSOFT.TEXTJOIN(&quot;, &quot;;TRUE();[.AF24:.AF28])" office:value-type="string" office:string-value="&quot;10&quot;: { &quot;0&quot;: 16, &quot;1&quot;: 9, &quot;2&quot;: 6, &quot;3&quot;: 13, &quot;4&quot;: 16, &quot;5&quot;: 6, &quot;6&quot;: 4, &quot;7&quot;: 3, &quot;8&quot;: 3, &quot;9&quot;: 11, &quot;10&quot;: 12, &quot;11&quot;: 2, &quot;12&quot;: 1, &quot;13&quot;: 1, &quot;14&quot;: 9}, &quot;11&quot;: { &quot;0&quot;: 17, &quot;1&quot;: 8, &quot;2&quot;: 6, &quot;3&quot;: 13, &quot;4&quot;: 16, &quot;5&quot;: 8, &quot;6&quot;: 3, &quot;7&quot;: 3, &quot;8&quot;: 2, &quot;9&quot;: 11, &quot;10&quot;: 5, &quot;11&quot;: 11, &quot;12&quot;: 1, &quot;13&quot;: 0, &quot;14&quot;: 9}, &quot;12&quot;: { &quot;0&quot;: 17, &quot;1&quot;: 9, &quot;2&quot;: 5, &quot;3&quot;: 13, &quot;4&quot;: 16, &quot;5&quot;: 8, &quot;6&quot;: 4, &quot;7&quot;: 2, &quot;8&quot;: 2, &quot;9&quot;: 11, &quot;10&quot;: 5, &quot;11&quot;: 2, &quot;12&quot;: 7, &quot;13&quot;: 0, &quot;14&quot;: 10}, &quot;13&quot;: { &quot;0&quot;: 17, &quot;1&quot;: 9, &quot;2&quot;: 6, &quot;3&quot;: 12, &quot;4&quot;: 15, &quot;5&quot;: 7, &quot;6&quot;: 4, &quot;7&quot;: 3, &quot;8&quot;: 1, &quot;9&quot;: 9, &quot;10&quot;: 5, &quot;11&quot;: 2, &quot;12&quot;: 1, &quot;13&quot;: 4, &quot;14&quot;: 9}, 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" calcext:value-type="string">
            <text:p>"10": { "0": 16, "1": 9, "2": 6, "3": 13, "4": 16, "5": 6, "6": 4, "7": 3, "8": 3, "9": 11, "10": 12, "11": 2, "12": 1, "13": 1, "14": 9}, "11": { "0": 17, "1": 8, "2": 6, "3": 13, "4": 16, "5": 8, "6": 3, "7": 3, "8": 2, "9": 11, "10": 5, "11": 11, "12": 1, "13": 0, "14": 9}, "12": { "0": 17, "1": 9, "2": 5, "3": 13, "4": 16, "5": 8, "6": 4, "7": 2, "8": 2, "9": 11, "10": 5, "11": 2, "12": 7, "13": 0, "14": 10}, "13": { "0": 17, "1": 9, "2": 6, "3": 12, "4": 15, "5": 7, "6": 4, "7": 3, "8": 1, "9": 9, "10": 5, "11": 2, "12": 1, "13": 4, "14": 9}, "14": { "0": 17, "1": 9, "2": 6, "3": 12, "4": 15, "5": 8, "6": 5, "7": 4, "8": 1, "9": 9, "10": 8, "11": 5, "12": 4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1, &quot;4&quot;: 9, &quot;5&quot;: 6, &quot;6&quot;: 4, &quot;7&quot;: 3, &quot;8&quot;: 3, &quot;9&quot;: 11, &quot;10&quot;: 14, &quot;11&quot;: 14, &quot;12&quot;: 10, &quot;13&quot;: 7, &quot;14&quot;: 12}, &quot;1&quot;: { &quot;0&quot;: 5, &quot;1&quot;: 6, &quot;2&quot;: 1, &quot;3&quot;: 0, &quot;4&quot;: 9, &quot;5&quot;: 7, &quot;6&quot;: 3, &quot;7&quot;: 3, &quot;8&quot;: 0, &quot;9&quot;: 11, &quot;10&quot;: 15, &quot;11&quot;: 13, &quot;12&quot;: 10, &quot;13&quot;: 7, &quot;14&quot;: 12}, &quot;2&quot;: { &quot;0&quot;: 5, &quot;1&quot;: 2, &quot;2&quot;: 3, &quot;3&quot;: 0, &quot;4&quot;: 10, &quot;5&quot;: 7, &quot;6&quot;: 4, &quot;7&quot;: 2, &quot;8&quot;: 0, &quot;9&quot;: 10, &quot;10&quot;: 15, &quot;11&quot;: 14, &quot;12&quot;: 9, &quot;13&quot;: 7, &quot;14&quot;: 12}, &quot;3&quot;: { &quot;0&quot;: 5, &quot;1&quot;: 2, &quot;2&quot;: 1, &quot;3&quot;: 10, &quot;4&quot;: 9, &quot;5&quot;: 8, &quot;6&quot;: 4, &quot;7&quot;: 3, &quot;8&quot;: 1, &quot;9&quot;: 9, &quot;10&quot;: 15, &quot;11&quot;: 14, &quot;12&quot;: 10, &quot;13&quot;: 6, &quot;14&quot;: 11}, &quot;4&quot;: { &quot;0&quot;: 8, &quot;1&quot;: 5, &quot;2&quot;: 4, &quot;3&quot;: 1, &quot;4&quot;: 13, &quot;5&quot;: 8, `, &quot;7&quot;: 4, &quot;8&quot;: 1, &quot;9&quot;: 9, &quot;10&quot;: 15, &quot;11&quot;: 14, &quot;12&quot;: 10, &quot;13&quot;: 6, &quot;14&quot;: 11}, &quot;5&quot;: { &quot;0&quot;: 15, &quot;1&quot;: 8, &quot;2&quot;: 5, &quot;3&quot;: 12, &quot;4&quot;: 16, &quot;5&quot;: 5, &quot;6&quot;: 2, &quot;7&quot;: 1, &quot;8&quot;: 0, &quot;9&quot;: 9, &quot;10&quot;: 13, &quot;11&quot;: 13, &quot;12&quot;: 9, &quot;13&quot;: 6, &quot;14&quot;: 12}, 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, &quot;7&quot;: { &quot;0&quot;: 16, &quot;1&quot;: 8, &quot;2&quot;: 4, &quot;3&quot;: 12, &quot;4&quot;: 15, &quot;5&quot;: 5, &quot;6&quot;: 2, &quot;7&quot;: 1, &quot;8&quot;: 0, &quot;9&quot;: 8, &quot;10&quot;: 14, &quot;11&quot;: 13, &quot;12&quot;: 8, &quot;13&quot;: 5, &quot;14&quot;: 10}, &quot;8&quot;: { &quot;0&quot;: 16, &quot;1&quot;: 6, &quot;2&quot;: 3, &quot;3&quot;: 11, &quot;4&quot;: 14, &quot;5&quot;: 5, &quot;6&quot;: 2, &quot;7&quot;: 1, &quot;8&quot;: 0, &quot;9&quot;: 9, &quot;10&quot;: 13, &quot;11&quot;: 12, &quot;12&quot;: 9, &quot;13&quot;: 5, &quot;14&quot;: 10}, &quot;9&quot;: { &quot;0&quot;: 15, &quot;1&quot;: 9, &quot;2&quot;: 5, &quot;3&quot;: 11, &quot;4&quot;: 14, &quot;5&quot;: 6, &quot;6&quot;: 3, &quot;7&quot;: 2, &quot;8&quot;: 1, &quot;9&quot;: 8, &quot;10&quot;: 15, &quot;11&quot;: 14, &quot;12&quot;: 9, &quot;13&quot;: 5, &quot;14&quot;: 10}, &quot;10&quot;: { &quot;0&quot;: 16, &quot;1&quot;: 9, &quot;2&quot;: 6, &quot;3&quot;: 13, &quot;4&quot;: 16, &quot;5&quot;: 6, &quot;6&quot;: 4, &quot;7&quot;: 3, &quot;8&quot;: 3, &quot;9&quot;: 11, &quot;10&quot;: 12, &quot;11&quot;: 2, &quot;12&quot;: 1, &quot;13&quot;: 1, &quot;14&quot;: 9}, &quot;11&quot;: { &quot;0&quot;: 17, &quot;1&quot;: 8, &quot;2&quot;: 6, &quot;3&quot;: 13, &quot;4&quot;: 16, &quot;5&quot;: 8, &quot;6&quot;: 3, &quot;7&quot;: 3, &quot;8&quot;: 2, &quot;9&quot;: 11, &quot;10&quot;: 5, &quot;11&quot;: 11, &quot;12&quot;: 1, &quot;13&quot;: 0, &quot;14&quot;: 9}, &quot;12&quot;: { &quot;0&quot;: 17, &quot;1&quot;: 9, &quot;2&quot;: 5, &quot;3&quot;: 13, &quot;4&quot;: 16, &quot;5&quot;: 8, &quot;6&quot;: 4, &quot;7&quot;: 2, &quot;8&quot;: 2, &quot;9&quot;: 11, &quot;10&quot;: 5, &quot;11&quot;: 2, &quot;12&quot;: 7, &quot;13&quot;: 0, &quot;14&quot;: 10}, &quot;13&quot;: { &quot;0&quot;: 17, &quot;1&quot;: 9, &quot;2&quot;: 6, &quot;3&quot;: 12, &quot;4&quot;: 15, &quot;5&quot;: 7, &quot;6&quot;: 4, &quot;7&quot;: 3, &quot;8&quot;: 1, &quot;9&quot;: 9, &quot;10&quot;: 5, &quot;11&quot;: 2, &quot;12&quot;: 1, &quot;13&quot;: 4, &quot;14&quot;: 9}, 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}" calcext:value-type="string">
            <text:p>{"0": { "0": 14, "1": 2, "2": 1, "3": 1, "4": 9, "5": 6, "6": 4, "7": 3, "8": 3, "9": 11, "10": 14, "11": 14, "12": 10, "13": 7, "14": 12}, "1": { "0": 5, "1": 6, "2": 1, "3": 0, "4": 9, "5": 7, "6": 3, "7": 3, "8": 0, "9": 11, "10": 15, "11": 13, "12": 10, "13": 7, "14": 12}, "2": { "0": 5, "1": 2, "2": 3, "3": 0, "4": 10, "5": 7, "6": 4, "7": 2, "8": 0, "9": 10, "10": 15, "11": 14, "12": 9, "13": 7, "14": 12}, "3": { "0": 5, "1": 2, "2": 1, "3": 10, "4": 9, "5": 8, "6": 4, "7": 3, "8": 1, "9": 9, "10": 15, "11": 14, "12": 10, "13": 6, "14": 11}, "4": { "0": 8, "1": 5, "2": 4, "3": 1, "4": 13, "5": 8, `, "7": 4, "8": 1, "9": 9, "10": 15, "11": 14, "12": 10, "13": 6, "14": 11}, "5": { "0": 15, "1": 8, "2": 5, "3": 12, "4": 16, "5": 5, "6": 2, "7": 1, "8": 0, "9": 9, "10": 13, "11": 13, "12": 9, "13": 6, "14": 12}, "6": { "0": 16, "1": 7, "2": 3, "3": 12, "4": 16, "5": 5, "6": 2, "7": 1, "8": 0, "9": 9, "10": 14, "11": 12, "12": 9, "13": 5, "14": 10}, "7": { "0": 16, "1": 8, "2": 4, "3": 12, "4": 15, "5": 5, "6": 2, "7": 1, "8": 0, "9": 8, "10": 14, "11": 13, "12": 8, "13": 5, "14": 10}, "8": { "0": 16, "1": 6, "2": 3, "3": 11, "4": 14, "5": 5, "6": 2, "7": 1, "8": 0, "9": 9, "10": 13, "11": 12, "12": 9, "13": 5, "14": 10}, "9": { "0": 15, "1": 9, "2": 5, "3": 11, "4": 14, "5": 6, "6": 3, "7": 2, "8": 1, "9": 8, "10": 15, "11": 14, "12": 9, "13": 5, "14": 10}, "10": { "0": 16, "1": 9, "2": 6, "3": 13, "4": 16, "5": 6, "6": 4, "7": 3, "8": 3, "9": 11, "10": 12, "11": 2, "12": 1, "13": 1, "14": 9}, "11": { "0": 17, "1": 8, "2": 6, "3": 13, "4": 16, "5": 8, "6": 3, "7": 3, "8": 2, "9": 11, "10": 5, "11": 11, "12": 1, "13": 0, "14": 9}, "12": { "0": 17, "1": 9, "2": 5, "3": 13, "4": 16, "5": 8, "6": 4, "7": 2, "8": 2, "9": 11, "10": 5, "11": 2, "12": 7, "13": 0, "14": 10}, "13": { "0": 17, "1": 9, "2": 6, "3": 12, "4": 15, "5": 7, "6": 4, "7": 3, "8": 1, "9": 9, "10": 5, "11": 2, "12": 1, "13": 4, "14": 9}, "14": { "0": 17, "1": 9, "2": 6, "3": 12, "4": 15, "5": 8, "6": 5, "7": 4, "8": 1, "9": 9, "10": 8, "11": 5, "12": 4, "13": 1, "14": 9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7:54:30.78546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6T22:01:53.191950400</dc:date>
    <meta:generator>LibreOffice/26.2.0.3$Windows_X86_64 LibreOffice_project/620$Build-3</meta:generator>
    <meta:editing-duration>PT11H11M29S</meta:editing-duration>
    <meta:editing-cycles>159</meta:editing-cycles>
    <meta:document-statistic meta:table-count="1" meta:cell-count="524" meta:object-count="0"/>
    <meta:user-defined meta:name="AppVersion">16.0300</meta:user-defined>
  </office:meta>
</office:document-meta>
</file>